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Pictures/10000001000007D10000046675075CCA.png" manifest:media-type="image/png"/>
  <manifest:file-entry manifest:full-path="Pictures/1000000000000101000000642026CBC8.png" manifest:media-type="image/png"/>
  <manifest:file-entry manifest:full-path="Pictures/10000001000007D100000466F7E8660E.png" manifest:media-type="image/png"/>
  <manifest:file-entry manifest:full-path="Pictures/10000000000000E1000000E15CEEF973.jpg" manifest:media-type="image/jpeg"/>
  <manifest:file-entry manifest:full-path="Pictures/10000000000000DC00000068CBE0408A.png" manifest:media-type="image/png"/>
  <manifest:file-entry manifest:full-path="Pictures/100000000000016C00000070BB9818B1.png" manifest:media-type="image/png"/>
  <manifest:file-entry manifest:full-path="Pictures/10000000000000580000005890F3241F.png" manifest:media-type="image/png"/>
  <manifest:file-entry manifest:full-path="Pictures/10000000000000E000000070F6138BEF.jpg" manifest:media-type="image/jpeg"/>
  <manifest:file-entry manifest:full-path="Pictures/100000000000009C0000006149FFC21E.png" manifest:media-type="image/png"/>
  <manifest:file-entry manifest:full-path="Pictures/100000000000006E0000005FC01015FA.jpg" manifest:media-type="image/jpeg"/>
  <manifest:file-entry manifest:full-path="Pictures/10000000000000DE0000005C0BDA0805.png" manifest:media-type="image/png"/>
  <manifest:file-entry manifest:full-path="Pictures/100000000000013C000000B0D4050415.png" manifest:media-type="image/png"/>
  <manifest:file-entry manifest:full-path="Pictures/100000010000029F00000213F683F901.png" manifest:media-type="image/png"/>
  <manifest:file-entry manifest:full-path="Pictures/10000001000000460000005A0BC6759B.png" manifest:media-type="image/png"/>
  <manifest:file-entry manifest:full-path="Pictures/10000001000002B200000214E4FD8AE1.png" manifest:media-type="image/png"/>
  <manifest:file-entry manifest:full-path="Pictures/1000000000000058000000543A51F688.png" manifest:media-type="image/png"/>
  <manifest:file-entry manifest:full-path="Pictures/1000000100000261000001DB7C673B72.png" manifest:media-type="image/png"/>
  <manifest:file-entry manifest:full-path="Pictures/100000010000024B0000020A4A75515E.png" manifest:media-type="image/png"/>
  <manifest:file-entry manifest:full-path="Pictures/10000001000000580000005DAFEBAFA7.png" manifest:media-type="image/png"/>
  <manifest:file-entry manifest:full-path="Pictures/10000001000002EA00000180524DAC52.png" manifest:media-type="image/png"/>
  <manifest:file-entry manifest:full-path="Pictures/10000001000002BC000000F2ADC5241A.png" manifest:media-type="image/png"/>
  <manifest:file-entry manifest:full-path="Pictures/10000000000007D10000046614069405.jpg" manifest:media-type="image/jpeg"/>
  <manifest:file-entry manifest:full-path="Pictures/10000001000001C60000016F22825850.png" manifest:media-type="image/png"/>
  <manifest:file-entry manifest:full-path="Pictures/10000001000000420000004ADBBB7DE6.png" manifest:media-type="image/png"/>
  <manifest:file-entry manifest:full-path="Pictures/1000000100000077000000DD6F876B4B.png" manifest:media-type="image/png"/>
  <manifest:file-entry manifest:full-path="Pictures/1000000100000077000000CC695F4D0B.png" manifest:media-type="image/png"/>
  <manifest:file-entry manifest:full-path="Pictures/1000000100000077000000FBCBE2DDB6.png" manifest:media-type="image/png"/>
  <manifest:file-entry manifest:full-path="Pictures/1000000100000077000000C441180F59.png" manifest:media-type="image/png"/>
  <manifest:file-entry manifest:full-path="Pictures/10000001000000630000005E025859FE.png" manifest:media-type="image/png"/>
  <manifest:file-entry manifest:full-path="Pictures/10000001000000630000004EF963BFDE.png" manifest:media-type="image/png"/>
  <manifest:file-entry manifest:full-path="Pictures/10000001000000630000005D80A917C9.png" manifest:media-type="image/png"/>
  <manifest:file-entry manifest:full-path="Pictures/100000010000006300000068E733001D.png" manifest:media-type="image/png"/>
  <manifest:file-entry manifest:full-path="Pictures/100000010000005800000054404C21DA.png" manifest:media-type="image/png"/>
  <manifest:file-entry manifest:full-path="Pictures/100000010000006E0000006E5A050D2A.png" manifest:media-type="image/png"/>
  <manifest:file-entry manifest:full-path="Pictures/100000010000008400000084E24670FD.png" manifest:media-type="image/png"/>
  <manifest:file-entry manifest:full-path="Pictures/1000000100000058000000576C3B6CC0.png" manifest:media-type="image/png"/>
  <manifest:file-entry manifest:full-path="Pictures/1000000100000058000000566AEFA739.png" manifest:media-type="image/png"/>
  <manifest:file-entry manifest:full-path="Pictures/100000010000005800000058C9347651.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ce style:name="Noto Sans" svg:font-family="'Noto Sans'" style:font-family-generic="roman" style:font-pitch="variable"/>
    <style:font-face style:name="Noto Sans SC" svg:font-family="'Noto Sans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ingdings" svg:font-family="Wingdings"/>
    <style:font-face style:name="微软雅黑" svg:font-family="微软雅黑"/>
  </office:font-face-decls>
  <office:automatic-styles>
    <style:style style:name="dp1" style:family="drawing-page"/>
    <style:style style:name="gr1" style:family="graphic" style:parent-style-name="standard">
      <style:graphic-properties draw:stroke="none" draw:fill="solid" draw:fill-color="#ffffff" loext:decorative="false"/>
    </style:style>
    <style:style style:name="gr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3" style:family="graphic" style:parent-style-name="standard">
      <style:graphic-properties draw:stroke="none" draw:fill="none" draw:textarea-horizontal-align="left" draw:textarea-vertical-align="top" draw:auto-grow-height="true" draw:auto-grow-width="true" fo:min-height="0.649cm" fo:min-width="4.913cm" fo:padding-top="0cm" fo:padding-bottom="0cm" fo:padding-left="0cm" fo:padding-right="0cm" loext:decorative="false"/>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2.283cm" fo:min-width="26.688cm" fo:padding-top="0cm" fo:padding-bottom="0cm" fo:padding-left="0cm" fo:padding-right="0cm" loext:decorative="false"/>
      <style:paragraph-properties style:writing-mode="lr-tb"/>
    </style:style>
    <style:style style:name="gr5" style:family="graphic" style:parent-style-name="standard">
      <style:graphic-properties draw:stroke="solid" svg:stroke-width="0.025cm" svg:stroke-color="#f2f2f2" draw:stroke-linejoin="round" svg:stroke-linecap="butt" draw:fill="none" fo:padding-top="0.012cm" fo:padding-bottom="0.012cm" fo:padding-left="0.012cm" fo:padding-right="0.012cm" loext:decorative="false"/>
    </style:style>
    <style:style style:name="gr6" style:family="graphic" style:parent-style-name="standard">
      <style:graphic-properties draw:stroke="none" draw:fill="none" draw:textarea-horizontal-align="left" draw:textarea-vertical-align="top" draw:auto-grow-height="true" draw:auto-grow-width="true" fo:min-height="2.283cm" fo:min-width="9.082cm" fo:padding-top="0cm" fo:padding-bottom="0cm" fo:padding-left="0cm" fo:padding-right="0cm"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552cm" fo:min-width="1.777cm" fo:padding-top="0cm" fo:padding-bottom="0cm" fo:padding-left="0cm" fo:padding-right="0cm" loext:decorative="false"/>
      <style:paragraph-properties style:writing-mode="lr-tb"/>
    </style:style>
    <style:style style:name="gr8" style:family="graphic" style:parent-style-name="standard">
      <style:graphic-properties draw:stroke="none" draw:fill="solid" draw:fill-color="#1b4593" loext:decorative="false"/>
    </style:style>
    <style:style style:name="gr9" style:family="graphic" style:parent-style-name="standard">
      <style:graphic-properties draw:stroke="none" draw:fill="none" draw:textarea-horizontal-align="left" draw:textarea-vertical-align="top" draw:auto-grow-height="true" draw:auto-grow-width="true" fo:min-height="0.75cm" fo:min-width="5.232cm" fo:padding-top="0cm" fo:padding-bottom="0cm" fo:padding-left="0cm" fo:padding-right="0cm"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945cm" fo:min-width="0.846cm" fo:padding-top="0cm" fo:padding-bottom="0cm" fo:padding-left="0cm" fo:padding-right="0cm" loext:decorative="false"/>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649cm" fo:min-width="6.616cm" fo:padding-top="0cm" fo:padding-bottom="0cm" fo:padding-left="0cm" fo:padding-right="0cm" loext:decorative="false"/>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945cm" fo:min-width="0.847cm" fo:padding-top="0cm" fo:padding-bottom="0cm" fo:padding-left="0cm" fo:padding-right="0cm" loext:decorative="false"/>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649cm" fo:min-width="5.991cm" fo:padding-top="0cm" fo:padding-bottom="0cm" fo:padding-left="0cm" fo:padding-right="0cm" loext:decorative="false"/>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75cm" fo:min-width="7.607cm" fo:padding-top="0cm" fo:padding-bottom="0cm" fo:padding-left="0cm" fo:padding-right="0cm" loext:decorative="false"/>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649cm" fo:min-width="4.252cm" fo:padding-top="0cm" fo:padding-bottom="0cm" fo:padding-left="0cm" fo:padding-right="0cm"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649cm" fo:min-width="7.573cm" fo:padding-top="0cm" fo:padding-bottom="0cm" fo:padding-left="0cm" fo:padding-right="0cm" loext:decorative="false"/>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649cm" fo:min-width="5.264cm" fo:padding-top="0cm" fo:padding-bottom="0cm" fo:padding-left="0cm" fo:padding-right="0cm" loext:decorative="false"/>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649cm" fo:min-width="7.162cm" fo:padding-top="0cm" fo:padding-bottom="0cm" fo:padding-left="0cm" fo:padding-right="0cm" loext:decorative="false"/>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649cm" fo:min-width="10.266cm" fo:padding-top="0cm" fo:padding-bottom="0cm" fo:padding-left="0cm" fo:padding-right="0cm" loext:decorative="false"/>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75cm" fo:min-width="5.963cm" fo:padding-top="0cm" fo:padding-bottom="0cm" fo:padding-left="0cm" fo:padding-right="0cm" loext:decorative="false"/>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649cm" fo:min-width="4.264cm" fo:padding-top="0cm" fo:padding-bottom="0cm" fo:padding-left="0cm" fo:padding-right="0cm" loext:decorative="false"/>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649cm" fo:min-width="4.837cm" fo:padding-top="0cm" fo:padding-bottom="0cm" fo:padding-left="0cm" fo:padding-right="0cm" loext:decorative="false"/>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649cm" fo:min-width="6.137cm" fo:padding-top="0cm" fo:padding-bottom="0cm" fo:padding-left="0cm" fo:padding-right="0cm" loext:decorative="false"/>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649cm" fo:min-width="7.849cm" fo:padding-top="0cm" fo:padding-bottom="0cm" fo:padding-left="0cm" fo:padding-right="0cm" loext:decorative="false"/>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649cm" fo:min-width="3.978cm" fo:padding-top="0cm" fo:padding-bottom="0cm" fo:padding-left="0cm" fo:padding-right="0cm" loext:decorative="false"/>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1.309cm" fo:min-width="3.854cm" fo:padding-top="0cm" fo:padding-bottom="0cm" fo:padding-left="0cm" fo:padding-right="0cm" loext:decorative="false"/>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1.309cm" fo:min-width="0.99cm" fo:padding-top="0cm" fo:padding-bottom="0cm" fo:padding-left="0cm" fo:padding-right="0cm" loext:decorative="false"/>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928cm" fo:min-width="20.183cm" fo:padding-top="0cm" fo:padding-bottom="0cm" fo:padding-left="0cm" fo:padding-right="0cm" loext:decorative="false"/>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928cm" fo:min-width="11.02cm" fo:padding-top="0cm" fo:padding-bottom="0cm" fo:padding-left="0cm" fo:padding-right="0cm" loext:decorative="false"/>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928cm" fo:min-width="18.531cm" fo:padding-top="0cm" fo:padding-bottom="0cm" fo:padding-left="0cm" fo:padding-right="0cm" loext:decorative="false"/>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928cm" fo:min-width="17.136cm" fo:padding-top="0cm" fo:padding-bottom="0cm" fo:padding-left="0cm" fo:padding-right="0cm" loext:decorative="false"/>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928cm" fo:min-width="22.689cm" fo:padding-top="0cm" fo:padding-bottom="0cm" fo:padding-left="0cm" fo:padding-right="0cm" loext:decorative="false"/>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928cm" fo:min-width="17.954cm" fo:padding-top="0cm" fo:padding-bottom="0cm" fo:padding-left="0cm" fo:padding-right="0cm" loext:decorative="false"/>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928cm" fo:min-width="16.47cm" fo:padding-top="0cm" fo:padding-bottom="0cm" fo:padding-left="0cm" fo:padding-right="0cm" loext:decorative="false"/>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928cm" fo:min-width="13.969cm" fo:padding-top="0cm" fo:padding-bottom="0cm" fo:padding-left="0cm" fo:padding-right="0cm" loext:decorative="false"/>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1.309cm" fo:min-width="14.06cm" fo:padding-top="0cm" fo:padding-bottom="0cm" fo:padding-left="0cm" fo:padding-right="0cm" loext:decorative="false"/>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2.237cm" fo:min-width="15.613cm" fo:padding-top="0cm" fo:padding-bottom="0cm" fo:padding-left="0cm" fo:padding-right="0cm" loext:decorative="false"/>
      <style:paragraph-properties style:writing-mode="lr-tb"/>
    </style:style>
    <style:style style:name="gr38" style:family="graphic" style:parent-style-name="standard">
      <style:graphic-properties draw:stroke="none" draw:fill="solid" draw:fill-color="#768fbe" loext:decorative="false"/>
    </style:style>
    <style:style style:name="gr39" style:family="graphic" style:parent-style-name="standard">
      <style:graphic-properties draw:stroke="solid" svg:stroke-width="0.067cm" svg:stroke-color="#11306b" draw:stroke-linejoin="round" svg:stroke-linecap="butt" draw:fill="none" fo:padding-top="0.033cm" fo:padding-bottom="0.033cm" fo:padding-left="0.033cm" fo:padding-right="0.033cm" loext:decorative="false"/>
    </style:style>
    <style:style style:name="gr40" style:family="graphic" style:parent-style-name="standard">
      <style:graphic-properties draw:stroke="none" draw:fill="none" draw:textarea-horizontal-align="left" draw:textarea-vertical-align="top" draw:auto-grow-height="true" draw:auto-grow-width="true" fo:min-height="1.309cm" fo:min-width="21.011cm" fo:padding-top="0cm" fo:padding-bottom="0cm" fo:padding-left="0cm" fo:padding-right="0cm" loext:decorative="false"/>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399cm" fo:min-width="1.049cm" fo:padding-top="0cm" fo:padding-bottom="0cm" fo:padding-left="0cm" fo:padding-right="0cm" loext:decorative="false"/>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399cm" fo:min-width="0.694cm" fo:padding-top="0cm" fo:padding-bottom="0cm" fo:padding-left="0cm" fo:padding-right="0cm" loext:decorative="false"/>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399cm" fo:min-width="1.188cm" fo:padding-top="0cm" fo:padding-bottom="0cm" fo:padding-left="0cm" fo:padding-right="0cm" loext:decorative="false"/>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399cm" fo:min-width="0.931cm" fo:padding-top="0cm" fo:padding-bottom="0cm" fo:padding-left="0cm" fo:padding-right="0cm" loext:decorative="false"/>
      <style:paragraph-properties style:writing-mode="lr-tb"/>
    </style:style>
    <style:style style:name="gr45" style:family="graphic" style:parent-style-name="standard">
      <style:graphic-properties draw:stroke="solid" svg:stroke-width="0.067cm" svg:stroke-color="#11306b" draw:stroke-linejoin="round" svg:stroke-linecap="butt" draw:fill="solid" draw:fill-color="#1b4593" fo:padding-top="0.033cm" fo:padding-bottom="0.033cm" fo:padding-left="0.033cm" fo:padding-right="0.033cm" loext:decorative="false"/>
    </style:style>
    <style:style style:name="gr46" style:family="graphic" style:parent-style-name="standard">
      <style:graphic-properties draw:stroke="none" draw:fill="none" draw:textarea-horizontal-align="left" draw:textarea-vertical-align="top" draw:auto-grow-height="true" draw:auto-grow-width="true" fo:min-height="0.399cm" fo:min-width="0.358cm" fo:padding-top="0cm" fo:padding-bottom="0cm" fo:padding-left="0cm" fo:padding-right="0cm" loext:decorative="false"/>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552cm" fo:min-width="3.195cm" fo:padding-top="0cm" fo:padding-bottom="0cm" fo:padding-left="0cm" fo:padding-right="0cm" loext:decorative="false"/>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552cm" fo:min-width="2.349cm" fo:padding-top="0cm" fo:padding-bottom="0cm" fo:padding-left="0cm" fo:padding-right="0cm" loext:decorative="false"/>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552cm" fo:min-width="3.004cm" fo:padding-top="0cm" fo:padding-bottom="0cm" fo:padding-left="0cm" fo:padding-right="0cm" loext:decorative="false"/>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552cm" fo:min-width="4.45cm" fo:padding-top="0cm" fo:padding-bottom="0cm" fo:padding-left="0cm" fo:padding-right="0cm" loext:decorative="false"/>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552cm" fo:min-width="3.521cm" fo:padding-top="0cm" fo:padding-bottom="0cm" fo:padding-left="0cm" fo:padding-right="0cm" loext:decorative="false"/>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552cm" fo:min-width="2.54cm" fo:padding-top="0cm" fo:padding-bottom="0cm" fo:padding-left="0cm" fo:padding-right="0cm" loext:decorative="false"/>
      <style:paragraph-properties style:writing-mode="lr-tb"/>
    </style:style>
    <style:style style:name="gr53" style:family="graphic" style:parent-style-name="standard">
      <style:graphic-properties draw:stroke="none" draw:fill="solid" draw:fill-color="#00d3e4" loext:decorative="false"/>
    </style:style>
    <style:style style:name="gr54" style:family="graphic" style:parent-style-name="standard">
      <style:graphic-properties draw:stroke="none" draw:fill="solid" draw:fill-color="#66e5ef" loext:decorative="false"/>
    </style:style>
    <style:style style:name="gr55" style:family="graphic" style:parent-style-name="standard">
      <style:graphic-properties draw:stroke="none" draw:fill="none" draw:textarea-horizontal-align="left" draw:textarea-vertical-align="top" draw:auto-grow-height="true" draw:auto-grow-width="true" fo:min-height="0.552cm" fo:min-width="0.63cm" fo:padding-top="0cm" fo:padding-bottom="0cm" fo:padding-left="0cm" fo:padding-right="0cm" loext:decorative="false"/>
      <style:paragraph-properties style:writing-mode="lr-tb"/>
    </style:style>
    <style:style style:name="gr56" style:family="graphic" style:parent-style-name="standard">
      <style:graphic-properties draw:stroke="none" draw:fill="solid" draw:fill-color="#a1aad0" loext:decorative="false"/>
    </style:style>
    <style:style style:name="gr57" style:family="graphic" style:parent-style-name="standard">
      <style:graphic-properties draw:stroke="none" draw:fill="solid" draw:fill-color="#a2aad0" loext:decorative="false"/>
    </style:style>
    <style:style style:name="gr58" style:family="graphic" style:parent-style-name="standard">
      <style:graphic-properties draw:stroke="none" draw:fill="solid" draw:fill-color="#a2abd1" loext:decorative="false"/>
    </style:style>
    <style:style style:name="gr59" style:family="graphic" style:parent-style-name="standard">
      <style:graphic-properties draw:stroke="none" draw:fill="solid" draw:fill-color="#a3abd1" loext:decorative="false"/>
    </style:style>
    <style:style style:name="gr60" style:family="graphic" style:parent-style-name="standard">
      <style:graphic-properties draw:stroke="none" draw:fill="solid" draw:fill-color="#a3acd1" loext:decorative="false"/>
    </style:style>
    <style:style style:name="gr61" style:family="graphic" style:parent-style-name="standard">
      <style:graphic-properties draw:stroke="none" draw:fill="solid" draw:fill-color="#a4acd1" loext:decorative="false"/>
    </style:style>
    <style:style style:name="gr62" style:family="graphic" style:parent-style-name="standard">
      <style:graphic-properties draw:stroke="none" draw:fill="solid" draw:fill-color="#a4add1" loext:decorative="false"/>
    </style:style>
    <style:style style:name="gr63" style:family="graphic" style:parent-style-name="standard">
      <style:graphic-properties draw:stroke="none" draw:fill="solid" draw:fill-color="#a5add2" loext:decorative="false"/>
    </style:style>
    <style:style style:name="gr64" style:family="graphic" style:parent-style-name="standard">
      <style:graphic-properties draw:stroke="none" draw:fill="solid" draw:fill-color="#a6aed2" loext:decorative="false"/>
    </style:style>
    <style:style style:name="gr65" style:family="graphic" style:parent-style-name="standard">
      <style:graphic-properties draw:stroke="none" draw:fill="solid" draw:fill-color="#a7afd2" loext:decorative="false"/>
    </style:style>
    <style:style style:name="gr66" style:family="graphic" style:parent-style-name="standard">
      <style:graphic-properties draw:stroke="none" draw:fill="solid" draw:fill-color="#a7afd3" loext:decorative="false"/>
    </style:style>
    <style:style style:name="gr67" style:family="graphic" style:parent-style-name="standard">
      <style:graphic-properties draw:stroke="none" draw:fill="solid" draw:fill-color="#a8afd3" loext:decorative="false"/>
    </style:style>
    <style:style style:name="gr68" style:family="graphic" style:parent-style-name="standard">
      <style:graphic-properties draw:stroke="none" draw:fill="solid" draw:fill-color="#a8b0d3" loext:decorative="false"/>
    </style:style>
    <style:style style:name="gr69" style:family="graphic" style:parent-style-name="standard">
      <style:graphic-properties draw:stroke="none" draw:fill="solid" draw:fill-color="#a9b0d3" loext:decorative="false"/>
    </style:style>
    <style:style style:name="gr70" style:family="graphic" style:parent-style-name="standard">
      <style:graphic-properties draw:stroke="none" draw:fill="solid" draw:fill-color="#a9b1d3" loext:decorative="false"/>
    </style:style>
    <style:style style:name="gr71" style:family="graphic" style:parent-style-name="standard">
      <style:graphic-properties draw:stroke="none" draw:fill="solid" draw:fill-color="#a9b1d4" loext:decorative="false"/>
    </style:style>
    <style:style style:name="gr72" style:family="graphic" style:parent-style-name="standard">
      <style:graphic-properties draw:stroke="none" draw:fill="solid" draw:fill-color="#aab1d4" loext:decorative="false"/>
    </style:style>
    <style:style style:name="gr73" style:family="graphic" style:parent-style-name="standard">
      <style:graphic-properties draw:stroke="none" draw:fill="solid" draw:fill-color="#aab2d4" loext:decorative="false"/>
    </style:style>
    <style:style style:name="gr74" style:family="graphic" style:parent-style-name="standard">
      <style:graphic-properties draw:stroke="none" draw:fill="solid" draw:fill-color="#abb2d4" loext:decorative="false"/>
    </style:style>
    <style:style style:name="gr75" style:family="graphic" style:parent-style-name="standard">
      <style:graphic-properties draw:stroke="none" draw:fill="solid" draw:fill-color="#abb3d4" loext:decorative="false"/>
    </style:style>
    <style:style style:name="gr76" style:family="graphic" style:parent-style-name="standard">
      <style:graphic-properties draw:stroke="none" draw:fill="solid" draw:fill-color="#acb3d5" loext:decorative="false"/>
    </style:style>
    <style:style style:name="gr77" style:family="graphic" style:parent-style-name="standard">
      <style:graphic-properties draw:stroke="none" draw:fill="solid" draw:fill-color="#adb4d5" loext:decorative="false"/>
    </style:style>
    <style:style style:name="gr78" style:family="graphic" style:parent-style-name="standard">
      <style:graphic-properties draw:stroke="none" draw:fill="solid" draw:fill-color="#aeb5d5" loext:decorative="false"/>
    </style:style>
    <style:style style:name="gr79" style:family="graphic" style:parent-style-name="standard">
      <style:graphic-properties draw:stroke="none" draw:fill="solid" draw:fill-color="#afb6d6" loext:decorative="false"/>
    </style:style>
    <style:style style:name="gr80" style:family="graphic" style:parent-style-name="standard">
      <style:graphic-properties draw:stroke="none" draw:fill="solid" draw:fill-color="#b0b7d6" loext:decorative="false"/>
    </style:style>
    <style:style style:name="gr81" style:family="graphic" style:parent-style-name="standard">
      <style:graphic-properties draw:stroke="none" draw:fill="solid" draw:fill-color="#b1b7d7" loext:decorative="false"/>
    </style:style>
    <style:style style:name="gr82" style:family="graphic" style:parent-style-name="standard">
      <style:graphic-properties draw:stroke="none" draw:fill="solid" draw:fill-color="#b1b8d7" loext:decorative="false"/>
    </style:style>
    <style:style style:name="gr83" style:family="graphic" style:parent-style-name="standard">
      <style:graphic-properties draw:stroke="none" draw:fill="solid" draw:fill-color="#b2b9d7" loext:decorative="false"/>
    </style:style>
    <style:style style:name="gr84" style:family="graphic" style:parent-style-name="standard">
      <style:graphic-properties draw:stroke="none" draw:fill="solid" draw:fill-color="#b3b9d7" loext:decorative="false"/>
    </style:style>
    <style:style style:name="gr85" style:family="graphic" style:parent-style-name="standard">
      <style:graphic-properties draw:stroke="none" draw:fill="solid" draw:fill-color="#b3bad8" loext:decorative="false"/>
    </style:style>
    <style:style style:name="gr86" style:family="graphic" style:parent-style-name="standard">
      <style:graphic-properties draw:stroke="none" draw:fill="solid" draw:fill-color="#b4bad8" loext:decorative="false"/>
    </style:style>
    <style:style style:name="gr87" style:family="graphic" style:parent-style-name="standard">
      <style:graphic-properties draw:stroke="none" draw:fill="solid" draw:fill-color="#b5bbd8" loext:decorative="false"/>
    </style:style>
    <style:style style:name="gr88" style:family="graphic" style:parent-style-name="standard">
      <style:graphic-properties draw:stroke="none" draw:fill="solid" draw:fill-color="#b6bcd9" loext:decorative="false"/>
    </style:style>
    <style:style style:name="gr89" style:family="graphic" style:parent-style-name="standard">
      <style:graphic-properties draw:stroke="none" draw:fill="solid" draw:fill-color="#b7bdd9" loext:decorative="false"/>
    </style:style>
    <style:style style:name="gr90" style:family="graphic" style:parent-style-name="standard">
      <style:graphic-properties draw:stroke="none" draw:fill="solid" draw:fill-color="#b8beda" loext:decorative="false"/>
    </style:style>
    <style:style style:name="gr91" style:family="graphic" style:parent-style-name="standard">
      <style:graphic-properties draw:stroke="none" draw:fill="solid" draw:fill-color="#b9beda" loext:decorative="false"/>
    </style:style>
    <style:style style:name="gr92" style:family="graphic" style:parent-style-name="standard">
      <style:graphic-properties draw:stroke="none" draw:fill="solid" draw:fill-color="#b9bfda" loext:decorative="false"/>
    </style:style>
    <style:style style:name="gr93" style:family="graphic" style:parent-style-name="standard">
      <style:graphic-properties draw:stroke="none" draw:fill="solid" draw:fill-color="#bac0da" loext:decorative="false"/>
    </style:style>
    <style:style style:name="gr94" style:family="graphic" style:parent-style-name="standard">
      <style:graphic-properties draw:stroke="none" draw:fill="solid" draw:fill-color="#bbc0db" loext:decorative="false"/>
    </style:style>
    <style:style style:name="gr95" style:family="graphic" style:parent-style-name="standard">
      <style:graphic-properties draw:stroke="none" draw:fill="solid" draw:fill-color="#bbc1db" loext:decorative="false"/>
    </style:style>
    <style:style style:name="gr96" style:family="graphic" style:parent-style-name="standard">
      <style:graphic-properties draw:stroke="none" draw:fill="solid" draw:fill-color="#bcc1db" loext:decorative="false"/>
    </style:style>
    <style:style style:name="gr97" style:family="graphic" style:parent-style-name="standard">
      <style:graphic-properties draw:stroke="none" draw:fill="solid" draw:fill-color="#bdc2dc" loext:decorative="false"/>
    </style:style>
    <style:style style:name="gr98" style:family="graphic" style:parent-style-name="standard">
      <style:graphic-properties draw:stroke="none" draw:fill="solid" draw:fill-color="#bdc3dc" loext:decorative="false"/>
    </style:style>
    <style:style style:name="gr99" style:family="graphic" style:parent-style-name="standard">
      <style:graphic-properties draw:stroke="none" draw:fill="solid" draw:fill-color="#bec3dc" loext:decorative="false"/>
    </style:style>
    <style:style style:name="gr100" style:family="graphic" style:parent-style-name="standard">
      <style:graphic-properties draw:stroke="none" draw:fill="solid" draw:fill-color="#bfc4dc" loext:decorative="false"/>
    </style:style>
    <style:style style:name="gr101" style:family="graphic" style:parent-style-name="standard">
      <style:graphic-properties draw:stroke="none" draw:fill="solid" draw:fill-color="#bfc4dd" loext:decorative="false"/>
    </style:style>
    <style:style style:name="gr102" style:family="graphic" style:parent-style-name="standard">
      <style:graphic-properties draw:stroke="none" draw:fill="solid" draw:fill-color="#c0c5dd" loext:decorative="false"/>
    </style:style>
    <style:style style:name="gr103" style:family="graphic" style:parent-style-name="standard">
      <style:graphic-properties draw:stroke="none" draw:fill="solid" draw:fill-color="#c1c6dd" loext:decorative="false"/>
    </style:style>
    <style:style style:name="gr104" style:family="graphic" style:parent-style-name="standard">
      <style:graphic-properties draw:stroke="none" draw:fill="solid" draw:fill-color="#c1c6de" loext:decorative="false"/>
    </style:style>
    <style:style style:name="gr105" style:family="graphic" style:parent-style-name="standard">
      <style:graphic-properties draw:stroke="none" draw:fill="solid" draw:fill-color="#c2c7de" loext:decorative="false"/>
    </style:style>
    <style:style style:name="gr106" style:family="graphic" style:parent-style-name="standard">
      <style:graphic-properties draw:stroke="none" draw:fill="solid" draw:fill-color="#c3c8df" loext:decorative="false"/>
    </style:style>
    <style:style style:name="gr107" style:family="graphic" style:parent-style-name="standard">
      <style:graphic-properties draw:stroke="none" draw:fill="solid" draw:fill-color="#c4c8df" loext:decorative="false"/>
    </style:style>
    <style:style style:name="gr108" style:family="graphic" style:parent-style-name="standard">
      <style:graphic-properties draw:stroke="none" draw:fill="solid" draw:fill-color="#c4c9df" loext:decorative="false"/>
    </style:style>
    <style:style style:name="gr109" style:family="graphic" style:parent-style-name="standard">
      <style:graphic-properties draw:stroke="none" draw:fill="solid" draw:fill-color="#c5cae0" loext:decorative="false"/>
    </style:style>
    <style:style style:name="gr110" style:family="graphic" style:parent-style-name="standard">
      <style:graphic-properties draw:stroke="none" draw:fill="solid" draw:fill-color="#c6cbe0" loext:decorative="false"/>
    </style:style>
    <style:style style:name="gr111" style:family="graphic" style:parent-style-name="standard">
      <style:graphic-properties draw:stroke="none" draw:fill="solid" draw:fill-color="#c7cbe1" loext:decorative="false"/>
    </style:style>
    <style:style style:name="gr112" style:family="graphic" style:parent-style-name="standard">
      <style:graphic-properties draw:stroke="none" draw:fill="solid" draw:fill-color="#c7cce1" loext:decorative="false"/>
    </style:style>
    <style:style style:name="gr113" style:family="graphic" style:parent-style-name="standard">
      <style:graphic-properties draw:stroke="none" draw:fill="solid" draw:fill-color="#c8cde1" loext:decorative="false"/>
    </style:style>
    <style:style style:name="gr114" style:family="graphic" style:parent-style-name="standard">
      <style:graphic-properties draw:stroke="none" draw:fill="solid" draw:fill-color="#c9cde2" loext:decorative="false"/>
    </style:style>
    <style:style style:name="gr115" style:family="graphic" style:parent-style-name="standard">
      <style:graphic-properties draw:stroke="none" draw:fill="solid" draw:fill-color="#c9cee2" loext:decorative="false"/>
    </style:style>
    <style:style style:name="gr116" style:family="graphic" style:parent-style-name="standard">
      <style:graphic-properties draw:stroke="none" draw:fill="solid" draw:fill-color="#cacee2" loext:decorative="false"/>
    </style:style>
    <style:style style:name="gr117" style:family="graphic" style:parent-style-name="standard">
      <style:graphic-properties draw:stroke="none" draw:fill="solid" draw:fill-color="#cacfe2" loext:decorative="false"/>
    </style:style>
    <style:style style:name="gr118" style:family="graphic" style:parent-style-name="standard">
      <style:graphic-properties draw:stroke="none" draw:fill="solid" draw:fill-color="#cbcfe3" loext:decorative="false"/>
    </style:style>
    <style:style style:name="gr119" style:family="graphic" style:parent-style-name="standard">
      <style:graphic-properties draw:stroke="none" draw:fill="solid" draw:fill-color="#cbd0e3" loext:decorative="false"/>
    </style:style>
    <style:style style:name="gr120" style:family="graphic" style:parent-style-name="standard">
      <style:graphic-properties draw:stroke="none" draw:fill="solid" draw:fill-color="#ccd0e3" loext:decorative="false"/>
    </style:style>
    <style:style style:name="gr121" style:family="graphic" style:parent-style-name="standard">
      <style:graphic-properties draw:stroke="none" draw:fill="solid" draw:fill-color="#ccd0e4" loext:decorative="false"/>
    </style:style>
    <style:style style:name="gr122" style:family="graphic" style:parent-style-name="standard">
      <style:graphic-properties draw:stroke="none" draw:fill="solid" draw:fill-color="#cdd1e4" loext:decorative="false"/>
    </style:style>
    <style:style style:name="gr123" style:family="graphic" style:parent-style-name="standard">
      <style:graphic-properties draw:stroke="none" draw:fill="solid" draw:fill-color="#ced2e4" loext:decorative="false"/>
    </style:style>
    <style:style style:name="gr124" style:family="graphic" style:parent-style-name="standard">
      <style:graphic-properties draw:stroke="none" draw:fill="solid" draw:fill-color="#ced2e5" loext:decorative="false"/>
    </style:style>
    <style:style style:name="gr125" style:family="graphic" style:parent-style-name="standard">
      <style:graphic-properties draw:stroke="none" draw:fill="solid" draw:fill-color="#cfd3e5" loext:decorative="false"/>
    </style:style>
    <style:style style:name="gr126" style:family="graphic" style:parent-style-name="standard">
      <style:graphic-properties draw:stroke="none" draw:fill="solid" draw:fill-color="#d0d4e5" loext:decorative="false"/>
    </style:style>
    <style:style style:name="gr127" style:family="graphic" style:parent-style-name="standard">
      <style:graphic-properties draw:stroke="none" draw:fill="solid" draw:fill-color="#d0d4e6" loext:decorative="false"/>
    </style:style>
    <style:style style:name="gr128" style:family="graphic" style:parent-style-name="standard">
      <style:graphic-properties draw:stroke="none" draw:fill="solid" draw:fill-color="#d1d5e6" loext:decorative="false"/>
    </style:style>
    <style:style style:name="gr129" style:family="graphic" style:parent-style-name="standard">
      <style:graphic-properties draw:stroke="none" draw:fill="solid" draw:fill-color="#d2d6e6" loext:decorative="false"/>
    </style:style>
    <style:style style:name="gr130" style:family="graphic" style:parent-style-name="standard">
      <style:graphic-properties draw:stroke="none" draw:fill="solid" draw:fill-color="#d2d6e7" loext:decorative="false"/>
    </style:style>
    <style:style style:name="gr131" style:family="graphic" style:parent-style-name="standard">
      <style:graphic-properties draw:stroke="none" draw:fill="solid" draw:fill-color="#d3d7e7" loext:decorative="false"/>
    </style:style>
    <style:style style:name="gr132" style:family="graphic" style:parent-style-name="standard">
      <style:graphic-properties draw:stroke="none" draw:fill="solid" draw:fill-color="#d4d8e8" loext:decorative="false"/>
    </style:style>
    <style:style style:name="gr133" style:family="graphic" style:parent-style-name="standard">
      <style:graphic-properties draw:stroke="none" draw:fill="solid" draw:fill-color="#d5d9e8" loext:decorative="false"/>
    </style:style>
    <style:style style:name="gr134" style:family="graphic" style:parent-style-name="standard">
      <style:graphic-properties draw:stroke="none" draw:fill="solid" draw:fill-color="#d6dae9" loext:decorative="false"/>
    </style:style>
    <style:style style:name="gr135" style:family="graphic" style:parent-style-name="standard">
      <style:graphic-properties draw:stroke="none" draw:fill="solid" draw:fill-color="#d7dbe9" loext:decorative="false"/>
    </style:style>
    <style:style style:name="gr136" style:family="graphic" style:parent-style-name="standard">
      <style:graphic-properties draw:stroke="none" draw:fill="solid" draw:fill-color="#d8dbea" loext:decorative="false"/>
    </style:style>
    <style:style style:name="gr137" style:family="graphic" style:parent-style-name="standard">
      <style:graphic-properties draw:stroke="solid" svg:stroke-width="0.067cm" svg:stroke-color="#11306b" draw:stroke-linejoin="miter" svg:stroke-linecap="butt" draw:fill="none" fo:padding-top="0.033cm" fo:padding-bottom="0.033cm" fo:padding-left="0.033cm" fo:padding-right="0.033cm" loext:decorative="false"/>
    </style:style>
    <style:style style:name="gr138" style:family="graphic" style:parent-style-name="standard">
      <style:graphic-properties draw:stroke="none" draw:fill="solid" draw:fill-color="#e0e3ee" loext:decorative="false"/>
    </style:style>
    <style:style style:name="gr139" style:family="graphic" style:parent-style-name="standard">
      <style:graphic-properties draw:stroke="solid" svg:stroke-width="0.008cm" svg:stroke-color="#11306b" draw:stroke-linejoin="round" svg:stroke-linecap="butt" draw:fill="solid" draw:fill-color="#ffffff" fo:padding-top="0.004cm" fo:padding-bottom="0.004cm" fo:padding-left="0.004cm" fo:padding-right="0.004cm" loext:decorative="false"/>
    </style:style>
    <style:style style:name="gr140" style:family="graphic" style:parent-style-name="standard">
      <style:graphic-properties draw:stroke="solid" svg:stroke-width="0.008cm" svg:stroke-color="#ffffff" draw:stroke-linejoin="round" svg:stroke-linecap="butt" draw:fill="none" fo:padding-top="0.004cm" fo:padding-bottom="0.004cm" fo:padding-left="0.004cm" fo:padding-right="0.004cm" loext:decorative="false"/>
    </style:style>
    <style:style style:name="gr141" style:family="graphic" style:parent-style-name="standard">
      <style:graphic-properties draw:stroke="none" draw:fill="none" draw:textarea-horizontal-align="left" draw:textarea-vertical-align="top" draw:auto-grow-height="true" draw:auto-grow-width="true" fo:min-height="1.309cm" fo:min-width="14.259cm" fo:padding-top="0cm" fo:padding-bottom="0cm" fo:padding-left="0cm" fo:padding-right="0cm" loext:decorative="false"/>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552cm" fo:min-width="2.295cm" fo:padding-top="0cm" fo:padding-bottom="0cm" fo:padding-left="0cm" fo:padding-right="0cm" loext:decorative="false"/>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552cm" fo:min-width="1.858cm" fo:padding-top="0cm" fo:padding-bottom="0cm" fo:padding-left="0cm" fo:padding-right="0cm" loext:decorative="false"/>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314cm" fo:min-width="0.825cm" fo:padding-top="0cm" fo:padding-bottom="0cm" fo:padding-left="0cm" fo:padding-right="0cm" loext:decorative="false"/>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433cm" fo:min-width="0.5cm" fo:padding-top="0cm" fo:padding-bottom="0cm" fo:padding-left="0cm" fo:padding-right="0cm" loext:decorative="false"/>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314cm" fo:min-width="0.546cm" fo:padding-top="0cm" fo:padding-bottom="0cm" fo:padding-left="0cm" fo:padding-right="0cm" loext:decorative="false"/>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314cm" fo:min-width="0.934cm" fo:padding-top="0cm" fo:padding-bottom="0cm" fo:padding-left="0cm" fo:padding-right="0cm" loext:decorative="false"/>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314cm" fo:min-width="0.732cm" fo:padding-top="0cm" fo:padding-bottom="0cm" fo:padding-left="0cm" fo:padding-right="0cm" loext:decorative="false"/>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314cm" fo:min-width="0.281cm" fo:padding-top="0cm" fo:padding-bottom="0cm" fo:padding-left="0cm" fo:padding-right="0cm" loext:decorative="false"/>
      <style:paragraph-properties style:writing-mode="lr-tb"/>
    </style:style>
    <style:style style:name="gr150" style:family="graphic" style:parent-style-name="standard">
      <style:graphic-properties draw:stroke="none" draw:fill="solid" draw:fill-color="#174293" loext:decorative="false"/>
    </style:style>
    <style:style style:name="gr151" style:family="graphic" style:parent-style-name="standard">
      <style:graphic-properties draw:stroke="none" draw:fill="solid" draw:fill-color="#000000" loext:decorative="false"/>
    </style:style>
    <style:style style:name="gr152" style:family="graphic" style:parent-style-name="standard">
      <style:graphic-properties draw:stroke="none" draw:fill="solid" draw:fill-color="#92d050" loext:decorative="false"/>
    </style:style>
    <style:style style:name="gr153" style:family="graphic" style:parent-style-name="standard">
      <style:graphic-properties draw:stroke="none" draw:fill="none" draw:textarea-horizontal-align="left" draw:textarea-vertical-align="top" draw:auto-grow-height="true" draw:auto-grow-width="true" fo:min-height="0.552cm" fo:min-width="4.342cm" fo:padding-top="0cm" fo:padding-bottom="0cm" fo:padding-left="0cm" fo:padding-right="0cm" loext:decorative="false"/>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399cm" fo:min-width="0.852cm" fo:padding-top="0cm" fo:padding-bottom="0cm" fo:padding-left="0cm" fo:padding-right="0cm" loext:decorative="false"/>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399cm" fo:min-width="0.355cm" fo:padding-top="0cm" fo:padding-bottom="0cm" fo:padding-left="0cm" fo:padding-right="0cm" loext:decorative="false"/>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399cm" fo:min-width="0.457cm" fo:padding-top="0cm" fo:padding-bottom="0cm" fo:padding-left="0cm" fo:padding-right="0cm" loext:decorative="false"/>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399cm" fo:min-width="0.813cm" fo:padding-top="0cm" fo:padding-bottom="0cm" fo:padding-left="0cm" fo:padding-right="0cm" loext:decorative="false"/>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399cm" fo:min-width="0.378cm" fo:padding-top="0cm" fo:padding-bottom="0cm" fo:padding-left="0cm" fo:padding-right="0cm" loext:decorative="false"/>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552cm" fo:min-width="4.206cm" fo:padding-top="0cm" fo:padding-bottom="0cm" fo:padding-left="0cm" fo:padding-right="0cm" loext:decorative="false"/>
      <style:paragraph-properties style:writing-mode="lr-tb"/>
    </style:style>
    <style:style style:name="gr160" style:family="graphic" style:parent-style-name="standard">
      <style:graphic-properties draw:stroke="solid" svg:stroke-width="0.025cm" svg:stroke-color="#174293" draw:stroke-linejoin="round" svg:stroke-linecap="butt" draw:fill="none" fo:padding-top="0.012cm" fo:padding-bottom="0.012cm" fo:padding-left="0.012cm" fo:padding-right="0.012cm" loext:decorative="false"/>
    </style:style>
    <style:style style:name="gr161" style:family="graphic" style:parent-style-name="standard">
      <style:graphic-properties draw:stroke="none" draw:fill="none" draw:textarea-horizontal-align="left" draw:textarea-vertical-align="top" draw:auto-grow-height="true" draw:auto-grow-width="true" fo:min-height="0.552cm" fo:min-width="2.131cm" fo:padding-top="0cm" fo:padding-bottom="0cm" fo:padding-left="0cm" fo:padding-right="0cm" loext:decorative="false"/>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552cm" fo:min-width="4.15cm" fo:padding-top="0cm" fo:padding-bottom="0cm" fo:padding-left="0cm" fo:padding-right="0cm" loext:decorative="false"/>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552cm" fo:min-width="2.758cm" fo:padding-top="0cm" fo:padding-bottom="0cm" fo:padding-left="0cm" fo:padding-right="0cm" loext:decorative="false"/>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433cm" fo:min-width="2.448cm" fo:padding-top="0cm" fo:padding-bottom="0cm" fo:padding-left="0cm" fo:padding-right="0cm" loext:decorative="false"/>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433cm" fo:min-width="1.907cm" fo:padding-top="0cm" fo:padding-bottom="0cm" fo:padding-left="0cm" fo:padding-right="0cm" loext:decorative="false"/>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433cm" fo:min-width="4.092cm" fo:padding-top="0cm" fo:padding-bottom="0cm" fo:padding-left="0cm" fo:padding-right="0cm" loext:decorative="false"/>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552cm" fo:min-width="2.458cm" fo:padding-top="0cm" fo:padding-bottom="0cm" fo:padding-left="0cm" fo:padding-right="0cm" loext:decorative="false"/>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433cm" fo:min-width="1.236cm" fo:padding-top="0cm" fo:padding-bottom="0cm" fo:padding-left="0cm" fo:padding-right="0cm" loext:decorative="false"/>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552cm" fo:min-width="2.65cm" fo:padding-top="0cm" fo:padding-bottom="0cm" fo:padding-left="0cm" fo:padding-right="0cm" loext:decorative="false"/>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552cm" fo:min-width="2.84cm" fo:padding-top="0cm" fo:padding-bottom="0cm" fo:padding-left="0cm" fo:padding-right="0cm" loext:decorative="false"/>
      <style:paragraph-properties style:writing-mode="lr-tb"/>
    </style:style>
    <style:style style:name="gr171" style:family="graphic" style:parent-style-name="standard">
      <style:graphic-properties draw:stroke="solid" svg:stroke-width="0.025cm" svg:stroke-color="#11306b" draw:stroke-linejoin="round" svg:stroke-linecap="butt" draw:fill="none" fo:padding-top="0.012cm" fo:padding-bottom="0.012cm" fo:padding-left="0.012cm" fo:padding-right="0.012cm" loext:decorative="false"/>
    </style:style>
    <style:style style:name="gr172" style:family="graphic" style:parent-style-name="standard">
      <style:graphic-properties draw:stroke="solid" svg:stroke-width="0.008cm" svg:stroke-color="#11306b" draw:stroke-linejoin="round" svg:stroke-linecap="butt" draw:fill="solid" draw:fill-color="#00b050" fo:padding-top="0.004cm" fo:padding-bottom="0.004cm" fo:padding-left="0.004cm" fo:padding-right="0.004cm" loext:decorative="false"/>
    </style:style>
    <style:style style:name="gr173" style:family="graphic" style:parent-style-name="standard">
      <style:graphic-properties draw:stroke="none" draw:fill="none" draw:textarea-horizontal-align="left" draw:textarea-vertical-align="top" draw:auto-grow-height="true" draw:auto-grow-width="true" fo:min-height="0.552cm" fo:min-width="3.114cm" fo:padding-top="0cm" fo:padding-bottom="0cm" fo:padding-left="0cm" fo:padding-right="0cm" loext:decorative="false"/>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552cm" fo:min-width="2.512cm" fo:padding-top="0cm" fo:padding-bottom="0cm" fo:padding-left="0cm" fo:padding-right="0cm" loext:decorative="false"/>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475cm" fo:min-width="0.422cm" fo:padding-top="0cm" fo:padding-bottom="0cm" fo:padding-left="0cm" fo:padding-right="0cm" loext:decorative="false"/>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475cm" fo:min-width="7.474cm" fo:padding-top="0cm" fo:padding-bottom="0cm" fo:padding-left="0cm" fo:padding-right="0cm" loext:decorative="false"/>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475cm" fo:min-width="5.296cm" fo:padding-top="0cm" fo:padding-bottom="0cm" fo:padding-left="0cm" fo:padding-right="0cm" loext:decorative="false"/>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475cm" fo:min-width="0.423cm" fo:padding-top="0cm" fo:padding-bottom="0cm" fo:padding-left="0cm" fo:padding-right="0cm" loext:decorative="false"/>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475cm" fo:min-width="4.779cm" fo:padding-top="0cm" fo:padding-bottom="0cm" fo:padding-left="0cm" fo:padding-right="0cm" loext:decorative="false"/>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475cm" fo:min-width="5.626cm" fo:padding-top="0cm" fo:padding-bottom="0cm" fo:padding-left="0cm" fo:padding-right="0cm" loext:decorative="false"/>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475cm" fo:min-width="1.461cm" fo:padding-top="0cm" fo:padding-bottom="0cm" fo:padding-left="0cm" fo:padding-right="0cm" loext:decorative="false"/>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475cm" fo:min-width="5.156cm" fo:padding-top="0cm" fo:padding-bottom="0cm" fo:padding-left="0cm" fo:padding-right="0cm" loext:decorative="false"/>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475cm" fo:min-width="6.52cm" fo:padding-top="0cm" fo:padding-bottom="0cm" fo:padding-left="0cm" fo:padding-right="0cm" loext:decorative="false"/>
      <style:paragraph-properties style:writing-mode="lr-tb"/>
    </style:style>
    <style:style style:name="gr184" style:family="graphic" style:parent-style-name="standard">
      <style:graphic-properties draw:stroke="solid" svg:stroke-width="0.076cm" svg:stroke-color="#d9d9d9" draw:stroke-linejoin="round" svg:stroke-linecap="butt" draw:fill="solid" draw:fill-color="#00b050" fo:padding-top="0.038cm" fo:padding-bottom="0.038cm" fo:padding-left="0.038cm" fo:padding-right="0.038cm" loext:decorative="false"/>
    </style:style>
    <style:style style:name="gr185" style:family="graphic" style:parent-style-name="standard">
      <style:graphic-properties draw:stroke="none" draw:fill="none" draw:textarea-horizontal-align="left" draw:textarea-vertical-align="top" draw:auto-grow-height="true" draw:auto-grow-width="true" fo:min-height="0.475cm" fo:min-width="4.309cm" fo:padding-top="0cm" fo:padding-bottom="0cm" fo:padding-left="0cm" fo:padding-right="0cm" loext:decorative="false"/>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552cm" fo:min-width="0.49cm" fo:padding-top="0cm" fo:padding-bottom="0cm" fo:padding-left="0cm" fo:padding-right="0cm" loext:decorative="false"/>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552cm" fo:min-width="0.491cm" fo:padding-top="0cm" fo:padding-bottom="0cm" fo:padding-left="0cm" fo:padding-right="0cm" loext:decorative="false"/>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2.237cm" fo:min-width="22.199cm" fo:padding-top="0cm" fo:padding-bottom="0cm" fo:padding-left="0cm" fo:padding-right="0cm" loext:decorative="false"/>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1.309cm" fo:min-width="9.347cm" fo:padding-top="0cm" fo:padding-bottom="0cm" fo:padding-left="0cm" fo:padding-right="0cm" loext:decorative="false"/>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552cm" fo:min-width="4.423cm" fo:padding-top="0cm" fo:padding-bottom="0cm" fo:padding-left="0cm" fo:padding-right="0cm" loext:decorative="false"/>
      <style:paragraph-properties style:writing-mode="lr-tb"/>
    </style:style>
    <style:style style:name="gr191" style:family="graphic" style:parent-style-name="standard">
      <style:graphic-properties draw:stroke="solid" svg:stroke-width="0.016cm" svg:stroke-color="#11306b" draw:stroke-linejoin="round" svg:stroke-linecap="butt" draw:fill="solid" draw:fill-color="#00b050" fo:padding-top="0.008cm" fo:padding-bottom="0.008cm" fo:padding-left="0.008cm" fo:padding-right="0.008cm" loext:decorative="false"/>
    </style:style>
    <style:style style:name="gr192" style:family="graphic" style:parent-style-name="standard">
      <style:graphic-properties draw:stroke="none" draw:fill="none" draw:textarea-horizontal-align="left" draw:textarea-vertical-align="top" draw:auto-grow-height="true" draw:auto-grow-width="true" fo:min-height="0.552cm" fo:min-width="4.205cm" fo:padding-top="0cm" fo:padding-bottom="0cm" fo:padding-left="0cm" fo:padding-right="0cm" loext:decorative="false"/>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552cm" fo:min-width="0.548cm" fo:padding-top="0cm" fo:padding-bottom="0cm" fo:padding-left="0cm" fo:padding-right="0cm" loext:decorative="false"/>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712cm" fo:min-width="0.708cm" fo:padding-top="0cm" fo:padding-bottom="0cm" fo:padding-left="0cm" fo:padding-right="0cm" loext:decorative="false"/>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552cm" fo:min-width="1.53cm" fo:padding-top="0cm" fo:padding-bottom="0cm" fo:padding-left="0cm" fo:padding-right="0cm" loext:decorative="false"/>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552cm" fo:min-width="2.812cm" fo:padding-top="0cm" fo:padding-bottom="0cm" fo:padding-left="0cm" fo:padding-right="0cm" loext:decorative="false"/>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552cm" fo:min-width="2.95cm" fo:padding-top="0cm" fo:padding-bottom="0cm" fo:padding-left="0cm" fo:padding-right="0cm" loext:decorative="false"/>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552cm" fo:min-width="4.805cm" fo:padding-top="0cm" fo:padding-bottom="0cm" fo:padding-left="0cm" fo:padding-right="0cm" loext:decorative="false"/>
      <style:paragraph-properties style:writing-mode="lr-tb"/>
    </style:style>
    <style:style style:name="gr199" style:family="graphic" style:parent-style-name="standard">
      <style:graphic-properties draw:stroke="none" draw:fill="solid" draw:fill-color="#9fa8cf" loext:decorative="false"/>
    </style:style>
    <style:style style:name="gr200" style:family="graphic" style:parent-style-name="standard">
      <style:graphic-properties draw:stroke="none" draw:fill="solid" draw:fill-color="#a0a9d0" loext:decorative="false"/>
    </style:style>
    <style:style style:name="gr201" style:family="graphic" style:parent-style-name="standard">
      <style:graphic-properties draw:stroke="none" draw:fill="solid" draw:fill-color="#a1a9d0" loext:decorative="false"/>
    </style:style>
    <style:style style:name="gr202" style:family="graphic" style:parent-style-name="standard">
      <style:graphic-properties draw:stroke="none" draw:fill="solid" draw:fill-color="#a2abd0" loext:decorative="false"/>
    </style:style>
    <style:style style:name="gr203" style:family="graphic" style:parent-style-name="standard">
      <style:graphic-properties draw:stroke="none" draw:fill="solid" draw:fill-color="#a5aed2" loext:decorative="false"/>
    </style:style>
    <style:style style:name="gr204" style:family="graphic" style:parent-style-name="standard">
      <style:graphic-properties draw:stroke="none" draw:fill="solid" draw:fill-color="#acb3d4" loext:decorative="false"/>
    </style:style>
    <style:style style:name="gr205" style:family="graphic" style:parent-style-name="standard">
      <style:graphic-properties draw:stroke="none" draw:fill="solid" draw:fill-color="#aeb5d6" loext:decorative="false"/>
    </style:style>
    <style:style style:name="gr206" style:family="graphic" style:parent-style-name="standard">
      <style:graphic-properties draw:stroke="none" draw:fill="solid" draw:fill-color="#b0b6d6" loext:decorative="false"/>
    </style:style>
    <style:style style:name="gr207" style:family="graphic" style:parent-style-name="standard">
      <style:graphic-properties draw:stroke="none" draw:fill="solid" draw:fill-color="#b2b8d7" loext:decorative="false"/>
    </style:style>
    <style:style style:name="gr208" style:family="graphic" style:parent-style-name="standard">
      <style:graphic-properties draw:stroke="none" draw:fill="solid" draw:fill-color="#b3b9d8" loext:decorative="false"/>
    </style:style>
    <style:style style:name="gr209" style:family="graphic" style:parent-style-name="standard">
      <style:graphic-properties draw:stroke="none" draw:fill="solid" draw:fill-color="#b4bbd8" loext:decorative="false"/>
    </style:style>
    <style:style style:name="gr210" style:family="graphic" style:parent-style-name="standard">
      <style:graphic-properties draw:stroke="none" draw:fill="solid" draw:fill-color="#b8bed9" loext:decorative="false"/>
    </style:style>
    <style:style style:name="gr211" style:family="graphic" style:parent-style-name="standard">
      <style:graphic-properties draw:stroke="none" draw:fill="solid" draw:fill-color="#babfda" loext:decorative="false"/>
    </style:style>
    <style:style style:name="gr212" style:family="graphic" style:parent-style-name="standard">
      <style:graphic-properties draw:stroke="none" draw:fill="solid" draw:fill-color="#bac0db" loext:decorative="false"/>
    </style:style>
    <style:style style:name="gr213" style:family="graphic" style:parent-style-name="standard">
      <style:graphic-properties draw:stroke="none" draw:fill="solid" draw:fill-color="#bcc2db" loext:decorative="false"/>
    </style:style>
    <style:style style:name="gr214" style:family="graphic" style:parent-style-name="standard">
      <style:graphic-properties draw:stroke="none" draw:fill="solid" draw:fill-color="#bec4dc" loext:decorative="false"/>
    </style:style>
    <style:style style:name="gr215" style:family="graphic" style:parent-style-name="standard">
      <style:graphic-properties draw:stroke="none" draw:fill="solid" draw:fill-color="#c1c5dd" loext:decorative="false"/>
    </style:style>
    <style:style style:name="gr216" style:family="graphic" style:parent-style-name="standard">
      <style:graphic-properties draw:stroke="none" draw:fill="solid" draw:fill-color="#c3c8de" loext:decorative="false"/>
    </style:style>
    <style:style style:name="gr217" style:family="graphic" style:parent-style-name="standard">
      <style:graphic-properties draw:stroke="none" draw:fill="solid" draw:fill-color="#c5c9e0" loext:decorative="false"/>
    </style:style>
    <style:style style:name="gr218" style:family="graphic" style:parent-style-name="standard">
      <style:graphic-properties draw:stroke="none" draw:fill="solid" draw:fill-color="#c6cae0" loext:decorative="false"/>
    </style:style>
    <style:style style:name="gr219" style:family="graphic" style:parent-style-name="standard">
      <style:graphic-properties draw:stroke="none" draw:fill="solid" draw:fill-color="#c8cce1" loext:decorative="false"/>
    </style:style>
    <style:style style:name="gr220" style:family="graphic" style:parent-style-name="standard">
      <style:graphic-properties draw:stroke="solid" svg:stroke-width="0.016cm" svg:stroke-color="#11306b" draw:stroke-linejoin="miter" svg:stroke-linecap="butt" draw:fill="none" fo:padding-top="0.008cm" fo:padding-bottom="0.008cm" fo:padding-left="0.008cm" fo:padding-right="0.008cm" loext:decorative="false"/>
    </style:style>
    <style:style style:name="gr221" style:family="graphic" style:parent-style-name="standard">
      <style:graphic-properties draw:stroke="none" draw:fill="none" draw:textarea-horizontal-align="left" draw:textarea-vertical-align="top" draw:auto-grow-height="true" draw:auto-grow-width="true" fo:min-height="0.552cm" fo:min-width="3.358cm" fo:padding-top="0cm" fo:padding-bottom="0cm" fo:padding-left="0cm" fo:padding-right="0cm" loext:decorative="false"/>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475cm" fo:min-width="3.226cm" fo:padding-top="0cm" fo:padding-bottom="0cm" fo:padding-left="0cm" fo:padding-right="0cm" loext:decorative="false"/>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475cm" fo:min-width="2.966cm" fo:padding-top="0cm" fo:padding-bottom="0cm" fo:padding-left="0cm" fo:padding-right="0cm" loext:decorative="false"/>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552cm" fo:min-width="4.479cm" fo:padding-top="0cm" fo:padding-bottom="0cm" fo:padding-left="0cm" fo:padding-right="0cm" loext:decorative="false"/>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552cm" fo:min-width="2.594cm" fo:padding-top="0cm" fo:padding-bottom="0cm" fo:padding-left="0cm" fo:padding-right="0cm" loext:decorative="false"/>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552cm" fo:min-width="3.55cm" fo:padding-top="0cm" fo:padding-bottom="0cm" fo:padding-left="0cm" fo:padding-right="0cm" loext:decorative="false"/>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475cm" fo:min-width="2.873cm" fo:padding-top="0cm" fo:padding-bottom="0cm" fo:padding-left="0cm" fo:padding-right="0cm" loext:decorative="false"/>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475cm" fo:min-width="2.237cm" fo:padding-top="0cm" fo:padding-bottom="0cm" fo:padding-left="0cm" fo:padding-right="0cm" loext:decorative="false"/>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552cm" fo:min-width="22.054cm" fo:padding-top="0cm" fo:padding-bottom="0cm" fo:padding-left="0cm" fo:padding-right="0cm" loext:decorative="false"/>
      <style:paragraph-properties style:writing-mode="lr-tb"/>
    </style:style>
    <style:style style:name="gr230" style:family="graphic" style:parent-style-name="standard">
      <style:graphic-properties draw:stroke="solid" svg:stroke-width="0.16cm" svg:stroke-color="#d9d9d9" draw:stroke-linejoin="round" svg:stroke-linecap="butt" draw:fill="solid" draw:fill-color="#1b4593" fo:padding-top="0.08cm" fo:padding-bottom="0.08cm" fo:padding-left="0.08cm" fo:padding-right="0.08cm" loext:decorative="false"/>
    </style:style>
    <style:style style:name="gr231" style:family="graphic" style:parent-style-name="standard">
      <style:graphic-properties draw:stroke="none" draw:fill="none" draw:textarea-horizontal-align="left" draw:textarea-vertical-align="top" draw:auto-grow-height="true" draw:auto-grow-width="true" fo:min-height="0.552cm" fo:min-width="8.462cm" fo:padding-top="0cm" fo:padding-bottom="0cm" fo:padding-left="0cm" fo:padding-right="0cm" loext:decorative="false"/>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552cm" fo:min-width="3.14cm" fo:padding-top="0cm" fo:padding-bottom="0cm" fo:padding-left="0cm" fo:padding-right="0cm" loext:decorative="false"/>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1.309cm" fo:min-width="22.466cm" fo:padding-top="0cm" fo:padding-bottom="0cm" fo:padding-left="0cm" fo:padding-right="0cm" loext:decorative="false"/>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552cm" fo:min-width="3.359cm" fo:padding-top="0cm" fo:padding-bottom="0cm" fo:padding-left="0cm" fo:padding-right="0cm" loext:decorative="false"/>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552cm" fo:min-width="2.267cm" fo:padding-top="0cm" fo:padding-bottom="0cm" fo:padding-left="0cm" fo:padding-right="0cm" loext:decorative="false"/>
      <style:paragraph-properties style:writing-mode="lr-tb"/>
    </style:style>
    <style:style style:name="gr236" style:family="graphic" style:parent-style-name="standard">
      <style:graphic-properties draw:stroke="solid" svg:stroke-width="0.067cm" svg:stroke-color="#11306b" draw:stroke-linejoin="miter" svg:stroke-linecap="butt" draw:fill="solid" draw:fill-color="#1b4593" fo:padding-top="0.033cm" fo:padding-bottom="0.033cm" fo:padding-left="0.033cm" fo:padding-right="0.033cm" loext:decorative="false"/>
    </style:style>
    <style:style style:name="gr237" style:family="graphic" style:parent-style-name="standard">
      <style:graphic-properties draw:stroke="none" draw:fill="none" draw:textarea-horizontal-align="left" draw:textarea-vertical-align="top" draw:auto-grow-height="true" draw:auto-grow-width="true" fo:min-height="0.552cm" fo:min-width="2.049cm" fo:padding-top="0cm" fo:padding-bottom="0cm" fo:padding-left="0cm" fo:padding-right="0cm" loext:decorative="false"/>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552cm" fo:min-width="1.722cm" fo:padding-top="0cm" fo:padding-bottom="0cm" fo:padding-left="0cm" fo:padding-right="0cm" loext:decorative="false"/>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42cm" fo:min-width="1.555cm" fo:padding-top="0cm" fo:padding-bottom="0cm" fo:padding-left="0cm" fo:padding-right="0cm" loext:decorative="false"/>
      <style:paragraph-properties style:writing-mode="lr-tb"/>
    </style:style>
    <style:style style:name="gr240" style:family="graphic" style:parent-style-name="standard">
      <style:graphic-properties draw:stroke="solid" svg:stroke-width="0.07cm" svg:stroke-color="#11306b" draw:stroke-linejoin="miter" svg:stroke-linecap="butt" draw:fill="solid" draw:fill-color="#1b4593" fo:padding-top="0.035cm" fo:padding-bottom="0.035cm" fo:padding-left="0.035cm" fo:padding-right="0.035cm" loext:decorative="false"/>
    </style:style>
    <style:style style:name="gr241" style:family="graphic" style:parent-style-name="standard">
      <style:graphic-properties draw:stroke="none" draw:fill="none" draw:textarea-horizontal-align="left" draw:textarea-vertical-align="top" draw:auto-grow-height="true" draw:auto-grow-width="true" fo:min-height="0.42cm" fo:min-width="1.285cm" fo:padding-top="0cm" fo:padding-bottom="0cm" fo:padding-left="0cm" fo:padding-right="0cm" loext:decorative="false"/>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552cm" fo:min-width="1.394cm" fo:padding-top="0cm" fo:padding-bottom="0cm" fo:padding-left="0cm" fo:padding-right="0cm" loext:decorative="false"/>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552cm" fo:min-width="2.814cm" fo:padding-top="0cm" fo:padding-bottom="0cm" fo:padding-left="0cm" fo:padding-right="0cm" loext:decorative="false"/>
      <style:paragraph-properties style:writing-mode="lr-tb"/>
    </style:style>
    <style:style style:name="gr244" style:family="graphic" style:parent-style-name="standard">
      <style:graphic-properties draw:stroke="none" draw:fill="solid" draw:fill-color="#8daeea" loext:decorative="false"/>
    </style:style>
    <style:style style:name="gr245" style:family="graphic" style:parent-style-name="standard">
      <style:graphic-properties draw:stroke="none" draw:fill="none" draw:textarea-horizontal-align="left" draw:textarea-vertical-align="top" draw:auto-grow-height="true" draw:auto-grow-width="true" fo:min-height="0.42cm" fo:min-width="2.155cm" fo:padding-top="0cm" fo:padding-bottom="0cm" fo:padding-left="0cm" fo:padding-right="0cm" loext:decorative="false"/>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42cm" fo:min-width="1.513cm" fo:padding-top="0cm" fo:padding-bottom="0cm" fo:padding-left="0cm" fo:padding-right="0cm" loext:decorative="false"/>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42cm" fo:min-width="2.279cm" fo:padding-top="0cm" fo:padding-bottom="0cm" fo:padding-left="0cm" fo:padding-right="0cm" loext:decorative="false"/>
      <style:paragraph-properties style:writing-mode="lr-tb"/>
    </style:style>
    <style:style style:name="gr248" style:family="graphic" style:parent-style-name="standard">
      <style:graphic-properties draw:stroke="none" draw:fill="solid" draw:fill-color="#d9d9d9" loext:decorative="false"/>
    </style:style>
    <style:style style:name="gr249" style:family="graphic" style:parent-style-name="standard">
      <style:graphic-properties draw:stroke="none" draw:fill="none" draw:textarea-horizontal-align="left" draw:textarea-vertical-align="top" draw:auto-grow-height="true" draw:auto-grow-width="true" fo:min-height="0.552cm" fo:min-width="7.016cm" fo:padding-top="0cm" fo:padding-bottom="0cm" fo:padding-left="0cm" fo:padding-right="0cm" loext:decorative="false"/>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543cm" fo:min-width="0.49cm" fo:padding-top="0cm" fo:padding-bottom="0cm" fo:padding-left="0cm" fo:padding-right="0cm" loext:decorative="false"/>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552cm" fo:min-width="0.985cm" fo:padding-top="0cm" fo:padding-bottom="0cm" fo:padding-left="0cm" fo:padding-right="0cm" loext:decorative="false"/>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552cm" fo:min-width="4.341cm" fo:padding-top="0cm" fo:padding-bottom="0cm" fo:padding-left="0cm" fo:padding-right="0cm" loext:decorative="false"/>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552cm" fo:min-width="1.258cm" fo:padding-top="0cm" fo:padding-bottom="0cm" fo:padding-left="0cm" fo:padding-right="0cm" loext:decorative="false"/>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552cm" fo:min-width="4.997cm" fo:padding-top="0cm" fo:padding-bottom="0cm" fo:padding-left="0cm" fo:padding-right="0cm" loext:decorative="false"/>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543cm" fo:min-width="0.491cm" fo:padding-top="0cm" fo:padding-bottom="0cm" fo:padding-left="0cm" fo:padding-right="0cm" loext:decorative="false"/>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1.309cm" fo:min-width="15.346cm" fo:padding-top="0cm" fo:padding-bottom="0cm" fo:padding-left="0cm" fo:padding-right="0cm" loext:decorative="false"/>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552cm" fo:min-width="2.759cm" fo:padding-top="0cm" fo:padding-bottom="0cm" fo:padding-left="0cm" fo:padding-right="0cm" loext:decorative="false"/>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552cm" fo:min-width="4.424cm" fo:padding-top="0cm" fo:padding-bottom="0cm" fo:padding-left="0cm" fo:padding-right="0cm" loext:decorative="false"/>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552cm" fo:min-width="3.496cm" fo:padding-top="0cm" fo:padding-bottom="0cm" fo:padding-left="0cm" fo:padding-right="0cm" loext:decorative="false"/>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552cm" fo:min-width="1.749cm" fo:padding-top="0cm" fo:padding-bottom="0cm" fo:padding-left="0cm" fo:padding-right="0cm" loext:decorative="false"/>
      <style:paragraph-properties style:writing-mode="lr-tb"/>
    </style:style>
    <style:style style:name="gr261" style:family="graphic" style:parent-style-name="standard">
      <style:graphic-properties draw:stroke="none" draw:fill="solid" draw:fill-color="#048ae3" loext:decorative="false"/>
    </style:style>
    <style:style style:name="gr262" style:family="graphic" style:parent-style-name="standard">
      <style:graphic-properties draw:stroke="none" draw:fill="none" draw:textarea-horizontal-align="left" draw:textarea-vertical-align="top" draw:auto-grow-height="true" draw:auto-grow-width="true" fo:min-height="0.552cm" fo:min-width="1.312cm" fo:padding-top="0cm" fo:padding-bottom="0cm" fo:padding-left="0cm" fo:padding-right="0cm" loext:decorative="false"/>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475cm" fo:min-width="3.579cm" fo:padding-top="0cm" fo:padding-bottom="0cm" fo:padding-left="0cm" fo:padding-right="0cm" loext:decorative="false"/>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475cm" fo:min-width="4.026cm" fo:padding-top="0cm" fo:padding-bottom="0cm" fo:padding-left="0cm" fo:padding-right="0cm" loext:decorative="false"/>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475cm" fo:min-width="1.649cm" fo:padding-top="0cm" fo:padding-bottom="0cm" fo:padding-left="0cm" fo:padding-right="0cm" loext:decorative="false"/>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475cm" fo:min-width="3.65cm" fo:padding-top="0cm" fo:padding-bottom="0cm" fo:padding-left="0cm" fo:padding-right="0cm" loext:decorative="false"/>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475cm" fo:min-width="1.955cm" fo:padding-top="0cm" fo:padding-bottom="0cm" fo:padding-left="0cm" fo:padding-right="0cm" loext:decorative="false"/>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475cm" fo:min-width="3.39cm" fo:padding-top="0cm" fo:padding-bottom="0cm" fo:padding-left="0cm" fo:padding-right="0cm" loext:decorative="false"/>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475cm" fo:min-width="3.908cm" fo:padding-top="0cm" fo:padding-bottom="0cm" fo:padding-left="0cm" fo:padding-right="0cm" loext:decorative="false"/>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475cm" fo:min-width="1.014cm" fo:padding-top="0cm" fo:padding-bottom="0cm" fo:padding-left="0cm" fo:padding-right="0cm" loext:decorative="false"/>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475cm" fo:min-width="3.555cm" fo:padding-top="0cm" fo:padding-bottom="0cm" fo:padding-left="0cm" fo:padding-right="0cm" loext:decorative="false"/>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475cm" fo:min-width="2.261cm" fo:padding-top="0cm" fo:padding-bottom="0cm" fo:padding-left="0cm" fo:padding-right="0cm" loext:decorative="false"/>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475cm" fo:min-width="3.249cm" fo:padding-top="0cm" fo:padding-bottom="0cm" fo:padding-left="0cm" fo:padding-right="0cm" loext:decorative="false"/>
      <style:paragraph-properties style:writing-mode="lr-tb"/>
    </style:style>
    <style:style style:name="gr274" style:family="graphic" style:parent-style-name="standard">
      <style:graphic-properties draw:stroke="none" draw:fill="solid" draw:fill-color="#266de7" loext:decorative="false"/>
    </style:style>
    <style:style style:name="gr275" style:family="graphic" style:parent-style-name="standard">
      <style:graphic-properties draw:stroke="none" draw:fill="none" draw:textarea-horizontal-align="left" draw:textarea-vertical-align="top" draw:auto-grow-height="true" draw:auto-grow-width="true" fo:min-height="0.475cm" fo:min-width="3.532cm" fo:padding-top="0cm" fo:padding-bottom="0cm" fo:padding-left="0cm" fo:padding-right="0cm" loext:decorative="false"/>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552cm" fo:min-width="3.686cm" fo:padding-top="0cm" fo:padding-bottom="0cm" fo:padding-left="0cm" fo:padding-right="0cm" loext:decorative="false"/>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475cm" fo:min-width="3.414cm" fo:padding-top="0cm" fo:padding-bottom="0cm" fo:padding-left="0cm" fo:padding-right="0cm" loext:decorative="false"/>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475cm" fo:min-width="1.602cm" fo:padding-top="0cm" fo:padding-bottom="0cm" fo:padding-left="0cm" fo:padding-right="0cm" loext:decorative="false"/>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475cm" fo:min-width="3.861cm" fo:padding-top="0cm" fo:padding-bottom="0cm" fo:padding-left="0cm" fo:padding-right="0cm" loext:decorative="false"/>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475cm" fo:min-width="4.143cm" fo:padding-top="0cm" fo:padding-bottom="0cm" fo:padding-left="0cm" fo:padding-right="0cm" loext:decorative="false"/>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475cm" fo:min-width="3.744cm" fo:padding-top="0cm" fo:padding-bottom="0cm" fo:padding-left="0cm" fo:padding-right="0cm" loext:decorative="false"/>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475cm" fo:min-width="4.284cm" fo:padding-top="0cm" fo:padding-bottom="0cm" fo:padding-left="0cm" fo:padding-right="0cm" loext:decorative="false"/>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475cm" fo:min-width="1.343cm" fo:padding-top="0cm" fo:padding-bottom="0cm" fo:padding-left="0cm" fo:padding-right="0cm" loext:decorative="false"/>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475cm" fo:min-width="2.637cm" fo:padding-top="0cm" fo:padding-bottom="0cm" fo:padding-left="0cm" fo:padding-right="0cm" loext:decorative="false"/>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475cm" fo:min-width="4.238cm" fo:padding-top="0cm" fo:padding-bottom="0cm" fo:padding-left="0cm" fo:padding-right="0cm" loext:decorative="false"/>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475cm" fo:min-width="2.284cm" fo:padding-top="0cm" fo:padding-bottom="0cm" fo:padding-left="0cm" fo:padding-right="0cm" loext:decorative="false"/>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475cm" fo:min-width="2.214cm" fo:padding-top="0cm" fo:padding-bottom="0cm" fo:padding-left="0cm" fo:padding-right="0cm" loext:decorative="false"/>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475cm" fo:min-width="2.05cm" fo:padding-top="0cm" fo:padding-bottom="0cm" fo:padding-left="0cm" fo:padding-right="0cm" loext:decorative="false"/>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475cm" fo:min-width="2.543cm" fo:padding-top="0cm" fo:padding-bottom="0cm" fo:padding-left="0cm" fo:padding-right="0cm" loext:decorative="false"/>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475cm" fo:min-width="4.214cm" fo:padding-top="0cm" fo:padding-bottom="0cm" fo:padding-left="0cm" fo:padding-right="0cm" loext:decorative="false"/>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475cm" fo:min-width="4.12cm" fo:padding-top="0cm" fo:padding-bottom="0cm" fo:padding-left="0cm" fo:padding-right="0cm" loext:decorative="false"/>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552cm" fo:min-width="4.068cm" fo:padding-top="0cm" fo:padding-bottom="0cm" fo:padding-left="0cm" fo:padding-right="0cm" loext:decorative="false"/>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552cm" fo:min-width="3.168cm" fo:padding-top="0cm" fo:padding-bottom="0cm" fo:padding-left="0cm" fo:padding-right="0cm" loext:decorative="false"/>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552cm" fo:min-width="3.468cm" fo:padding-top="0cm" fo:padding-bottom="0cm" fo:padding-left="0cm" fo:padding-right="0cm" loext:decorative="false"/>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552cm" fo:min-width="2.05cm" fo:padding-top="0cm" fo:padding-bottom="0cm" fo:padding-left="0cm" fo:padding-right="0cm" loext:decorative="false"/>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552cm" fo:min-width="4.096cm" fo:padding-top="0cm" fo:padding-bottom="0cm" fo:padding-left="0cm" fo:padding-right="0cm" loext:decorative="false"/>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552cm" fo:min-width="3.523cm" fo:padding-top="0cm" fo:padding-bottom="0cm" fo:padding-left="0cm" fo:padding-right="0cm" loext:decorative="false"/>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552cm" fo:min-width="2.185cm" fo:padding-top="0cm" fo:padding-bottom="0cm" fo:padding-left="0cm" fo:padding-right="0cm" loext:decorative="false"/>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552cm" fo:min-width="2.322cm" fo:padding-top="0cm" fo:padding-bottom="0cm" fo:padding-left="0cm" fo:padding-right="0cm" loext:decorative="false"/>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552cm" fo:min-width="3.277cm" fo:padding-top="0cm" fo:padding-bottom="0cm" fo:padding-left="0cm" fo:padding-right="0cm" loext:decorative="false"/>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552cm" fo:min-width="3.714cm" fo:padding-top="0cm" fo:padding-bottom="0cm" fo:padding-left="0cm" fo:padding-right="0cm" loext:decorative="false"/>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552cm" fo:min-width="2.022cm" fo:padding-top="0cm" fo:padding-bottom="0cm" fo:padding-left="0cm" fo:padding-right="0cm" loext:decorative="false"/>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552cm" fo:min-width="3.933cm" fo:padding-top="0cm" fo:padding-bottom="0cm" fo:padding-left="0cm" fo:padding-right="0cm" loext:decorative="false"/>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552cm" fo:min-width="1.203cm" fo:padding-top="0cm" fo:padding-bottom="0cm" fo:padding-left="0cm" fo:padding-right="0cm" loext:decorative="false"/>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475cm" fo:min-width="3.273cm" fo:padding-top="0cm" fo:padding-bottom="0cm" fo:padding-left="0cm" fo:padding-right="0cm" loext:decorative="false"/>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475cm" fo:min-width="3.507cm" fo:padding-top="0cm" fo:padding-bottom="0cm" fo:padding-left="0cm" fo:padding-right="0cm" loext:decorative="false"/>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475cm" fo:min-width="4.097cm" fo:padding-top="0cm" fo:padding-bottom="0cm" fo:padding-left="0cm" fo:padding-right="0cm" loext:decorative="false"/>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475cm" fo:min-width="1.861cm" fo:padding-top="0cm" fo:padding-bottom="0cm" fo:padding-left="0cm" fo:padding-right="0cm" loext:decorative="false"/>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475cm" fo:min-width="3.296cm" fo:padding-top="0cm" fo:padding-bottom="0cm" fo:padding-left="0cm" fo:padding-right="0cm" loext:decorative="false"/>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475cm" fo:min-width="1.814cm" fo:padding-top="0cm" fo:padding-bottom="0cm" fo:padding-left="0cm" fo:padding-right="0cm" loext:decorative="false"/>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475cm" fo:min-width="3.814cm" fo:padding-top="0cm" fo:padding-bottom="0cm" fo:padding-left="0cm" fo:padding-right="0cm" loext:decorative="false"/>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475cm" fo:min-width="2.614cm" fo:padding-top="0cm" fo:padding-bottom="0cm" fo:padding-left="0cm" fo:padding-right="0cm" loext:decorative="false"/>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475cm" fo:min-width="3.672cm" fo:padding-top="0cm" fo:padding-bottom="0cm" fo:padding-left="0cm" fo:padding-right="0cm" loext:decorative="false"/>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475cm" fo:min-width="4.167cm" fo:padding-top="0cm" fo:padding-bottom="0cm" fo:padding-left="0cm" fo:padding-right="0cm" loext:decorative="false"/>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475cm" fo:min-width="2.897cm" fo:padding-top="0cm" fo:padding-bottom="0cm" fo:padding-left="0cm" fo:padding-right="0cm" loext:decorative="false"/>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475cm" fo:min-width="3.461cm" fo:padding-top="0cm" fo:padding-bottom="0cm" fo:padding-left="0cm" fo:padding-right="0cm" loext:decorative="false"/>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475cm" fo:min-width="2.895cm" fo:padding-top="0cm" fo:padding-bottom="0cm" fo:padding-left="0cm" fo:padding-right="0cm" loext:decorative="false"/>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1.309cm" fo:min-width="11.257cm" fo:padding-top="0cm" fo:padding-bottom="0cm" fo:padding-left="0cm" fo:padding-right="0cm" loext:decorative="false"/>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552cm" fo:min-width="3.005cm" fo:padding-top="0cm" fo:padding-bottom="0cm" fo:padding-left="0cm" fo:padding-right="0cm" loext:decorative="false"/>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552cm" fo:min-width="2.568cm" fo:padding-top="0cm" fo:padding-bottom="0cm" fo:padding-left="0cm" fo:padding-right="0cm" loext:decorative="false"/>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552cm" fo:min-width="1.694cm" fo:padding-top="0cm" fo:padding-bottom="0cm" fo:padding-left="0cm" fo:padding-right="0cm" loext:decorative="false"/>
      <style:paragraph-properties style:writing-mode="lr-tb"/>
    </style:style>
    <style:style style:name="gr322" style:family="graphic" style:parent-style-name="standard">
      <style:graphic-properties draw:stroke="none" draw:fill="solid" draw:fill-color="#00b050" loext:decorative="false"/>
    </style:style>
    <style:style style:name="gr323" style:family="graphic" style:parent-style-name="standard">
      <style:graphic-properties draw:stroke="none" draw:fill="none" draw:textarea-horizontal-align="left" draw:textarea-vertical-align="top" draw:auto-grow-height="true" draw:auto-grow-width="true" fo:min-height="0.552cm" fo:min-width="2.595cm" fo:padding-top="0cm" fo:padding-bottom="0cm" fo:padding-left="0cm" fo:padding-right="0cm" loext:decorative="false"/>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552cm" fo:min-width="2.868cm" fo:padding-top="0cm" fo:padding-bottom="0cm" fo:padding-left="0cm" fo:padding-right="0cm" loext:decorative="false"/>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552cm" fo:min-width="2.431cm" fo:padding-top="0cm" fo:padding-bottom="0cm" fo:padding-left="0cm" fo:padding-right="0cm" loext:decorative="false"/>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552cm" fo:min-width="1.176cm" fo:padding-top="0cm" fo:padding-bottom="0cm" fo:padding-left="0cm" fo:padding-right="0cm" loext:decorative="false"/>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552cm" fo:min-width="2.513cm" fo:padding-top="0cm" fo:padding-bottom="0cm" fo:padding-left="0cm" fo:padding-right="0cm" loext:decorative="false"/>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552cm" fo:min-width="1.558cm" fo:padding-top="0cm" fo:padding-bottom="0cm" fo:padding-left="0cm" fo:padding-right="0cm" loext:decorative="false"/>
      <style:paragraph-properties style:writing-mode="lr-tb"/>
    </style:style>
    <style:style style:name="gr329" style:family="graphic" style:parent-style-name="standard">
      <style:graphic-properties draw:stroke="none" draw:fill="solid" draw:fill-color="#a7b3e8" loext:decorative="false"/>
    </style:style>
    <style:style style:name="gr330" style:family="graphic" style:parent-style-name="standard">
      <style:graphic-properties draw:stroke="none" draw:fill="solid" draw:fill-color="#a8b4e8" loext:decorative="false"/>
    </style:style>
    <style:style style:name="gr331" style:family="graphic" style:parent-style-name="standard">
      <style:graphic-properties draw:stroke="none" draw:fill="solid" draw:fill-color="#a9b4e8" loext:decorative="false"/>
    </style:style>
    <style:style style:name="gr332" style:family="graphic" style:parent-style-name="standard">
      <style:graphic-properties draw:stroke="none" draw:fill="solid" draw:fill-color="#a9b5e8" loext:decorative="false"/>
    </style:style>
    <style:style style:name="gr333" style:family="graphic" style:parent-style-name="standard">
      <style:graphic-properties draw:stroke="none" draw:fill="solid" draw:fill-color="#aab5e9" loext:decorative="false"/>
    </style:style>
    <style:style style:name="gr334" style:family="graphic" style:parent-style-name="standard">
      <style:graphic-properties draw:stroke="none" draw:fill="solid" draw:fill-color="#aab6e9" loext:decorative="false"/>
    </style:style>
    <style:style style:name="gr335" style:family="graphic" style:parent-style-name="standard">
      <style:graphic-properties draw:stroke="none" draw:fill="solid" draw:fill-color="#abb6e9" loext:decorative="false"/>
    </style:style>
    <style:style style:name="gr336" style:family="graphic" style:parent-style-name="standard">
      <style:graphic-properties draw:stroke="none" draw:fill="solid" draw:fill-color="#acb7e9" loext:decorative="false"/>
    </style:style>
    <style:style style:name="gr337" style:family="graphic" style:parent-style-name="standard">
      <style:graphic-properties draw:stroke="none" draw:fill="solid" draw:fill-color="#adb8e9" loext:decorative="false"/>
    </style:style>
    <style:style style:name="gr338" style:family="graphic" style:parent-style-name="standard">
      <style:graphic-properties draw:stroke="none" draw:fill="solid" draw:fill-color="#aeb9ea" loext:decorative="false"/>
    </style:style>
    <style:style style:name="gr339" style:family="graphic" style:parent-style-name="standard">
      <style:graphic-properties draw:stroke="none" draw:fill="solid" draw:fill-color="#afb9ea" loext:decorative="false"/>
    </style:style>
    <style:style style:name="gr340" style:family="graphic" style:parent-style-name="standard">
      <style:graphic-properties draw:stroke="none" draw:fill="solid" draw:fill-color="#afbaea" loext:decorative="false"/>
    </style:style>
    <style:style style:name="gr341" style:family="graphic" style:parent-style-name="standard">
      <style:graphic-properties draw:stroke="none" draw:fill="solid" draw:fill-color="#b0baea" loext:decorative="false"/>
    </style:style>
    <style:style style:name="gr342" style:family="graphic" style:parent-style-name="standard">
      <style:graphic-properties draw:stroke="none" draw:fill="solid" draw:fill-color="#b0bbea" loext:decorative="false"/>
    </style:style>
    <style:style style:name="gr343" style:family="graphic" style:parent-style-name="standard">
      <style:graphic-properties draw:stroke="none" draw:fill="solid" draw:fill-color="#b1bbea" loext:decorative="false"/>
    </style:style>
    <style:style style:name="gr344" style:family="graphic" style:parent-style-name="standard">
      <style:graphic-properties draw:stroke="none" draw:fill="solid" draw:fill-color="#b2bcea" loext:decorative="false"/>
    </style:style>
    <style:style style:name="gr345" style:family="graphic" style:parent-style-name="standard">
      <style:graphic-properties draw:stroke="none" draw:fill="solid" draw:fill-color="#b3bdeb" loext:decorative="false"/>
    </style:style>
    <style:style style:name="gr346" style:family="graphic" style:parent-style-name="standard">
      <style:graphic-properties draw:stroke="none" draw:fill="solid" draw:fill-color="#b3beeb" loext:decorative="false"/>
    </style:style>
    <style:style style:name="gr347" style:family="graphic" style:parent-style-name="standard">
      <style:graphic-properties draw:stroke="none" draw:fill="solid" draw:fill-color="#b4beeb" loext:decorative="false"/>
    </style:style>
    <style:style style:name="gr348" style:family="graphic" style:parent-style-name="standard">
      <style:graphic-properties draw:stroke="none" draw:fill="solid" draw:fill-color="#b5bfeb" loext:decorative="false"/>
    </style:style>
    <style:style style:name="gr349" style:family="graphic" style:parent-style-name="standard">
      <style:graphic-properties draw:stroke="none" draw:fill="solid" draw:fill-color="#b6c0eb" loext:decorative="false"/>
    </style:style>
    <style:style style:name="gr350" style:family="graphic" style:parent-style-name="standard">
      <style:graphic-properties draw:stroke="none" draw:fill="solid" draw:fill-color="#b7c1ec" loext:decorative="false"/>
    </style:style>
    <style:style style:name="gr351" style:family="graphic" style:parent-style-name="standard">
      <style:graphic-properties draw:stroke="none" draw:fill="solid" draw:fill-color="#b8c1ec" loext:decorative="false"/>
    </style:style>
    <style:style style:name="gr352" style:family="graphic" style:parent-style-name="standard">
      <style:graphic-properties draw:stroke="none" draw:fill="solid" draw:fill-color="#b8c2ec" loext:decorative="false"/>
    </style:style>
    <style:style style:name="gr353" style:family="graphic" style:parent-style-name="standard">
      <style:graphic-properties draw:stroke="none" draw:fill="solid" draw:fill-color="#b9c2ec" loext:decorative="false"/>
    </style:style>
    <style:style style:name="gr354" style:family="graphic" style:parent-style-name="standard">
      <style:graphic-properties draw:stroke="none" draw:fill="solid" draw:fill-color="#b9c3ec" loext:decorative="false"/>
    </style:style>
    <style:style style:name="gr355" style:family="graphic" style:parent-style-name="standard">
      <style:graphic-properties draw:stroke="none" draw:fill="solid" draw:fill-color="#bac3ec" loext:decorative="false"/>
    </style:style>
    <style:style style:name="gr356" style:family="graphic" style:parent-style-name="standard">
      <style:graphic-properties draw:stroke="none" draw:fill="solid" draw:fill-color="#bbc4ec" loext:decorative="false"/>
    </style:style>
    <style:style style:name="gr357" style:family="graphic" style:parent-style-name="standard">
      <style:graphic-properties draw:stroke="none" draw:fill="solid" draw:fill-color="#bcc5ed" loext:decorative="false"/>
    </style:style>
    <style:style style:name="gr358" style:family="graphic" style:parent-style-name="standard">
      <style:graphic-properties draw:stroke="none" draw:fill="solid" draw:fill-color="#bdc6ed" loext:decorative="false"/>
    </style:style>
    <style:style style:name="gr359" style:family="graphic" style:parent-style-name="standard">
      <style:graphic-properties draw:stroke="none" draw:fill="solid" draw:fill-color="#bec6ed" loext:decorative="false"/>
    </style:style>
    <style:style style:name="gr360" style:family="graphic" style:parent-style-name="standard">
      <style:graphic-properties draw:stroke="none" draw:fill="solid" draw:fill-color="#bec7ed" loext:decorative="false"/>
    </style:style>
    <style:style style:name="gr361" style:family="graphic" style:parent-style-name="standard">
      <style:graphic-properties draw:stroke="none" draw:fill="solid" draw:fill-color="#bfc7ed" loext:decorative="false"/>
    </style:style>
    <style:style style:name="gr362" style:family="graphic" style:parent-style-name="standard">
      <style:graphic-properties draw:stroke="none" draw:fill="solid" draw:fill-color="#bfc8ed" loext:decorative="false"/>
    </style:style>
    <style:style style:name="gr363" style:family="graphic" style:parent-style-name="standard">
      <style:graphic-properties draw:stroke="none" draw:fill="solid" draw:fill-color="#c0c8ee" loext:decorative="false"/>
    </style:style>
    <style:style style:name="gr364" style:family="graphic" style:parent-style-name="standard">
      <style:graphic-properties draw:stroke="none" draw:fill="solid" draw:fill-color="#c1c9ee" loext:decorative="false"/>
    </style:style>
    <style:style style:name="gr365" style:family="graphic" style:parent-style-name="standard">
      <style:graphic-properties draw:stroke="none" draw:fill="solid" draw:fill-color="#c2caee" loext:decorative="false"/>
    </style:style>
    <style:style style:name="gr366" style:family="graphic" style:parent-style-name="standard">
      <style:graphic-properties draw:stroke="none" draw:fill="solid" draw:fill-color="#c3cbee" loext:decorative="false"/>
    </style:style>
    <style:style style:name="gr367" style:family="graphic" style:parent-style-name="standard">
      <style:graphic-properties draw:stroke="none" draw:fill="solid" draw:fill-color="#c4ccef" loext:decorative="false"/>
    </style:style>
    <style:style style:name="gr368" style:family="graphic" style:parent-style-name="standard">
      <style:graphic-properties draw:stroke="none" draw:fill="solid" draw:fill-color="#c5ccef" loext:decorative="false"/>
    </style:style>
    <style:style style:name="gr369" style:family="graphic" style:parent-style-name="standard">
      <style:graphic-properties draw:stroke="none" draw:fill="solid" draw:fill-color="#c6cdef" loext:decorative="false"/>
    </style:style>
    <style:style style:name="gr370" style:family="graphic" style:parent-style-name="standard">
      <style:graphic-properties draw:stroke="none" draw:fill="solid" draw:fill-color="#c7ceef" loext:decorative="false"/>
    </style:style>
    <style:style style:name="gr371" style:family="graphic" style:parent-style-name="standard">
      <style:graphic-properties draw:stroke="none" draw:fill="solid" draw:fill-color="#c7cff0" loext:decorative="false"/>
    </style:style>
    <style:style style:name="gr372" style:family="graphic" style:parent-style-name="standard">
      <style:graphic-properties draw:stroke="none" draw:fill="solid" draw:fill-color="#c8cff0" loext:decorative="false"/>
    </style:style>
    <style:style style:name="gr373" style:family="graphic" style:parent-style-name="standard">
      <style:graphic-properties draw:stroke="none" draw:fill="solid" draw:fill-color="#c9d0f0" loext:decorative="false"/>
    </style:style>
    <style:style style:name="gr374" style:family="graphic" style:parent-style-name="standard">
      <style:graphic-properties draw:stroke="none" draw:fill="solid" draw:fill-color="#cad1f0" loext:decorative="false"/>
    </style:style>
    <style:style style:name="gr375" style:family="graphic" style:parent-style-name="standard">
      <style:graphic-properties draw:stroke="none" draw:fill="solid" draw:fill-color="#cbd2f1" loext:decorative="false"/>
    </style:style>
    <style:style style:name="gr376" style:family="graphic" style:parent-style-name="standard">
      <style:graphic-properties draw:stroke="none" draw:fill="solid" draw:fill-color="#ccd3f1" loext:decorative="false"/>
    </style:style>
    <style:style style:name="gr377" style:family="graphic" style:parent-style-name="standard">
      <style:graphic-properties draw:stroke="none" draw:fill="solid" draw:fill-color="#cdd3f1" loext:decorative="false"/>
    </style:style>
    <style:style style:name="gr378" style:family="graphic" style:parent-style-name="standard">
      <style:graphic-properties draw:stroke="none" draw:fill="solid" draw:fill-color="#ced4f1" loext:decorative="false"/>
    </style:style>
    <style:style style:name="gr379" style:family="graphic" style:parent-style-name="standard">
      <style:graphic-properties draw:stroke="none" draw:fill="solid" draw:fill-color="#cfd5f2" loext:decorative="false"/>
    </style:style>
    <style:style style:name="gr380" style:family="graphic" style:parent-style-name="standard">
      <style:graphic-properties draw:stroke="none" draw:fill="solid" draw:fill-color="#cfd6f2" loext:decorative="false"/>
    </style:style>
    <style:style style:name="gr381" style:family="graphic" style:parent-style-name="standard">
      <style:graphic-properties draw:stroke="none" draw:fill="solid" draw:fill-color="#d0d6f2" loext:decorative="false"/>
    </style:style>
    <style:style style:name="gr382" style:family="graphic" style:parent-style-name="standard">
      <style:graphic-properties draw:stroke="none" draw:fill="solid" draw:fill-color="#d1d7f3" loext:decorative="false"/>
    </style:style>
    <style:style style:name="gr383" style:family="graphic" style:parent-style-name="standard">
      <style:graphic-properties draw:stroke="none" draw:fill="solid" draw:fill-color="#d2d8f3" loext:decorative="false"/>
    </style:style>
    <style:style style:name="gr384" style:family="graphic" style:parent-style-name="standard">
      <style:graphic-properties draw:stroke="none" draw:fill="solid" draw:fill-color="#d3d9f3" loext:decorative="false"/>
    </style:style>
    <style:style style:name="gr385" style:family="graphic" style:parent-style-name="standard">
      <style:graphic-properties draw:stroke="none" draw:fill="solid" draw:fill-color="#d4d9f3" loext:decorative="false"/>
    </style:style>
    <style:style style:name="gr386" style:family="graphic" style:parent-style-name="standard">
      <style:graphic-properties draw:stroke="none" draw:fill="solid" draw:fill-color="#d5daf4" loext:decorative="false"/>
    </style:style>
    <style:style style:name="gr387" style:family="graphic" style:parent-style-name="standard">
      <style:graphic-properties draw:stroke="none" draw:fill="solid" draw:fill-color="#d6dbf4" loext:decorative="false"/>
    </style:style>
    <style:style style:name="gr388" style:family="graphic" style:parent-style-name="standard">
      <style:graphic-properties draw:stroke="none" draw:fill="solid" draw:fill-color="#d7dcf4" loext:decorative="false"/>
    </style:style>
    <style:style style:name="gr389" style:family="graphic" style:parent-style-name="standard">
      <style:graphic-properties draw:stroke="none" draw:fill="solid" draw:fill-color="#d7ddf4" loext:decorative="false"/>
    </style:style>
    <style:style style:name="gr390" style:family="graphic" style:parent-style-name="standard">
      <style:graphic-properties draw:stroke="none" draw:fill="solid" draw:fill-color="#d8ddf5" loext:decorative="false"/>
    </style:style>
    <style:style style:name="gr391" style:family="graphic" style:parent-style-name="standard">
      <style:graphic-properties draw:stroke="none" draw:fill="solid" draw:fill-color="#d9def5" loext:decorative="false"/>
    </style:style>
    <style:style style:name="gr392" style:family="graphic" style:parent-style-name="standard">
      <style:graphic-properties draw:stroke="none" draw:fill="solid" draw:fill-color="#dadff5" loext:decorative="false"/>
    </style:style>
    <style:style style:name="gr393" style:family="graphic" style:parent-style-name="standard">
      <style:graphic-properties draw:stroke="none" draw:fill="solid" draw:fill-color="#dbe0f5" loext:decorative="false"/>
    </style:style>
    <style:style style:name="gr394" style:family="graphic" style:parent-style-name="standard">
      <style:graphic-properties draw:stroke="none" draw:fill="solid" draw:fill-color="#dce0f6" loext:decorative="false"/>
    </style:style>
    <style:style style:name="gr395" style:family="graphic" style:parent-style-name="standard">
      <style:graphic-properties draw:stroke="none" draw:fill="solid" draw:fill-color="#dde1f6" loext:decorative="false"/>
    </style:style>
    <style:style style:name="gr396" style:family="graphic" style:parent-style-name="standard">
      <style:graphic-properties draw:stroke="none" draw:fill="solid" draw:fill-color="#dee2f6" loext:decorative="false"/>
    </style:style>
    <style:style style:name="gr397" style:family="graphic" style:parent-style-name="standard">
      <style:graphic-properties draw:stroke="none" draw:fill="solid" draw:fill-color="#dfe3f6" loext:decorative="false"/>
    </style:style>
    <style:style style:name="gr398" style:family="graphic" style:parent-style-name="standard">
      <style:graphic-properties draw:stroke="none" draw:fill="solid" draw:fill-color="#dfe3f7" loext:decorative="false"/>
    </style:style>
    <style:style style:name="gr399" style:family="graphic" style:parent-style-name="standard">
      <style:graphic-properties draw:stroke="none" draw:fill="solid" draw:fill-color="#e0e4f7" loext:decorative="false"/>
    </style:style>
    <style:style style:name="gr400" style:family="graphic" style:parent-style-name="standard">
      <style:graphic-properties draw:stroke="none" draw:fill="solid" draw:fill-color="#e1e5f7" loext:decorative="false"/>
    </style:style>
    <style:style style:name="gr401" style:family="graphic" style:parent-style-name="standard">
      <style:graphic-properties draw:stroke="none" draw:fill="solid" draw:fill-color="#e2e6f8" loext:decorative="false"/>
    </style:style>
    <style:style style:name="gr402" style:family="graphic" style:parent-style-name="standard">
      <style:graphic-properties draw:stroke="none" draw:fill="solid" draw:fill-color="#e3e7f8" loext:decorative="false"/>
    </style:style>
    <style:style style:name="gr403" style:family="graphic" style:parent-style-name="standard">
      <style:graphic-properties draw:stroke="none" draw:fill="solid" draw:fill-color="#e4e7f8" loext:decorative="false"/>
    </style:style>
    <style:style style:name="gr404" style:family="graphic" style:parent-style-name="standard">
      <style:graphic-properties draw:stroke="none" draw:fill="solid" draw:fill-color="#e5e8f8" loext:decorative="false"/>
    </style:style>
    <style:style style:name="gr405" style:family="graphic" style:parent-style-name="standard">
      <style:graphic-properties draw:stroke="none" draw:fill="solid" draw:fill-color="#e6e9f9" loext:decorative="false"/>
    </style:style>
    <style:style style:name="gr406" style:family="graphic" style:parent-style-name="standard">
      <style:graphic-properties draw:stroke="none" draw:fill="solid" draw:fill-color="#e7eaf9" loext:decorative="false"/>
    </style:style>
    <style:style style:name="gr407" style:family="graphic" style:parent-style-name="standard">
      <style:graphic-properties draw:stroke="none" draw:fill="none" draw:textarea-horizontal-align="left" draw:textarea-vertical-align="top" draw:auto-grow-height="true" draw:auto-grow-width="true" fo:min-height="0.552cm" fo:min-width="5.626cm" fo:padding-top="0cm" fo:padding-bottom="0cm" fo:padding-left="0cm" fo:padding-right="0cm" loext:decorative="false"/>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552cm" fo:min-width="2.186cm" fo:padding-top="0cm" fo:padding-bottom="0cm" fo:padding-left="0cm" fo:padding-right="0cm" loext:decorative="false"/>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552cm" fo:min-width="5.378cm" fo:padding-top="0cm" fo:padding-bottom="0cm" fo:padding-left="0cm" fo:padding-right="0cm" loext:decorative="false"/>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552cm" fo:min-width="4.288cm" fo:padding-top="0cm" fo:padding-bottom="0cm" fo:padding-left="0cm" fo:padding-right="0cm" loext:decorative="false"/>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552cm" fo:min-width="4.26cm" fo:padding-top="0cm" fo:padding-bottom="0cm" fo:padding-left="0cm" fo:padding-right="0cm" loext:decorative="false"/>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552cm" fo:min-width="4.642cm" fo:padding-top="0cm" fo:padding-bottom="0cm" fo:padding-left="0cm" fo:padding-right="0cm" loext:decorative="false"/>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552cm" fo:min-width="6.007cm" fo:padding-top="0cm" fo:padding-bottom="0cm" fo:padding-left="0cm" fo:padding-right="0cm" loext:decorative="false"/>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552cm" fo:min-width="6.117cm" fo:padding-top="0cm" fo:padding-bottom="0cm" fo:padding-left="0cm" fo:padding-right="0cm" loext:decorative="false"/>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552cm" fo:min-width="4.506cm" fo:padding-top="0cm" fo:padding-bottom="0cm" fo:padding-left="0cm" fo:padding-right="0cm" loext:decorative="false"/>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552cm" fo:min-width="2.104cm" fo:padding-top="0cm" fo:padding-bottom="0cm" fo:padding-left="0cm" fo:padding-right="0cm" loext:decorative="false"/>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552cm" fo:min-width="3.879cm" fo:padding-top="0cm" fo:padding-bottom="0cm" fo:padding-left="0cm" fo:padding-right="0cm" loext:decorative="false"/>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552cm" fo:min-width="4.971cm" fo:padding-top="0cm" fo:padding-bottom="0cm" fo:padding-left="0cm" fo:padding-right="0cm" loext:decorative="false"/>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552cm" fo:min-width="5.816cm" fo:padding-top="0cm" fo:padding-bottom="0cm" fo:padding-left="0cm" fo:padding-right="0cm" loext:decorative="false"/>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552cm" fo:min-width="3.522cm" fo:padding-top="0cm" fo:padding-bottom="0cm" fo:padding-left="0cm" fo:padding-right="0cm" loext:decorative="false"/>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552cm" fo:min-width="5.407cm" fo:padding-top="0cm" fo:padding-bottom="0cm" fo:padding-left="0cm" fo:padding-right="0cm" loext:decorative="false"/>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552cm" fo:min-width="2.486cm" fo:padding-top="0cm" fo:padding-bottom="0cm" fo:padding-left="0cm" fo:padding-right="0cm" loext:decorative="false"/>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552cm" fo:min-width="4.042cm" fo:padding-top="0cm" fo:padding-bottom="0cm" fo:padding-left="0cm" fo:padding-right="0cm" loext:decorative="false"/>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552cm" fo:min-width="7.672cm" fo:padding-top="0cm" fo:padding-bottom="0cm" fo:padding-left="0cm" fo:padding-right="0cm" loext:decorative="false"/>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552cm" fo:min-width="8.026cm" fo:padding-top="0cm" fo:padding-bottom="0cm" fo:padding-left="0cm" fo:padding-right="0cm" loext:decorative="false"/>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552cm" fo:min-width="7.508cm" fo:padding-top="0cm" fo:padding-bottom="0cm" fo:padding-left="0cm" fo:padding-right="0cm" loext:decorative="false"/>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1.309cm" fo:min-width="20.835cm" fo:padding-top="0cm" fo:padding-bottom="0cm" fo:padding-left="0cm" fo:padding-right="0cm" loext:decorative="false"/>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552cm" fo:min-width="2.541cm" fo:padding-top="0cm" fo:padding-bottom="0cm" fo:padding-left="0cm" fo:padding-right="0cm" loext:decorative="false"/>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552cm" fo:min-width="4.041cm" fo:padding-top="0cm" fo:padding-bottom="0cm" fo:padding-left="0cm" fo:padding-right="0cm" loext:decorative="false"/>
      <style:paragraph-properties style:writing-mode="lr-tb"/>
    </style:style>
    <style:style style:name="gr430" style:family="graphic" style:parent-style-name="standard">
      <style:graphic-properties draw:stroke="solid" svg:stroke-width="0.067cm" svg:stroke-color="#7f7f7f" draw:stroke-linejoin="round" svg:stroke-linecap="butt" draw:fill="solid" draw:fill-color="#bfbfbf" fo:padding-top="0.033cm" fo:padding-bottom="0.033cm" fo:padding-left="0.033cm" fo:padding-right="0.033cm" loext:decorative="false"/>
    </style:style>
    <style:style style:name="gr431" style:family="graphic" style:parent-style-name="standard">
      <style:graphic-properties draw:stroke="none" draw:fill="none" draw:textarea-horizontal-align="left" draw:textarea-vertical-align="top" draw:auto-grow-height="true" draw:auto-grow-width="true" fo:min-height="0.552cm" fo:min-width="3.687cm" fo:padding-top="0cm" fo:padding-bottom="0cm" fo:padding-left="0cm" fo:padding-right="0cm" loext:decorative="false"/>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552cm" fo:min-width="12.885cm" fo:padding-top="0cm" fo:padding-bottom="0cm" fo:padding-left="0cm" fo:padding-right="0cm" loext:decorative="false"/>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552cm" fo:min-width="9.092cm" fo:padding-top="0cm" fo:padding-bottom="0cm" fo:padding-left="0cm" fo:padding-right="0cm" loext:decorative="false"/>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552cm" fo:min-width="4.478cm" fo:padding-top="0cm" fo:padding-bottom="0cm" fo:padding-left="0cm" fo:padding-right="0cm" loext:decorative="false"/>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552cm" fo:min-width="5.406cm" fo:padding-top="0cm" fo:padding-bottom="0cm" fo:padding-left="0cm" fo:padding-right="0cm" loext:decorative="false"/>
      <style:paragraph-properties style:writing-mode="lr-tb"/>
    </style:style>
    <style:style style:name="gr436" style:family="graphic" style:parent-style-name="standard">
      <style:graphic-properties draw:stroke="none" draw:fill="solid" draw:fill-color="#bfbfbf" loext:decorative="false"/>
    </style:style>
    <style:style style:name="gr437" style:family="graphic" style:parent-style-name="standard">
      <style:graphic-properties draw:stroke="none" draw:fill="none" draw:textarea-horizontal-align="left" draw:textarea-vertical-align="top" draw:auto-grow-height="true" draw:auto-grow-width="true" fo:min-height="0.552cm" fo:min-width="3.742cm" fo:padding-top="0cm" fo:padding-bottom="0cm" fo:padding-left="0cm" fo:padding-right="0cm" loext:decorative="false"/>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552cm" fo:min-width="7.234cm" fo:padding-top="0cm" fo:padding-bottom="0cm" fo:padding-left="0cm" fo:padding-right="0cm" loext:decorative="false"/>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552cm" fo:min-width="4.097cm" fo:padding-top="0cm" fo:padding-bottom="0cm" fo:padding-left="0cm" fo:padding-right="0cm" loext:decorative="false"/>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0.552cm" fo:min-width="3.66cm" fo:padding-top="0cm" fo:padding-bottom="0cm" fo:padding-left="0cm" fo:padding-right="0cm" loext:decorative="false"/>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552cm" fo:min-width="3.059cm" fo:padding-top="0cm" fo:padding-bottom="0cm" fo:padding-left="0cm" fo:padding-right="0cm" loext:decorative="false"/>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552cm" fo:min-width="1.612cm" fo:padding-top="0cm" fo:padding-bottom="0cm" fo:padding-left="0cm" fo:padding-right="0cm" loext:decorative="false"/>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552cm" fo:min-width="11.767cm" fo:padding-top="0cm" fo:padding-bottom="0cm" fo:padding-left="0cm" fo:padding-right="0cm" loext:decorative="false"/>
      <style:paragraph-properties style:writing-mode="lr-tb"/>
    </style:style>
    <style:style style:name="gr444" style:family="graphic" style:parent-style-name="standard">
      <style:graphic-properties draw:stroke="none" draw:fill="none" draw:textarea-horizontal-align="left" draw:textarea-vertical-align="top" draw:auto-grow-height="true" draw:auto-grow-width="true" fo:min-height="0.552cm" fo:min-width="6.498cm" fo:padding-top="0cm" fo:padding-bottom="0cm" fo:padding-left="0cm" fo:padding-right="0cm" loext:decorative="false"/>
      <style:paragraph-properties style:writing-mode="lr-tb"/>
    </style:style>
    <style:style style:name="gr445" style:family="graphic" style:parent-style-name="standard">
      <style:graphic-properties draw:stroke="none" draw:fill="none" draw:textarea-horizontal-align="left" draw:textarea-vertical-align="top" draw:auto-grow-height="true" draw:auto-grow-width="true" fo:min-height="0.552cm" fo:min-width="7.128cm" fo:padding-top="0cm" fo:padding-bottom="0cm" fo:padding-left="0cm" fo:padding-right="0cm" loext:decorative="false"/>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552cm" fo:min-width="8.545cm" fo:padding-top="0cm" fo:padding-bottom="0cm" fo:padding-left="0cm" fo:padding-right="0cm" loext:decorative="false"/>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552cm" fo:min-width="11.384cm" fo:padding-top="0cm" fo:padding-bottom="0cm" fo:padding-left="0cm" fo:padding-right="0cm" loext:decorative="false"/>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552cm" fo:min-width="12.558cm" fo:padding-top="0cm" fo:padding-bottom="0cm" fo:padding-left="0cm" fo:padding-right="0cm" loext:decorative="false"/>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552cm" fo:min-width="9.091cm" fo:padding-top="0cm" fo:padding-bottom="0cm" fo:padding-left="0cm" fo:padding-right="0cm" loext:decorative="false"/>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2.237cm" fo:min-width="19.828cm" fo:padding-top="0cm" fo:padding-bottom="0cm" fo:padding-left="0cm" fo:padding-right="0cm" loext:decorative="false"/>
      <style:paragraph-properties style:writing-mode="lr-tb"/>
    </style:style>
    <style:style style:name="gr451" style:family="graphic" style:parent-style-name="standard">
      <style:graphic-properties draw:stroke="none" draw:fill="solid" draw:fill-color="#1b4593" draw:opacity="15%" loext:decorative="false"/>
    </style:style>
    <style:style style:name="gr452" style:family="graphic" style:parent-style-name="standard">
      <style:graphic-properties draw:stroke="none" draw:fill="none" draw:textarea-horizontal-align="left" draw:textarea-vertical-align="top" draw:auto-grow-height="true" draw:auto-grow-width="true" fo:min-height="1.309cm" fo:min-width="9.067cm" fo:padding-top="0cm" fo:padding-bottom="0cm" fo:padding-left="0cm" fo:padding-right="0cm" loext:decorative="false"/>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712cm" fo:min-width="0.634cm" fo:padding-top="0cm" fo:padding-bottom="0cm" fo:padding-left="0cm" fo:padding-right="0cm" loext:decorative="false"/>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712cm" fo:min-width="5.649cm" fo:padding-top="0cm" fo:padding-bottom="0cm" fo:padding-left="0cm" fo:padding-right="0cm" loext:decorative="false"/>
      <style:paragraph-properties style:writing-mode="lr-tb"/>
    </style:style>
    <style:style style:name="gr455" style:family="graphic" style:parent-style-name="standard">
      <style:graphic-properties draw:stroke="none" draw:fill="none" draw:textarea-horizontal-align="left" draw:textarea-vertical-align="top" draw:auto-grow-height="true" draw:auto-grow-width="true" fo:min-height="0.712cm" fo:min-width="6.779cm" fo:padding-top="0cm" fo:padding-bottom="0cm" fo:padding-left="0cm" fo:padding-right="0cm" loext:decorative="false"/>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712cm" fo:min-width="5.12cm" fo:padding-top="0cm" fo:padding-bottom="0cm" fo:padding-left="0cm" fo:padding-right="0cm" loext:decorative="false"/>
      <style:paragraph-properties style:writing-mode="lr-tb"/>
    </style:style>
    <style:style style:name="gr457" style:family="graphic" style:parent-style-name="standard">
      <style:graphic-properties draw:stroke="none" draw:fill="solid" draw:fill-color="#ff0000" draw:opacity="70%" loext:decorative="false"/>
    </style:style>
    <style:style style:name="gr458" style:family="graphic" style:parent-style-name="standard">
      <style:graphic-properties draw:stroke="none" draw:fill="none" draw:textarea-horizontal-align="left" draw:textarea-vertical-align="top" draw:auto-grow-height="true" draw:auto-grow-width="true" fo:min-height="0.928cm" fo:min-width="5.843cm" fo:padding-top="0cm" fo:padding-bottom="0cm" fo:padding-left="0cm" fo:padding-right="0cm" loext:decorative="false"/>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712cm" fo:min-width="0.635cm" fo:padding-top="0cm" fo:padding-bottom="0cm" fo:padding-left="0cm" fo:padding-right="0cm" loext:decorative="false"/>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712cm" fo:min-width="3.743cm" fo:padding-top="0cm" fo:padding-bottom="0cm" fo:padding-left="0cm" fo:padding-right="0cm" loext:decorative="false"/>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928cm" fo:min-width="2.032cm" fo:padding-top="0cm" fo:padding-bottom="0cm" fo:padding-left="0cm" fo:padding-right="0cm" loext:decorative="false"/>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928cm" fo:min-width="4.885cm" fo:padding-top="0cm" fo:padding-bottom="0cm" fo:padding-left="0cm" fo:padding-right="0cm" loext:decorative="false"/>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712cm" fo:min-width="6.002cm" fo:padding-top="0cm" fo:padding-bottom="0cm" fo:padding-left="0cm" fo:padding-right="0cm" loext:decorative="false"/>
      <style:paragraph-properties style:writing-mode="lr-tb"/>
    </style:style>
    <style:style style:name="gr464" style:family="graphic" style:parent-style-name="standard">
      <style:graphic-properties draw:stroke="none" draw:fill="none" draw:textarea-horizontal-align="left" draw:textarea-vertical-align="top" draw:auto-grow-height="true" draw:auto-grow-width="true" fo:min-height="0.712cm" fo:min-width="4.449cm" fo:padding-top="0cm" fo:padding-bottom="0cm" fo:padding-left="0cm" fo:padding-right="0cm" loext:decorative="false"/>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712cm" fo:min-width="3.708cm" fo:padding-top="0cm" fo:padding-bottom="0cm" fo:padding-left="0cm" fo:padding-right="0cm" loext:decorative="false"/>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712cm" fo:min-width="2.437cm" fo:padding-top="0cm" fo:padding-bottom="0cm" fo:padding-left="0cm" fo:padding-right="0cm" loext:decorative="false"/>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712cm" fo:min-width="1.52cm" fo:padding-top="0cm" fo:padding-bottom="0cm" fo:padding-left="0cm" fo:padding-right="0cm" loext:decorative="false"/>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712cm" fo:min-width="5.685cm" fo:padding-top="0cm" fo:padding-bottom="0cm" fo:padding-left="0cm" fo:padding-right="0cm" loext:decorative="false"/>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928cm" fo:min-width="5.62cm" fo:padding-top="0cm" fo:padding-bottom="0cm" fo:padding-left="0cm" fo:padding-right="0cm" loext:decorative="false"/>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1.309cm" fo:min-width="9.657cm" fo:padding-top="0cm" fo:padding-bottom="0cm" fo:padding-left="0cm" fo:padding-right="0cm" loext:decorative="false"/>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552cm" fo:min-width="2.294cm" fo:padding-top="0cm" fo:padding-bottom="0cm" fo:padding-left="0cm" fo:padding-right="0cm" loext:decorative="false"/>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552cm" fo:min-width="2.896cm" fo:padding-top="0cm" fo:padding-bottom="0cm" fo:padding-left="0cm" fo:padding-right="0cm" loext:decorative="false"/>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552cm" fo:min-width="2.622cm" fo:padding-top="0cm" fo:padding-bottom="0cm" fo:padding-left="0cm" fo:padding-right="0cm" loext:decorative="false"/>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552cm" fo:min-width="3.332cm" fo:padding-top="0cm" fo:padding-bottom="0cm" fo:padding-left="0cm" fo:padding-right="0cm" loext:decorative="false"/>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552cm" fo:min-width="0.93cm" fo:padding-top="0cm" fo:padding-bottom="0cm" fo:padding-left="0cm" fo:padding-right="0cm" loext:decorative="false"/>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552cm" fo:min-width="1.886cm" fo:padding-top="0cm" fo:padding-bottom="0cm" fo:padding-left="0cm" fo:padding-right="0cm" loext:decorative="false"/>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552cm" fo:min-width="1.967cm" fo:padding-top="0cm" fo:padding-bottom="0cm" fo:padding-left="0cm" fo:padding-right="0cm" loext:decorative="false"/>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552cm" fo:min-width="9.145cm" fo:padding-top="0cm" fo:padding-bottom="0cm" fo:padding-left="0cm" fo:padding-right="0cm" loext:decorative="false"/>
      <style:paragraph-properties style:writing-mode="lr-tb"/>
    </style:style>
    <style:style style:name="gr479" style:family="graphic" style:parent-style-name="standard">
      <style:graphic-properties draw:stroke="solid" svg:stroke-width="0.152cm" svg:stroke-color="#11306b" draw:stroke-linejoin="round" svg:stroke-linecap="butt" draw:fill="solid" draw:fill-color="#1b4593" fo:padding-top="0.076cm" fo:padding-bottom="0.076cm" fo:padding-left="0.076cm" fo:padding-right="0.076cm" loext:decorative="false"/>
    </style:style>
    <style:style style:name="gr480" style:family="graphic" style:parent-style-name="standard">
      <style:graphic-properties draw:stroke="none" draw:fill="none" draw:textarea-horizontal-align="left" draw:textarea-vertical-align="top" draw:auto-grow-height="true" draw:auto-grow-width="true" fo:min-height="0.996cm" fo:min-width="14.41cm" fo:padding-top="0cm" fo:padding-bottom="0cm" fo:padding-left="0cm" fo:padding-right="0cm" loext:decorative="false"/>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475cm" fo:min-width="2.495cm" fo:padding-top="0cm" fo:padding-bottom="0cm" fo:padding-left="0cm" fo:padding-right="0cm" loext:decorative="false"/>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475cm" fo:min-width="2.355cm" fo:padding-top="0cm" fo:padding-bottom="0cm" fo:padding-left="0cm" fo:padding-right="0cm" loext:decorative="false"/>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475cm" fo:min-width="2.378cm" fo:padding-top="0cm" fo:padding-bottom="0cm" fo:padding-left="0cm" fo:padding-right="0cm" loext:decorative="false"/>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475cm" fo:min-width="1.767cm" fo:padding-top="0cm" fo:padding-bottom="0cm" fo:padding-left="0cm" fo:padding-right="0cm" loext:decorative="false"/>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475cm" fo:min-width="2.99cm" fo:padding-top="0cm" fo:padding-bottom="0cm" fo:padding-left="0cm" fo:padding-right="0cm" loext:decorative="false"/>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475cm" fo:min-width="1.225cm" fo:padding-top="0cm" fo:padding-bottom="0cm" fo:padding-left="0cm" fo:padding-right="0cm" loext:decorative="false"/>
      <style:paragraph-properties style:writing-mode="lr-tb"/>
    </style:style>
    <style:style style:name="gr487" style:family="graphic" style:parent-style-name="standard">
      <style:graphic-properties draw:stroke="none" draw:fill="solid" draw:fill-color="#5585e0" loext:decorative="false"/>
    </style:style>
    <style:style style:name="gr488" style:family="graphic" style:parent-style-name="standard">
      <style:graphic-properties draw:stroke="none" draw:fill="none" draw:textarea-horizontal-align="left" draw:textarea-vertical-align="top" draw:auto-grow-height="true" draw:auto-grow-width="true" fo:min-height="0.475cm" fo:min-width="1.508cm" fo:padding-top="0cm" fo:padding-bottom="0cm" fo:padding-left="0cm" fo:padding-right="0cm" loext:decorative="false"/>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42cm" fo:min-width="4.164cm" fo:padding-top="0cm" fo:padding-bottom="0cm" fo:padding-left="0cm" fo:padding-right="0cm" loext:decorative="false"/>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42cm" fo:min-width="4.515cm" fo:padding-top="0cm" fo:padding-bottom="0cm" fo:padding-left="0cm" fo:padding-right="0cm" loext:decorative="false"/>
      <style:paragraph-properties style:writing-mode="lr-tb"/>
    </style:style>
    <style:style style:name="gr491" style:family="graphic" style:parent-style-name="standard">
      <style:graphic-properties draw:stroke="solid" svg:stroke-width="0.152cm" svg:stroke-color="#11306b" draw:stroke-linejoin="round" svg:stroke-linecap="butt" draw:fill="solid" draw:fill-color="#92d050" fo:padding-top="0.076cm" fo:padding-bottom="0.076cm" fo:padding-left="0.076cm" fo:padding-right="0.076cm" loext:decorative="false"/>
    </style:style>
    <style:style style:name="gr492" style:family="graphic" style:parent-style-name="standard">
      <style:graphic-properties draw:stroke="none" draw:fill="none" draw:textarea-horizontal-align="left" draw:textarea-vertical-align="top" draw:auto-grow-height="true" draw:auto-grow-width="true" fo:min-height="0.42cm" fo:min-width="2.859cm" fo:padding-top="0cm" fo:padding-bottom="0cm" fo:padding-left="0cm" fo:padding-right="0cm" loext:decorative="false"/>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42cm" fo:min-width="3.191cm" fo:padding-top="0cm" fo:padding-bottom="0cm" fo:padding-left="0cm" fo:padding-right="0cm" loext:decorative="false"/>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42cm" fo:min-width="3.315cm" fo:padding-top="0cm" fo:padding-bottom="0cm" fo:padding-left="0cm" fo:padding-right="0cm" loext:decorative="false"/>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42cm" fo:min-width="1.928cm" fo:padding-top="0cm" fo:padding-bottom="0cm" fo:padding-left="0cm" fo:padding-right="0cm" loext:decorative="false"/>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42cm" fo:min-width="2.301cm" fo:padding-top="0cm" fo:padding-bottom="0cm" fo:padding-left="0cm" fo:padding-right="0cm" loext:decorative="false"/>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42cm" fo:min-width="2.57cm" fo:padding-top="0cm" fo:padding-bottom="0cm" fo:padding-left="0cm" fo:padding-right="0cm" loext:decorative="false"/>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42cm" fo:min-width="3.75cm" fo:padding-top="0cm" fo:padding-bottom="0cm" fo:padding-left="0cm" fo:padding-right="0cm" loext:decorative="false"/>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42cm" fo:min-width="3.605cm" fo:padding-top="0cm" fo:padding-bottom="0cm" fo:padding-left="0cm" fo:padding-right="0cm" loext:decorative="false"/>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42cm" fo:min-width="4.308cm" fo:padding-top="0cm" fo:padding-bottom="0cm" fo:padding-left="0cm" fo:padding-right="0cm" loext:decorative="false"/>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42cm" fo:min-width="1.1cm" fo:padding-top="0cm" fo:padding-bottom="0cm" fo:padding-left="0cm" fo:padding-right="0cm" loext:decorative="false"/>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42cm" fo:min-width="3.563cm" fo:padding-top="0cm" fo:padding-bottom="0cm" fo:padding-left="0cm" fo:padding-right="0cm" loext:decorative="false"/>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42cm" fo:min-width="2.736cm" fo:padding-top="0cm" fo:padding-bottom="0cm" fo:padding-left="0cm" fo:padding-right="0cm" loext:decorative="false"/>
      <style:paragraph-properties style:writing-mode="lr-tb"/>
    </style:style>
    <style:style style:name="gr504" style:family="graphic" style:parent-style-name="standard">
      <style:graphic-properties draw:stroke="dash" draw:stroke-dash="stroke-dash644" svg:stroke-width="0.025cm" svg:stroke-color="#174293" draw:stroke-linejoin="round" svg:stroke-linecap="butt" draw:fill="none" fo:padding-top="0.012cm" fo:padding-bottom="0.012cm" fo:padding-left="0.012cm" fo:padding-right="0.012cm" loext:decorative="false"/>
    </style:style>
    <style:style style:name="gr505" style:family="graphic" style:parent-style-name="standard">
      <style:graphic-properties draw:stroke="none" draw:fill="none" draw:textarea-horizontal-align="left" draw:textarea-vertical-align="top" draw:auto-grow-height="true" draw:auto-grow-width="true" fo:min-height="0.42cm" fo:min-width="2.031cm" fo:padding-top="0cm" fo:padding-bottom="0cm" fo:padding-left="0cm" fo:padding-right="0cm" loext:decorative="false"/>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475cm" fo:min-width="1.837cm" fo:padding-top="0cm" fo:padding-bottom="0cm" fo:padding-left="0cm" fo:padding-right="0cm" loext:decorative="false"/>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475cm" fo:min-width="1.414cm" fo:padding-top="0cm" fo:padding-bottom="0cm" fo:padding-left="0cm" fo:padding-right="0cm" loext:decorative="false"/>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552cm" fo:min-width="19.239cm" fo:padding-top="0cm" fo:padding-bottom="0cm" fo:padding-left="0cm" fo:padding-right="0cm" loext:decorative="false"/>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552cm" fo:min-width="2.867cm" fo:padding-top="0cm" fo:padding-bottom="0cm" fo:padding-left="0cm" fo:padding-right="0cm" loext:decorative="false"/>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42cm" fo:min-width="3.087cm" fo:padding-top="0cm" fo:padding-bottom="0cm" fo:padding-left="0cm" fo:padding-right="0cm" loext:decorative="false"/>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42cm" fo:min-width="2.963cm" fo:padding-top="0cm" fo:padding-bottom="0cm" fo:padding-left="0cm" fo:padding-right="0cm" loext:decorative="false"/>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42cm" fo:min-width="3.708cm" fo:padding-top="0cm" fo:padding-bottom="0cm" fo:padding-left="0cm" fo:padding-right="0cm" loext:decorative="false"/>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42cm" fo:min-width="3.004cm" fo:padding-top="0cm" fo:padding-bottom="0cm" fo:padding-left="0cm" fo:padding-right="0cm" loext:decorative="false"/>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42cm" fo:min-width="4.868cm" fo:padding-top="0cm" fo:padding-bottom="0cm" fo:padding-left="0cm" fo:padding-right="0cm" loext:decorative="false"/>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42cm" fo:min-width="4.205cm" fo:padding-top="0cm" fo:padding-bottom="0cm" fo:padding-left="0cm" fo:padding-right="0cm" loext:decorative="false"/>
      <style:paragraph-properties style:writing-mode="lr-tb"/>
    </style:style>
    <style:style style:name="gr516" style:family="graphic" style:parent-style-name="standard">
      <style:graphic-properties draw:stroke="solid" svg:stroke-width="0.008cm" svg:stroke-color="#11306b" draw:stroke-linejoin="round" svg:stroke-linecap="butt" draw:fill="solid" draw:fill-color="#bfbfbf" fo:padding-top="0.004cm" fo:padding-bottom="0.004cm" fo:padding-left="0.004cm" fo:padding-right="0.004cm" loext:decorative="false"/>
    </style:style>
    <style:style style:name="gr517" style:family="graphic" style:parent-style-name="standard">
      <style:graphic-properties draw:stroke="none" draw:fill="none" draw:textarea-horizontal-align="left" draw:textarea-vertical-align="top" draw:auto-grow-height="true" draw:auto-grow-width="true" fo:min-height="0.42cm" fo:min-width="2.694cm" fo:padding-top="0cm" fo:padding-bottom="0cm" fo:padding-left="0cm" fo:padding-right="0cm" loext:decorative="false"/>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552cm" fo:min-width="8.245cm" fo:padding-top="0cm" fo:padding-bottom="0cm" fo:padding-left="0cm" fo:padding-right="0cm" loext:decorative="false"/>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552cm" fo:min-width="7.863cm" fo:padding-top="0cm" fo:padding-bottom="0cm" fo:padding-left="0cm" fo:padding-right="0cm" loext:decorative="false"/>
      <style:paragraph-properties style:writing-mode="lr-tb"/>
    </style:style>
    <style:style style:name="gr520" style:family="graphic" style:parent-style-name="standard">
      <style:graphic-properties draw:stroke="solid" svg:stroke-width="0.025cm" svg:stroke-color="#5585e0" svg:stroke-opacity="50%" draw:stroke-linejoin="round" svg:stroke-linecap="butt" draw:fill="none" fo:padding-top="0.012cm" fo:padding-bottom="0.012cm" fo:padding-left="0.012cm" fo:padding-right="0.012cm" loext:decorative="false"/>
    </style:style>
    <style:style style:name="gr521" style:family="graphic" style:parent-style-name="standard">
      <style:graphic-properties draw:stroke="none" draw:fill="none" draw:textarea-horizontal-align="left" draw:textarea-vertical-align="top" draw:auto-grow-height="true" draw:auto-grow-width="true" fo:min-height="1.309cm" fo:min-width="20.713cm" fo:padding-top="0cm" fo:padding-bottom="0cm" fo:padding-left="0cm" fo:padding-right="0cm" loext:decorative="false"/>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475cm" fo:min-width="3.178cm" fo:padding-top="0cm" fo:padding-bottom="0cm" fo:padding-left="0cm" fo:padding-right="0cm" loext:decorative="false"/>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314cm" fo:min-width="2.067cm" fo:padding-top="0cm" fo:padding-bottom="0cm" fo:padding-left="0cm" fo:padding-right="0cm" loext:decorative="false"/>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314cm" fo:min-width="2.13cm" fo:padding-top="0cm" fo:padding-bottom="0cm" fo:padding-left="0cm" fo:padding-right="0cm" loext:decorative="false"/>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314cm" fo:min-width="2.409cm" fo:padding-top="0cm" fo:padding-bottom="0cm" fo:padding-left="0cm" fo:padding-right="0cm" loext:decorative="false"/>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314cm" fo:min-width="1.291cm" fo:padding-top="0cm" fo:padding-bottom="0cm" fo:padding-left="0cm" fo:padding-right="0cm" loext:decorative="false"/>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314cm" fo:min-width="0.918cm" fo:padding-top="0cm" fo:padding-bottom="0cm" fo:padding-left="0cm" fo:padding-right="0cm" loext:decorative="false"/>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314cm" fo:min-width="1.741cm" fo:padding-top="0cm" fo:padding-bottom="0cm" fo:padding-left="0cm" fo:padding-right="0cm" loext:decorative="false"/>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314cm" fo:min-width="0.375cm" fo:padding-top="0cm" fo:padding-bottom="0cm" fo:padding-left="0cm" fo:padding-right="0cm" loext:decorative="false"/>
      <style:paragraph-properties style:writing-mode="lr-tb"/>
    </style:style>
    <style:style style:name="gr530" style:family="graphic" style:parent-style-name="standard">
      <style:graphic-properties draw:stroke="solid" svg:stroke-width="0.025cm" svg:stroke-color="#009eab" draw:stroke-linejoin="round" svg:stroke-linecap="butt" draw:fill="none" fo:padding-top="0.012cm" fo:padding-bottom="0.012cm" fo:padding-left="0.012cm" fo:padding-right="0.012cm" loext:decorative="false"/>
    </style:style>
    <style:style style:name="gr531" style:family="graphic" style:parent-style-name="standard">
      <style:graphic-properties draw:stroke="none" draw:fill="none" draw:textarea-horizontal-align="left" draw:textarea-vertical-align="top" draw:auto-grow-height="true" draw:auto-grow-width="true" fo:min-height="0.314cm" fo:min-width="1.058cm" fo:padding-top="0cm" fo:padding-bottom="0cm" fo:padding-left="0cm" fo:padding-right="0cm" loext:decorative="false"/>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475cm" fo:min-width="1.695cm" fo:padding-top="0cm" fo:padding-bottom="0cm" fo:padding-left="0cm" fo:padding-right="0cm" loext:decorative="false"/>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314cm" fo:min-width="1.337cm" fo:padding-top="0cm" fo:padding-bottom="0cm" fo:padding-left="0cm" fo:padding-right="0cm" loext:decorative="false"/>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399cm" fo:min-width="0.812cm" fo:padding-top="0cm" fo:padding-bottom="0cm" fo:padding-left="0cm" fo:padding-right="0cm" loext:decorative="false"/>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314cm" fo:min-width="2.114cm" fo:padding-top="0cm" fo:padding-bottom="0cm" fo:padding-left="0cm" fo:padding-right="0cm" loext:decorative="false"/>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314cm" fo:min-width="3.046cm" fo:padding-top="0cm" fo:padding-bottom="0cm" fo:padding-left="0cm" fo:padding-right="0cm" loext:decorative="false"/>
      <style:paragraph-properties style:writing-mode="lr-tb"/>
    </style:style>
    <style:style style:name="gr537" style:family="graphic" style:parent-style-name="standard">
      <style:graphic-properties draw:stroke="solid" svg:stroke-width="0.035cm" svg:stroke-color="#7f7f7f" draw:stroke-linejoin="round" svg:stroke-linecap="butt" draw:fill="none" fo:padding-top="0.017cm" fo:padding-bottom="0.017cm" fo:padding-left="0.017cm" fo:padding-right="0.017cm" loext:decorative="false"/>
    </style:style>
    <style:style style:name="gr538" style:family="graphic" style:parent-style-name="standard">
      <style:graphic-properties draw:stroke="none" draw:fill="none" draw:textarea-horizontal-align="left" draw:textarea-vertical-align="top" draw:auto-grow-height="true" draw:auto-grow-width="true" fo:min-height="0.399cm" fo:min-width="3.341cm" fo:padding-top="0cm" fo:padding-bottom="0cm" fo:padding-left="0cm" fo:padding-right="0cm" loext:decorative="false"/>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399cm" fo:min-width="1.345cm" fo:padding-top="0cm" fo:padding-bottom="0cm" fo:padding-left="0cm" fo:padding-right="0cm" loext:decorative="false"/>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399cm" fo:min-width="1.109cm" fo:padding-top="0cm" fo:padding-bottom="0cm" fo:padding-left="0cm" fo:padding-right="0cm" loext:decorative="false"/>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399cm" fo:min-width="1.84cm" fo:padding-top="0cm" fo:padding-bottom="0cm" fo:padding-left="0cm" fo:padding-right="0cm" loext:decorative="false"/>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361cm" fo:min-width="2.506cm" fo:padding-top="0cm" fo:padding-bottom="0cm" fo:padding-left="0cm" fo:padding-right="0cm" loext:decorative="false"/>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361cm" fo:min-width="2.738cm" fo:padding-top="0cm" fo:padding-bottom="0cm" fo:padding-left="0cm" fo:padding-right="0cm" loext:decorative="false"/>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361cm" fo:min-width="1.147cm" fo:padding-top="0cm" fo:padding-bottom="0cm" fo:padding-left="0cm" fo:padding-right="0cm" loext:decorative="false"/>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361cm" fo:min-width="0.322cm" fo:padding-top="0cm" fo:padding-bottom="0cm" fo:padding-left="0cm" fo:padding-right="0cm" loext:decorative="false"/>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361cm" fo:min-width="2.988cm" fo:padding-top="0cm" fo:padding-bottom="0cm" fo:padding-left="0cm" fo:padding-right="0cm" loext:decorative="false"/>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361cm" fo:min-width="0.321cm" fo:padding-top="0cm" fo:padding-bottom="0cm" fo:padding-left="0cm" fo:padding-right="0cm" loext:decorative="false"/>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361cm" fo:min-width="3.507cm" fo:padding-top="0cm" fo:padding-bottom="0cm" fo:padding-left="0cm" fo:padding-right="0cm" loext:decorative="false"/>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361cm" fo:min-width="0.842cm" fo:padding-top="0cm" fo:padding-bottom="0cm" fo:padding-left="0cm" fo:padding-right="0cm" loext:decorative="false"/>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361cm" fo:min-width="2.863cm" fo:padding-top="0cm" fo:padding-bottom="0cm" fo:padding-left="0cm" fo:padding-right="0cm" loext:decorative="false"/>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361cm" fo:min-width="3.49cm" fo:padding-top="0cm" fo:padding-bottom="0cm" fo:padding-left="0cm" fo:padding-right="0cm" loext:decorative="false"/>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361cm" fo:min-width="1.076cm" fo:padding-top="0cm" fo:padding-bottom="0cm" fo:padding-left="0cm" fo:padding-right="0cm" loext:decorative="false"/>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361cm" fo:min-width="3.186cm" fo:padding-top="0cm" fo:padding-bottom="0cm" fo:padding-left="0cm" fo:padding-right="0cm" loext:decorative="false"/>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361cm" fo:min-width="0.932cm" fo:padding-top="0cm" fo:padding-bottom="0cm" fo:padding-left="0cm" fo:padding-right="0cm" loext:decorative="false"/>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361cm" fo:min-width="1.003cm" fo:padding-top="0cm" fo:padding-bottom="0cm" fo:padding-left="0cm" fo:padding-right="0cm" loext:decorative="false"/>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361cm" fo:min-width="1.272cm" fo:padding-top="0cm" fo:padding-bottom="0cm" fo:padding-left="0cm" fo:padding-right="0cm" loext:decorative="false"/>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361cm" fo:min-width="1.253cm" fo:padding-top="0cm" fo:padding-bottom="0cm" fo:padding-left="0cm" fo:padding-right="0cm" loext:decorative="false"/>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361cm" fo:min-width="2.004cm" fo:padding-top="0cm" fo:padding-bottom="0cm" fo:padding-left="0cm" fo:padding-right="0cm" loext:decorative="false"/>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361cm" fo:min-width="2.094cm" fo:padding-top="0cm" fo:padding-bottom="0cm" fo:padding-left="0cm" fo:padding-right="0cm" loext:decorative="false"/>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361cm" fo:min-width="2.595cm" fo:padding-top="0cm" fo:padding-bottom="0cm" fo:padding-left="0cm" fo:padding-right="0cm" loext:decorative="false"/>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361cm" fo:min-width="3.345cm" fo:padding-top="0cm" fo:padding-bottom="0cm" fo:padding-left="0cm" fo:padding-right="0cm" loext:decorative="false"/>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361cm" fo:min-width="3.453cm" fo:padding-top="0cm" fo:padding-bottom="0cm" fo:padding-left="0cm" fo:padding-right="0cm" loext:decorative="false"/>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361cm" fo:min-width="3.024cm" fo:padding-top="0cm" fo:padding-bottom="0cm" fo:padding-left="0cm" fo:padding-right="0cm" loext:decorative="false"/>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361cm" fo:min-width="2.399cm" fo:padding-top="0cm" fo:padding-bottom="0cm" fo:padding-left="0cm" fo:padding-right="0cm" loext:decorative="false"/>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361cm" fo:min-width="2.147cm" fo:padding-top="0cm" fo:padding-bottom="0cm" fo:padding-left="0cm" fo:padding-right="0cm" loext:decorative="false"/>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361cm" fo:min-width="1.665cm" fo:padding-top="0cm" fo:padding-bottom="0cm" fo:padding-left="0cm" fo:padding-right="0cm" loext:decorative="false"/>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361cm" fo:min-width="3.435cm" fo:padding-top="0cm" fo:padding-bottom="0cm" fo:padding-left="0cm" fo:padding-right="0cm" loext:decorative="false"/>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361cm" fo:min-width="3.114cm" fo:padding-top="0cm" fo:padding-bottom="0cm" fo:padding-left="0cm" fo:padding-right="0cm" loext:decorative="false"/>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361cm" fo:min-width="1.557cm" fo:padding-top="0cm" fo:padding-bottom="0cm" fo:padding-left="0cm" fo:padding-right="0cm" loext:decorative="false"/>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361cm" fo:min-width="2.166cm" fo:padding-top="0cm" fo:padding-bottom="0cm" fo:padding-left="0cm" fo:padding-right="0cm" loext:decorative="false"/>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361cm" fo:min-width="2.864cm" fo:padding-top="0cm" fo:padding-bottom="0cm" fo:padding-left="0cm" fo:padding-right="0cm" loext:decorative="false"/>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361cm" fo:min-width="2.845cm" fo:padding-top="0cm" fo:padding-bottom="0cm" fo:padding-left="0cm" fo:padding-right="0cm" loext:decorative="false"/>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361cm" fo:min-width="1.808cm" fo:padding-top="0cm" fo:padding-bottom="0cm" fo:padding-left="0cm" fo:padding-right="0cm" loext:decorative="false"/>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361cm" fo:min-width="1.969cm" fo:padding-top="0cm" fo:padding-bottom="0cm" fo:padding-left="0cm" fo:padding-right="0cm" loext:decorative="false"/>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361cm" fo:min-width="2.559cm" fo:padding-top="0cm" fo:padding-bottom="0cm" fo:padding-left="0cm" fo:padding-right="0cm" loext:decorative="false"/>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361cm" fo:min-width="2.862cm" fo:padding-top="0cm" fo:padding-bottom="0cm" fo:padding-left="0cm" fo:padding-right="0cm" loext:decorative="false"/>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361cm" fo:min-width="2.434cm" fo:padding-top="0cm" fo:padding-bottom="0cm" fo:padding-left="0cm" fo:padding-right="0cm" loext:decorative="false"/>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361cm" fo:min-width="1.718cm" fo:padding-top="0cm" fo:padding-bottom="0cm" fo:padding-left="0cm" fo:padding-right="0cm" loext:decorative="false"/>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361cm" fo:min-width="1.736cm" fo:padding-top="0cm" fo:padding-bottom="0cm" fo:padding-left="0cm" fo:padding-right="0cm" loext:decorative="false"/>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361cm" fo:min-width="1.057cm" fo:padding-top="0cm" fo:padding-bottom="0cm" fo:padding-left="0cm" fo:padding-right="0cm" loext:decorative="false"/>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361cm" fo:min-width="2.29cm" fo:padding-top="0cm" fo:padding-bottom="0cm" fo:padding-left="0cm" fo:padding-right="0cm" loext:decorative="false"/>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361cm" fo:min-width="1.343cm" fo:padding-top="0cm" fo:padding-bottom="0cm" fo:padding-left="0cm" fo:padding-right="0cm" loext:decorative="false"/>
      <style:paragraph-properties style:writing-mode="lr-tb"/>
    </style:style>
    <style:style style:name="gr583" style:family="graphic" style:parent-style-name="standard">
      <style:graphic-properties draw:stroke="solid" svg:stroke-width="0.025cm" svg:stroke-color="#5585e0" draw:stroke-linejoin="round" svg:stroke-linecap="butt" draw:fill="none" fo:padding-top="0.012cm" fo:padding-bottom="0.012cm" fo:padding-left="0.012cm" fo:padding-right="0.012cm" loext:decorative="false"/>
    </style:style>
    <style:style style:name="gr584" style:family="graphic" style:parent-style-name="standard">
      <style:graphic-properties draw:stroke="none" draw:fill="none" draw:textarea-horizontal-align="left" draw:textarea-vertical-align="top" draw:auto-grow-height="true" draw:auto-grow-width="true" fo:min-height="0.314cm" fo:min-width="1.214cm" fo:padding-top="0cm" fo:padding-bottom="0cm" fo:padding-left="0cm" fo:padding-right="0cm" loext:decorative="false"/>
      <style:paragraph-properties style:writing-mode="lr-tb"/>
    </style:style>
    <style:style style:name="gr585" style:family="graphic" style:parent-style-name="standard">
      <style:graphic-properties draw:stroke="none" draw:fill="solid" draw:fill-color="#9966ff" loext:decorative="false"/>
    </style:style>
    <style:style style:name="gr586" style:family="graphic" style:parent-style-name="standard">
      <style:graphic-properties draw:stroke="none" draw:fill="none" draw:textarea-horizontal-align="left" draw:textarea-vertical-align="top" draw:auto-grow-height="true" draw:auto-grow-width="true" fo:min-height="0.475cm" fo:min-width="1.296cm" fo:padding-top="0cm" fo:padding-bottom="0cm" fo:padding-left="0cm" fo:padding-right="0cm" loext:decorative="false"/>
      <style:paragraph-properties style:writing-mode="lr-tb"/>
    </style:style>
    <style:style style:name="gr587" style:family="graphic" style:parent-style-name="standard">
      <style:graphic-properties draw:stroke="none" draw:fill="solid" draw:fill-color="#ff6600" loext:decorative="false"/>
    </style:style>
    <style:style style:name="gr588" style:family="graphic" style:parent-style-name="standard">
      <style:graphic-properties draw:stroke="none" draw:fill="none" draw:textarea-horizontal-align="left" draw:textarea-vertical-align="top" draw:auto-grow-height="true" draw:auto-grow-width="true" fo:min-height="0.314cm" fo:min-width="1.803cm" fo:padding-top="0cm" fo:padding-bottom="0cm" fo:padding-left="0cm" fo:padding-right="0cm" loext:decorative="false"/>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314cm" fo:min-width="2.487cm" fo:padding-top="0cm" fo:padding-bottom="0cm" fo:padding-left="0cm" fo:padding-right="0cm" loext:decorative="false"/>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314cm" fo:min-width="1.773cm" fo:padding-top="0cm" fo:padding-bottom="0cm" fo:padding-left="0cm" fo:padding-right="0cm" loext:decorative="false"/>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945cm" fo:min-width="16.61cm" fo:padding-top="0cm" fo:padding-bottom="0cm" fo:padding-left="0cm" fo:padding-right="0cm" loext:decorative="false"/>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314cm" fo:min-width="1.461cm" fo:padding-top="0cm" fo:padding-bottom="0cm" fo:padding-left="0cm" fo:padding-right="0cm" loext:decorative="false"/>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314cm" fo:min-width="2.952cm" fo:padding-top="0cm" fo:padding-bottom="0cm" fo:padding-left="0cm" fo:padding-right="0cm" loext:decorative="false"/>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314cm" fo:min-width="2.455cm" fo:padding-top="0cm" fo:padding-bottom="0cm" fo:padding-left="0cm" fo:padding-right="0cm" loext:decorative="false"/>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314cm" fo:min-width="1.245cm" fo:padding-top="0cm" fo:padding-bottom="0cm" fo:padding-left="0cm" fo:padding-right="0cm" loext:decorative="false"/>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314cm" fo:min-width="2.347cm" fo:padding-top="0cm" fo:padding-bottom="0cm" fo:padding-left="0cm" fo:padding-right="0cm" loext:decorative="false"/>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314cm" fo:min-width="2.439cm" fo:padding-top="0cm" fo:padding-bottom="0cm" fo:padding-left="0cm" fo:padding-right="0cm" loext:decorative="false"/>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475cm" fo:min-width="2.19cm" fo:padding-top="0cm" fo:padding-bottom="0cm" fo:padding-left="0cm" fo:padding-right="0cm" loext:decorative="false"/>
      <style:paragraph-properties style:writing-mode="lr-tb"/>
    </style:style>
    <style:style style:name="gr599" style:family="graphic" style:parent-style-name="standard">
      <style:graphic-properties draw:stroke="dash" draw:stroke-dash="stroke-dash723" svg:stroke-width="0.067cm" svg:stroke-color="#ff0000" draw:stroke-linejoin="round" svg:stroke-linecap="butt" draw:fill="none" fo:padding-top="0.033cm" fo:padding-bottom="0.033cm" fo:padding-left="0.033cm" fo:padding-right="0.033cm" loext:decorative="false"/>
    </style:style>
    <style:style style:name="gr600" style:family="graphic" style:parent-style-name="standard">
      <style:graphic-properties draw:stroke="none" draw:fill="none" draw:textarea-horizontal-align="left" draw:textarea-vertical-align="top" draw:auto-grow-height="true" draw:auto-grow-width="true" fo:min-height="0.475cm" fo:min-width="2.166cm" fo:padding-top="0cm" fo:padding-bottom="0cm" fo:padding-left="0cm" fo:padding-right="0cm" loext:decorative="false"/>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314cm" fo:min-width="2.393cm" fo:padding-top="0cm" fo:padding-bottom="0cm" fo:padding-left="0cm" fo:padding-right="0cm" loext:decorative="false"/>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314cm" fo:min-width="2.657cm" fo:padding-top="0cm" fo:padding-bottom="0cm" fo:padding-left="0cm" fo:padding-right="0cm" loext:decorative="false"/>
      <style:paragraph-properties style:writing-mode="lr-tb"/>
    </style:style>
    <style:style style:name="gr603" style:family="graphic" style:parent-style-name="standard">
      <style:graphic-properties draw:stroke="solid" svg:stroke-width="0.067cm" svg:stroke-color="#ff0000" draw:stroke-linejoin="round" svg:stroke-linecap="butt" draw:fill="solid" draw:fill-color="#ff0000" fo:padding-top="0.033cm" fo:padding-bottom="0.033cm" fo:padding-left="0.033cm" fo:padding-right="0.033cm" loext:decorative="false"/>
    </style:style>
    <style:style style:name="gr604" style:family="graphic" style:parent-style-name="standard">
      <style:graphic-properties draw:stroke="none" draw:fill="none" draw:textarea-horizontal-align="left" draw:textarea-vertical-align="top" draw:auto-grow-height="true" draw:auto-grow-width="true" fo:min-height="0.399cm" fo:min-width="4.33cm" fo:padding-top="0cm" fo:padding-bottom="0cm" fo:padding-left="0cm" fo:padding-right="0cm" loext:decorative="false"/>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399cm" fo:min-width="4.568cm" fo:padding-top="0cm" fo:padding-bottom="0cm" fo:padding-left="0cm" fo:padding-right="0cm" loext:decorative="false"/>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399cm" fo:min-width="4.746cm" fo:padding-top="0cm" fo:padding-bottom="0cm" fo:padding-left="0cm" fo:padding-right="0cm" loext:decorative="false"/>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399cm" fo:min-width="5.437cm" fo:padding-top="0cm" fo:padding-bottom="0cm" fo:padding-left="0cm" fo:padding-right="0cm" loext:decorative="false"/>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399cm" fo:min-width="4.608cm" fo:padding-top="0cm" fo:padding-bottom="0cm" fo:padding-left="0cm" fo:padding-right="0cm" loext:decorative="false"/>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399cm" fo:min-width="3.797cm" fo:padding-top="0cm" fo:padding-bottom="0cm" fo:padding-left="0cm" fo:padding-right="0cm" loext:decorative="false"/>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399cm" fo:min-width="5.198cm" fo:padding-top="0cm" fo:padding-bottom="0cm" fo:padding-left="0cm" fo:padding-right="0cm" loext:decorative="false"/>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399cm" fo:min-width="3.283cm" fo:padding-top="0cm" fo:padding-bottom="0cm" fo:padding-left="0cm" fo:padding-right="0cm" loext:decorative="false"/>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399cm" fo:min-width="5.517cm" fo:padding-top="0cm" fo:padding-bottom="0cm" fo:padding-left="0cm" fo:padding-right="0cm" loext:decorative="false"/>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399cm" fo:min-width="4.885cm" fo:padding-top="0cm" fo:padding-bottom="0cm" fo:padding-left="0cm" fo:padding-right="0cm" loext:decorative="false"/>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399cm" fo:min-width="4.606cm" fo:padding-top="0cm" fo:padding-bottom="0cm" fo:padding-left="0cm" fo:padding-right="0cm" loext:decorative="false"/>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399cm" fo:min-width="2.828cm" fo:padding-top="0cm" fo:padding-bottom="0cm" fo:padding-left="0cm" fo:padding-right="0cm" loext:decorative="false"/>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399cm" fo:min-width="5.478cm" fo:padding-top="0cm" fo:padding-bottom="0cm" fo:padding-left="0cm" fo:padding-right="0cm" loext:decorative="false"/>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399cm" fo:min-width="4.488cm" fo:padding-top="0cm" fo:padding-bottom="0cm" fo:padding-left="0cm" fo:padding-right="0cm" loext:decorative="false"/>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399cm" fo:min-width="4.903cm" fo:padding-top="0cm" fo:padding-bottom="0cm" fo:padding-left="0cm" fo:padding-right="0cm" loext:decorative="false"/>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399cm" fo:min-width="3.856cm" fo:padding-top="0cm" fo:padding-bottom="0cm" fo:padding-left="0cm" fo:padding-right="0cm" loext:decorative="false"/>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399cm" fo:min-width="4.984cm" fo:padding-top="0cm" fo:padding-bottom="0cm" fo:padding-left="0cm" fo:padding-right="0cm" loext:decorative="false"/>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399cm" fo:min-width="4.687cm" fo:padding-top="0cm" fo:padding-bottom="0cm" fo:padding-left="0cm" fo:padding-right="0cm" loext:decorative="false"/>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399cm" fo:min-width="5.378cm" fo:padding-top="0cm" fo:padding-bottom="0cm" fo:padding-left="0cm" fo:padding-right="0cm" loext:decorative="false"/>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399cm" fo:min-width="3.698cm" fo:padding-top="0cm" fo:padding-bottom="0cm" fo:padding-left="0cm" fo:padding-right="0cm" loext:decorative="false"/>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399cm" fo:min-width="4.331cm" fo:padding-top="0cm" fo:padding-bottom="0cm" fo:padding-left="0cm" fo:padding-right="0cm" loext:decorative="false"/>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399cm" fo:min-width="5.279cm" fo:padding-top="0cm" fo:padding-bottom="0cm" fo:padding-left="0cm" fo:padding-right="0cm" loext:decorative="false"/>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399cm" fo:min-width="2.809cm" fo:padding-top="0cm" fo:padding-bottom="0cm" fo:padding-left="0cm" fo:padding-right="0cm" loext:decorative="false"/>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314cm" fo:min-width="0.576cm" fo:padding-top="0cm" fo:padding-bottom="0cm" fo:padding-left="0cm" fo:padding-right="0cm" loext:decorative="false"/>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1.309cm" fo:min-width="6.403cm" fo:padding-top="0cm" fo:padding-bottom="0cm" fo:padding-left="0cm" fo:padding-right="0cm" loext:decorative="false"/>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928cm" fo:min-width="6.18cm" fo:padding-top="0cm" fo:padding-bottom="0cm" fo:padding-left="0cm" fo:padding-right="0cm" loext:decorative="false"/>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928cm" fo:min-width="2.773cm" fo:padding-top="0cm" fo:padding-bottom="0cm" fo:padding-left="0cm" fo:padding-right="0cm" loext:decorative="false"/>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928cm" fo:min-width="6.234cm" fo:padding-top="0cm" fo:padding-bottom="0cm" fo:padding-left="0cm" fo:padding-right="0cm" loext:decorative="false"/>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928cm" fo:min-width="2.584cm" fo:padding-top="0cm" fo:padding-bottom="0cm" fo:padding-left="0cm" fo:padding-right="0cm" loext:decorative="false"/>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928cm" fo:min-width="4.333cm" fo:padding-top="0cm" fo:padding-bottom="0cm" fo:padding-left="0cm" fo:padding-right="0cm" loext:decorative="false"/>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928cm" fo:min-width="3.271cm" fo:padding-top="0cm" fo:padding-bottom="0cm" fo:padding-left="0cm" fo:padding-right="0cm" loext:decorative="false"/>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928cm" fo:min-width="7.737cm" fo:padding-top="0cm" fo:padding-bottom="0cm" fo:padding-left="0cm" fo:padding-right="0cm" loext:decorative="false"/>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928cm" fo:min-width="23.334cm" fo:padding-top="0cm" fo:padding-bottom="0cm" fo:padding-left="0cm" fo:padding-right="0cm" loext:decorative="false"/>
      <style:paragraph-properties style:writing-mode="lr-tb"/>
    </style:style>
    <style:style style:name="gr637" style:family="graphic" style:parent-style-name="standard">
      <style:graphic-properties draw:stroke="none" draw:fill="solid" draw:fill-color="#cccfdc" loext:decorative="false"/>
    </style:style>
    <style:style style:name="gr638" style:family="graphic" style:parent-style-name="standard">
      <style:graphic-properties draw:stroke="none" draw:fill="solid" draw:fill-color="#e7e9ee" loext:decorative="false"/>
    </style:style>
    <style:style style:name="gr639" style:family="graphic" style:parent-style-name="standard">
      <style:graphic-properties draw:stroke="solid" svg:stroke-width="0.035cm" svg:stroke-color="#ffffff" draw:stroke-linejoin="round" svg:stroke-linecap="butt" draw:fill="none" fo:padding-top="0.017cm" fo:padding-bottom="0.017cm" fo:padding-left="0.017cm" fo:padding-right="0.017cm" loext:decorative="false"/>
    </style:style>
    <style:style style:name="gr640" style:family="graphic" style:parent-style-name="standard">
      <style:graphic-properties draw:stroke="solid" svg:stroke-width="0.105cm" svg:stroke-color="#ffffff" draw:stroke-linejoin="round" svg:stroke-linecap="butt" draw:fill="none" fo:padding-top="0.052cm" fo:padding-bottom="0.052cm" fo:padding-left="0.052cm" fo:padding-right="0.052cm" loext:decorative="false"/>
    </style:style>
    <style:style style:name="gr641" style:family="graphic" style:parent-style-name="standard">
      <style:graphic-properties draw:stroke="none" draw:fill="none" draw:textarea-horizontal-align="left" draw:textarea-vertical-align="top" draw:auto-grow-height="true" draw:auto-grow-width="true" fo:min-height="1.309cm" fo:min-width="17.403cm" fo:padding-top="0cm" fo:padding-bottom="0cm" fo:padding-left="0cm" fo:padding-right="0cm" loext:decorative="false"/>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433cm" fo:min-width="1.626cm" fo:padding-top="0cm" fo:padding-bottom="0cm" fo:padding-left="0cm" fo:padding-right="0cm" loext:decorative="false"/>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433cm" fo:min-width="2.231cm" fo:padding-top="0cm" fo:padding-bottom="0cm" fo:padding-left="0cm" fo:padding-right="0cm" loext:decorative="false"/>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433cm" fo:min-width="1.517cm" fo:padding-top="0cm" fo:padding-bottom="0cm" fo:padding-left="0cm" fo:padding-right="0cm" loext:decorative="false"/>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433cm" fo:min-width="1.106cm" fo:padding-top="0cm" fo:padding-bottom="0cm" fo:padding-left="0cm" fo:padding-right="0cm" loext:decorative="false"/>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433cm" fo:min-width="2.188cm" fo:padding-top="0cm" fo:padding-bottom="0cm" fo:padding-left="0cm" fo:padding-right="0cm" loext:decorative="false"/>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433cm" fo:min-width="2.447cm" fo:padding-top="0cm" fo:padding-bottom="0cm" fo:padding-left="0cm" fo:padding-right="0cm" loext:decorative="false"/>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433cm" fo:min-width="0.388cm" fo:padding-top="0cm" fo:padding-bottom="0cm" fo:padding-left="0cm" fo:padding-right="0cm" loext:decorative="false"/>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475cm" fo:min-width="2.072cm" fo:padding-top="0cm" fo:padding-bottom="0cm" fo:padding-left="0cm" fo:padding-right="0cm" loext:decorative="false"/>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475cm" fo:min-width="2.402cm" fo:padding-top="0cm" fo:padding-bottom="0cm" fo:padding-left="0cm" fo:padding-right="0cm" loext:decorative="false"/>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475cm" fo:min-width="1.332cm" fo:padding-top="0cm" fo:padding-bottom="0cm" fo:padding-left="0cm" fo:padding-right="0cm" loext:decorative="false"/>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475cm" fo:min-width="0.896cm" fo:padding-top="0cm" fo:padding-bottom="0cm" fo:padding-left="0cm" fo:padding-right="0cm" loext:decorative="false"/>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475cm" fo:min-width="2.061cm" fo:padding-top="0cm" fo:padding-bottom="0cm" fo:padding-left="0cm" fo:padding-right="0cm" loext:decorative="false"/>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475cm" fo:min-width="2.225cm" fo:padding-top="0cm" fo:padding-bottom="0cm" fo:padding-left="0cm" fo:padding-right="0cm" loext:decorative="false"/>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475cm" fo:min-width="2.155cm" fo:padding-top="0cm" fo:padding-bottom="0cm" fo:padding-left="0cm" fo:padding-right="0cm" loext:decorative="false"/>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433cm" fo:min-width="0.389cm" fo:padding-top="0cm" fo:padding-bottom="0cm" fo:padding-left="0cm" fo:padding-right="0cm" loext:decorative="false"/>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475cm" fo:min-width="2.273cm" fo:padding-top="0cm" fo:padding-bottom="0cm" fo:padding-left="0cm" fo:padding-right="0cm" loext:decorative="false"/>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475cm" fo:min-width="1.896cm" fo:padding-top="0cm" fo:padding-bottom="0cm" fo:padding-left="0cm" fo:padding-right="0cm" loext:decorative="false"/>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475cm" fo:min-width="2.108cm" fo:padding-top="0cm" fo:padding-bottom="0cm" fo:padding-left="0cm" fo:padding-right="0cm" loext:decorative="false"/>
      <style:paragraph-properties style:writing-mode="lr-tb"/>
    </style:style>
    <style:style style:name="gr660" style:family="graphic" style:parent-style-name="standard">
      <style:graphic-properties draw:stroke="none" draw:fill="none" draw:textarea-horizontal-align="left" draw:textarea-vertical-align="top" draw:auto-grow-height="true" draw:auto-grow-width="true" fo:min-height="0.475cm" fo:min-width="2.202cm" fo:padding-top="0cm" fo:padding-bottom="0cm" fo:padding-left="0cm" fo:padding-right="0cm" loext:decorative="false"/>
      <style:paragraph-properties style:writing-mode="lr-tb"/>
    </style:style>
    <style:style style:name="gr661" style:family="graphic" style:parent-style-name="standard">
      <style:graphic-properties draw:stroke="solid" svg:stroke-width="0.025cm" svg:stroke-color="#b2b2b2" draw:stroke-linejoin="miter" svg:stroke-linecap="butt" draw:fill="solid" draw:fill-color="#d9e7cf" fo:padding-top="0.012cm" fo:padding-bottom="0.012cm" fo:padding-left="0.012cm" fo:padding-right="0.012cm" loext:decorative="false"/>
    </style:style>
    <style:style style:name="gr662" style:family="graphic" style:parent-style-name="standard">
      <style:graphic-properties draw:stroke="none" draw:fill="none" draw:textarea-horizontal-align="left" draw:textarea-vertical-align="top" draw:auto-grow-height="true" draw:auto-grow-width="true" fo:min-height="0.475cm" fo:min-width="0.684cm" fo:padding-top="0cm" fo:padding-bottom="0cm" fo:padding-left="0cm" fo:padding-right="0cm" loext:decorative="false"/>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433cm" fo:min-width="2.881cm" fo:padding-top="0cm" fo:padding-bottom="0cm" fo:padding-left="0cm" fo:padding-right="0cm" loext:decorative="false"/>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475cm" fo:min-width="3.108cm" fo:padding-top="0cm" fo:padding-bottom="0cm" fo:padding-left="0cm" fo:padding-right="0cm" loext:decorative="false"/>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475cm" fo:min-width="5.767cm" fo:padding-top="0cm" fo:padding-bottom="0cm" fo:padding-left="0cm" fo:padding-right="0cm" loext:decorative="false"/>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475cm" fo:min-width="2.896cm" fo:padding-top="0cm" fo:padding-bottom="0cm" fo:padding-left="0cm" fo:padding-right="0cm" loext:decorative="false"/>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475cm" fo:min-width="0.966cm" fo:padding-top="0cm" fo:padding-bottom="0cm" fo:padding-left="0cm" fo:padding-right="0cm" loext:decorative="false"/>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433cm" fo:min-width="1.258cm" fo:padding-top="0cm" fo:padding-bottom="0cm" fo:padding-left="0cm" fo:padding-right="0cm" loext:decorative="false"/>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361cm" fo:min-width="2.773cm" fo:padding-top="0cm" fo:padding-bottom="0cm" fo:padding-left="0cm" fo:padding-right="0cm" loext:decorative="false"/>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361cm" fo:min-width="9.516cm" fo:padding-top="0cm" fo:padding-bottom="0cm" fo:padding-left="0cm" fo:padding-right="0cm" loext:decorative="false"/>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361cm" fo:min-width="5.259cm" fo:padding-top="0cm" fo:padding-bottom="0cm" fo:padding-left="0cm" fo:padding-right="0cm" loext:decorative="false"/>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361cm" fo:min-width="5.742cm" fo:padding-top="0cm" fo:padding-bottom="0cm" fo:padding-left="0cm" fo:padding-right="0cm" loext:decorative="false"/>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361cm" fo:min-width="2.97cm" fo:padding-top="0cm" fo:padding-bottom="0cm" fo:padding-left="0cm" fo:padding-right="0cm" loext:decorative="false"/>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361cm" fo:min-width="14.647cm" fo:padding-top="0cm" fo:padding-bottom="0cm" fo:padding-left="0cm" fo:padding-right="0cm" loext:decorative="false"/>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361cm" fo:min-width="15.202cm" fo:padding-top="0cm" fo:padding-bottom="0cm" fo:padding-left="0cm" fo:padding-right="0cm" loext:decorative="false"/>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361cm" fo:min-width="14.684cm" fo:padding-top="0cm" fo:padding-bottom="0cm" fo:padding-left="0cm" fo:padding-right="0cm" loext:decorative="false"/>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361cm" fo:min-width="4.579cm" fo:padding-top="0cm" fo:padding-bottom="0cm" fo:padding-left="0cm" fo:padding-right="0cm" loext:decorative="false"/>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361cm" fo:min-width="9.623cm" fo:padding-top="0cm" fo:padding-bottom="0cm" fo:padding-left="0cm" fo:padding-right="0cm" loext:decorative="false"/>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361cm" fo:min-width="18.653cm" fo:padding-top="0cm" fo:padding-bottom="0cm" fo:padding-left="0cm" fo:padding-right="0cm" loext:decorative="false"/>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361cm" fo:min-width="7.531cm" fo:padding-top="0cm" fo:padding-bottom="0cm" fo:padding-left="0cm" fo:padding-right="0cm" loext:decorative="false"/>
      <style:paragraph-properties style:writing-mode="lr-tb"/>
    </style:style>
    <style:style style:name="gr681" style:family="graphic" style:parent-style-name="standard">
      <style:graphic-properties draw:stroke="solid" svg:stroke-width="0.067cm" svg:stroke-color="#bfbfbf" draw:stroke-linejoin="round" svg:stroke-linecap="butt" draw:fill="solid" draw:fill-color="#bfbfbf" fo:padding-top="0.033cm" fo:padding-bottom="0.033cm" fo:padding-left="0.033cm" fo:padding-right="0.033cm" loext:decorative="false"/>
    </style:style>
    <style:style style:name="gr682" style:family="graphic" style:parent-style-name="standard">
      <style:graphic-properties draw:stroke="none" draw:fill="solid" draw:fill-color="#d9e7cf" loext:decorative="false"/>
    </style:style>
    <style:style style:name="gr683" style:family="graphic" style:parent-style-name="standard">
      <style:graphic-properties draw:stroke="solid" svg:stroke-width="0.025cm" svg:stroke-color="#b2b2b2" draw:stroke-linejoin="miter" svg:stroke-linecap="butt" draw:fill="none" fo:padding-top="0.012cm" fo:padding-bottom="0.012cm" fo:padding-left="0.012cm" fo:padding-right="0.012cm" loext:decorative="false"/>
    </style:style>
    <style:style style:name="gr684" style:family="graphic" style:parent-style-name="standard">
      <style:graphic-properties draw:stroke="none" draw:fill="none" draw:textarea-horizontal-align="left" draw:textarea-vertical-align="top" draw:auto-grow-height="true" draw:auto-grow-width="true" fo:min-height="0.361cm" fo:min-width="18.619cm" fo:padding-top="0cm" fo:padding-bottom="0cm" fo:padding-left="0cm" fo:padding-right="0cm" loext:decorative="false"/>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1.309cm" fo:min-width="1.885cm" fo:padding-top="0cm" fo:padding-bottom="0cm" fo:padding-left="0cm" fo:padding-right="0cm" loext:decorative="false"/>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399cm" fo:min-width="1.485cm" fo:padding-top="0cm" fo:padding-bottom="0cm" fo:padding-left="0cm" fo:padding-right="0cm" loext:decorative="false"/>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399cm" fo:min-width="3.124cm" fo:padding-top="0cm" fo:padding-bottom="0cm" fo:padding-left="0cm" fo:padding-right="0cm" loext:decorative="false"/>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399cm" fo:min-width="2.413cm" fo:padding-top="0cm" fo:padding-bottom="0cm" fo:padding-left="0cm" fo:padding-right="0cm" loext:decorative="false"/>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399cm" fo:min-width="4.369cm" fo:padding-top="0cm" fo:padding-bottom="0cm" fo:padding-left="0cm" fo:padding-right="0cm" loext:decorative="false"/>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399cm" fo:min-width="1.938cm" fo:padding-top="0cm" fo:padding-bottom="0cm" fo:padding-left="0cm" fo:padding-right="0cm" loext:decorative="false"/>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399cm" fo:min-width="0.832cm" fo:padding-top="0cm" fo:padding-bottom="0cm" fo:padding-left="0cm" fo:padding-right="0cm" loext:decorative="false"/>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399cm" fo:min-width="1.504cm" fo:padding-top="0cm" fo:padding-bottom="0cm" fo:padding-left="0cm" fo:padding-right="0cm" loext:decorative="false"/>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475cm" fo:min-width="1.39cm" fo:padding-top="0cm" fo:padding-bottom="0cm" fo:padding-left="0cm" fo:padding-right="0cm" loext:decorative="false"/>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475cm" fo:min-width="7.672cm" fo:padding-top="0cm" fo:padding-bottom="0cm" fo:padding-left="0cm" fo:padding-right="0cm" loext:decorative="false"/>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475cm" fo:min-width="8.685cm" fo:padding-top="0cm" fo:padding-bottom="0cm" fo:padding-left="0cm" fo:padding-right="0cm" loext:decorative="false"/>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475cm" fo:min-width="2.778cm" fo:padding-top="0cm" fo:padding-bottom="0cm" fo:padding-left="0cm" fo:padding-right="0cm" loext:decorative="false"/>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475cm" fo:min-width="1.532cm" fo:padding-top="0cm" fo:padding-bottom="0cm" fo:padding-left="0cm" fo:padding-right="0cm" loext:decorative="false"/>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475cm" fo:min-width="0.967cm" fo:padding-top="0cm" fo:padding-bottom="0cm" fo:padding-left="0cm" fo:padding-right="0cm" loext:decorative="false"/>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475cm" fo:min-width="1.178cm" fo:padding-top="0cm" fo:padding-bottom="0cm" fo:padding-left="0cm" fo:padding-right="0cm" loext:decorative="false"/>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475cm" fo:min-width="8.401cm" fo:padding-top="0cm" fo:padding-bottom="0cm" fo:padding-left="0cm" fo:padding-right="0cm" loext:decorative="false"/>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475cm" fo:min-width="8.308cm" fo:padding-top="0cm" fo:padding-bottom="0cm" fo:padding-left="0cm" fo:padding-right="0cm" loext:decorative="false"/>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475cm" fo:min-width="8.403cm" fo:padding-top="0cm" fo:padding-bottom="0cm" fo:padding-left="0cm" fo:padding-right="0cm" loext:decorative="false"/>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475cm" fo:min-width="8.331cm" fo:padding-top="0cm" fo:padding-bottom="0cm" fo:padding-left="0cm" fo:padding-right="0cm" loext:decorative="false"/>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475cm" fo:min-width="7.061cm" fo:padding-top="0cm" fo:padding-bottom="0cm" fo:padding-left="0cm" fo:padding-right="0cm" loext:decorative="false"/>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475cm" fo:min-width="4.849cm" fo:padding-top="0cm" fo:padding-bottom="0cm" fo:padding-left="0cm" fo:padding-right="0cm" loext:decorative="false"/>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475cm" fo:min-width="4.285cm" fo:padding-top="0cm" fo:padding-bottom="0cm" fo:padding-left="0cm" fo:padding-right="0cm" loext:decorative="false"/>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475cm" fo:min-width="2.449cm" fo:padding-top="0cm" fo:padding-bottom="0cm" fo:padding-left="0cm" fo:padding-right="0cm" loext:decorative="false"/>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475cm" fo:min-width="2.731cm" fo:padding-top="0cm" fo:padding-bottom="0cm" fo:padding-left="0cm" fo:padding-right="0cm" loext:decorative="false"/>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475cm" fo:min-width="1.79cm" fo:padding-top="0cm" fo:padding-bottom="0cm" fo:padding-left="0cm" fo:padding-right="0cm" loext:decorative="false"/>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475cm" fo:min-width="1.484cm" fo:padding-top="0cm" fo:padding-bottom="0cm" fo:padding-left="0cm" fo:padding-right="0cm" loext:decorative="false"/>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475cm" fo:min-width="1.531cm" fo:padding-top="0cm" fo:padding-bottom="0cm" fo:padding-left="0cm" fo:padding-right="0cm" loext:decorative="false"/>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475cm" fo:min-width="1.555cm" fo:padding-top="0cm" fo:padding-bottom="0cm" fo:padding-left="0cm" fo:padding-right="0cm" loext:decorative="false"/>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475cm" fo:min-width="7.626cm" fo:padding-top="0cm" fo:padding-bottom="0cm" fo:padding-left="0cm" fo:padding-right="0cm" loext:decorative="false"/>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475cm" fo:min-width="7.979cm" fo:padding-top="0cm" fo:padding-bottom="0cm" fo:padding-left="0cm" fo:padding-right="0cm" loext:decorative="false"/>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475cm" fo:min-width="8.732cm" fo:padding-top="0cm" fo:padding-bottom="0cm" fo:padding-left="0cm" fo:padding-right="0cm" loext:decorative="false"/>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475cm" fo:min-width="2.331cm" fo:padding-top="0cm" fo:padding-bottom="0cm" fo:padding-left="0cm" fo:padding-right="0cm" loext:decorative="false"/>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14cm" fo:min-width="0.278cm" fo:padding-top="0cm" fo:padding-bottom="0cm" fo:padding-left="0cm" fo:padding-right="0cm" loext:decorative="false"/>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475cm" fo:min-width="0.802cm" fo:padding-top="0cm" fo:padding-bottom="0cm" fo:padding-left="0cm" fo:padding-right="0cm" loext:decorative="false"/>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1.309cm" fo:min-width="11.572cm" fo:padding-top="0cm" fo:padding-bottom="0cm" fo:padding-left="0cm" fo:padding-right="0cm" loext:decorative="false"/>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99cm" fo:min-width="0.674cm" fo:padding-top="0cm" fo:padding-bottom="0cm" fo:padding-left="0cm" fo:padding-right="0cm" loext:decorative="false"/>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99cm" fo:min-width="2.768cm" fo:padding-top="0cm" fo:padding-bottom="0cm" fo:padding-left="0cm" fo:padding-right="0cm" loext:decorative="false"/>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99cm" fo:min-width="1.681cm" fo:padding-top="0cm" fo:padding-bottom="0cm" fo:padding-left="0cm" fo:padding-right="0cm" loext:decorative="false"/>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99cm" fo:min-width="1.089cm" fo:padding-top="0cm" fo:padding-bottom="0cm" fo:padding-left="0cm" fo:padding-right="0cm" loext:decorative="false"/>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552cm" fo:min-width="10.213cm" fo:padding-top="0cm" fo:padding-bottom="0cm" fo:padding-left="0cm" fo:padding-right="0cm" loext:decorative="false"/>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552cm" fo:min-width="10.864cm" fo:padding-top="0cm" fo:padding-bottom="0cm" fo:padding-left="0cm" fo:padding-right="0cm" loext:decorative="false"/>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552cm" fo:min-width="8.271cm" fo:padding-top="0cm" fo:padding-bottom="0cm" fo:padding-left="0cm" fo:padding-right="0cm" loext:decorative="false"/>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552cm" fo:min-width="6.826cm" fo:padding-top="0cm" fo:padding-bottom="0cm" fo:padding-left="0cm" fo:padding-right="0cm" loext:decorative="false"/>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552cm" fo:min-width="10.838cm" fo:padding-top="0cm" fo:padding-bottom="0cm" fo:padding-left="0cm" fo:padding-right="0cm" loext:decorative="false"/>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552cm" fo:min-width="10.455cm" fo:padding-top="0cm" fo:padding-bottom="0cm" fo:padding-left="0cm" fo:padding-right="0cm" loext:decorative="false"/>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552cm" fo:min-width="5.488cm" fo:padding-top="0cm" fo:padding-bottom="0cm" fo:padding-left="0cm" fo:padding-right="0cm" loext:decorative="false"/>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552cm" fo:min-width="11.521cm" fo:padding-top="0cm" fo:padding-bottom="0cm" fo:padding-left="0cm" fo:padding-right="0cm" loext:decorative="false"/>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552cm" fo:min-width="9.392cm" fo:padding-top="0cm" fo:padding-bottom="0cm" fo:padding-left="0cm" fo:padding-right="0cm" loext:decorative="false"/>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552cm" fo:min-width="9.91cm" fo:padding-top="0cm" fo:padding-bottom="0cm" fo:padding-left="0cm" fo:padding-right="0cm" loext:decorative="false"/>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552cm" fo:min-width="11.029cm" fo:padding-top="0cm" fo:padding-bottom="0cm" fo:padding-left="0cm" fo:padding-right="0cm" loext:decorative="false"/>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552cm" fo:min-width="10.592cm" fo:padding-top="0cm" fo:padding-bottom="0cm" fo:padding-left="0cm" fo:padding-right="0cm" loext:decorative="false"/>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552cm" fo:min-width="9.447cm" fo:padding-top="0cm" fo:padding-bottom="0cm" fo:padding-left="0cm" fo:padding-right="0cm" loext:decorative="false"/>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552cm" fo:min-width="3.087cm" fo:padding-top="0cm" fo:padding-bottom="0cm" fo:padding-left="0cm" fo:padding-right="0cm" loext:decorative="false"/>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552cm" fo:min-width="10.184cm" fo:padding-top="0cm" fo:padding-bottom="0cm" fo:padding-left="0cm" fo:padding-right="0cm" loext:decorative="false"/>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552cm" fo:min-width="9.938cm" fo:padding-top="0cm" fo:padding-bottom="0cm" fo:padding-left="0cm" fo:padding-right="0cm" loext:decorative="false"/>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552cm" fo:min-width="9.966cm" fo:padding-top="0cm" fo:padding-bottom="0cm" fo:padding-left="0cm" fo:padding-right="0cm" loext:decorative="false"/>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1.309cm" fo:min-width="5.995cm" fo:padding-top="0cm" fo:padding-bottom="0cm" fo:padding-left="0cm" fo:padding-right="0cm" loext:decorative="false"/>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598cm" fo:min-width="2.908cm" fo:padding-top="0cm" fo:padding-bottom="0cm" fo:padding-left="0cm" fo:padding-right="0cm" loext:decorative="false"/>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1.11cm" fo:min-width="0.99cm" fo:padding-top="0cm" fo:padding-bottom="0cm" fo:padding-left="0cm" fo:padding-right="0cm" loext:decorative="false"/>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475cm" fo:min-width="8.049cm" fo:padding-top="0cm" fo:padding-bottom="0cm" fo:padding-left="0cm" fo:padding-right="0cm" loext:decorative="false"/>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475cm" fo:min-width="14.968cm" fo:padding-top="0cm" fo:padding-bottom="0cm" fo:padding-left="0cm" fo:padding-right="0cm" loext:decorative="false"/>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56cm" fo:min-width="0.425cm" fo:padding-top="0cm" fo:padding-bottom="0cm" fo:padding-left="0cm" fo:padding-right="0cm" loext:decorative="false"/>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475cm" fo:min-width="13.838cm" fo:padding-top="0cm" fo:padding-bottom="0cm" fo:padding-left="0cm" fo:padding-right="0cm" loext:decorative="false"/>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475cm" fo:min-width="9.508cm" fo:padding-top="0cm" fo:padding-bottom="0cm" fo:padding-left="0cm" fo:padding-right="0cm" loext:decorative="false"/>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475cm" fo:min-width="16.638cm" fo:padding-top="0cm" fo:padding-bottom="0cm" fo:padding-left="0cm" fo:padding-right="0cm" loext:decorative="false"/>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475cm" fo:min-width="15.32cm" fo:padding-top="0cm" fo:padding-bottom="0cm" fo:padding-left="0cm" fo:padding-right="0cm" loext:decorative="false"/>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475cm" fo:min-width="8.662cm" fo:padding-top="0cm" fo:padding-bottom="0cm" fo:padding-left="0cm" fo:padding-right="0cm" loext:decorative="false"/>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475cm" fo:min-width="11.366cm" fo:padding-top="0cm" fo:padding-bottom="0cm" fo:padding-left="0cm" fo:padding-right="0cm" loext:decorative="false"/>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475cm" fo:min-width="17.813cm" fo:padding-top="0cm" fo:padding-bottom="0cm" fo:padding-left="0cm" fo:padding-right="0cm" loext:decorative="false"/>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475cm" fo:min-width="16.591cm" fo:padding-top="0cm" fo:padding-bottom="0cm" fo:padding-left="0cm" fo:padding-right="0cm" loext:decorative="false"/>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475cm" fo:min-width="8.943cm" fo:padding-top="0cm" fo:padding-bottom="0cm" fo:padding-left="0cm" fo:padding-right="0cm" loext:decorative="false"/>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475cm" fo:min-width="20.403cm" fo:padding-top="0cm" fo:padding-bottom="0cm" fo:padding-left="0cm" fo:padding-right="0cm" loext:decorative="false"/>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475cm" fo:min-width="10.896cm" fo:padding-top="0cm" fo:padding-bottom="0cm" fo:padding-left="0cm" fo:padding-right="0cm" loext:decorative="false"/>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475cm" fo:min-width="25.274cm" fo:padding-top="0cm" fo:padding-bottom="0cm" fo:padding-left="0cm" fo:padding-right="0cm" loext:decorative="false"/>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598cm" fo:min-width="2.315cm" fo:padding-top="0cm" fo:padding-bottom="0cm" fo:padding-left="0cm" fo:padding-right="0cm" loext:decorative="false"/>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513cm" fo:min-width="18.91cm" fo:padding-top="0cm" fo:padding-bottom="0cm" fo:padding-left="0cm" fo:padding-right="0cm" loext:decorative="false"/>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552cm" fo:min-width="14.716cm" fo:padding-top="0cm" fo:padding-bottom="0cm" fo:padding-left="0cm" fo:padding-right="0cm" loext:decorative="false"/>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552cm" fo:min-width="20.419cm" fo:padding-top="0cm" fo:padding-bottom="0cm" fo:padding-left="0cm" fo:padding-right="0cm" loext:decorative="false"/>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2.237cm" fo:min-width="8.231cm" fo:padding-top="0cm" fo:padding-bottom="0cm" fo:padding-left="0cm" fo:padding-right="0cm" loext:decorative="false"/>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649cm" fo:min-width="2.457cm" fo:padding-top="0cm" fo:padding-bottom="0cm" fo:padding-left="0cm" fo:padding-right="0cm" loext:decorative="false"/>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552cm" fo:min-width="3.06cm" fo:padding-top="0cm" fo:padding-bottom="0cm" fo:padding-left="0cm" fo:padding-right="0cm" loext:decorative="false"/>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2.516cm" fo:min-width="10.183cm" fo:padding-top="0cm" fo:padding-bottom="0cm" fo:padding-left="0cm" fo:padding-right="0cm" loext:decorative="false"/>
      <style:paragraph-properties style:writing-mode="lr-tb"/>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text-align="start" style:writing-mode="lr-tb"/>
    </style:style>
    <style:style style:name="P4" style:family="paragraph">
      <loext:graphic-properties draw:fill="none"/>
      <style:text-properties fo:font-size="13.8999996185303pt" style:font-size-asian="13.8999996185303pt" style:font-size-complex="13.8999996185303pt"/>
    </style:style>
    <style:style style:name="P5" style:family="paragraph">
      <loext:graphic-properties draw:fill="none"/>
      <style:text-properties fo:font-size="49pt" style:font-size-asian="49pt" style:font-size-complex="49pt"/>
    </style:style>
    <style:style style:name="P6" style:family="paragraph">
      <loext:graphic-properties draw:fill="solid" draw:fill-color="#1b4593"/>
    </style:style>
    <style:style style:name="P7" style:family="paragraph">
      <loext:graphic-properties draw:fill="none"/>
      <style:text-properties fo:font-size="16.1000003814697pt" style:font-size-asian="16.1000003814697pt" style:font-size-complex="16.1000003814697pt"/>
    </style:style>
    <style:style style:name="P8" style:family="paragraph">
      <loext:graphic-properties draw:fill="none"/>
      <style:text-properties fo:font-size="24pt" style:font-size-asian="24pt" style:font-size-complex="24pt"/>
    </style:style>
    <style:style style:name="P9" style:family="paragraph">
      <loext:graphic-properties draw:fill="none"/>
      <style:text-properties fo:font-size="28.1000003814697pt" style:font-size-asian="28.1000003814697pt" style:font-size-complex="28.1000003814697pt"/>
    </style:style>
    <style:style style:name="P10" style:family="paragraph">
      <loext:graphic-properties draw:fill="none"/>
      <style:text-properties fo:font-size="20pt" style:font-size-asian="20pt" style:font-size-complex="20pt"/>
    </style:style>
    <style:style style:name="P11" style:family="paragraph">
      <loext:graphic-properties draw:fill="none"/>
      <style:text-properties fo:font-size="19.8999996185303pt" style:font-size-asian="19.8999996185303pt" style:font-size-complex="19.8999996185303pt"/>
    </style:style>
    <style:style style:name="P12" style:family="paragraph">
      <loext:graphic-properties draw:fill="none"/>
      <style:text-properties fo:font-size="48pt" style:font-size-asian="48pt" style:font-size-complex="48pt"/>
    </style:style>
    <style:style style:name="P13" style:family="paragraph">
      <loext:graphic-properties draw:fill="solid" draw:fill-color="#768fbe"/>
    </style:style>
    <style:style style:name="P14" style:family="paragraph">
      <loext:graphic-properties draw:fill="none"/>
      <style:text-properties fo:font-size="10.1000003814697pt" style:font-size-asian="10.1000003814697pt" style:font-size-complex="10.1000003814697pt"/>
    </style:style>
    <style:style style:name="P15" style:family="paragraph">
      <loext:graphic-properties draw:fill="solid" draw:fill-color="#00d3e4"/>
    </style:style>
    <style:style style:name="P16" style:family="paragraph">
      <loext:graphic-properties draw:fill="solid" draw:fill-color="#66e5ef"/>
    </style:style>
    <style:style style:name="P17" style:family="paragraph">
      <loext:graphic-properties draw:fill="solid" draw:fill-color="#a1aad0"/>
    </style:style>
    <style:style style:name="P18" style:family="paragraph">
      <loext:graphic-properties draw:fill="solid" draw:fill-color="#a2aad0"/>
    </style:style>
    <style:style style:name="P19" style:family="paragraph">
      <loext:graphic-properties draw:fill="solid" draw:fill-color="#a2abd1"/>
    </style:style>
    <style:style style:name="P20" style:family="paragraph">
      <loext:graphic-properties draw:fill="solid" draw:fill-color="#a3abd1"/>
    </style:style>
    <style:style style:name="P21" style:family="paragraph">
      <loext:graphic-properties draw:fill="solid" draw:fill-color="#a3acd1"/>
    </style:style>
    <style:style style:name="P22" style:family="paragraph">
      <loext:graphic-properties draw:fill="solid" draw:fill-color="#a4acd1"/>
    </style:style>
    <style:style style:name="P23" style:family="paragraph">
      <loext:graphic-properties draw:fill="solid" draw:fill-color="#a4add1"/>
    </style:style>
    <style:style style:name="P24" style:family="paragraph">
      <loext:graphic-properties draw:fill="solid" draw:fill-color="#a5add2"/>
    </style:style>
    <style:style style:name="P25" style:family="paragraph">
      <loext:graphic-properties draw:fill="solid" draw:fill-color="#a6aed2"/>
    </style:style>
    <style:style style:name="P26" style:family="paragraph">
      <loext:graphic-properties draw:fill="solid" draw:fill-color="#a7afd2"/>
    </style:style>
    <style:style style:name="P27" style:family="paragraph">
      <loext:graphic-properties draw:fill="solid" draw:fill-color="#a7afd3"/>
    </style:style>
    <style:style style:name="P28" style:family="paragraph">
      <loext:graphic-properties draw:fill="solid" draw:fill-color="#a8afd3"/>
    </style:style>
    <style:style style:name="P29" style:family="paragraph">
      <loext:graphic-properties draw:fill="solid" draw:fill-color="#a8b0d3"/>
    </style:style>
    <style:style style:name="P30" style:family="paragraph">
      <loext:graphic-properties draw:fill="solid" draw:fill-color="#a9b0d3"/>
    </style:style>
    <style:style style:name="P31" style:family="paragraph">
      <loext:graphic-properties draw:fill="solid" draw:fill-color="#a9b1d3"/>
    </style:style>
    <style:style style:name="P32" style:family="paragraph">
      <loext:graphic-properties draw:fill="solid" draw:fill-color="#a9b1d4"/>
    </style:style>
    <style:style style:name="P33" style:family="paragraph">
      <loext:graphic-properties draw:fill="solid" draw:fill-color="#aab1d4"/>
    </style:style>
    <style:style style:name="P34" style:family="paragraph">
      <loext:graphic-properties draw:fill="solid" draw:fill-color="#aab2d4"/>
    </style:style>
    <style:style style:name="P35" style:family="paragraph">
      <loext:graphic-properties draw:fill="solid" draw:fill-color="#abb2d4"/>
    </style:style>
    <style:style style:name="P36" style:family="paragraph">
      <loext:graphic-properties draw:fill="solid" draw:fill-color="#abb3d4"/>
    </style:style>
    <style:style style:name="P37" style:family="paragraph">
      <loext:graphic-properties draw:fill="solid" draw:fill-color="#acb3d5"/>
    </style:style>
    <style:style style:name="P38" style:family="paragraph">
      <loext:graphic-properties draw:fill="solid" draw:fill-color="#adb4d5"/>
    </style:style>
    <style:style style:name="P39" style:family="paragraph">
      <loext:graphic-properties draw:fill="solid" draw:fill-color="#aeb5d5"/>
    </style:style>
    <style:style style:name="P40" style:family="paragraph">
      <loext:graphic-properties draw:fill="solid" draw:fill-color="#afb6d6"/>
    </style:style>
    <style:style style:name="P41" style:family="paragraph">
      <loext:graphic-properties draw:fill="solid" draw:fill-color="#b0b7d6"/>
    </style:style>
    <style:style style:name="P42" style:family="paragraph">
      <loext:graphic-properties draw:fill="solid" draw:fill-color="#b1b7d7"/>
    </style:style>
    <style:style style:name="P43" style:family="paragraph">
      <loext:graphic-properties draw:fill="solid" draw:fill-color="#b1b8d7"/>
    </style:style>
    <style:style style:name="P44" style:family="paragraph">
      <loext:graphic-properties draw:fill="solid" draw:fill-color="#b2b9d7"/>
    </style:style>
    <style:style style:name="P45" style:family="paragraph">
      <loext:graphic-properties draw:fill="solid" draw:fill-color="#b3b9d7"/>
    </style:style>
    <style:style style:name="P46" style:family="paragraph">
      <loext:graphic-properties draw:fill="solid" draw:fill-color="#b3bad8"/>
    </style:style>
    <style:style style:name="P47" style:family="paragraph">
      <loext:graphic-properties draw:fill="solid" draw:fill-color="#b4bad8"/>
    </style:style>
    <style:style style:name="P48" style:family="paragraph">
      <loext:graphic-properties draw:fill="solid" draw:fill-color="#b5bbd8"/>
    </style:style>
    <style:style style:name="P49" style:family="paragraph">
      <loext:graphic-properties draw:fill="solid" draw:fill-color="#b6bcd9"/>
    </style:style>
    <style:style style:name="P50" style:family="paragraph">
      <loext:graphic-properties draw:fill="solid" draw:fill-color="#b7bdd9"/>
    </style:style>
    <style:style style:name="P51" style:family="paragraph">
      <loext:graphic-properties draw:fill="solid" draw:fill-color="#b8beda"/>
    </style:style>
    <style:style style:name="P52" style:family="paragraph">
      <loext:graphic-properties draw:fill="solid" draw:fill-color="#b9beda"/>
    </style:style>
    <style:style style:name="P53" style:family="paragraph">
      <loext:graphic-properties draw:fill="solid" draw:fill-color="#b9bfda"/>
    </style:style>
    <style:style style:name="P54" style:family="paragraph">
      <loext:graphic-properties draw:fill="solid" draw:fill-color="#bac0da"/>
    </style:style>
    <style:style style:name="P55" style:family="paragraph">
      <loext:graphic-properties draw:fill="solid" draw:fill-color="#bbc0db"/>
    </style:style>
    <style:style style:name="P56" style:family="paragraph">
      <loext:graphic-properties draw:fill="solid" draw:fill-color="#bbc1db"/>
    </style:style>
    <style:style style:name="P57" style:family="paragraph">
      <loext:graphic-properties draw:fill="solid" draw:fill-color="#bcc1db"/>
    </style:style>
    <style:style style:name="P58" style:family="paragraph">
      <loext:graphic-properties draw:fill="solid" draw:fill-color="#bdc2dc"/>
    </style:style>
    <style:style style:name="P59" style:family="paragraph">
      <loext:graphic-properties draw:fill="solid" draw:fill-color="#bdc3dc"/>
    </style:style>
    <style:style style:name="P60" style:family="paragraph">
      <loext:graphic-properties draw:fill="solid" draw:fill-color="#bec3dc"/>
    </style:style>
    <style:style style:name="P61" style:family="paragraph">
      <loext:graphic-properties draw:fill="solid" draw:fill-color="#bfc4dc"/>
    </style:style>
    <style:style style:name="P62" style:family="paragraph">
      <loext:graphic-properties draw:fill="solid" draw:fill-color="#bfc4dd"/>
    </style:style>
    <style:style style:name="P63" style:family="paragraph">
      <loext:graphic-properties draw:fill="solid" draw:fill-color="#c0c5dd"/>
    </style:style>
    <style:style style:name="P64" style:family="paragraph">
      <loext:graphic-properties draw:fill="solid" draw:fill-color="#c1c6dd"/>
    </style:style>
    <style:style style:name="P65" style:family="paragraph">
      <loext:graphic-properties draw:fill="solid" draw:fill-color="#c1c6de"/>
    </style:style>
    <style:style style:name="P66" style:family="paragraph">
      <loext:graphic-properties draw:fill="solid" draw:fill-color="#c2c7de"/>
    </style:style>
    <style:style style:name="P67" style:family="paragraph">
      <loext:graphic-properties draw:fill="solid" draw:fill-color="#c3c8df"/>
    </style:style>
    <style:style style:name="P68" style:family="paragraph">
      <loext:graphic-properties draw:fill="solid" draw:fill-color="#c4c8df"/>
    </style:style>
    <style:style style:name="P69" style:family="paragraph">
      <loext:graphic-properties draw:fill="solid" draw:fill-color="#c4c9df"/>
    </style:style>
    <style:style style:name="P70" style:family="paragraph">
      <loext:graphic-properties draw:fill="solid" draw:fill-color="#c5cae0"/>
    </style:style>
    <style:style style:name="P71" style:family="paragraph">
      <loext:graphic-properties draw:fill="solid" draw:fill-color="#c6cbe0"/>
    </style:style>
    <style:style style:name="P72" style:family="paragraph">
      <loext:graphic-properties draw:fill="solid" draw:fill-color="#c7cbe1"/>
    </style:style>
    <style:style style:name="P73" style:family="paragraph">
      <loext:graphic-properties draw:fill="solid" draw:fill-color="#c7cce1"/>
    </style:style>
    <style:style style:name="P74" style:family="paragraph">
      <loext:graphic-properties draw:fill="solid" draw:fill-color="#c8cde1"/>
    </style:style>
    <style:style style:name="P75" style:family="paragraph">
      <loext:graphic-properties draw:fill="solid" draw:fill-color="#c9cde2"/>
    </style:style>
    <style:style style:name="P76" style:family="paragraph">
      <loext:graphic-properties draw:fill="solid" draw:fill-color="#c9cee2"/>
    </style:style>
    <style:style style:name="P77" style:family="paragraph">
      <loext:graphic-properties draw:fill="solid" draw:fill-color="#cacee2"/>
    </style:style>
    <style:style style:name="P78" style:family="paragraph">
      <loext:graphic-properties draw:fill="solid" draw:fill-color="#cacfe2"/>
    </style:style>
    <style:style style:name="P79" style:family="paragraph">
      <loext:graphic-properties draw:fill="solid" draw:fill-color="#cbcfe3"/>
    </style:style>
    <style:style style:name="P80" style:family="paragraph">
      <loext:graphic-properties draw:fill="solid" draw:fill-color="#cbd0e3"/>
    </style:style>
    <style:style style:name="P81" style:family="paragraph">
      <loext:graphic-properties draw:fill="solid" draw:fill-color="#ccd0e3"/>
    </style:style>
    <style:style style:name="P82" style:family="paragraph">
      <loext:graphic-properties draw:fill="solid" draw:fill-color="#ccd0e4"/>
    </style:style>
    <style:style style:name="P83" style:family="paragraph">
      <loext:graphic-properties draw:fill="solid" draw:fill-color="#cdd1e4"/>
    </style:style>
    <style:style style:name="P84" style:family="paragraph">
      <loext:graphic-properties draw:fill="solid" draw:fill-color="#ced2e4"/>
    </style:style>
    <style:style style:name="P85" style:family="paragraph">
      <loext:graphic-properties draw:fill="solid" draw:fill-color="#ced2e5"/>
    </style:style>
    <style:style style:name="P86" style:family="paragraph">
      <loext:graphic-properties draw:fill="solid" draw:fill-color="#cfd3e5"/>
    </style:style>
    <style:style style:name="P87" style:family="paragraph">
      <loext:graphic-properties draw:fill="solid" draw:fill-color="#d0d4e5"/>
    </style:style>
    <style:style style:name="P88" style:family="paragraph">
      <loext:graphic-properties draw:fill="solid" draw:fill-color="#d0d4e6"/>
    </style:style>
    <style:style style:name="P89" style:family="paragraph">
      <loext:graphic-properties draw:fill="solid" draw:fill-color="#d1d5e6"/>
    </style:style>
    <style:style style:name="P90" style:family="paragraph">
      <loext:graphic-properties draw:fill="solid" draw:fill-color="#d2d6e6"/>
    </style:style>
    <style:style style:name="P91" style:family="paragraph">
      <loext:graphic-properties draw:fill="solid" draw:fill-color="#d2d6e7"/>
    </style:style>
    <style:style style:name="P92" style:family="paragraph">
      <loext:graphic-properties draw:fill="solid" draw:fill-color="#d3d7e7"/>
    </style:style>
    <style:style style:name="P93" style:family="paragraph">
      <loext:graphic-properties draw:fill="solid" draw:fill-color="#d4d8e8"/>
    </style:style>
    <style:style style:name="P94" style:family="paragraph">
      <loext:graphic-properties draw:fill="solid" draw:fill-color="#d5d9e8"/>
    </style:style>
    <style:style style:name="P95" style:family="paragraph">
      <loext:graphic-properties draw:fill="solid" draw:fill-color="#d6dae9"/>
    </style:style>
    <style:style style:name="P96" style:family="paragraph">
      <loext:graphic-properties draw:fill="solid" draw:fill-color="#d7dbe9"/>
    </style:style>
    <style:style style:name="P97" style:family="paragraph">
      <loext:graphic-properties draw:fill="solid" draw:fill-color="#d8dbea"/>
    </style:style>
    <style:style style:name="P98" style:family="paragraph">
      <loext:graphic-properties draw:fill="solid" draw:fill-color="#e0e3ee"/>
    </style:style>
    <style:style style:name="P99" style:family="paragraph">
      <loext:graphic-properties draw:fill="none"/>
      <style:text-properties fo:font-size="7.90000009536743pt" style:font-size-asian="7.90000009536743pt" style:font-size-complex="7.90000009536743pt"/>
    </style:style>
    <style:style style:name="P100" style:family="paragraph">
      <loext:graphic-properties draw:fill="none"/>
      <style:text-properties fo:font-size="11.1000003814697pt" style:font-size-asian="11.1000003814697pt" style:font-size-complex="11.1000003814697pt"/>
    </style:style>
    <style:style style:name="P101" style:family="paragraph">
      <loext:graphic-properties draw:fill="solid" draw:fill-color="#174293"/>
    </style:style>
    <style:style style:name="P102" style:family="paragraph">
      <loext:graphic-properties draw:fill="solid" draw:fill-color="#000000"/>
    </style:style>
    <style:style style:name="P103" style:family="paragraph">
      <loext:graphic-properties draw:fill="solid" draw:fill-color="#92d050"/>
    </style:style>
    <style:style style:name="P104" style:family="paragraph">
      <loext:graphic-properties draw:fill="solid" draw:fill-color="#00b050"/>
    </style:style>
    <style:style style:name="P105" style:family="paragraph">
      <loext:graphic-properties draw:fill="none"/>
      <style:text-properties fo:font-size="12pt" style:font-size-asian="12pt" style:font-size-complex="12pt"/>
    </style:style>
    <style:style style:name="P106" style:family="paragraph">
      <loext:graphic-properties draw:fill="none"/>
      <style:text-properties fo:font-size="18pt" style:font-size-asian="18pt" style:font-size-complex="18pt"/>
    </style:style>
    <style:style style:name="P107" style:family="paragraph">
      <loext:graphic-properties draw:fill="solid" draw:fill-color="#9fa8cf"/>
    </style:style>
    <style:style style:name="P108" style:family="paragraph">
      <loext:graphic-properties draw:fill="solid" draw:fill-color="#a0a9d0"/>
    </style:style>
    <style:style style:name="P109" style:family="paragraph">
      <loext:graphic-properties draw:fill="solid" draw:fill-color="#a1a9d0"/>
    </style:style>
    <style:style style:name="P110" style:family="paragraph">
      <loext:graphic-properties draw:fill="solid" draw:fill-color="#a2abd0"/>
    </style:style>
    <style:style style:name="P111" style:family="paragraph">
      <loext:graphic-properties draw:fill="solid" draw:fill-color="#a5aed2"/>
    </style:style>
    <style:style style:name="P112" style:family="paragraph">
      <loext:graphic-properties draw:fill="solid" draw:fill-color="#acb3d4"/>
    </style:style>
    <style:style style:name="P113" style:family="paragraph">
      <loext:graphic-properties draw:fill="solid" draw:fill-color="#aeb5d6"/>
    </style:style>
    <style:style style:name="P114" style:family="paragraph">
      <loext:graphic-properties draw:fill="solid" draw:fill-color="#b0b6d6"/>
    </style:style>
    <style:style style:name="P115" style:family="paragraph">
      <loext:graphic-properties draw:fill="solid" draw:fill-color="#b2b8d7"/>
    </style:style>
    <style:style style:name="P116" style:family="paragraph">
      <loext:graphic-properties draw:fill="solid" draw:fill-color="#b3b9d8"/>
    </style:style>
    <style:style style:name="P117" style:family="paragraph">
      <loext:graphic-properties draw:fill="solid" draw:fill-color="#b4bbd8"/>
    </style:style>
    <style:style style:name="P118" style:family="paragraph">
      <loext:graphic-properties draw:fill="solid" draw:fill-color="#b8bed9"/>
    </style:style>
    <style:style style:name="P119" style:family="paragraph">
      <loext:graphic-properties draw:fill="solid" draw:fill-color="#babfda"/>
    </style:style>
    <style:style style:name="P120" style:family="paragraph">
      <loext:graphic-properties draw:fill="solid" draw:fill-color="#bac0db"/>
    </style:style>
    <style:style style:name="P121" style:family="paragraph">
      <loext:graphic-properties draw:fill="solid" draw:fill-color="#bcc2db"/>
    </style:style>
    <style:style style:name="P122" style:family="paragraph">
      <loext:graphic-properties draw:fill="solid" draw:fill-color="#bec4dc"/>
    </style:style>
    <style:style style:name="P123" style:family="paragraph">
      <loext:graphic-properties draw:fill="solid" draw:fill-color="#c1c5dd"/>
    </style:style>
    <style:style style:name="P124" style:family="paragraph">
      <loext:graphic-properties draw:fill="solid" draw:fill-color="#c3c8de"/>
    </style:style>
    <style:style style:name="P125" style:family="paragraph">
      <loext:graphic-properties draw:fill="solid" draw:fill-color="#c5c9e0"/>
    </style:style>
    <style:style style:name="P126" style:family="paragraph">
      <loext:graphic-properties draw:fill="solid" draw:fill-color="#c6cae0"/>
    </style:style>
    <style:style style:name="P127" style:family="paragraph">
      <loext:graphic-properties draw:fill="solid" draw:fill-color="#c8cce1"/>
    </style:style>
    <style:style style:name="P128" style:family="paragraph">
      <loext:graphic-properties draw:fill="none"/>
      <style:text-properties fo:font-size="10.5pt" style:font-size-asian="10.5pt" style:font-size-complex="10.5pt"/>
    </style:style>
    <style:style style:name="P129" style:family="paragraph">
      <loext:graphic-properties draw:fill="solid" draw:fill-color="#8daeea"/>
    </style:style>
    <style:style style:name="P130" style:family="paragraph">
      <loext:graphic-properties draw:fill="solid" draw:fill-color="#d9d9d9"/>
    </style:style>
    <style:style style:name="P131" style:family="paragraph">
      <loext:graphic-properties draw:fill="solid" draw:fill-color="#048ae3"/>
    </style:style>
    <style:style style:name="P132" style:family="paragraph">
      <loext:graphic-properties draw:fill="solid" draw:fill-color="#266de7"/>
    </style:style>
    <style:style style:name="P133" style:family="paragraph">
      <loext:graphic-properties draw:fill="solid" draw:fill-color="#a7b3e8"/>
    </style:style>
    <style:style style:name="P134" style:family="paragraph">
      <loext:graphic-properties draw:fill="solid" draw:fill-color="#a8b4e8"/>
    </style:style>
    <style:style style:name="P135" style:family="paragraph">
      <loext:graphic-properties draw:fill="solid" draw:fill-color="#a9b4e8"/>
    </style:style>
    <style:style style:name="P136" style:family="paragraph">
      <loext:graphic-properties draw:fill="solid" draw:fill-color="#a9b5e8"/>
    </style:style>
    <style:style style:name="P137" style:family="paragraph">
      <loext:graphic-properties draw:fill="solid" draw:fill-color="#aab5e9"/>
    </style:style>
    <style:style style:name="P138" style:family="paragraph">
      <loext:graphic-properties draw:fill="solid" draw:fill-color="#aab6e9"/>
    </style:style>
    <style:style style:name="P139" style:family="paragraph">
      <loext:graphic-properties draw:fill="solid" draw:fill-color="#abb6e9"/>
    </style:style>
    <style:style style:name="P140" style:family="paragraph">
      <loext:graphic-properties draw:fill="solid" draw:fill-color="#acb7e9"/>
    </style:style>
    <style:style style:name="P141" style:family="paragraph">
      <loext:graphic-properties draw:fill="solid" draw:fill-color="#adb8e9"/>
    </style:style>
    <style:style style:name="P142" style:family="paragraph">
      <loext:graphic-properties draw:fill="solid" draw:fill-color="#aeb9ea"/>
    </style:style>
    <style:style style:name="P143" style:family="paragraph">
      <loext:graphic-properties draw:fill="solid" draw:fill-color="#afb9ea"/>
    </style:style>
    <style:style style:name="P144" style:family="paragraph">
      <loext:graphic-properties draw:fill="solid" draw:fill-color="#afbaea"/>
    </style:style>
    <style:style style:name="P145" style:family="paragraph">
      <loext:graphic-properties draw:fill="solid" draw:fill-color="#b0baea"/>
    </style:style>
    <style:style style:name="P146" style:family="paragraph">
      <loext:graphic-properties draw:fill="solid" draw:fill-color="#b0bbea"/>
    </style:style>
    <style:style style:name="P147" style:family="paragraph">
      <loext:graphic-properties draw:fill="solid" draw:fill-color="#b1bbea"/>
    </style:style>
    <style:style style:name="P148" style:family="paragraph">
      <loext:graphic-properties draw:fill="solid" draw:fill-color="#b2bcea"/>
    </style:style>
    <style:style style:name="P149" style:family="paragraph">
      <loext:graphic-properties draw:fill="solid" draw:fill-color="#b3bdeb"/>
    </style:style>
    <style:style style:name="P150" style:family="paragraph">
      <loext:graphic-properties draw:fill="solid" draw:fill-color="#b3beeb"/>
    </style:style>
    <style:style style:name="P151" style:family="paragraph">
      <loext:graphic-properties draw:fill="solid" draw:fill-color="#b4beeb"/>
    </style:style>
    <style:style style:name="P152" style:family="paragraph">
      <loext:graphic-properties draw:fill="solid" draw:fill-color="#b5bfeb"/>
    </style:style>
    <style:style style:name="P153" style:family="paragraph">
      <loext:graphic-properties draw:fill="solid" draw:fill-color="#b6c0eb"/>
    </style:style>
    <style:style style:name="P154" style:family="paragraph">
      <loext:graphic-properties draw:fill="solid" draw:fill-color="#b7c1ec"/>
    </style:style>
    <style:style style:name="P155" style:family="paragraph">
      <loext:graphic-properties draw:fill="solid" draw:fill-color="#b8c1ec"/>
    </style:style>
    <style:style style:name="P156" style:family="paragraph">
      <loext:graphic-properties draw:fill="solid" draw:fill-color="#b8c2ec"/>
    </style:style>
    <style:style style:name="P157" style:family="paragraph">
      <loext:graphic-properties draw:fill="solid" draw:fill-color="#b9c2ec"/>
    </style:style>
    <style:style style:name="P158" style:family="paragraph">
      <loext:graphic-properties draw:fill="solid" draw:fill-color="#b9c3ec"/>
    </style:style>
    <style:style style:name="P159" style:family="paragraph">
      <loext:graphic-properties draw:fill="solid" draw:fill-color="#bac3ec"/>
    </style:style>
    <style:style style:name="P160" style:family="paragraph">
      <loext:graphic-properties draw:fill="solid" draw:fill-color="#bbc4ec"/>
    </style:style>
    <style:style style:name="P161" style:family="paragraph">
      <loext:graphic-properties draw:fill="solid" draw:fill-color="#bcc5ed"/>
    </style:style>
    <style:style style:name="P162" style:family="paragraph">
      <loext:graphic-properties draw:fill="solid" draw:fill-color="#bdc6ed"/>
    </style:style>
    <style:style style:name="P163" style:family="paragraph">
      <loext:graphic-properties draw:fill="solid" draw:fill-color="#bec6ed"/>
    </style:style>
    <style:style style:name="P164" style:family="paragraph">
      <loext:graphic-properties draw:fill="solid" draw:fill-color="#bec7ed"/>
    </style:style>
    <style:style style:name="P165" style:family="paragraph">
      <loext:graphic-properties draw:fill="solid" draw:fill-color="#bfc7ed"/>
    </style:style>
    <style:style style:name="P166" style:family="paragraph">
      <loext:graphic-properties draw:fill="solid" draw:fill-color="#bfc8ed"/>
    </style:style>
    <style:style style:name="P167" style:family="paragraph">
      <loext:graphic-properties draw:fill="solid" draw:fill-color="#c0c8ee"/>
    </style:style>
    <style:style style:name="P168" style:family="paragraph">
      <loext:graphic-properties draw:fill="solid" draw:fill-color="#c1c9ee"/>
    </style:style>
    <style:style style:name="P169" style:family="paragraph">
      <loext:graphic-properties draw:fill="solid" draw:fill-color="#c2caee"/>
    </style:style>
    <style:style style:name="P170" style:family="paragraph">
      <loext:graphic-properties draw:fill="solid" draw:fill-color="#c3cbee"/>
    </style:style>
    <style:style style:name="P171" style:family="paragraph">
      <loext:graphic-properties draw:fill="solid" draw:fill-color="#c4ccef"/>
    </style:style>
    <style:style style:name="P172" style:family="paragraph">
      <loext:graphic-properties draw:fill="solid" draw:fill-color="#c5ccef"/>
    </style:style>
    <style:style style:name="P173" style:family="paragraph">
      <loext:graphic-properties draw:fill="solid" draw:fill-color="#c6cdef"/>
    </style:style>
    <style:style style:name="P174" style:family="paragraph">
      <loext:graphic-properties draw:fill="solid" draw:fill-color="#c7ceef"/>
    </style:style>
    <style:style style:name="P175" style:family="paragraph">
      <loext:graphic-properties draw:fill="solid" draw:fill-color="#c7cff0"/>
    </style:style>
    <style:style style:name="P176" style:family="paragraph">
      <loext:graphic-properties draw:fill="solid" draw:fill-color="#c8cff0"/>
    </style:style>
    <style:style style:name="P177" style:family="paragraph">
      <loext:graphic-properties draw:fill="solid" draw:fill-color="#c9d0f0"/>
    </style:style>
    <style:style style:name="P178" style:family="paragraph">
      <loext:graphic-properties draw:fill="solid" draw:fill-color="#cad1f0"/>
    </style:style>
    <style:style style:name="P179" style:family="paragraph">
      <loext:graphic-properties draw:fill="solid" draw:fill-color="#cbd2f1"/>
    </style:style>
    <style:style style:name="P180" style:family="paragraph">
      <loext:graphic-properties draw:fill="solid" draw:fill-color="#ccd3f1"/>
    </style:style>
    <style:style style:name="P181" style:family="paragraph">
      <loext:graphic-properties draw:fill="solid" draw:fill-color="#cdd3f1"/>
    </style:style>
    <style:style style:name="P182" style:family="paragraph">
      <loext:graphic-properties draw:fill="solid" draw:fill-color="#ced4f1"/>
    </style:style>
    <style:style style:name="P183" style:family="paragraph">
      <loext:graphic-properties draw:fill="solid" draw:fill-color="#cfd5f2"/>
    </style:style>
    <style:style style:name="P184" style:family="paragraph">
      <loext:graphic-properties draw:fill="solid" draw:fill-color="#cfd6f2"/>
    </style:style>
    <style:style style:name="P185" style:family="paragraph">
      <loext:graphic-properties draw:fill="solid" draw:fill-color="#d0d6f2"/>
    </style:style>
    <style:style style:name="P186" style:family="paragraph">
      <loext:graphic-properties draw:fill="solid" draw:fill-color="#d1d7f3"/>
    </style:style>
    <style:style style:name="P187" style:family="paragraph">
      <loext:graphic-properties draw:fill="solid" draw:fill-color="#d2d8f3"/>
    </style:style>
    <style:style style:name="P188" style:family="paragraph">
      <loext:graphic-properties draw:fill="solid" draw:fill-color="#d3d9f3"/>
    </style:style>
    <style:style style:name="P189" style:family="paragraph">
      <loext:graphic-properties draw:fill="solid" draw:fill-color="#d4d9f3"/>
    </style:style>
    <style:style style:name="P190" style:family="paragraph">
      <loext:graphic-properties draw:fill="solid" draw:fill-color="#d5daf4"/>
    </style:style>
    <style:style style:name="P191" style:family="paragraph">
      <loext:graphic-properties draw:fill="solid" draw:fill-color="#d6dbf4"/>
    </style:style>
    <style:style style:name="P192" style:family="paragraph">
      <loext:graphic-properties draw:fill="solid" draw:fill-color="#d7dcf4"/>
    </style:style>
    <style:style style:name="P193" style:family="paragraph">
      <loext:graphic-properties draw:fill="solid" draw:fill-color="#d7ddf4"/>
    </style:style>
    <style:style style:name="P194" style:family="paragraph">
      <loext:graphic-properties draw:fill="solid" draw:fill-color="#d8ddf5"/>
    </style:style>
    <style:style style:name="P195" style:family="paragraph">
      <loext:graphic-properties draw:fill="solid" draw:fill-color="#d9def5"/>
    </style:style>
    <style:style style:name="P196" style:family="paragraph">
      <loext:graphic-properties draw:fill="solid" draw:fill-color="#dadff5"/>
    </style:style>
    <style:style style:name="P197" style:family="paragraph">
      <loext:graphic-properties draw:fill="solid" draw:fill-color="#dbe0f5"/>
    </style:style>
    <style:style style:name="P198" style:family="paragraph">
      <loext:graphic-properties draw:fill="solid" draw:fill-color="#dce0f6"/>
    </style:style>
    <style:style style:name="P199" style:family="paragraph">
      <loext:graphic-properties draw:fill="solid" draw:fill-color="#dde1f6"/>
    </style:style>
    <style:style style:name="P200" style:family="paragraph">
      <loext:graphic-properties draw:fill="solid" draw:fill-color="#dee2f6"/>
    </style:style>
    <style:style style:name="P201" style:family="paragraph">
      <loext:graphic-properties draw:fill="solid" draw:fill-color="#dfe3f6"/>
    </style:style>
    <style:style style:name="P202" style:family="paragraph">
      <loext:graphic-properties draw:fill="solid" draw:fill-color="#dfe3f7"/>
    </style:style>
    <style:style style:name="P203" style:family="paragraph">
      <loext:graphic-properties draw:fill="solid" draw:fill-color="#e0e4f7"/>
    </style:style>
    <style:style style:name="P204" style:family="paragraph">
      <loext:graphic-properties draw:fill="solid" draw:fill-color="#e1e5f7"/>
    </style:style>
    <style:style style:name="P205" style:family="paragraph">
      <loext:graphic-properties draw:fill="solid" draw:fill-color="#e2e6f8"/>
    </style:style>
    <style:style style:name="P206" style:family="paragraph">
      <loext:graphic-properties draw:fill="solid" draw:fill-color="#e3e7f8"/>
    </style:style>
    <style:style style:name="P207" style:family="paragraph">
      <loext:graphic-properties draw:fill="solid" draw:fill-color="#e4e7f8"/>
    </style:style>
    <style:style style:name="P208" style:family="paragraph">
      <loext:graphic-properties draw:fill="solid" draw:fill-color="#e5e8f8"/>
    </style:style>
    <style:style style:name="P209" style:family="paragraph">
      <loext:graphic-properties draw:fill="solid" draw:fill-color="#e6e9f9"/>
    </style:style>
    <style:style style:name="P210" style:family="paragraph">
      <loext:graphic-properties draw:fill="solid" draw:fill-color="#e7eaf9"/>
    </style:style>
    <style:style style:name="P211" style:family="paragraph">
      <loext:graphic-properties draw:fill="solid" draw:fill-color="#bfbfbf"/>
    </style:style>
    <style:style style:name="P212" style:family="paragraph">
      <loext:graphic-properties draw:fill="solid" draw:fill-color="#1b4593" draw:opacity="15%"/>
    </style:style>
    <style:style style:name="P213" style:family="paragraph">
      <loext:graphic-properties draw:fill="solid" draw:fill-color="#ff0000" draw:opacity="70%"/>
    </style:style>
    <style:style style:name="P214" style:family="paragraph">
      <loext:graphic-properties draw:fill="solid" draw:fill-color="#5585e0"/>
    </style:style>
    <style:style style:name="P215" style:family="paragraph">
      <loext:graphic-properties draw:fill="none"/>
      <style:text-properties fo:font-size="10.6000003814697pt" style:font-size-asian="10.6000003814697pt" style:font-size-complex="10.6000003814697pt"/>
    </style:style>
    <style:style style:name="P216" style:family="paragraph">
      <loext:graphic-properties draw:fill="none"/>
      <style:text-properties fo:font-size="9.19999980926514pt" style:font-size-asian="9.19999980926514pt" style:font-size-complex="9.19999980926514pt"/>
    </style:style>
    <style:style style:name="P217" style:family="paragraph">
      <loext:graphic-properties draw:fill="none"/>
      <style:text-properties fo:font-size="9.10000038146973pt" style:font-size-asian="9.10000038146973pt" style:font-size-complex="9.10000038146973pt"/>
    </style:style>
    <style:style style:name="P218" style:family="paragraph">
      <loext:graphic-properties draw:fill="solid" draw:fill-color="#9966ff"/>
    </style:style>
    <style:style style:name="P219" style:family="paragraph">
      <loext:graphic-properties draw:fill="solid" draw:fill-color="#ff6600"/>
    </style:style>
    <style:style style:name="P220" style:family="paragraph">
      <loext:graphic-properties draw:fill="solid" draw:fill-color="#ff0000"/>
    </style:style>
    <style:style style:name="P221" style:family="paragraph">
      <loext:graphic-properties draw:fill="solid" draw:fill-color="#cccfdc"/>
    </style:style>
    <style:style style:name="P222" style:family="paragraph">
      <loext:graphic-properties draw:fill="solid" draw:fill-color="#e7e9ee"/>
    </style:style>
    <style:style style:name="P223" style:family="paragraph">
      <loext:graphic-properties draw:fill="solid" draw:fill-color="#d9e7cf"/>
    </style:style>
    <style:style style:name="P224" style:family="paragraph">
      <loext:graphic-properties draw:fill="none"/>
      <style:text-properties fo:font-size="15.1000003814697pt" style:font-size-asian="15.1000003814697pt" style:font-size-complex="15.1000003814697pt"/>
    </style:style>
    <style:style style:name="P225" style:family="paragraph">
      <loext:graphic-properties draw:fill="none"/>
      <style:text-properties fo:font-size="13pt" style:font-size-asian="13pt" style:font-size-complex="13pt"/>
    </style:style>
    <style:style style:name="P226" style:family="paragraph">
      <loext:graphic-properties draw:fill="none"/>
      <style:text-properties fo:font-size="54pt" style:font-size-asian="54pt" style:font-size-complex="54pt"/>
    </style:style>
    <style:style style:name="T1" style:family="text">
      <style:text-properties fo:color="#7ca6f0" loext:opacity="100%" style:font-name="微软雅黑" fo:font-size="13.8999996185303pt" fo:font-weight="normal" style:font-name-asian="微软雅黑" style:font-size-asian="13.8999996185303pt" style:font-weight-asian="normal" style:font-name-complex="微软雅黑" style:font-size-complex="13.8999996185303pt" style:font-weight-complex="normal"/>
    </style:style>
    <style:style style:name="T2" style:family="text">
      <style:text-properties fo:color="#ffffff" loext:opacity="100%" style:font-name="Microsoft YaHei" fo:font-size="49pt" fo:font-weight="bold" style:font-name-asian="Microsoft YaHei" style:font-size-asian="49pt" style:font-weight-asian="bold" style:font-name-complex="Microsoft YaHei" style:font-size-complex="49pt" style:font-weight-complex="bold"/>
    </style:style>
    <style:style style:name="T3" style:family="text">
      <style:text-properties fo:color="#ffffff" loext:opacity="100%" style:font-name="Arial" fo:font-size="13.8999996185303pt" fo:font-weight="normal" style:font-name-asian="Arial" style:font-size-asian="13.8999996185303pt" style:font-weight-asian="normal" style:font-name-complex="Arial" style:font-size-complex="13.8999996185303pt" style:font-weight-complex="normal"/>
    </style:style>
    <style:style style:name="T4" style:family="text">
      <style:text-properties fo:color="#000000" loext:opacity="100%" style:font-name="Microsoft YaHei" fo:font-size="16.1000003814697pt" fo:font-weight="bold" style:font-name-asian="Microsoft YaHei" style:font-size-asian="16.1000003814697pt" style:font-weight-asian="bold" style:font-name-complex="Microsoft YaHei" style:font-size-complex="16.1000003814697pt" style:font-weight-complex="bold"/>
    </style:style>
    <style:style style:name="T5" style:family="text">
      <style:text-properties fo:color="#000000" loext:opacity="100%" style:font-name="Arial" fo:font-size="24pt" fo:font-weight="normal" style:font-name-asian="Arial" style:font-size-asian="24pt" style:font-weight-asian="normal" style:font-name-complex="Arial" style:font-size-complex="24pt" style:font-weight-complex="normal"/>
    </style:style>
    <style:style style:name="T6" style:family="text">
      <style:text-properties fo:color="#000000" loext:opacity="100%" style:font-name="Microsoft YaHei" fo:font-size="13.8999996185303pt" fo:font-weight="normal" style:font-name-asian="Microsoft YaHei" style:font-size-asian="13.8999996185303pt" style:font-weight-asian="normal" style:font-name-complex="Microsoft YaHei" style:font-size-complex="13.8999996185303pt" style:font-weight-complex="normal"/>
    </style:style>
    <style:style style:name="T7" style:family="text">
      <style:text-properties fo:color="#000000" loext:opacity="100%" style:font-name="Microsoft YaHei" fo:font-size="28.1000003814697pt" fo:font-weight="bold" style:font-name-asian="Microsoft YaHei" style:font-size-asian="28.1000003814697pt" style:font-weight-asian="bold" style:font-name-complex="Microsoft YaHei" style:font-size-complex="28.1000003814697pt" style:font-weight-complex="bold"/>
    </style:style>
    <style:style style:name="T8" style:family="text">
      <style:text-properties fo:color="#000000" loext:opacity="100%" style:font-name="Microsoft YaHei" fo:font-size="28.1000003814697pt" fo:font-weight="normal" style:font-name-asian="Microsoft YaHei" style:font-size-asian="28.1000003814697pt" style:font-weight-asian="normal" style:font-name-complex="Microsoft YaHei" style:font-size-complex="28.1000003814697pt" style:font-weight-complex="normal"/>
    </style:style>
    <style:style style:name="T9" style:family="text">
      <style:text-properties fo:color="#000000" loext:opacity="100%" style:font-name="Microsoft YaHei" fo:font-size="20pt" fo:font-weight="normal" style:font-name-asian="Microsoft YaHei" style:font-size-asian="20pt" style:font-weight-asian="normal" style:font-name-complex="Microsoft YaHei" style:font-size-complex="20pt" style:font-weight-complex="normal"/>
    </style:style>
    <style:style style:name="T10" style:family="text">
      <style:text-properties fo:color="#000000" loext:opacity="100%" style:font-name="Microsoft YaHei" fo:font-size="19.8999996185303pt" fo:font-weight="normal" style:font-name-asian="Microsoft YaHei" style:font-size-asian="19.8999996185303pt" style:font-weight-asian="normal" style:font-name-complex="Microsoft YaHei" style:font-size-complex="19.8999996185303pt" style:font-weight-complex="normal"/>
    </style:style>
    <style:style style:name="T11" style:family="text">
      <style:text-properties fo:color="#1b4593" loext:opacity="100%" style:font-name="Microsoft YaHei" fo:font-size="48pt" fo:font-weight="bold" style:font-name-asian="Microsoft YaHei" style:font-size-asian="48pt" style:font-weight-asian="bold" style:font-name-complex="Microsoft YaHei" style:font-size-complex="48pt" style:font-weight-complex="bold"/>
    </style:style>
    <style:style style:name="T12" style:family="text">
      <style:text-properties fo:color="#ffffff" loext:opacity="100%" style:font-name="Arial" fo:font-size="10.1000003814697pt" fo:font-weight="normal" style:font-name-asian="Arial" style:font-size-asian="10.1000003814697pt" style:font-weight-asian="normal" style:font-name-complex="Arial" style:font-size-complex="10.1000003814697pt" style:font-weight-complex="normal"/>
    </style:style>
    <style:style style:name="T13" style:family="text">
      <style:text-properties fo:color="#000000" loext:opacity="100%" style:font-name="Arial" fo:font-size="13.8999996185303pt" fo:font-weight="normal" style:font-name-asian="Arial" style:font-size-asian="13.8999996185303pt" style:font-weight-asian="normal" style:font-name-complex="Arial" style:font-size-complex="13.8999996185303pt" style:font-weight-complex="normal"/>
    </style:style>
    <style:style style:name="T14" style:family="text">
      <style:text-properties fo:color="#ffffff" loext:opacity="100%" style:font-name="Arial" fo:font-size="7.90000009536743pt" fo:font-weight="normal" style:font-name-asian="Arial" style:font-size-asian="7.90000009536743pt" style:font-weight-asian="normal" style:font-name-complex="Arial" style:font-size-complex="7.90000009536743pt" style:font-weight-complex="normal"/>
    </style:style>
    <style:style style:name="T15" style:family="text">
      <style:text-properties fo:color="#ffffff" loext:opacity="100%" style:font-name="Arial" fo:font-size="11.1000003814697pt" fo:font-weight="normal" style:font-name-asian="Arial" style:font-size-asian="11.1000003814697pt" style:font-weight-asian="normal" style:font-name-complex="Arial" style:font-size-complex="11.1000003814697pt" style:font-weight-complex="normal"/>
    </style:style>
    <style:style style:name="T16" style:family="text">
      <style:text-properties fo:color="#000000" loext:opacity="100%" style:font-name="Arial" fo:font-size="11.1000003814697pt" fo:font-weight="bold" style:font-name-asian="Arial" style:font-size-asian="11.1000003814697pt" style:font-weight-asian="bold" style:font-name-complex="Arial" style:font-size-complex="11.1000003814697pt" style:font-weight-complex="bold"/>
    </style:style>
    <style:style style:name="T17" style:family="text">
      <style:text-properties fo:color="#000000" loext:opacity="100%" style:font-name="Arial" fo:font-size="11.1000003814697pt" fo:font-weight="normal" style:font-name-asian="Arial" style:font-size-asian="11.1000003814697pt" style:font-weight-asian="normal" style:font-name-complex="Arial" style:font-size-complex="11.1000003814697pt" style:font-weight-complex="normal"/>
    </style:style>
    <style:style style:name="T18" style:family="text">
      <style:text-properties fo:color="#ffffff" loext:opacity="100%" style:font-name="Arial" fo:font-size="13.8999996185303pt" fo:font-weight="bold" style:font-name-asian="Arial" style:font-size-asian="13.8999996185303pt" style:font-weight-asian="bold" style:font-name-complex="Arial" style:font-size-complex="13.8999996185303pt" style:font-weight-complex="bold"/>
    </style:style>
    <style:style style:name="T19" style:family="text">
      <style:text-properties fo:color="#ffffff" loext:opacity="100%" style:font-name="Arial" fo:font-size="12pt" fo:font-weight="normal" style:font-name-asian="Arial" style:font-size-asian="12pt" style:font-weight-asian="normal" style:font-name-complex="Arial" style:font-size-complex="12pt" style:font-weight-complex="normal"/>
    </style:style>
    <style:style style:name="T20" style:family="text">
      <style:text-properties fo:color="#ffffff" loext:opacity="100%" style:font-name="Arial" fo:font-size="18pt" fo:font-weight="bold" style:font-name-asian="Arial" style:font-size-asian="18pt" style:font-weight-asian="bold" style:font-name-complex="Arial" style:font-size-complex="18pt" style:font-weight-complex="bold"/>
    </style:style>
    <style:style style:name="T21" style:family="text">
      <style:text-properties fo:color="#000000" loext:opacity="100%" style:font-name="Arial" fo:font-size="12pt" fo:font-weight="normal" style:font-name-asian="Arial" style:font-size-asian="12pt" style:font-weight-asian="normal" style:font-name-complex="Arial" style:font-size-complex="12pt" style:font-weight-complex="normal"/>
    </style:style>
    <style:style style:name="T22" style:family="text">
      <style:text-properties fo:color="#000000" loext:opacity="100%" style:font-name="Arial" fo:font-size="10.5pt" fo:font-weight="bold" style:font-name-asian="Arial" style:font-size-asian="10.5pt" style:font-weight-asian="bold" style:font-name-complex="Arial" style:font-size-complex="10.5pt" style:font-weight-complex="bold"/>
    </style:style>
    <style:style style:name="T23" style:family="text">
      <style:text-properties fo:color="#000000" loext:opacity="100%" style:font-name="Wingdings" fo:font-size="13.8999996185303pt" fo:font-weight="normal" style:font-name-asian="Wingdings" style:font-size-asian="13.8999996185303pt" style:font-weight-asian="normal" style:font-name-complex="Wingdings" style:font-size-complex="13.8999996185303pt" style:font-weight-complex="normal"/>
    </style:style>
    <style:style style:name="T24" style:family="text">
      <style:text-properties fo:color="#ffc000" loext:opacity="100%" style:font-name="Arial" fo:font-size="13.8999996185303pt" fo:font-weight="normal" style:font-name-asian="Arial" style:font-size-asian="13.8999996185303pt" style:font-weight-asian="normal" style:font-name-complex="Arial" style:font-size-complex="13.8999996185303pt" style:font-weight-complex="normal"/>
    </style:style>
    <style:style style:name="T25" style:family="text">
      <style:text-properties fo:color="#000000" loext:opacity="100%" style:font-name="Arial" fo:font-size="18pt" fo:font-weight="normal" style:font-name-asian="Arial" style:font-size-asian="18pt" style:font-weight-asian="normal" style:font-name-complex="Arial" style:font-size-complex="18pt" style:font-weight-complex="normal"/>
    </style:style>
    <style:style style:name="T26" style:family="text">
      <style:text-properties fo:color="#ffffff" loext:opacity="100%" style:font-name="Microsoft YaHei" fo:font-size="20pt" fo:font-weight="bold" style:font-name-asian="Microsoft YaHei" style:font-size-asian="20pt" style:font-weight-asian="bold" style:font-name-complex="Microsoft YaHei" style:font-size-complex="20pt" style:font-weight-complex="bold"/>
    </style:style>
    <style:style style:name="T27" style:family="text">
      <style:text-properties fo:color="#ffffff" loext:opacity="100%" style:font-name="Microsoft YaHei" fo:font-size="19.8999996185303pt" fo:font-weight="bold" style:font-name-asian="Microsoft YaHei" style:font-size-asian="19.8999996185303pt" style:font-weight-asian="bold" style:font-name-complex="Microsoft YaHei" style:font-size-complex="19.8999996185303pt" style:font-weight-complex="bold"/>
    </style:style>
    <style:style style:name="T28" style:family="text">
      <style:text-properties fo:color="#000000" loext:opacity="100%" style:font-name="Calibri" fo:font-size="28.1000003814697pt" fo:font-weight="bold" style:font-name-asian="Calibri" style:font-size-asian="28.1000003814697pt" style:font-weight-asian="bold" style:font-name-complex="Calibri" style:font-size-complex="28.1000003814697pt" style:font-weight-complex="bold"/>
    </style:style>
    <style:style style:name="T29" style:family="text">
      <style:text-properties fo:color="#ffffff" loext:opacity="100%" style:font-name="Arial" fo:font-size="10.5pt" fo:font-weight="normal" style:font-name-asian="Arial" style:font-size-asian="10.5pt" style:font-weight-asian="normal" style:font-name-complex="Arial" style:font-size-complex="10.5pt" style:font-weight-complex="normal"/>
    </style:style>
    <style:style style:name="T30" style:family="text">
      <style:text-properties fo:color="#ffffff" loext:opacity="100%" style:font-name="Arial" fo:font-size="10.6000003814697pt" fo:font-weight="normal" style:font-name-asian="Arial" style:font-size-asian="10.6000003814697pt" style:font-weight-asian="normal" style:font-name-complex="Arial" style:font-size-complex="10.6000003814697pt" style:font-weight-complex="normal"/>
    </style:style>
    <style:style style:name="T31" style:family="text">
      <style:text-properties fo:color="#004280" loext:opacity="100%" style:font-name="Microsoft YaHei" fo:font-size="28.1000003814697pt" fo:font-weight="bold" style:font-name-asian="Microsoft YaHei" style:font-size-asian="28.1000003814697pt" style:font-weight-asian="bold" style:font-name-complex="Microsoft YaHei" style:font-size-complex="28.1000003814697pt" style:font-weight-complex="bold"/>
    </style:style>
    <style:style style:name="T32" style:family="text">
      <style:text-properties fo:color="#5585e0" loext:opacity="100%" style:font-name="Arial" fo:font-size="12pt" fo:font-weight="bold" style:font-name-asian="Arial" style:font-size-asian="12pt" style:font-weight-asian="bold" style:font-name-complex="Arial" style:font-size-complex="12pt" style:font-weight-complex="bold"/>
    </style:style>
    <style:style style:name="T33" style:family="text">
      <style:text-properties fo:color="#1b4593" loext:opacity="100%" style:font-name="Arial" fo:font-size="7.90000009536743pt" fo:font-weight="normal" style:font-name-asian="Arial" style:font-size-asian="7.90000009536743pt" style:font-weight-asian="normal" style:font-name-complex="Arial" style:font-size-complex="7.90000009536743pt" style:font-weight-complex="normal"/>
    </style:style>
    <style:style style:name="T34" style:family="text">
      <style:text-properties fo:color="#266de7" loext:opacity="100%" style:font-name="Arial" fo:font-size="7.90000009536743pt" fo:font-weight="normal" style:font-name-asian="Arial" style:font-size-asian="7.90000009536743pt" style:font-weight-asian="normal" style:font-name-complex="Arial" style:font-size-complex="7.90000009536743pt" style:font-weight-complex="normal"/>
    </style:style>
    <style:style style:name="T35" style:family="text">
      <style:text-properties fo:color="#009eab" loext:opacity="100%" style:font-name="Arial" fo:font-size="7.90000009536743pt" fo:font-weight="normal" style:font-name-asian="Arial" style:font-size-asian="7.90000009536743pt" style:font-weight-asian="normal" style:font-name-complex="Arial" style:font-size-complex="7.90000009536743pt" style:font-weight-complex="normal"/>
    </style:style>
    <style:style style:name="T36" style:family="text">
      <style:text-properties fo:color="#b4b4b4" loext:opacity="100%" style:font-name="Arial" fo:font-size="7.90000009536743pt" fo:font-weight="normal" style:font-name-asian="Arial" style:font-size-asian="7.90000009536743pt" style:font-weight-asian="normal" style:font-name-complex="Arial" style:font-size-complex="7.90000009536743pt" style:font-weight-complex="normal"/>
    </style:style>
    <style:style style:name="T37" style:family="text">
      <style:text-properties fo:color="#009eab" loext:opacity="100%" style:font-name="Arial" fo:font-size="12pt" fo:font-weight="bold" style:font-name-asian="Arial" style:font-size-asian="12pt" style:font-weight-asian="bold" style:font-name-complex="Arial" style:font-size-complex="12pt" style:font-weight-complex="bold"/>
    </style:style>
    <style:style style:name="T38" style:family="text">
      <style:text-properties fo:color="#b4b4b4" loext:opacity="100%" style:font-name="Arial" fo:font-size="10.1000003814697pt" fo:font-weight="normal" style:font-name-asian="Arial" style:font-size-asian="10.1000003814697pt" style:font-weight-asian="normal" style:font-name-complex="Arial" style:font-size-complex="10.1000003814697pt" style:font-weight-complex="normal"/>
    </style:style>
    <style:style style:name="T39" style:family="text">
      <style:text-properties fo:color="#595959" loext:opacity="100%" style:font-name="Arial" fo:font-size="10.1000003814697pt" fo:font-weight="bold" style:font-name-asian="Arial" style:font-size-asian="10.1000003814697pt" style:font-weight-asian="bold" style:font-name-complex="Arial" style:font-size-complex="10.1000003814697pt" style:font-weight-complex="bold"/>
    </style:style>
    <style:style style:name="T40" style:family="text">
      <style:text-properties fo:color="#595959" loext:opacity="100%" style:font-name="Arial" fo:font-size="9.19999980926514pt" fo:font-weight="normal" style:font-name-asian="Arial" style:font-size-asian="9.19999980926514pt" style:font-weight-asian="normal" style:font-name-complex="Arial" style:font-size-complex="9.19999980926514pt" style:font-weight-complex="normal"/>
    </style:style>
    <style:style style:name="T41" style:family="text">
      <style:text-properties fo:color="#595959" loext:opacity="100%" style:font-name="Arial" fo:font-size="9.10000038146973pt" fo:font-weight="normal" style:font-name-asian="Arial" style:font-size-asian="9.10000038146973pt" style:font-weight-asian="normal" style:font-name-complex="Arial" style:font-size-complex="9.10000038146973pt" style:font-weight-complex="normal"/>
    </style:style>
    <style:style style:name="T42" style:family="text">
      <style:text-properties fo:color="#004280" loext:opacity="100%" style:font-name="Arial" fo:font-size="9.19999980926514pt" fo:font-weight="normal" style:font-name-asian="Arial" style:font-size-asian="9.19999980926514pt" style:font-weight-asian="normal" style:font-name-complex="Arial" style:font-size-complex="9.19999980926514pt" style:font-weight-complex="normal"/>
    </style:style>
    <style:style style:name="T43" style:family="text">
      <style:text-properties fo:color="#004280" loext:opacity="100%" style:font-name="Arial" fo:font-size="9.10000038146973pt" fo:font-weight="normal" style:font-name-asian="Arial" style:font-size-asian="9.10000038146973pt" style:font-weight-asian="normal" style:font-name-complex="Arial" style:font-size-complex="9.10000038146973pt" style:font-weight-complex="normal"/>
    </style:style>
    <style:style style:name="T44" style:family="text">
      <style:text-properties fo:color="#266de7" loext:opacity="100%" style:font-name="Arial" fo:font-size="12pt" fo:font-weight="bold" style:font-name-asian="Arial" style:font-size-asian="12pt" style:font-weight-asian="bold" style:font-name-complex="Arial" style:font-size-complex="12pt" style:font-weight-complex="bold"/>
    </style:style>
    <style:style style:name="T45" style:family="text">
      <style:text-properties fo:color="#004280" loext:opacity="100%" style:font-name="Arial" fo:font-size="24pt" fo:font-weight="bold" style:font-name-asian="Arial" style:font-size-asian="24pt" style:font-weight-asian="bold" style:font-name-complex="Arial" style:font-size-complex="24pt" style:font-weight-complex="bold"/>
    </style:style>
    <style:style style:name="T46" style:family="text">
      <style:text-properties fo:color="#626262" loext:opacity="100%" style:font-name="Arial" fo:font-size="7.90000009536743pt" fo:font-weight="bold" style:font-name-asian="Arial" style:font-size-asian="7.90000009536743pt" style:font-weight-asian="bold" style:font-name-complex="Arial" style:font-size-complex="7.90000009536743pt" style:font-weight-complex="bold"/>
    </style:style>
    <style:style style:name="T47" style:family="text">
      <style:text-properties fo:color="#ff0000" loext:opacity="100%" style:font-name="Arial" fo:font-size="7.90000009536743pt" fo:font-weight="bold" style:font-name-asian="Arial" style:font-size-asian="7.90000009536743pt" style:font-weight-asian="bold" style:font-name-complex="Arial" style:font-size-complex="7.90000009536743pt" style:font-weight-complex="bold"/>
    </style:style>
    <style:style style:name="T48" style:family="text">
      <style:text-properties fo:color="#000000" loext:opacity="100%" style:font-name="Arial" fo:font-size="10.1000003814697pt" fo:font-weight="normal" style:font-name-asian="Arial" style:font-size-asian="10.1000003814697pt" style:font-weight-asian="normal" style:font-name-complex="Arial" style:font-size-complex="10.1000003814697pt" style:font-weight-complex="normal"/>
    </style:style>
    <style:style style:name="T49" style:family="text">
      <style:text-properties fo:color="#ff0000" loext:opacity="100%" style:font-name="Arial" fo:font-size="10.1000003814697pt" fo:font-weight="bold" style:font-name-asian="Arial" style:font-size-asian="10.1000003814697pt" style:font-weight-asian="bold" style:font-name-complex="Arial" style:font-size-complex="10.1000003814697pt" style:font-weight-complex="bold"/>
    </style:style>
    <style:style style:name="T50" style:family="text">
      <style:text-properties fo:color="#ffffff" loext:opacity="100%" style:font-name="Arial" fo:font-size="11.1000003814697pt" fo:font-weight="bold" style:font-name-asian="Arial" style:font-size-asian="11.1000003814697pt" style:font-weight-asian="bold" style:font-name-complex="Arial" style:font-size-complex="11.1000003814697pt" style:font-weight-complex="bold"/>
    </style:style>
    <style:style style:name="T51" style:family="text">
      <style:text-properties fo:color="#000000" loext:opacity="100%" style:font-name="Arial" fo:font-size="9.10000038146973pt" fo:font-weight="bold" style:font-name-asian="Arial" style:font-size-asian="9.10000038146973pt" style:font-weight-asian="bold" style:font-name-complex="Arial" style:font-size-complex="9.10000038146973pt" style:font-weight-complex="bold"/>
    </style:style>
    <style:style style:name="T52" style:family="text">
      <style:text-properties fo:color="#000000" loext:opacity="100%" style:font-name="Arial" fo:font-size="9.10000038146973pt" fo:font-weight="normal" style:font-name-asian="Arial" style:font-size-asian="9.10000038146973pt" style:font-weight-asian="normal" style:font-name-complex="Arial" style:font-size-complex="9.10000038146973pt" style:font-weight-complex="normal"/>
    </style:style>
    <style:style style:name="T53" style:family="text">
      <style:text-properties fo:color="#000000" loext:opacity="100%" style:font-name="Arial" fo:font-size="9.19999980926514pt" fo:font-weight="normal" style:font-name-asian="Arial" style:font-size-asian="9.19999980926514pt" style:font-weight-asian="normal" style:font-name-complex="Arial" style:font-size-complex="9.19999980926514pt" style:font-weight-complex="normal"/>
    </style:style>
    <style:style style:name="T54" style:family="text">
      <style:text-properties fo:color="#000000" loext:opacity="100%" style:font-name="Arial" fo:font-size="9.19999980926514pt" fo:font-weight="bold" style:font-name-asian="Arial" style:font-size-asian="9.19999980926514pt" style:font-weight-asian="bold" style:font-name-complex="Arial" style:font-size-complex="9.19999980926514pt" style:font-weight-complex="bold"/>
    </style:style>
    <style:style style:name="T55" style:family="text">
      <style:text-properties fo:color="#ffffff" loext:opacity="100%" style:font-name="Arial" fo:font-size="10.1000003814697pt" fo:font-weight="bold" style:font-name-asian="Arial" style:font-size-asian="10.1000003814697pt" style:font-weight-asian="bold" style:font-name-complex="Arial" style:font-size-complex="10.1000003814697pt" style:font-weight-complex="bold"/>
    </style:style>
    <style:style style:name="T56" style:family="text">
      <style:text-properties fo:color="#000000" loext:opacity="100%" style:font-name="Arial" fo:font-size="7.90000009536743pt" fo:font-weight="normal" style:font-name-asian="Arial" style:font-size-asian="7.90000009536743pt" style:font-weight-asian="normal" style:font-name-complex="Arial" style:font-size-complex="7.90000009536743pt" style:font-weight-complex="normal"/>
    </style:style>
    <style:style style:name="T57" style:family="text">
      <style:text-properties fo:color="#000000" loext:opacity="100%" style:font-name="微软雅黑" fo:font-size="28.1000003814697pt" fo:font-weight="bold" style:font-name-asian="微软雅黑" style:font-size-asian="28.1000003814697pt" style:font-weight-asian="bold" style:font-name-complex="微软雅黑" style:font-size-complex="28.1000003814697pt" style:font-weight-complex="bold"/>
    </style:style>
    <style:style style:name="T58" style:family="text">
      <style:text-properties fo:color="#000000" loext:opacity="100%" style:font-name="Arial" fo:font-size="15.1000003814697pt" fo:font-weight="normal" style:font-name-asian="Arial" style:font-size-asian="15.1000003814697pt" style:font-weight-asian="normal" style:font-name-complex="Arial" style:font-size-complex="15.1000003814697pt" style:font-weight-complex="normal"/>
    </style:style>
    <style:style style:name="T59" style:family="text">
      <style:text-properties fo:color="#000000" loext:opacity="100%" style:font-name="Arial" fo:font-size="28.1000003814697pt" fo:font-weight="normal" style:font-name-asian="Arial" style:font-size-asian="28.1000003814697pt" style:font-weight-asian="normal" style:font-name-complex="Arial" style:font-size-complex="28.1000003814697pt" style:font-weight-complex="normal"/>
    </style:style>
    <style:style style:name="T60" style:family="text">
      <style:text-properties fo:color="#000000" loext:opacity="100%" style:font-name="微软雅黑" fo:font-size="12pt" fo:font-weight="normal" style:font-name-asian="微软雅黑" style:font-size-asian="12pt" style:font-weight-asian="normal" style:font-name-complex="微软雅黑" style:font-size-complex="12pt" style:font-weight-complex="normal"/>
    </style:style>
    <style:style style:name="T61" style:family="text">
      <style:text-properties fo:color="#000000" loext:opacity="100%" style:font-name="Arial" fo:font-size="13pt" fo:font-weight="normal" style:font-name-asian="Arial" style:font-size-asian="13pt" style:font-weight-asian="normal" style:font-name-complex="Arial" style:font-size-complex="13pt" style:font-weight-complex="normal"/>
    </style:style>
    <style:style style:name="T62" style:family="text">
      <style:text-properties fo:color="#7ca6f0" loext:opacity="100%" style:font-name="Arial" fo:font-size="13.8999996185303pt" fo:font-weight="normal" style:font-name-asian="Arial" style:font-size-asian="13.8999996185303pt" style:font-weight-asian="normal" style:font-name-complex="Arial" style:font-size-complex="13.8999996185303pt" style:font-weight-complex="normal"/>
    </style:style>
    <style:style style:name="T63" style:family="text">
      <style:text-properties fo:color="#ffffff" loext:opacity="100%" style:font-name="Microsoft YaHei" fo:font-size="54pt" fo:font-weight="bold" style:font-name-asian="Microsoft YaHei" style:font-size-asian="54pt" style:font-weight-asian="bold" style:font-name-complex="Microsoft YaHei" style:font-size-complex="54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33.866cm" svg:height="19.049cm" svg:x="0cm" svg:y="0cm" svg:viewBox="0 0 33867 19050" draw:points="0,0 33867,0 33867,19050 0,19050">
          <text:p/>
        </draw:polygon>
        <draw:frame draw:style-name="gr2" draw:text-style-name="P2" draw:layer="layout" svg:width="33.866cm" svg:height="19.049cm" svg:x="0cm" svg:y="0cm">
          <draw:image xlink:href="Pictures/10000001000007D100000466F7E8660E.png" xlink:type="simple" xlink:show="embed" xlink:actuate="onLoad" draw:mime-type="image/png">
            <text:p/>
          </draw:image>
        </draw:frame>
        <draw:frame draw:style-name="gr2" draw:text-style-name="P2" draw:layer="layout" svg:width="2.861cm" svg:height="2.861cm" svg:x="29.278cm" svg:y="14.884cm">
          <draw:image xlink:href="Pictures/10000000000000E1000000E15CEEF973.jpg" xlink:type="simple" xlink:show="embed" xlink:actuate="onLoad" draw:mime-type="image/jpeg">
            <text:p/>
          </draw:image>
        </draw:frame>
        <draw:frame draw:style-name="gr3" draw:text-style-name="P4" draw:layer="layout" svg:width="4.913cm" svg:height="0.649cm" svg:x="2.384cm" svg:y="17.027cm">
          <draw:text-box>
            <text:p text:style-name="P3"><text:span text:style-name="T1">数字科技成就美好世界</text:span></text:p>
          </draw:text-box>
        </draw:frame>
        <draw:frame draw:style-name="gr4" draw:text-style-name="P5" draw:layer="layout" svg:width="26.688cm" svg:height="2.283cm" svg:x="2.384cm" svg:y="6.93cm">
          <draw:text-box>
            <text:p text:style-name="P3"><text:span text:style-name="T2">Proposal for Informatica </text:span></text:p>
          </draw:text-box>
        </draw:frame>
        <draw:line draw:style-name="gr5" draw:text-style-name="P2" draw:layer="layout" svg:x1="2.391cm" svg:y1="11.662cm" svg:x2="6.262cm" svg:y2="11.662cm">
          <text:p/>
        </draw:line>
        <draw:frame draw:style-name="gr6" draw:text-style-name="P5" draw:layer="layout" svg:width="9.082cm" svg:height="2.283cm" svg:x="2.384cm" svg:y="9.005cm">
          <draw:text-box>
            <text:p text:style-name="P3"><text:span text:style-name="T2">migration </text:span></text:p>
          </draw:text-box>
        </draw:frame>
        <draw:frame draw:style-name="gr7" draw:text-style-name="P4" draw:layer="layout" svg:width="1.777cm" svg:height="0.552cm" svg:x="30.228cm" svg:y="13.932cm">
          <draw:text-box>
            <text:p text:style-name="P3"><text:span text:style-name="T3">2026.01</text:span></text:p>
          </draw:text-box>
        </draw:frame>
      </draw:page>
      <draw:page draw:name="page2" draw:style-name="dp1" draw:master-page-name="master-page3">
        <draw:polygon draw:style-name="gr1" draw:text-style-name="P1" draw:layer="layout" svg:width="33.866cm" svg:height="19.049cm" svg:x="0cm" svg:y="0cm" svg:viewBox="0 0 33867 19050" draw:points="0,0 33867,0 33867,19050 0,19050">
          <text:p/>
        </draw:polygon>
        <draw:polygon draw:style-name="gr8" draw:text-style-name="P6" draw:layer="layout" svg:width="2.175cm" svg:height="0.128cm" svg:x="0cm" svg:y="3.056cm" svg:viewBox="0 0 2176 129" draw:points="0,0 2176,0 2176,129 0,129">
          <text:p/>
        </draw:polygon>
        <draw:frame draw:style-name="gr9" draw:text-style-name="P7" draw:layer="layout" svg:width="5.232cm" svg:height="0.75cm" svg:x="1.607cm" svg:y="3.895cm">
          <draw:text-box>
            <text:p text:style-name="P3"><text:span text:style-name="T4">Technical Solution</text:span></text:p>
          </draw:text-box>
        </draw:frame>
        <draw:frame draw:style-name="gr10" draw:text-style-name="P8" draw:layer="layout" svg:width="0.846cm" svg:height="0.945cm" svg:x="2.607cm" svg:y="4.577cm">
          <draw:text-box>
            <text:p text:style-name="P3"><text:span text:style-name="T5">•</text:span></text:p>
          </draw:text-box>
        </draw:frame>
        <draw:frame draw:style-name="gr11" draw:text-style-name="P4" draw:layer="layout" svg:width="6.616cm" svg:height="0.649cm" svg:x="3.564cm" svg:y="4.824cm">
          <draw:text-box>
            <text:p text:style-name="P3"><text:span text:style-name="T6">Requirement understanding</text:span></text:p>
          </draw:text-box>
        </draw:frame>
        <draw:frame draw:style-name="gr12" draw:text-style-name="P8" draw:layer="layout" svg:width="0.847cm" svg:height="0.945cm" svg:x="2.607cm" svg:y="5.406cm">
          <draw:text-box>
            <text:p text:style-name="P3"><text:span text:style-name="T5">•</text:span></text:p>
          </draw:text-box>
        </draw:frame>
        <draw:frame draw:style-name="gr13" draw:text-style-name="P4" draw:layer="layout" svg:width="5.991cm" svg:height="0.649cm" svg:x="3.564cm" svg:y="5.652cm">
          <draw:text-box>
            <text:p text:style-name="P3"><text:span text:style-name="T6">Architecture (as is , to be)</text:span></text:p>
          </draw:text-box>
        </draw:frame>
        <draw:frame draw:style-name="gr14" draw:text-style-name="P7" draw:layer="layout" svg:width="7.607cm" svg:height="0.75cm" svg:x="1.607cm" svg:y="6.649cm">
          <draw:text-box>
            <text:p text:style-name="P3"><text:span text:style-name="T4">Implementation approach </text:span></text:p>
          </draw:text-box>
        </draw:frame>
        <draw:frame draw:style-name="gr12" draw:text-style-name="P8" draw:layer="layout" svg:width="0.847cm" svg:height="0.945cm" svg:x="2.607cm" svg:y="7.337cm">
          <draw:text-box>
            <text:p text:style-name="P3"><text:span text:style-name="T5">•</text:span></text:p>
          </draw:text-box>
        </draw:frame>
        <draw:frame draw:style-name="gr15" draw:text-style-name="P4" draw:layer="layout" svg:width="4.252cm" svg:height="0.649cm" svg:x="3.564cm" svg:y="7.585cm">
          <draw:text-box>
            <text:p text:style-name="P3"><text:span text:style-name="T6">Migration process</text:span></text:p>
          </draw:text-box>
        </draw:frame>
        <draw:frame draw:style-name="gr10" draw:text-style-name="P8" draw:layer="layout" svg:width="0.846cm" svg:height="0.945cm" svg:x="2.607cm" svg:y="8.16cm">
          <draw:text-box>
            <text:p text:style-name="P3"><text:span text:style-name="T5">•</text:span></text:p>
          </draw:text-box>
        </draw:frame>
        <draw:frame draw:style-name="gr16" draw:text-style-name="P4" draw:layer="layout" svg:width="7.573cm" svg:height="0.649cm" svg:x="3.564cm" svg:y="8.407cm">
          <draw:text-box>
            <text:p text:style-name="P3"><text:span text:style-name="T6">Working modes after migration </text:span></text:p>
          </draw:text-box>
        </draw:frame>
        <draw:frame draw:style-name="gr12" draw:text-style-name="P8" draw:layer="layout" svg:width="0.847cm" svg:height="0.945cm" svg:x="2.607cm" svg:y="8.989cm">
          <draw:text-box>
            <text:p text:style-name="P3"><text:span text:style-name="T5">•</text:span></text:p>
          </draw:text-box>
        </draw:frame>
        <draw:frame draw:style-name="gr17" draw:text-style-name="P4" draw:layer="layout" svg:width="5.264cm" svg:height="0.649cm" svg:x="3.564cm" svg:y="9.237cm">
          <draw:text-box>
            <text:p text:style-name="P3"><text:span text:style-name="T6">Investigate the system</text:span></text:p>
          </draw:text-box>
        </draw:frame>
        <draw:frame draw:style-name="gr10" draw:text-style-name="P8" draw:layer="layout" svg:width="0.846cm" svg:height="0.945cm" svg:x="2.607cm" svg:y="9.821cm">
          <draw:text-box>
            <text:p text:style-name="P3"><text:span text:style-name="T5">•</text:span></text:p>
          </draw:text-box>
        </draw:frame>
        <draw:frame draw:style-name="gr18" draw:text-style-name="P4" draw:layer="layout" svg:width="7.162cm" svg:height="0.649cm" svg:x="3.564cm" svg:y="10.067cm">
          <draw:text-box>
            <text:p text:style-name="P3"><text:span text:style-name="T6">implementation detailed steps</text:span></text:p>
          </draw:text-box>
        </draw:frame>
        <draw:frame draw:style-name="gr10" draw:text-style-name="P8" draw:layer="layout" svg:width="0.846cm" svg:height="0.945cm" svg:x="2.607cm" svg:y="10.65cm">
          <draw:text-box>
            <text:p text:style-name="P3"><text:span text:style-name="T5">•</text:span></text:p>
          </draw:text-box>
        </draw:frame>
        <draw:frame draw:style-name="gr19" draw:text-style-name="P4" draw:layer="layout" svg:width="10.266cm" svg:height="0.649cm" svg:x="3.564cm" svg:y="10.897cm">
          <draw:text-box>
            <text:p text:style-name="P3"><text:span text:style-name="T6">Key information in Replacement a workflow</text:span></text:p>
          </draw:text-box>
        </draw:frame>
        <draw:frame draw:style-name="gr20" draw:text-style-name="P7" draw:layer="layout" svg:width="5.963cm" svg:height="0.75cm" svg:x="1.607cm" svg:y="11.891cm">
          <draw:text-box>
            <text:p text:style-name="P3"><text:span text:style-name="T4">Project management</text:span></text:p>
          </draw:text-box>
        </draw:frame>
        <draw:frame draw:style-name="gr10" draw:text-style-name="P8" draw:layer="layout" svg:width="0.846cm" svg:height="0.945cm" svg:x="2.607cm" svg:y="12.573cm">
          <draw:text-box>
            <text:p text:style-name="P3"><text:span text:style-name="T5">•</text:span></text:p>
          </draw:text-box>
        </draw:frame>
        <draw:frame draw:style-name="gr21" draw:text-style-name="P4" draw:layer="layout" svg:width="4.264cm" svg:height="0.649cm" svg:x="3.564cm" svg:y="12.82cm">
          <draw:text-box>
            <text:p text:style-name="P3"><text:span text:style-name="T6">Delivery approach</text:span></text:p>
          </draw:text-box>
        </draw:frame>
        <draw:frame draw:style-name="gr12" draw:text-style-name="P8" draw:layer="layout" svg:width="0.847cm" svg:height="0.945cm" svg:x="2.607cm" svg:y="13.402cm">
          <draw:text-box>
            <text:p text:style-name="P3"><text:span text:style-name="T5">•</text:span></text:p>
          </draw:text-box>
        </draw:frame>
        <draw:frame draw:style-name="gr22" draw:text-style-name="P4" draw:layer="layout" svg:width="4.837cm" svg:height="0.649cm" svg:x="3.564cm" svg:y="13.649cm">
          <draw:text-box>
            <text:p text:style-name="P3"><text:span text:style-name="T6">Estimation approach</text:span></text:p>
          </draw:text-box>
        </draw:frame>
        <draw:frame draw:style-name="gr10" draw:text-style-name="P8" draw:layer="layout" svg:width="0.846cm" svg:height="0.945cm" svg:x="2.607cm" svg:y="14.233cm">
          <draw:text-box>
            <text:p text:style-name="P3"><text:span text:style-name="T5">•</text:span></text:p>
          </draw:text-box>
        </draw:frame>
        <draw:frame draw:style-name="gr23" draw:text-style-name="P4" draw:layer="layout" svg:width="6.137cm" svg:height="0.649cm" svg:x="3.564cm" svg:y="14.48cm">
          <draw:text-box>
            <text:p text:style-name="P3"><text:span text:style-name="T6">Project plan &amp; Milestone <text:s/></text:span></text:p>
          </draw:text-box>
        </draw:frame>
        <draw:frame draw:style-name="gr12" draw:text-style-name="P8" draw:layer="layout" svg:width="0.847cm" svg:height="0.945cm" svg:x="2.607cm" svg:y="15.062cm">
          <draw:text-box>
            <text:p text:style-name="P3"><text:span text:style-name="T5">•</text:span></text:p>
          </draw:text-box>
        </draw:frame>
        <draw:frame draw:style-name="gr24" draw:text-style-name="P4" draw:layer="layout" svg:width="7.849cm" svg:height="0.649cm" svg:x="3.564cm" svg:y="15.31cm">
          <draw:text-box>
            <text:p text:style-name="P3"><text:span text:style-name="T6">Org-chart &amp; communication plan</text:span></text:p>
          </draw:text-box>
        </draw:frame>
        <draw:frame draw:style-name="gr10" draw:text-style-name="P8" draw:layer="layout" svg:width="0.846cm" svg:height="0.945cm" svg:x="2.607cm" svg:y="15.894cm">
          <draw:text-box>
            <text:p text:style-name="P3"><text:span text:style-name="T5">•</text:span></text:p>
          </draw:text-box>
        </draw:frame>
        <draw:frame draw:style-name="gr25" draw:text-style-name="P4" draw:layer="layout" svg:width="3.978cm" svg:height="0.649cm" svg:x="3.564cm" svg:y="16.14cm">
          <draw:text-box>
            <text:p text:style-name="P3"><text:span text:style-name="T6">SLA Assumption </text:span></text:p>
          </draw:text-box>
        </draw:frame>
        <draw:frame draw:style-name="gr26" draw:text-style-name="P9" draw:layer="layout" svg:width="3.854cm" svg:height="1.309cm" svg:x="0.899cm" svg:y="1.518cm">
          <draw:text-box>
            <text:p text:style-name="P3"><text:span text:style-name="T7">Agenda</text:span></text:p>
          </draw:text-box>
        </draw:frame>
      </draw:page>
      <draw:page draw:name="page3" draw:style-name="dp1" draw:master-page-name="master-page3">
        <draw:polygon draw:style-name="gr8" draw:text-style-name="P6" draw:layer="layout" svg:width="2.175cm" svg:height="0.128cm" svg:x="0cm" svg:y="3.056cm" svg:viewBox="0 0 2176 129" draw:points="0,0 2176,0 2176,129 0,129">
          <text:p/>
        </draw:polygon>
        <draw:frame draw:style-name="gr27" draw:text-style-name="P9" draw:layer="layout" svg:width="0.99cm" svg:height="1.309cm" svg:x="1.607cm" svg:y="5.166cm">
          <draw:text-box>
            <text:p text:style-name="P3"><text:span text:style-name="T8">1.</text:span></text:p>
          </draw:text-box>
        </draw:frame>
        <draw:frame draw:style-name="gr28" draw:text-style-name="P10" draw:layer="layout" svg:width="20.305cm" svg:height="0.937cm" svg:x="2.878cm" svg:y="5.471cm">
          <draw:text-box>
            <text:p text:style-name="P3"><text:span text:style-name="T9">Investigate current overall system infra, workflow &amp; practice</text:span></text:p>
          </draw:text-box>
        </draw:frame>
        <draw:frame draw:style-name="gr27" draw:text-style-name="P9" draw:layer="layout" svg:width="0.99cm" svg:height="1.309cm" svg:x="1.607cm" svg:y="6.624cm">
          <draw:text-box>
            <text:p text:style-name="P3"><text:span text:style-name="T8">2.</text:span></text:p>
          </draw:text-box>
        </draw:frame>
        <draw:frame draw:style-name="gr29" draw:text-style-name="P11" draw:layer="layout" svg:width="11.02cm" svg:height="0.928cm" svg:x="2.878cm" svg:y="6.929cm">
          <draw:text-box>
            <text:p text:style-name="P3"><text:span text:style-name="T10">Design or adjust the architecture</text:span></text:p>
          </draw:text-box>
        </draw:frame>
        <draw:frame draw:style-name="gr27" draw:text-style-name="P9" draw:layer="layout" svg:width="0.99cm" svg:height="1.309cm" svg:x="1.607cm" svg:y="8.073cm">
          <draw:text-box>
            <text:p text:style-name="P3"><text:span text:style-name="T8">3.</text:span></text:p>
          </draw:text-box>
        </draw:frame>
        <draw:frame draw:style-name="gr30" draw:text-style-name="P11" draw:layer="layout" svg:width="18.531cm" svg:height="0.928cm" svg:x="2.878cm" svg:y="8.378cm">
          <draw:text-box>
            <text:p text:style-name="P3"><text:span text:style-name="T10">Parse the Informatica XML file(ETL) and extract the SQL</text:span></text:p>
          </draw:text-box>
        </draw:frame>
        <draw:frame draw:style-name="gr27" draw:text-style-name="P9" draw:layer="layout" svg:width="0.99cm" svg:height="1.309cm" svg:x="1.607cm" svg:y="9.53cm">
          <draw:text-box>
            <text:p text:style-name="P3"><text:span text:style-name="T8">4.</text:span></text:p>
          </draw:text-box>
        </draw:frame>
        <draw:frame draw:style-name="gr31" draw:text-style-name="P11" draw:layer="layout" svg:width="17.136cm" svg:height="0.928cm" svg:x="2.878cm" svg:y="9.835cm">
          <draw:text-box>
            <text:p text:style-name="P3"><text:span text:style-name="T10">Verify &amp; engineering the SQL into a pl/SQL or shell</text:span></text:p>
          </draw:text-box>
        </draw:frame>
        <draw:frame draw:style-name="gr27" draw:text-style-name="P9" draw:layer="layout" svg:width="0.99cm" svg:height="1.309cm" svg:x="1.607cm" svg:y="10.986cm">
          <draw:text-box>
            <text:p text:style-name="P3"><text:span text:style-name="T8">5.</text:span></text:p>
          </draw:text-box>
        </draw:frame>
        <draw:frame draw:style-name="gr32" draw:text-style-name="P10" draw:layer="layout" svg:width="22.825cm" svg:height="0.937cm" svg:x="2.878cm" svg:y="11.29cm">
          <draw:text-box>
            <text:p text:style-name="P3"><text:span text:style-name="T9">Set up the schedules for all reports, same as the existing schedulers</text:span></text:p>
          </draw:text-box>
        </draw:frame>
        <draw:frame draw:style-name="gr27" draw:text-style-name="P9" draw:layer="layout" svg:width="0.99cm" svg:height="1.309cm" svg:x="1.607cm" svg:y="12.435cm">
          <draw:text-box>
            <text:p text:style-name="P3"><text:span text:style-name="T8">6.</text:span></text:p>
          </draw:text-box>
        </draw:frame>
        <draw:frame draw:style-name="gr33" draw:text-style-name="P11" draw:layer="layout" svg:width="17.954cm" svg:height="0.928cm" svg:x="2.878cm" svg:y="12.74cm">
          <draw:text-box>
            <text:p text:style-name="P3"><text:span text:style-name="T10">Test all ETL workflow and DEV/SIT/UAT environments</text:span></text:p>
          </draw:text-box>
        </draw:frame>
        <draw:frame draw:style-name="gr27" draw:text-style-name="P9" draw:layer="layout" svg:width="0.99cm" svg:height="1.309cm" svg:x="1.607cm" svg:y="13.892cm">
          <draw:text-box>
            <text:p text:style-name="P3"><text:span text:style-name="T8">7.</text:span></text:p>
          </draw:text-box>
        </draw:frame>
        <draw:frame draw:style-name="gr34" draw:text-style-name="P11" draw:layer="layout" svg:width="16.47cm" svg:height="0.928cm" svg:x="2.878cm" svg:y="14.197cm">
          <draw:text-box>
            <text:p text:style-name="P3"><text:span text:style-name="T10">Reconcile the data result in Product environment</text:span></text:p>
          </draw:text-box>
        </draw:frame>
        <draw:frame draw:style-name="gr27" draw:text-style-name="P9" draw:layer="layout" svg:width="0.99cm" svg:height="1.309cm" svg:x="1.607cm" svg:y="15.348cm">
          <draw:text-box>
            <text:p text:style-name="P3"><text:span text:style-name="T8">8.</text:span></text:p>
          </draw:text-box>
        </draw:frame>
        <draw:frame draw:style-name="gr35" draw:text-style-name="P10" draw:layer="layout" svg:width="14.053cm" svg:height="0.937cm" svg:x="2.878cm" svg:y="15.652cm">
          <draw:text-box>
            <text:p text:style-name="P3"><text:span text:style-name="T9">Downgrade or decommission Informatica</text:span></text:p>
          </draw:text-box>
        </draw:frame>
        <draw:frame draw:style-name="gr36" draw:text-style-name="P9" draw:layer="layout" svg:width="14.06cm" svg:height="1.309cm" svg:x="0.899cm" svg:y="1.518cm">
          <draw:text-box>
            <text:p text:style-name="P3"><text:span text:style-name="T7">Requirement understanding</text:span></text:p>
          </draw:text-box>
        </draw:frame>
      </draw:page>
      <draw:page draw:name="page4" draw:style-name="dp1" draw:master-page-name="master-page3">
        <draw:polygon draw:style-name="gr1" draw:text-style-name="P1" draw:layer="layout" svg:width="33.866cm" svg:height="19.049cm" svg:x="0cm" svg:y="0cm" svg:viewBox="0 0 33867 19050" draw:points="0,0 33867,0 33867,19050 0,19050">
          <text:p/>
        </draw:polygon>
        <draw:frame draw:style-name="gr37" draw:text-style-name="P12" draw:layer="layout" svg:width="15.613cm" svg:height="2.237cm" svg:x="2.384cm" svg:y="7.643cm">
          <draw:text-box>
            <text:p text:style-name="P3"><text:span text:style-name="T11">Technical Solution</text:span></text:p>
          </draw:text-box>
        </draw:frame>
      </draw:page>
      <draw:page draw:name="page5" draw:style-name="dp1" draw:master-page-name="master-page3">
        <draw:polygon draw:style-name="gr1" draw:text-style-name="P1" draw:layer="layout" svg:width="33.866cm" svg:height="19.049cm" svg:x="0cm" svg:y="0cm" svg:viewBox="0 0 33867 19050" draw:points="0,0 33867,0 33867,19050 0,19050">
          <text:p/>
        </draw:polygon>
        <draw:polygon draw:style-name="gr8" draw:text-style-name="P6" draw:layer="layout" svg:width="2.175cm" svg:height="0.128cm" svg:x="0cm" svg:y="3.056cm" svg:viewBox="0 0 2176 129" draw:points="0,0 2176,0 2176,129 0,129">
          <text:p/>
        </draw:polygon>
        <draw:path draw:style-name="gr8" draw:text-style-name="P6" draw:layer="layout" svg:width="1.82cm" svg:height="1.593cm" svg:x="5.689cm" svg:y="7.72cm" svg:viewBox="0 0 1821 1594" svg:d="M0 0c0 126 408 228 911 228s910-102 910-228v1366c0 126-407 228-910 228s-911-102-911-228z">
          <text:p/>
        </draw:path>
        <draw:path draw:style-name="gr38" draw:text-style-name="P13" draw:layer="layout" svg:width="1.82cm" svg:height="0.456cm" svg:x="5.689cm" svg:y="7.493cm" svg:viewBox="0 0 1821 457" svg:d="M0 229c0-126 408-229 911-229s910 103 910 229-407 228-910 228-911-102-911-228z">
          <text:p/>
        </draw:path>
        <draw:path draw:style-name="gr39" draw:text-style-name="P2" draw:layer="layout" svg:width="1.82cm" svg:height="1.821cm" svg:x="5.689cm" svg:y="7.493cm" svg:viewBox="0 0 1821 1822" svg:d="M1821 228c0 126-407 228-910 228s-911-102-911-228 408-228 911-228 910 102 910 228zM1821 228v1366c0 126-407 228-910 228s-911-102-911-228v-1366">
          <text:p/>
        </draw:path>
        <draw:frame draw:style-name="gr40" draw:text-style-name="P9" draw:layer="layout" svg:width="21.011cm" svg:height="1.309cm" svg:x="0.899cm" svg:y="1.518cm">
          <draw:text-box>
            <text:p text:style-name="P3"><text:span text:style-name="T7">Existing Architecture for Infomatica (as is)</text:span></text:p>
          </draw:text-box>
        </draw:frame>
        <draw:path draw:style-name="gr8" draw:text-style-name="P6" draw:layer="layout" svg:width="1.821cm" svg:height="1.585cm" svg:x="8.322cm" svg:y="7.719cm" svg:viewBox="0 0 1822 1586" svg:d="M0 0c0 125 408 226 910 226 503 0 912-101 912-226v1360c0 125-409 226-912 226-502 0-910-101-910-226z">
          <text:p/>
        </draw:path>
        <draw:path draw:style-name="gr38" draw:text-style-name="P13" draw:layer="layout" svg:width="1.821cm" svg:height="0.453cm" svg:x="8.322cm" svg:y="7.493cm" svg:viewBox="0 0 1822 454" svg:d="M0 227c0-125 408-227 910-227 503 0 912 102 912 227s-409 227-912 227c-502 0-910-102-910-227z">
          <text:p/>
        </draw:path>
        <draw:path draw:style-name="gr39" draw:text-style-name="P2" draw:layer="layout" svg:width="1.821cm" svg:height="1.812cm" svg:x="8.322cm" svg:y="7.493cm" svg:viewBox="0 0 1822 1813" svg:d="M1822 227c0 125-409 226-912 226-502 0-910-101-910-226s408-227 910-227c503 0 912 102 912 227zM1822 227v1360c0 125-409 226-912 226-502 0-910-101-910-226v-1360">
          <text:p/>
        </draw:path>
        <draw:frame draw:style-name="gr41" draw:text-style-name="P14" draw:layer="layout" svg:width="1.049cm" svg:height="0.399cm" svg:x="6.073cm" svg:y="8.331cm">
          <draw:text-box>
            <text:p text:style-name="P3"><text:span text:style-name="T12">Oracle</text:span></text:p>
          </draw:text-box>
        </draw:frame>
        <draw:path draw:style-name="gr8" draw:text-style-name="P6" draw:layer="layout" svg:width="1.82cm" svg:height="1.592cm" svg:x="5.689cm" svg:y="9.981cm" svg:viewBox="0 0 1821 1593" svg:d="M0 0c0 125 408 227 911 227s910-102 910-227v1366c0 125-407 227-910 227s-911-102-911-227z">
          <text:p/>
        </draw:path>
        <draw:path draw:style-name="gr38" draw:text-style-name="P13" draw:layer="layout" svg:width="1.82cm" svg:height="0.455cm" svg:x="5.689cm" svg:y="9.753cm" svg:viewBox="0 0 1821 456" svg:d="M0 229c0-126 408-229 911-229s910 103 910 229c0 125-407 227-910 227s-911-102-911-227z">
          <text:p/>
        </draw:path>
        <draw:path draw:style-name="gr39" draw:text-style-name="P2" draw:layer="layout" svg:width="1.82cm" svg:height="1.82cm" svg:x="5.689cm" svg:y="9.753cm" svg:viewBox="0 0 1821 1821" svg:d="M1821 228c0 126-407 228-910 228s-911-102-911-228 408-228 911-228 910 102 910 228zM1821 228v1366c0 125-407 227-910 227s-911-102-911-227v-1366">
          <text:p/>
        </draw:path>
        <draw:frame draw:style-name="gr42" draw:text-style-name="P14" draw:layer="layout" svg:width="0.694cm" svg:height="0.399cm" svg:x="8.891cm" svg:y="8.33cm">
          <draw:text-box>
            <text:p text:style-name="P3"><text:span text:style-name="T12">DB2</text:span></text:p>
          </draw:text-box>
        </draw:frame>
        <draw:path draw:style-name="gr8" draw:text-style-name="P6" draw:layer="layout" svg:width="1.821cm" svg:height="1.592cm" svg:x="8.322cm" svg:y="9.981cm" svg:viewBox="0 0 1822 1593" svg:d="M0 0c0 125 408 227 910 227 503 0 912-102 912-227v1366c0 125-409 227-912 227-502 0-910-102-910-227z">
          <text:p/>
        </draw:path>
        <draw:path draw:style-name="gr38" draw:text-style-name="P13" draw:layer="layout" svg:width="1.821cm" svg:height="0.455cm" svg:x="8.322cm" svg:y="9.753cm" svg:viewBox="0 0 1822 456" svg:d="M0 229c0-126 408-229 910-229 503 0 912 103 912 229 0 125-409 227-912 227-502 0-910-102-910-227z">
          <text:p/>
        </draw:path>
        <draw:path draw:style-name="gr39" draw:text-style-name="P2" draw:layer="layout" svg:width="1.821cm" svg:height="1.82cm" svg:x="8.322cm" svg:y="9.753cm" svg:viewBox="0 0 1822 1821" svg:d="M1822 228c0 126-409 228-912 228-502 0-910-102-910-228s408-228 910-228c503 0 912 102 912 228zM1822 228v1366c0 125-409 227-912 227-502 0-910-102-910-227v-1366">
          <text:p/>
        </draw:path>
        <draw:frame draw:style-name="gr43" draw:text-style-name="P14" draw:layer="layout" svg:width="1.188cm" svg:height="0.399cm" svg:x="6.014cm" svg:y="10.598cm">
          <draw:text-box>
            <text:p text:style-name="P3"><text:span text:style-name="T12">Sybase</text:span></text:p>
          </draw:text-box>
        </draw:frame>
        <draw:path draw:style-name="gr8" draw:text-style-name="P6" draw:layer="layout" svg:width="1.821cm" svg:height="1.593cm" svg:x="8.322cm" svg:y="12.436cm" svg:viewBox="0 0 1822 1594" svg:d="M0 0c0 126 408 228 910 228 503 0 912-102 912-228v1366c0 126-409 228-912 228-502 0-910-102-910-228z">
          <text:p/>
        </draw:path>
        <draw:path draw:style-name="gr38" draw:text-style-name="P13" draw:layer="layout" svg:width="1.821cm" svg:height="0.456cm" svg:x="8.322cm" svg:y="12.208cm" svg:viewBox="0 0 1822 457" svg:d="M0 228c0-126 408-228 910-228 503 0 912 102 912 228 0 127-409 229-912 229-502 0-910-102-910-229z">
          <text:p/>
        </draw:path>
        <draw:path draw:style-name="gr39" draw:text-style-name="P2" draw:layer="layout" svg:width="1.821cm" svg:height="1.821cm" svg:x="8.322cm" svg:y="12.208cm" svg:viewBox="0 0 1822 1822" svg:d="M1822 228c0 126-409 228-912 228-502 0-910-102-910-228s408-228 910-228c503 0 912 102 912 228zM1822 228v1366c0 126-409 228-912 228-502 0-910-102-910-228v-1366">
          <text:p/>
        </draw:path>
        <draw:frame draw:style-name="gr44" draw:text-style-name="P14" draw:layer="layout" svg:width="0.931cm" svg:height="0.399cm" svg:x="8.772cm" svg:y="10.598cm">
          <draw:text-box>
            <text:p text:style-name="P3"><text:span text:style-name="T12">Mysql</text:span></text:p>
          </draw:text-box>
        </draw:frame>
        <draw:polygon draw:style-name="gr45" draw:text-style-name="P6" draw:layer="layout" svg:width="6.197cm" svg:height="0.89cm" svg:x="12.683cm" svg:y="8.779cm" svg:viewBox="0 0 6198 891" draw:points="0,0 6198,0 6198,891 0,891">
          <text:p/>
        </draw:polygon>
        <draw:frame draw:style-name="gr46" draw:text-style-name="P14" draw:layer="layout" svg:width="0.358cm" svg:height="0.399cm" svg:x="9.052cm" svg:y="13.05cm">
          <draw:text-box>
            <text:p text:style-name="P3"><text:span text:style-name="T12">…</text:span></text:p>
          </draw:text-box>
        </draw:frame>
        <draw:polygon draw:style-name="gr45" draw:text-style-name="P6" draw:layer="layout" svg:width="6.197cm" svg:height="1.337cm" svg:x="12.683cm" svg:y="9.889cm" svg:viewBox="0 0 6198 1338" draw:points="0,0 6198,0 6198,1338 0,1338">
          <text:p/>
        </draw:polygon>
        <draw:frame draw:style-name="gr47" draw:text-style-name="P4" draw:layer="layout" svg:width="3.195cm" svg:height="0.552cm" svg:x="14.191cm" svg:y="8.973cm">
          <draw:text-box>
            <text:p text:style-name="P3"><text:span text:style-name="T3">Designer(ETL)</text:span></text:p>
          </draw:text-box>
        </draw:frame>
        <draw:frame draw:style-name="gr48" draw:text-style-name="P4" draw:layer="layout" svg:width="2.349cm" svg:height="0.552cm" svg:x="14.623cm" svg:y="10.008cm">
          <draw:text-box>
            <text:p text:style-name="P3"><text:span text:style-name="T3">Repository</text:span></text:p>
          </draw:text-box>
        </draw:frame>
        <draw:polygon draw:style-name="gr45" draw:text-style-name="P6" draw:layer="layout" svg:width="6.197cm" svg:height="0.89cm" svg:x="12.683cm" svg:y="13.089cm" svg:viewBox="0 0 6198 891" draw:points="0,0 6198,0 6198,891 0,891">
          <text:p/>
        </draw:polygon>
        <draw:frame draw:style-name="gr49" draw:text-style-name="P4" draw:layer="layout" svg:width="3.004cm" svg:height="0.552cm" svg:x="14.284cm" svg:y="10.601cm">
          <draw:text-box>
            <text:p text:style-name="P3"><text:span text:style-name="T3">(source code)</text:span></text:p>
          </draw:text-box>
        </draw:frame>
        <draw:polygon draw:style-name="gr45" draw:text-style-name="P6" draw:layer="layout" svg:width="6.197cm" svg:height="1.219cm" svg:x="12.683cm" svg:y="11.514cm" svg:viewBox="0 0 6198 1220" draw:points="0,0 6198,0 6198,1220 0,1220">
          <text:p/>
        </draw:polygon>
        <draw:frame draw:style-name="gr50" draw:text-style-name="P4" draw:layer="layout" svg:width="4.45cm" svg:height="0.552cm" svg:x="13.564cm" svg:y="13.278cm">
          <draw:text-box>
            <text:p text:style-name="P3"><text:span text:style-name="T3">Monitor( task status)</text:span></text:p>
          </draw:text-box>
        </draw:frame>
        <draw:frame draw:style-name="gr51" draw:text-style-name="P4" draw:layer="layout" svg:width="3.521cm" svg:height="0.552cm" svg:x="14.013cm" svg:y="11.576cm">
          <draw:text-box>
            <text:p text:style-name="P3"><text:span text:style-name="T3">Workflow mgmt.</text:span></text:p>
          </draw:text-box>
        </draw:frame>
        <draw:frame draw:style-name="gr2" draw:text-style-name="P2" draw:layer="layout" svg:width="6.942cm" svg:height="2.133cm" svg:x="11.591cm" svg:y="5.232cm">
          <draw:image xlink:href="Pictures/100000000000016C00000070BB9818B1.png" xlink:type="simple" xlink:show="embed" xlink:actuate="onLoad" draw:mime-type="image/png">
            <text:p/>
          </draw:image>
        </draw:frame>
        <draw:path draw:style-name="gr8" draw:text-style-name="P6" draw:layer="layout" svg:width="2.26cm" svg:height="1.842cm" svg:x="5.41cm" svg:y="12.208cm" svg:viewBox="0 0 2261 1843" svg:d="M0 1777c974 236 974-237 1947-237v-1226h-1947zM160 314v-158h1934v1233c-74 0-147 9-147 9v-1084zM312 156v-156h1949v1230c-83 0-167 7-167 7v-1081z">
          <text:p/>
        </draw:path>
        <draw:path draw:style-name="gr39" draw:text-style-name="P2" draw:layer="layout" svg:width="2.26cm" svg:height="1.842cm" svg:x="5.41cm" svg:y="12.208cm" svg:viewBox="0 0 2261 1843" svg:d="M0 314h1947v1226c-973 0-973 473-1947 237zM160 314v-158h1934v1233c-74 0-147 9-147 9M312 156v-156h1949v1230c-83 0-167 7-167 7">
          <text:p/>
        </draw:path>
        <draw:frame draw:style-name="gr52" draw:text-style-name="P4" draw:layer="layout" svg:width="2.54cm" svg:height="0.552cm" svg:x="14.521cm" svg:y="12.169cm">
          <draw:text-box>
            <text:p text:style-name="P3"><text:span text:style-name="T3">(Scheduler)</text:span></text:p>
          </draw:text-box>
        </draw:frame>
        <draw:path draw:style-name="gr53" draw:text-style-name="P15" draw:layer="layout" svg:width="1.82cm" svg:height="1.593cm" svg:x="21.666cm" svg:y="7.686cm" svg:viewBox="0 0 1821 1594" svg:d="M0 0c0 126 407 228 910 228 504 0 911-102 911-228v1366c0 126-407 228-911 228-503 0-910-102-910-228z">
          <text:p/>
        </draw:path>
        <draw:path draw:style-name="gr54" draw:text-style-name="P16" draw:layer="layout" svg:width="1.82cm" svg:height="0.455cm" svg:x="21.666cm" svg:y="7.459cm" svg:viewBox="0 0 1821 456" svg:d="M0 228c0-125 407-228 910-228 504 0 911 103 911 228 0 126-407 228-911 228-503 0-910-102-910-228z">
          <text:p/>
        </draw:path>
        <draw:path draw:style-name="gr39" draw:text-style-name="P2" draw:layer="layout" svg:width="1.82cm" svg:height="1.82cm" svg:x="21.666cm" svg:y="7.459cm" svg:viewBox="0 0 1821 1821" svg:d="M1821 227c0 126-407 228-911 228-503 0-910-102-910-228 0-125 407-227 910-227 504 0 911 102 911 227zM1821 227v1366c0 126-407 228-911 228-503 0-910-102-910-228v-1366">
          <text:p/>
        </draw:path>
        <draw:frame draw:style-name="gr55" draw:text-style-name="P4" draw:layer="layout" svg:width="0.63cm" svg:height="0.552cm" svg:x="6.071cm" svg:y="13.001cm">
          <draw:text-box>
            <text:p text:style-name="P3"><text:span text:style-name="T3">file</text:span></text:p>
          </draw:text-box>
        </draw:frame>
        <draw:path draw:style-name="gr53" draw:text-style-name="P15" draw:layer="layout" svg:width="1.82cm" svg:height="1.593cm" svg:x="24.299cm" svg:y="7.686cm" svg:viewBox="0 0 1821 1594" svg:d="M0 0c0 126 408 228 911 228s910-102 910-228v1366c0 126-407 228-910 228s-911-102-911-228z">
          <text:p/>
        </draw:path>
        <draw:path draw:style-name="gr54" draw:text-style-name="P16" draw:layer="layout" svg:width="1.82cm" svg:height="0.455cm" svg:x="24.299cm" svg:y="7.459cm" svg:viewBox="0 0 1821 456" svg:d="M0 228c0-125 408-228 911-228s910 103 910 228c0 126-407 228-910 228s-911-102-911-228z">
          <text:p/>
        </draw:path>
        <draw:path draw:style-name="gr39" draw:text-style-name="P2" draw:layer="layout" svg:width="1.82cm" svg:height="1.82cm" svg:x="24.299cm" svg:y="7.459cm" svg:viewBox="0 0 1821 1821" svg:d="M1821 227c0 126-407 228-910 228s-911-102-911-228c0-125 408-227 911-227s910 102 910 227zM1821 227v1366c0 126-407 228-910 228s-911-102-911-228v-1366">
          <text:p/>
        </draw:path>
        <draw:frame draw:style-name="gr41" draw:text-style-name="P14" draw:layer="layout" svg:width="1.049cm" svg:height="0.399cm" svg:x="22.056cm" svg:y="8.301cm">
          <draw:text-box>
            <text:p text:style-name="P3"><text:span text:style-name="T12">Oracle</text:span></text:p>
          </draw:text-box>
        </draw:frame>
        <draw:path draw:style-name="gr53" draw:text-style-name="P15" draw:layer="layout" svg:width="1.82cm" svg:height="1.593cm" svg:x="21.666cm" svg:y="9.955cm" svg:viewBox="0 0 1821 1594" svg:d="M0 0c0 126 407 228 910 228 504 0 911-102 911-228v1366c0 126-407 228-911 228-503 0-910-102-910-228z">
          <text:p/>
        </draw:path>
        <draw:path draw:style-name="gr54" draw:text-style-name="P16" draw:layer="layout" svg:width="1.82cm" svg:height="0.455cm" svg:x="21.666cm" svg:y="9.728cm" svg:viewBox="0 0 1821 456" svg:d="M0 228c0-125 407-228 910-228 504 0 911 103 911 228 0 126-407 228-911 228-503 0-910-102-910-228z">
          <text:p/>
        </draw:path>
        <draw:path draw:style-name="gr39" draw:text-style-name="P2" draw:layer="layout" svg:width="1.82cm" svg:height="1.82cm" svg:x="21.666cm" svg:y="9.728cm" svg:viewBox="0 0 1821 1821" svg:d="M1821 227c0 127-407 229-911 229-503 0-910-102-910-229 0-125 407-227 910-227 504 0 911 102 911 227zM1821 227v1366c0 126-407 228-911 228-503 0-910-102-910-228v-1366">
          <text:p/>
        </draw:path>
        <draw:frame draw:style-name="gr42" draw:text-style-name="P14" draw:layer="layout" svg:width="0.694cm" svg:height="0.399cm" svg:x="24.874cm" svg:y="8.301cm">
          <draw:text-box>
            <text:p text:style-name="P3"><text:span text:style-name="T12">DB2</text:span></text:p>
          </draw:text-box>
        </draw:frame>
        <draw:path draw:style-name="gr53" draw:text-style-name="P15" draw:layer="layout" svg:width="1.82cm" svg:height="1.593cm" svg:x="24.299cm" svg:y="9.955cm" svg:viewBox="0 0 1821 1594" svg:d="M0 0c0 126 408 228 911 228s910-102 910-228v1366c0 126-407 228-910 228s-911-102-911-228z">
          <text:p/>
        </draw:path>
        <draw:path draw:style-name="gr54" draw:text-style-name="P16" draw:layer="layout" svg:width="1.82cm" svg:height="0.455cm" svg:x="24.299cm" svg:y="9.728cm" svg:viewBox="0 0 1821 456" svg:d="M0 228c0-125 408-228 911-228s910 103 910 228c0 126-407 228-910 228s-911-102-911-228z">
          <text:p/>
        </draw:path>
        <draw:path draw:style-name="gr39" draw:text-style-name="P2" draw:layer="layout" svg:width="1.82cm" svg:height="1.82cm" svg:x="24.299cm" svg:y="9.728cm" svg:viewBox="0 0 1821 1821" svg:d="M1821 227c0 127-407 229-910 229s-911-102-911-229c0-125 408-227 911-227s910 102 910 227zM1821 227v1366c0 126-407 228-910 228s-911-102-911-228v-1366">
          <text:p/>
        </draw:path>
        <draw:frame draw:style-name="gr43" draw:text-style-name="P14" draw:layer="layout" svg:width="1.188cm" svg:height="0.399cm" svg:x="21.997cm" svg:y="10.566cm">
          <draw:text-box>
            <text:p text:style-name="P3"><text:span text:style-name="T12">Sybase</text:span></text:p>
          </draw:text-box>
        </draw:frame>
        <draw:path draw:style-name="gr53" draw:text-style-name="P15" draw:layer="layout" svg:width="1.82cm" svg:height="1.593cm" svg:x="24.299cm" svg:y="12.402cm" svg:viewBox="0 0 1821 1594" svg:d="M0 0c0 126 408 228 911 228s910-102 910-228v1366c0 126-407 228-910 228s-911-102-911-228z">
          <text:p/>
        </draw:path>
        <draw:path draw:style-name="gr54" draw:text-style-name="P16" draw:layer="layout" svg:width="1.82cm" svg:height="0.455cm" svg:x="24.299cm" svg:y="12.175cm" svg:viewBox="0 0 1821 456" svg:d="M0 227c0-125 408-227 911-227s910 102 910 227c0 127-407 229-910 229s-911-102-911-229z">
          <text:p/>
        </draw:path>
        <draw:path draw:style-name="gr39" draw:text-style-name="P2" draw:layer="layout" svg:width="1.82cm" svg:height="1.82cm" svg:x="24.299cm" svg:y="12.175cm" svg:viewBox="0 0 1821 1821" svg:d="M1821 227c0 126-407 228-910 228s-911-102-911-228c0-125 408-227 911-227s910 102 910 227zM1821 227v1366c0 126-407 228-910 228s-911-102-911-228v-1366">
          <text:p/>
        </draw:path>
        <draw:frame draw:style-name="gr44" draw:text-style-name="P14" draw:layer="layout" svg:width="0.931cm" svg:height="0.399cm" svg:x="24.756cm" svg:y="10.566cm">
          <draw:text-box>
            <text:p text:style-name="P3"><text:span text:style-name="T12">Mysql</text:span></text:p>
          </draw:text-box>
        </draw:frame>
        <draw:path draw:style-name="gr53" draw:text-style-name="P15" draw:layer="layout" svg:width="2.261cm" svg:height="1.85cm" svg:x="21.386cm" svg:y="12.175cm" svg:viewBox="0 0 2262 1851" svg:d="M0 1785c974 237 974-239 1948-239v-1231h-1948zM161 315v-160h1933v1240c-73 0-146 8-146 8v-1088zM312 155v-155h1950v1235c-84 0-168 6-168 6v-1086z">
          <text:p/>
        </draw:path>
        <draw:path draw:style-name="gr39" draw:text-style-name="P2" draw:layer="layout" svg:width="2.261cm" svg:height="1.85cm" svg:x="21.386cm" svg:y="12.175cm" svg:viewBox="0 0 2262 1851" svg:d="M0 315h1948v1231c-974 0-974 476-1948 239zM161 315v-160h1933v1240c-73 0-146 8-146 8M312 155v-155h1950v1235c-84 0-168 6-168 6">
          <text:p/>
        </draw:path>
        <draw:frame draw:style-name="gr46" draw:text-style-name="P14" draw:layer="layout" svg:width="0.358cm" svg:height="0.399cm" svg:x="25.036cm" svg:y="13.02cm">
          <draw:text-box>
            <text:p text:style-name="P3"><text:span text:style-name="T12">…</text:span></text:p>
          </draw:text-box>
        </draw:frame>
        <draw:polygon draw:style-name="gr56" draw:text-style-name="P17" draw:layer="layout" svg:width="0.034cm" svg:height="0.003cm" svg:x="10.752cm" svg:y="10.229cm" svg:viewBox="0 0 35 4" draw:points="0,0 35,0 29,1 22,3 15,4 7,4 0,4">
          <text:p/>
        </draw:polygon>
        <draw:polygon draw:style-name="gr56" draw:text-style-name="P17" draw:layer="layout" svg:width="0.064cm" svg:height="0.009cm" svg:x="10.752cm" svg:y="10.229cm" svg:viewBox="0 0 65 10" draw:points="65,0 59,2 51,4 43,5 36,6 29,8 22,9 15,10 7,10 0,10 0,3 7,3 14,3 21,2 28,1 34,0">
          <text:p/>
        </draw:polygon>
        <draw:polygon draw:style-name="gr57" draw:text-style-name="P18" draw:layer="layout" svg:width="0.083cm" svg:height="0.015cm" svg:x="10.752cm" svg:y="10.229cm" svg:viewBox="0 0 84 16" draw:points="84,0 82,1 74,4 66,6 59,8 52,11 45,12 37,14 30,15 23,15 15,16 8,16 0,16 0,10 7,10 15,10 22,8 29,7 36,6 43,5 51,4 58,2 64,0">
          <text:p/>
        </draw:polygon>
        <draw:polygon draw:style-name="gr57" draw:text-style-name="P18" draw:layer="layout" svg:width="0.1cm" svg:height="0.022cm" svg:x="10.752cm" svg:y="10.229cm" svg:viewBox="0 0 101 23" draw:points="101,0 98,2 91,5 83,7 75,11 68,13 61,15 53,17 46,18 38,20 31,21 23,22 15,22 8,23 0,23 0,16 8,16 15,16 23,15 30,15 37,14 45,12 52,11 59,8 66,6 74,4 81,1 83,0">
          <text:p/>
        </draw:polygon>
        <draw:polygon draw:style-name="gr58" draw:text-style-name="P19" draw:layer="layout" svg:width="0.114cm" svg:height="0.028cm" svg:x="10.752cm" svg:y="10.229cm" svg:viewBox="0 0 115 29" draw:points="115,0 115,1 108,4 100,7 93,10 86,13 78,16 71,19 63,21 56,23 48,25 40,26 32,27 25,28 16,28 8,29 0,29 0,23 8,23 15,22 24,22 32,21 39,20 47,17 54,16 62,14 69,12 76,10 84,7 91,5 98,2 101,0">
          <text:p/>
        </draw:polygon>
        <draw:polygon draw:style-name="gr59" draw:text-style-name="P20" draw:layer="layout" svg:width="0.127cm" svg:height="0.034cm" svg:x="10.752cm" svg:y="10.229cm" svg:viewBox="0 0 128 35" draw:points="128,0 125,3 117,6 110,10 102,13 94,16 87,20 79,23 72,25 64,27 56,29 48,31 40,32 32,33 24,34 16,35 8,35 0,35 0,29 8,29 16,28 24,28 31,27 39,26 47,25 55,23 62,21 70,19 77,16 85,13 92,10 99,7 108,4 115,1 115,0">
          <text:p/>
        </draw:polygon>
        <draw:polygon draw:style-name="gr59" draw:text-style-name="P20" draw:layer="layout" svg:width="0.14cm" svg:height="0.04cm" svg:x="10.752cm" svg:y="10.229cm" svg:viewBox="0 0 141 41" draw:points="141,0 135,4 128,8 120,12 113,15 105,19 98,22 90,25 82,28 74,30 66,33 58,35 50,37 42,38 34,39 26,40 17,41 8,41 0,41 0,35 8,35 16,35 25,34 33,33 41,31 49,30 57,28 65,26 73,24 80,22 88,19 95,16 103,13 110,10 117,6 125,3 128,0">
          <text:p/>
        </draw:polygon>
        <draw:polygon draw:style-name="gr60" draw:text-style-name="P21" draw:layer="layout" svg:width="0.151cm" svg:height="0.047cm" svg:x="10.752cm" svg:y="10.229cm" svg:viewBox="0 0 152 48" draw:points="152,0 145,5 138,10 131,14 122,18 115,22 107,26 99,29 91,32 83,35 75,37 67,39 59,41 50,43 42,44 34,46 25,47 17,47 9,48 0,48 0,41 8,41 17,41 25,40 33,39 41,38 49,37 57,35 65,33 73,31 81,29 89,26 97,23 104,20 112,16 119,13 128,9 135,4 141,0">
          <text:p/>
        </draw:polygon>
        <draw:polygon draw:style-name="gr61" draw:text-style-name="P22" draw:layer="layout" svg:width="0.162cm" svg:height="0.053cm" svg:x="10.752cm" svg:y="10.229cm" svg:viewBox="0 0 163 54" draw:points="163,0 156,5 148,10 141,15 134,19 126,23 118,27 109,30 101,34 93,37 85,40 77,43 69,45 60,47 52,49 43,51 35,52 26,53 17,53 9,54 0,54 0,48 9,48 17,47 25,47 34,46 42,44 50,43 59,40 67,38 75,36 83,34 91,31 99,28 107,25 115,21 123,17 131,13 138,9 145,5 152,0">
          <text:p/>
        </draw:polygon>
        <draw:polygon draw:style-name="gr61" draw:text-style-name="P22" draw:layer="layout" svg:width="0.172cm" svg:height="0.059cm" svg:x="10.752cm" svg:y="10.229cm" svg:viewBox="0 0 173 60" draw:points="173,0 165,6 158,12 151,16 143,21 136,25 128,30 120,33 112,37 104,40 95,44 87,46 79,49 70,51 61,53 53,55 44,57 35,58 27,59 18,60 9,60 0,60 0,54 9,54 17,53 26,53 35,52 43,51 52,49 60,47 69,45 77,43 85,41 93,38 101,35 109,31 117,28 125,24 133,20 140,16 147,11 155,5 162,0">
          <text:p/>
        </draw:polygon>
        <draw:polygon draw:style-name="gr62" draw:text-style-name="P23" draw:layer="layout" svg:width="0.182cm" svg:height="0.065cm" svg:x="10.752cm" svg:y="10.229cm" svg:viewBox="0 0 183 66" draw:points="183,0 177,5 170,12 163,17 155,22 147,26 140,31 132,35 124,39 115,43 107,46 99,49 90,52 81,55 72,57 63,60 54,61 45,63 36,64 27,65 18,66 9,66 0,66 0,60 9,60 18,60 27,59 35,58 44,57 53,55 61,53 70,51 80,49 88,46 96,44 105,40 113,37 121,33 129,30 137,25 144,21 152,16 159,12 166,6 173,0">
          <text:p/>
        </draw:polygon>
        <draw:polygon draw:style-name="gr63" draw:text-style-name="P24" draw:layer="layout" svg:width="0.192cm" svg:height="0.072cm" svg:x="10.752cm" svg:y="10.229cm" svg:viewBox="0 0 193 73" draw:points="193,0 188,4 181,10 174,16 166,21 158,26 151,32 143,36 134,41 126,45 118,49 109,52 101,55 92,58 83,61 74,63 65,66 56,67 47,69 37,70 28,71 19,72 9,73 0,73 0,66 9,66 18,66 27,65 36,64 46,63 55,61 64,60 73,57 81,55 90,52 99,49 107,46 115,43 124,39 132,35 140,30 147,25 155,21 163,16 170,11 177,5 183,0">
          <text:p/>
        </draw:polygon>
        <draw:polygon draw:style-name="gr63" draw:text-style-name="P24" draw:layer="layout" svg:width="0.201cm" svg:height="0.078cm" svg:x="10.752cm" svg:y="10.229cm" svg:viewBox="0 0 202 79" draw:points="202,0 199,3 192,9 185,15 177,21 170,26 162,31 154,36 146,41 137,45 129,49 120,54 112,58 103,61 94,64 85,67 76,70 67,72 57,74 48,75 39,77 29,78 20,78 11,79 0,79 0,73 10,73 20,72 29,71 38,70 47,69 56,67 65,66 74,63 83,61 92,58 101,55 109,52 118,48 126,44 134,40 143,35 151,31 158,26 166,21 174,16 181,10 188,4 193,0">
          <text:p/>
        </draw:polygon>
        <draw:polygon draw:style-name="gr63" draw:text-style-name="P24" draw:layer="layout" svg:width="0.211cm" svg:height="0.084cm" svg:x="10.752cm" svg:y="10.229cm" svg:viewBox="0 0 212 85" draw:points="212,0 211,1 204,8 196,14 189,20 181,27 173,32 165,38 157,43 149,47 140,52 131,56 123,60 114,64 105,67 96,70 87,73 77,76 68,78 58,80 48,81 39,83 29,84 19,85 10,85 0,85 0,79 10,79 19,78 28,78 38,77 47,75 56,74 67,72 76,70 85,67 94,64 103,61 112,58 120,54 129,50 137,46 146,42 154,37 162,32 170,27 177,21 185,15 192,9 199,3 202,0">
          <text:p/>
        </draw:polygon>
        <draw:polygon draw:style-name="gr64" draw:text-style-name="P25" draw:layer="layout" svg:width="0.22cm" svg:height="0.09cm" svg:x="10.752cm" svg:y="10.229cm" svg:viewBox="0 0 221 91" draw:points="221,0 215,6 208,12 200,19 193,25 185,31 177,36 169,42 160,47 152,52 143,56 134,61 125,65 116,68 107,72 98,75 87,79 78,82 68,84 59,86 49,88 39,89 30,90 20,91 10,91 0,91 0,85 10,85 19,85 29,84 39,83 48,81 58,80 67,78 76,75 86,72 96,69 105,66 114,63 123,59 131,55 140,51 149,46 157,42 165,37 173,31 181,26 189,20 196,14 204,8 211,1 212,0">
          <text:p/>
        </draw:polygon>
        <draw:polygon draw:style-name="gr64" draw:text-style-name="P25" draw:layer="layout" svg:width="0.228cm" svg:height="0.097cm" svg:x="10.752cm" svg:y="10.229cm" svg:viewBox="0 0 229 98" draw:points="229,0 226,3 219,10 212,17 204,24 196,30 188,36 180,42 172,47 163,52 155,57 146,62 137,66 128,70 118,74 109,78 100,81 90,84 80,87 70,89 60,92 50,94 40,95 30,96 20,97 10,98 0,98 0,90 10,90 20,90 30,89 39,88 49,87 59,85 68,83 78,81 88,78 98,75 107,72 116,68 125,65 134,61 143,56 152,52 160,47 169,42 177,36 185,31 193,25 200,19 208,12 215,6 221,0">
          <text:p/>
        </draw:polygon>
        <draw:polygon draw:style-name="gr64" draw:text-style-name="P25" draw:layer="layout" svg:width="0.237cm" svg:height="0.103cm" svg:x="10.752cm" svg:y="10.229cm" svg:viewBox="0 0 238 104" draw:points="238,0 231,8 224,15 215,23 207,29 199,36 191,42 183,48 174,53 166,59 157,64 148,69 138,73 129,77 120,81 110,85 101,88 91,91 81,94 71,96 61,98 51,100 41,101 31,102 21,103 10,104 0,104 0,98 10,98 20,97 30,96 40,95 50,94 60,92 70,90 79,88 89,85 99,82 108,79 117,75 127,71 136,67 145,63 154,58 162,53 171,48 179,43 187,37 195,31 203,25 211,17 218,10 226,3 229,0">
          <text:p/>
        </draw:polygon>
        <draw:polygon draw:style-name="gr65" draw:text-style-name="P26" draw:layer="layout" svg:width="0.245cm" svg:height="0.109cm" svg:x="10.752cm" svg:y="10.229cm" svg:viewBox="0 0 246 110" draw:points="246,0 243,5 235,12 228,19 220,26 212,33 204,40 196,46 187,52 179,58 170,63 161,68 150,73 141,78 132,82 122,87 112,91 102,94 93,97 83,100 72,102 62,104 52,106 42,108 31,109 21,110 11,110 0,110 0,104 10,104 21,103 31,102 41,101 51,100 61,98 71,96 81,94 91,91 101,88 110,84 120,80 129,76 138,72 148,68 158,63 167,58 175,52 184,47 192,41 200,35 208,28 216,22 224,15 231,8 238,0">
          <text:p/>
        </draw:polygon>
        <draw:polygon draw:style-name="gr66" draw:text-style-name="P27" draw:layer="layout" svg:width="0.255cm" svg:height="0.115cm" svg:x="10.752cm" svg:y="10.229cm" svg:viewBox="0 0 256 116" draw:points="256,0 254,1 247,9 240,17 232,24 224,31 216,38 208,45 199,51 191,57 182,63 173,69 164,75 154,80 145,84 135,89 125,93 115,96 105,100 95,103 85,106 75,108 64,110 54,112 43,114 33,115 22,116 12,116 0,116 0,110 12,110 22,110 32,109 43,108 53,106 63,104 73,102 84,100 94,97 103,94 113,91 123,87 133,83 142,79 151,74 161,69 170,63 179,58 187,52 196,46 204,40 212,33 220,26 228,19 235,12 243,5 246,0">
          <text:p/>
        </draw:polygon>
        <draw:polygon draw:style-name="gr66" draw:text-style-name="P27" draw:layer="layout" svg:width="0.262cm" svg:height="0.122cm" svg:x="10.752cm" svg:y="10.229cm" svg:viewBox="0 0 263 123" draw:points="263,0 259,5 252,13 244,21 236,29 228,36 220,43 212,50 203,56 194,62 185,68 176,74 167,79 157,84 147,89 138,93 128,98 118,101 107,105 97,108 87,111 75,113 65,116 54,118 43,120 32,121 22,122 11,122 0,123 0,115 11,115 21,115 32,114 42,113 53,111 63,109 74,107 85,105 95,102 105,99 115,95 125,92 135,88 145,83 154,79 164,74 173,68 182,63 191,57 199,51 208,45 216,38 224,31 232,24 240,17 247,9 254,1 255,0">
          <text:p/>
        </draw:polygon>
        <draw:polygon draw:style-name="gr67" draw:text-style-name="P28" draw:layer="layout" svg:width="0.27cm" svg:height="0.128cm" svg:x="10.752cm" svg:y="10.229cm" svg:viewBox="0 0 271 129" draw:points="271,0 271,1 264,9 256,18 249,25 241,33 233,40 224,48 216,55 207,61 198,67 189,73 178,79 169,85 159,90 149,95 139,99 129,103 119,107 108,111 98,114 87,117 76,119 66,123 55,125 44,126 33,127 22,128 11,129 0,129 0,123 11,121 22,121 32,120 43,119 54,117 65,116 75,113 86,111 96,108 106,105 117,101 127,98 137,93 146,89 156,84 166,79 175,74 185,68 194,62 203,56 212,50 220,43 228,36 236,29 244,21 252,13 259,5 263,0">
          <text:p/>
        </draw:polygon>
        <draw:polygon draw:style-name="gr68" draw:text-style-name="P29" draw:layer="layout" svg:width="0.278cm" svg:height="0.134cm" svg:x="10.752cm" svg:y="10.229cm" svg:viewBox="0 0 279 135" draw:points="279,0 276,5 268,14 261,22 253,30 245,38 237,45 227,52 218,59 209,66 200,73 191,80 181,86 172,91 162,96 152,101 142,106 131,110 121,114 110,118 100,121 89,124 78,127 67,129 56,131 45,132 34,134 23,134 11,135 0,135 0,129 11,129 22,128 33,127 44,126 55,125 66,123 76,120 87,118 98,115 108,112 119,108 129,104 139,100 149,96 159,91 169,86 178,80 188,73 197,67 206,61 215,55 223,48 233,40 241,33 249,25 256,18 264,9 271,1 271,0">
          <text:p/>
        </draw:polygon>
        <draw:polygon draw:style-name="gr68" draw:text-style-name="P29" draw:layer="layout" svg:width="0.286cm" svg:height="0.14cm" svg:x="10.752cm" svg:y="10.229cm" svg:viewBox="0 0 287 141" draw:points="287,0 280,9 273,18 265,26 256,34 248,42 240,50 231,57 222,65 213,72 204,79 194,85 185,91 175,97 165,102 154,107 144,112 134,116 123,120 112,124 101,127 90,130 79,133 68,135 57,137 46,139 34,140 23,141 12,141 0,141 0,135 11,135 23,134 34,134 45,132 56,131 67,129 78,127 89,124 100,121 110,118 121,114 131,110 142,106 152,101 162,96 172,91 181,86 191,80 200,74 209,67 218,59 227,52 236,45 244,38 252,30 261,22 268,14 276,5 279,0">
          <text:p/>
        </draw:polygon>
        <draw:polygon draw:style-name="gr69" draw:text-style-name="P30" draw:layer="layout" svg:width="0.294cm" svg:height="0.147cm" svg:x="10.752cm" svg:y="10.229cm" svg:viewBox="0 0 295 148" draw:points="295,0 292,4 285,13 278,22 270,30 262,39 253,47 245,55 235,62 226,70 217,77 207,84 198,90 188,96 178,102 167,107 157,113 147,117 136,122 125,126 114,130 103,133 92,136 81,139 69,141 58,143 46,145 35,146 23,147 12,147 0,148 0,141 12,141 23,141 34,140 46,139 57,137 68,135 79,133 90,130 101,127 112,124 123,120 134,116 144,112 154,107 165,102 175,97 185,91 194,85 204,79 213,72 222,65 231,57 241,50 249,42 257,34 265,26 273,18 280,9 287,0">
          <text:p/>
        </draw:polygon>
        <draw:polygon draw:style-name="gr70" draw:text-style-name="P31" draw:layer="layout" svg:width="0.302cm" svg:height="0.153cm" svg:x="10.752cm" svg:y="10.229cm" svg:viewBox="0 0 303 154" draw:points="303,0 297,8 290,17 282,26 274,36 266,44 258,52 249,60 240,68 230,75 220,82 211,89 201,96 191,102 181,108 170,113 160,118 149,123 138,128 127,132 116,136 105,139 93,142 82,145 70,147 59,149 47,151 35,152 24,153 12,154 0,154 0,148 12,147 23,147 35,146 46,145 58,143 69,141 81,139 92,136 103,133 114,130 125,126 136,122 147,117 157,113 167,107 178,102 188,96 198,90 207,84 217,77 226,70 236,63 245,56 253,48 262,40 270,30 278,22 285,13 292,4 295,0">
          <text:p/>
        </draw:polygon>
        <draw:polygon draw:style-name="gr71" draw:text-style-name="P32" draw:layer="layout" svg:width="0.31cm" svg:height="0.159cm" svg:x="10.752cm" svg:y="10.229cm" svg:viewBox="0 0 311 160" draw:points="311,0 309,2 302,12 295,21 287,30 279,39 271,48 262,56 253,64 244,72 235,79 225,86 214,93 204,100 194,106 184,112 173,118 162,124 151,129 140,133 129,138 118,141 106,145 95,148 83,151 72,153 60,155 48,157 36,158 24,159 12,160 0,160 0,154 12,154 24,153 35,152 47,151 59,149 70,147 82,145 93,142 105,139 116,136 127,132 138,128 149,123 160,117 170,112 181,107 191,101 201,95 211,88 221,81 231,74 240,67 249,59 258,51 266,43 274,35 282,26 290,17 297,8 303,0">
          <text:p/>
        </draw:polygon>
        <draw:polygon draw:style-name="gr72" draw:text-style-name="P33" draw:layer="layout" svg:width="0.317cm" svg:height="0.165cm" svg:x="10.752cm" svg:y="10.229cm" svg:viewBox="0 0 318 166" draw:points="318,0 314,6 307,15 300,25 292,34 283,43 275,52 266,60 257,69 248,77 239,85 229,92 219,99 209,106 198,112 188,118 176,124 165,130 154,135 143,139 131,143 120,147 108,151 96,154 85,157 73,160 61,162 49,163 37,165 24,166 12,166 0,166 0,160 12,160 24,159 36,158 48,157 60,155 72,153 83,151 95,148 106,145 118,141 129,138 140,133 151,129 162,124 173,119 184,113 195,107 205,101 215,94 225,87 235,79 244,72 253,64 262,56 271,48 279,39 287,30 295,21 302,12 309,2 311,0">
          <text:p/>
        </draw:polygon>
        <draw:polygon draw:style-name="gr73" draw:text-style-name="P34" draw:layer="layout" svg:width="0.325cm" svg:height="0.172cm" svg:x="10.752cm" svg:y="10.229cm" svg:viewBox="0 0 326 173" draw:points="326,0 320,9 312,19 304,29 296,38 288,47 279,56 271,65 261,73 252,81 242,89 232,96 222,104 212,110 201,118 191,124 180,130 169,135 157,140 146,145 134,149 123,153 111,157 98,160 86,163 74,166 62,168 49,170 37,171 25,172 13,172 0,173 0,166 12,166 24,166 37,165 49,163 61,162 73,160 85,157 96,154 109,151 121,147 132,143 144,139 155,135 166,130 177,124 188,118 198,111 209,105 219,98 229,91 239,84 248,77 257,69 266,60 275,52 283,43 292,34 300,25 307,15 314,6 318,0">
          <text:p/>
        </draw:polygon>
        <draw:polygon draw:style-name="gr73" draw:text-style-name="P34" draw:layer="layout" svg:width="0.332cm" svg:height="0.178cm" svg:x="10.752cm" svg:y="10.229cm" svg:viewBox="0 0 333 179" draw:points="333,0 332,3 325,13 317,23 309,33 301,42 293,52 284,61 275,70 266,78 256,86 246,94 236,102 226,109 215,116 205,122 194,129 183,135 171,141 160,146 148,151 137,155 125,159 113,163 101,166 88,169 76,172 64,174 51,176 39,177 25,178 13,179 0,179 0,173 13,172 25,172 37,171 50,170 63,168 75,166 87,163 99,160 111,157 123,153 134,149 146,145 157,140 169,135 180,130 191,123 201,117 212,110 222,104 232,96 242,89 252,81 261,73 271,65 279,56 288,47 296,38 304,29 312,19 320,9 326,0">
          <text:p/>
        </draw:polygon>
        <draw:polygon draw:style-name="gr74" draw:text-style-name="P35" draw:layer="layout" svg:width="0.34cm" svg:height="0.184cm" svg:x="10.752cm" svg:y="10.229cm" svg:viewBox="0 0 341 185" draw:points="341,0 337,6 330,17 322,27 314,37 306,47 297,56 288,65 279,74 270,83 259,91 249,99 239,107 228,115 218,122 207,129 196,135 185,141 173,146 161,152 150,157 138,161 126,165 113,169 101,172 89,175 76,178 64,180 51,182 38,183 26,184 13,185 0,185 0,179 13,179 25,178 38,177 50,176 63,174 75,172 87,169 100,166 112,163 124,159 136,155 147,151 159,146 170,141 182,135 193,129 204,123 214,117 225,109 235,102 245,94 255,86 265,78 275,70 284,61 293,52 301,42 309,33 317,23 325,13 332,3 333,0">
          <text:p/>
        </draw:polygon>
        <draw:polygon draw:style-name="gr75" draw:text-style-name="P36" draw:layer="layout" svg:width="0.355cm" svg:height="0.197cm" svg:x="10.752cm" svg:y="10.229cm" svg:viewBox="0 0 356 198" draw:points="356,0 355,2 347,13 340,24 332,35 324,45 315,55 306,66 297,75 288,84 278,93 268,102 258,110 247,118 236,125 225,132 214,139 203,146 191,152 179,158 167,163 155,168 143,173 130,177 118,181 105,184 92,188 80,190 67,192 54,194 40,196 26,197 13,197 0,198 0,185 13,185 26,184 38,183 52,182 65,180 77,178 90,175 102,172 114,169 127,165 139,161 151,157 162,152 174,146 186,141 197,135 208,129 219,122 229,115 240,108 250,100 260,92 270,84 279,75 288,66 297,56 306,47 314,37 322,27 330,17 337,6 341,0">
          <text:p/>
        </draw:polygon>
        <draw:polygon draw:style-name="gr76" draw:text-style-name="P37" draw:layer="layout" svg:width="0.369cm" svg:height="0.209cm" svg:x="10.752cm" svg:y="10.229cm" svg:viewBox="0 0 370 210" draw:points="370,0 365,9 358,20 350,31 342,42 333,53 324,63 315,74 306,84 296,93 286,102 276,111 265,120 255,128 243,136 232,143 221,150 209,157 197,163 185,169 172,175 160,180 147,185 133,189 120,193 107,197 94,200 81,202 68,205 54,207 41,208 27,209 14,210 0,210 0,198 13,197 26,197 40,196 53,194 66,192 79,190 91,188 104,184 117,181 129,177 143,173 155,168 167,163 179,158 191,152 203,146 214,139 225,132 236,125 247,118 258,110 268,102 278,93 288,84 297,75 306,65 315,55 324,45 332,35 340,24 347,13 355,2 356,0">
          <text:p/>
        </draw:polygon>
        <draw:polygon draw:style-name="gr77" draw:text-style-name="P38" draw:layer="layout" svg:width="0.384cm" svg:height="0.222cm" svg:x="10.752cm" svg:y="10.229cm" svg:viewBox="0 0 385 223" draw:points="385,0 383,4 376,16 368,27 360,39 352,51 343,62 334,72 324,83 315,93 305,102 294,112 284,121 273,130 262,138 250,146 239,154 227,161 215,168 203,174 190,180 177,186 163,191 150,196 137,201 124,205 110,209 97,212 83,215 70,217 56,219 42,221 28,222 14,222 0,223 0,210 14,210 27,209 41,208 54,207 68,205 81,202 94,200 107,197 120,193 133,189 146,185 159,180 172,175 185,169 197,163 209,157 221,150 232,143 243,136 255,128 265,120 276,111 286,102 296,93 306,84 315,74 324,64 333,54 342,42 350,31 358,20 365,9 370,0">
          <text:p/>
        </draw:polygon>
        <draw:polygon draw:style-name="gr77" draw:text-style-name="P38" draw:layer="layout" svg:width="0.398cm" svg:height="0.234cm" svg:x="10.752cm" svg:y="10.229cm" svg:viewBox="0 0 399 235" draw:points="399,0 394,10 386,22 378,34 370,46 361,58 353,69 343,80 334,90 324,101 313,111 303,120 292,129 281,138 269,148 257,156 246,164 233,172 221,179 208,185 195,192 181,198 168,203 155,208 141,213 127,217 114,221 100,224 86,227 72,229 57,232 43,233 29,234 14,235 0,235 0,223 14,222 28,222 42,221 56,219 70,217 83,215 97,212 110,209 124,205 137,201 150,196 163,191 176,186 189,180 203,174 215,168 227,161 239,154 250,146 262,137 273,129 284,120 294,111 305,101 315,92 324,82 334,71 343,61 352,50 360,39 368,27 376,16 383,4 385,0">
          <text:p/>
        </draw:polygon>
        <draw:polygon draw:style-name="gr78" draw:text-style-name="P39" draw:layer="layout" svg:width="0.413cm" svg:height="0.247cm" svg:x="10.752cm" svg:y="10.229cm" svg:viewBox="0 0 414 248" draw:points="414,0 412,4 404,17 397,29 389,41 380,53 371,65 362,77 353,88 343,99 332,109 322,120 311,130 300,139 288,148 277,157 265,166 252,174 240,181 227,189 214,196 201,202 187,208 174,214 159,219 145,224 131,229 117,233 102,236 88,239 73,242 59,244 44,246 30,247 15,247 0,248 0,235 14,235 29,234 43,233 57,232 72,229 86,227 100,223 114,220 127,216 141,212 155,207 169,202 182,197 195,191 208,184 221,178 233,171 246,163 257,155 269,147 281,138 292,129 303,120 313,111 324,101 334,90 343,80 353,69 361,58 370,46 378,34 386,22 394,10 399,0">
          <text:p/>
        </draw:polygon>
        <draw:polygon draw:style-name="gr79" draw:text-style-name="P40" draw:layer="layout" svg:width="0.427cm" svg:height="0.259cm" svg:x="10.752cm" svg:y="10.229cm" svg:viewBox="0 0 428 260" draw:points="428,0 423,10 415,23 407,36 399,48 390,61 381,73 372,85 362,96 352,107 341,118 330,129 319,139 308,149 296,158 284,167 272,176 259,184 246,192 233,200 220,207 206,213 192,221 178,226 164,232 150,237 135,241 121,245 105,249 90,252 75,254 60,256 45,258 30,259 15,260 0,260 0,248 15,247 30,247 44,246 59,244 73,242 88,239 102,236 118,233 132,229 146,225 160,219 174,214 187,208 201,202 214,196 227,189 240,181 252,174 265,166 277,157 288,148 300,139 311,130 322,120 332,109 343,99 353,88 362,77 371,65 380,53 389,41 397,29 404,17 412,4 414,0">
          <text:p/>
        </draw:polygon>
        <draw:polygon draw:style-name="gr79" draw:text-style-name="P40" draw:layer="layout" svg:width="0.441cm" svg:height="0.272cm" svg:x="10.752cm" svg:y="10.229cm" svg:viewBox="0 0 442 273" draw:points="442,0 441,2 434,16 426,29 418,43 409,55 400,68 391,81 381,93 371,104 361,116 350,127 339,138 328,148 316,158 304,168 291,177 279,186 266,195 252,203 239,212 225,219 211,226 197,232 183,238 168,243 154,248 139,253 124,257 109,261 94,264 78,267 63,269 48,270 32,272 16,272 0,273 0,260 15,260 31,259 46,258 61,256 76,254 91,252 106,249 121,245 135,241 150,237 164,232 178,226 192,221 206,214 220,208 233,200 246,192 259,184 272,176 284,167 296,158 308,149 319,139 330,129 341,118 352,107 362,96 372,85 381,73 390,61 399,48 407,36 415,23 423,10 428,0">
          <text:p/>
        </draw:polygon>
        <draw:polygon draw:style-name="gr80" draw:text-style-name="P41" draw:layer="layout" svg:width="0.455cm" svg:height="0.284cm" svg:x="10.752cm" svg:y="10.229cm" svg:viewBox="0 0 456 285" draw:points="456,0 452,8 445,22 437,36 428,49 420,63 411,76 401,88 391,102 381,114 369,125 358,137 347,148 335,159 323,169 310,179 298,188 285,198 271,206 258,215 244,222 230,230 216,237 201,243 186,250 172,255 157,260 141,265 126,269 111,273 95,276 79,279 64,281 48,283 32,284 16,285 0,285 0,273 16,272 31,272 47,270 62,269 77,267 93,264 108,261 123,257 138,253 153,248 167,243 182,238 196,232 210,226 224,219 238,212 251,204 265,196 278,187 290,178 303,169 315,159 327,149 338,139 349,128 360,117 370,105 381,93 391,81 400,68 409,55 418,43 426,29 434,16 441,2 442,0">
          <text:p/>
        </draw:polygon>
        <draw:polygon draw:style-name="gr81" draw:text-style-name="P42" draw:layer="layout" svg:width="0.469cm" svg:height="0.297cm" svg:x="10.752cm" svg:y="10.229cm" svg:viewBox="0 0 470 298" draw:points="470,0 463,13 456,28 447,42 439,56 430,70 421,83 411,96 401,109 390,121 379,133 368,145 356,156 344,167 332,178 319,188 306,198 293,207 279,216 265,224 251,232 236,240 221,247 206,254 191,260 176,266 160,271 145,276 129,281 113,285 97,288 81,291 65,293 49,295 33,297 16,297 0,298 0,285 16,285 32,284 48,283 64,281 79,278 95,275 111,272 126,268 141,264 157,259 172,254 186,249 201,242 216,236 230,229 244,221 259,214 272,205 286,197 299,187 311,178 324,168 336,158 348,147 359,136 370,124 381,113 391,101 401,88 411,76 420,63 428,49 437,36 445,22 452,8 456,0">
          <text:p/>
        </draw:polygon>
        <draw:polygon draw:style-name="gr82" draw:text-style-name="P43" draw:layer="layout" svg:width="0.482cm" svg:height="0.309cm" svg:x="10.752cm" svg:y="10.229cm" svg:viewBox="0 0 483 310" draw:points="483,0 482,4 474,19 466,34 458,48 449,63 440,77 431,91 421,105 410,118 399,130 388,143 377,155 365,166 352,177 340,188 327,199 313,209 300,218 286,227 271,236 257,244 242,252 227,260 212,266 197,273 181,279 165,284 149,289 133,293 117,297 101,301 83,304 67,306 50,308 34,309 17,310 0,310 0,298 16,297 33,297 49,295 65,293 81,291 98,288 114,285 130,281 146,277 161,272 177,267 192,261 207,255 222,248 237,241 251,233 265,225 279,217 293,208 306,199 319,189 332,179 344,168 356,157 368,146 379,134 390,122 401,110 411,97 421,83 430,70 439,56 447,42 456,28 463,13 470,0">
          <text:p/>
        </draw:polygon>
        <draw:polygon draw:style-name="gr83" draw:text-style-name="P44" draw:layer="layout" svg:width="0.496cm" svg:height="0.322cm" svg:x="10.752cm" svg:y="10.229cm" svg:viewBox="0 0 497 323" draw:points="497,0 493,9 485,25 477,40 469,55 460,69 451,84 441,98 431,111 420,125 409,137 397,150 384,162 372,174 360,186 347,197 333,209 320,219 306,229 291,238 277,247 262,255 247,263 232,271 216,278 200,284 184,290 168,296 152,301 135,305 119,309 102,313 85,316 68,318 51,320 34,321 17,322 0,323 0,310 17,310 34,309 50,308 67,306 83,304 100,301 116,297 132,293 148,289 164,284 180,279 196,273 211,266 226,260 241,252 256,244 270,236 285,227 299,218 312,209 326,198 339,187 351,176 364,165 376,154 388,142 399,129 410,117 421,104 431,90 440,77 449,63 458,48 466,34 474,19 482,4 483,0">
          <text:p/>
        </draw:polygon>
        <draw:polygon draw:style-name="gr84" draw:text-style-name="P45" draw:layer="layout" svg:width="0.51cm" svg:height="0.334cm" svg:x="10.752cm" svg:y="10.229cm" svg:viewBox="0 0 511 335" draw:points="511,0 504,15 497,30 488,46 480,61 471,76 461,91 451,105 440,119 430,132 418,146 406,159 394,171 382,183 369,195 356,206 342,217 328,228 314,238 299,248 284,257 269,266 254,274 238,282 222,289 206,296 188,302 172,308 155,313 138,318 121,322 104,325 87,328 70,331 52,333 35,334 18,335 0,335 0,323 17,322 34,321 51,320 68,318 85,316 102,313 119,309 135,305 152,301 168,296 184,290 201,284 217,278 233,271 248,263 263,254 278,246 292,237 307,228 321,218 334,208 348,197 361,186 373,174 385,162 397,150 409,137 420,125 431,111 441,98 451,84 460,69 469,55 477,40 485,25 493,9 497,0">
          <text:p/>
        </draw:polygon>
        <draw:polygon draw:style-name="gr85" draw:text-style-name="P46" draw:layer="layout" svg:width="0.523cm" svg:height="0.347cm" svg:x="10.752cm" svg:y="10.229cm" svg:viewBox="0 0 524 348" draw:points="524,0 523,4 516,20 508,36 499,52 489,67 480,83 470,98 460,112 449,127 438,140 427,154 415,167 402,180 389,192 376,204 363,216 349,227 334,238 320,248 305,258 290,267 274,276 258,285 242,292 226,300 209,307 193,313 176,319 159,325 142,330 124,334 107,337 89,341 71,343 54,345 36,346 18,347 0,348 0,335 18,335 35,334 52,333 70,331 87,328 104,325 121,321 138,317 155,312 172,307 188,301 205,295 221,288 237,281 253,273 268,265 283,257 298,248 313,238 327,228 341,217 355,206 368,195 381,183 393,171 405,159 417,146 429,132 439,119 450,105 460,91 470,76 479,61 487,46 497,30 504,15 511,0">
          <text:p/>
        </draw:polygon>
        <draw:polygon draw:style-name="gr86" draw:text-style-name="P47" draw:layer="layout" svg:width="0.537cm" svg:height="0.359cm" svg:x="10.752cm" svg:y="10.229cm" svg:viewBox="0 0 538 360" draw:points="538,0 534,9 527,25 519,42 510,58 501,74 492,89 482,105 471,120 460,134 449,148 437,162 425,176 412,189 399,202 385,214 371,226 357,237 343,248 328,259 312,269 297,278 281,287 265,296 249,304 231,311 214,318 197,325 180,331 162,337 145,342 127,346 109,350 91,353 73,355 55,357 37,359 18,360 0,360 0,348 18,347 36,346 54,345 71,343 89,341 107,337 124,334 142,329 159,324 176,319 193,313 209,307 226,300 243,292 259,285 275,276 291,267 306,258 321,248 335,238 350,227 364,216 377,204 390,192 403,180 416,167 428,154 439,140 450,127 461,112 471,98 481,83 490,67 499,52 508,36 516,20 523,4 524,0">
          <text:p/>
        </draw:polygon>
        <draw:polygon draw:style-name="gr87" draw:text-style-name="P48" draw:layer="layout" svg:width="0.55cm" svg:height="0.372cm" svg:x="10.752cm" svg:y="10.229cm" svg:viewBox="0 0 551 373" draw:points="551,0 546,14 538,31 530,48 520,64 511,80 501,96 491,112 480,127 469,142 457,156 445,171 433,184 420,198 406,211 393,223 378,235 364,247 349,258 334,269 318,279 302,289 286,298 270,307 253,315 236,323 219,330 201,336 184,342 166,349 148,354 130,358 111,362 93,365 75,368 56,370 37,371 19,372 0,373 0,360 18,360 37,359 55,357 73,355 91,353 109,350 127,346 145,341 162,336 180,331 197,325 214,318 231,311 248,304 264,296 280,287 296,278 311,269 327,259 342,248 356,237 370,226 384,214 398,202 411,189 424,176 436,162 448,148 459,134 470,120 481,105 491,89 500,74 509,58 518,42 527,25 534,9 538,0">
          <text:p/>
        </draw:polygon>
        <draw:polygon draw:style-name="gr87" draw:text-style-name="P48" draw:layer="layout" svg:width="0.564cm" svg:height="0.384cm" svg:x="10.752cm" svg:y="10.229cm" svg:viewBox="0 0 565 385" draw:points="565,0 565,1 557,19 549,36 541,53 532,70 523,87 513,103 502,119 491,134 480,149 468,164 456,179 443,193 430,207 416,220 402,233 387,245 373,257 357,268 342,279 326,290 310,300 293,310 276,319 259,327 242,335 223,342 205,349 187,355 169,361 151,366 132,370 114,374 95,378 76,380 57,382 38,384 19,385 0,385 0,373 19,372 37,371 56,370 75,368 93,365 111,362 130,358 148,354 166,349 184,343 201,337 219,331 237,324 254,316 271,308 287,298 303,289 319,279 335,269 350,258 365,247 379,235 394,223 407,211 421,198 434,184 446,171 458,156 470,142 481,127 492,112 502,96 512,80 521,64 530,48 538,31 546,14 551,0">
          <text:p/>
        </draw:polygon>
        <draw:polygon draw:style-name="gr88" draw:text-style-name="P49" draw:layer="layout" svg:width="0.577cm" svg:height="0.397cm" svg:x="10.752cm" svg:y="10.229cm" svg:viewBox="0 0 578 398" draw:points="578,0 576,6 569,24 561,41 552,59 543,76 533,93 523,109 513,126 501,142 489,157 477,172 464,187 451,201 437,215 424,229 409,242 394,255 379,268 364,279 348,291 332,301 315,311 298,321 281,330 263,339 246,347 228,354 210,361 191,367 173,373 154,378 135,383 116,387 97,390 78,393 58,395 39,396 20,397 0,398 0,385 19,385 38,384 57,382 76,380 95,378 114,374 132,370 151,366 169,361 187,355 205,349 223,342 241,335 258,327 275,319 292,310 309,301 325,291 341,280 356,269 372,257 386,245 401,233 415,220 429,207 442,193 455,179 467,164 479,149 490,134 502,119 513,103 523,87 532,70 541,53 549,36 557,19 565,1 565,0">
          <text:p/>
        </draw:polygon>
        <draw:polygon draw:style-name="gr89" draw:text-style-name="P50" draw:layer="layout" svg:width="0.591cm" svg:height="0.409cm" svg:x="10.752cm" svg:y="10.229cm" svg:viewBox="0 0 592 410" draw:points="592,0 588,10 580,29 572,47 563,65 554,82 544,99 534,116 523,133 512,149 500,165 487,181 474,196 461,211 447,225 433,239 418,252 403,265 388,278 372,290 356,301 339,312 322,322 305,332 288,341 270,350 252,358 233,366 215,373 196,379 177,385 157,390 138,395 118,399 99,402 79,405 60,407 40,409 20,410 0,410 0,398 20,397 39,396 58,395 78,393 97,390 116,387 135,383 154,378 174,373 192,367 211,361 229,354 247,347 264,339 282,330 299,321 316,311 333,301 349,291 365,279 380,268 395,256 410,243 425,230 438,216 452,202 465,188 478,172 490,157 501,142 513,126 523,109 533,93 543,76 552,59 561,41 569,24 576,6 578,0">
          <text:p/>
        </draw:polygon>
        <draw:polygon draw:style-name="gr89" draw:text-style-name="P50" draw:layer="layout" svg:width="0.604cm" svg:height="0.422cm" svg:x="10.752cm" svg:y="10.229cm" svg:viewBox="0 0 605 423" draw:points="605,0 599,15 592,34 583,52 574,70 565,89 555,107 544,124 533,141 522,157 510,173 497,189 484,205 470,220 456,234 442,248 427,262 411,275 395,287 378,300 362,311 345,322 328,333 310,343 292,352 274,361 256,370 237,377 218,384 199,391 180,397 160,402 141,407 121,411 101,415 81,417 61,420 41,421 20,422 0,423 0,410 20,410 40,409 60,407 79,405 99,402 118,399 138,395 157,390 176,385 195,379 214,373 232,366 251,358 269,350 287,341 304,332 321,322 338,312 355,301 371,290 387,278 402,265 418,252 433,239 447,225 461,211 474,196 487,181 500,166 512,150 523,134 534,117 544,100 554,82 563,65 572,47 580,29 588,10 592,0">
          <text:p/>
        </draw:polygon>
        <draw:polygon draw:style-name="gr90" draw:text-style-name="P51" draw:layer="layout" svg:width="0.617cm" svg:height="0.434cm" svg:x="10.752cm" svg:y="10.229cm" svg:viewBox="0 0 618 435" draw:points="618,0 611,20 603,39 595,57 586,76 576,94 566,112 555,130 544,147 532,164 519,180 507,196 493,212 479,227 465,242 450,256 435,270 419,283 403,296 387,309 370,321 353,332 335,343 317,353 299,363 280,372 262,381 243,389 223,396 204,403 184,409 164,414 144,419 124,423 104,427 83,430 63,432 41,434 21,435 0,435 0,423 20,422 41,421 62,420 82,417 102,415 122,411 142,407 161,402 181,397 200,391 219,384 238,376 257,369 275,360 293,351 311,342 329,332 346,321 363,310 379,299 396,286 411,274 427,261 442,247 456,233 470,219 484,204 497,188 510,172 522,156 533,140 544,123 555,106 565,88 574,70 583,52 592,34 599,15 605,0">
          <text:p/>
        </draw:polygon>
        <draw:polygon draw:style-name="gr91" draw:text-style-name="P52" draw:layer="layout" svg:width="0.63cm" svg:height="0.445cm" svg:x="10.752cm" svg:y="10.229cm" svg:viewBox="0 0 631 446" draw:points="631,0 630,5 623,24 615,44 606,63 597,82 587,100 576,118 566,136 554,154 542,171 529,188 516,204 503,221 488,237 474,252 459,266 443,280 427,294 411,307 394,320 377,332 359,343 341,354 323,365 305,375 286,384 266,393 246,401 227,408 207,415 187,421 166,426 146,431 125,436 105,439 84,442 63,445 46,446 0,446 0,435 21,435 41,434 62,432 82,430 103,427 123,423 143,419 163,414 183,409 203,403 222,396 242,389 261,381 280,373 299,364 317,354 335,344 353,333 370,322 387,310 403,297 419,284 435,271 450,257 465,243 479,228 493,213 507,196 519,180 532,164 544,147 555,130 566,112 576,94 586,76 595,57 603,39 611,20 618,0">
          <text:p/>
        </draw:polygon>
        <draw:polygon draw:style-name="gr92" draw:text-style-name="P53" draw:layer="layout" svg:width="0.598cm" svg:height="0.445cm" svg:x="10.798cm" svg:y="10.229cm" svg:viewBox="0 0 599 446" draw:points="599,0 596,9 588,29 580,49 571,68 562,87 552,106 541,125 530,143 518,161 506,178 493,195 480,213 466,229 452,245 437,261 421,275 405,290 389,304 372,317 355,330 338,342 320,354 302,365 283,376 264,386 244,395 225,404 205,412 185,420 165,427 144,433 123,439 103,444 92,446 0,446 17,445 38,442 59,439 79,436 100,431 120,426 141,421 161,415 181,408 200,401 220,393 239,384 259,375 277,365 295,354 313,343 331,332 348,320 365,307 381,294 397,280 413,266 428,252 442,237 457,221 470,204 483,188 496,171 508,154 520,136 530,118 541,100 551,82 560,63 569,44 577,24 584,5 585,0">
          <text:p/>
        </draw:polygon>
        <draw:polygon draw:style-name="gr93" draw:text-style-name="P54" draw:layer="layout" svg:width="0.519cm" svg:height="0.445cm" svg:x="10.89cm" svg:y="10.229cm" svg:viewBox="0 0 520 446" draw:points="520,0 516,13 508,33 500,53 491,73 481,93 471,112 460,131 449,150 437,168 424,186 411,203 397,221 383,238 369,254 353,269 338,285 322,299 305,313 288,327 271,340 252,353 234,365 215,376 196,387 177,397 157,406 138,415 117,424 97,431 76,439 56,445 52,446 0,446 11,444 31,439 52,433 73,427 93,420 113,412 133,404 152,395 171,386 190,376 209,365 227,354 245,342 262,330 280,317 297,304 313,290 329,275 345,261 360,245 374,229 388,213 401,195 414,178 426,161 438,143 449,125 460,106 470,87 479,68 488,49 496,29 504,9 507,0">
          <text:p/>
        </draw:polygon>
        <draw:polygon draw:style-name="gr94" draw:text-style-name="P55" draw:layer="layout" svg:width="0.48cm" svg:height="0.445cm" svg:x="10.942cm" svg:y="10.229cm" svg:viewBox="0 0 481 446" draw:points="481,0 475,17 467,38 459,58 450,79 440,99 430,118 419,137 407,156 395,175 382,193 369,212 355,229 341,246 326,262 309,278 293,294 277,309 260,323 243,337 225,350 207,363 188,375 169,387 150,398 131,408 111,418 91,427 70,435 49,443 42,446 0,446 4,445 24,439 45,431 65,424 86,415 105,406 125,397 144,387 163,376 182,365 200,353 218,340 235,327 252,313 269,299 285,285 300,269 317,254 331,238 345,221 359,203 372,186 385,168 397,150 408,131 419,112 429,93 439,73 448,53 456,33 464,13 468,0">
          <text:p/>
        </draw:polygon>
        <draw:polygon draw:style-name="gr95" draw:text-style-name="P56" draw:layer="layout" svg:width="0.451cm" svg:height="0.445cm" svg:x="10.984cm" svg:y="10.229cm" svg:viewBox="0 0 452 446" draw:points="452,0 445,21 437,43 428,63 419,84 409,104 399,124 387,144 376,163 363,182 350,200 337,219 323,237 308,254 293,271 277,287 261,303 244,318 227,333 209,347 191,360 173,373 154,386 135,397 115,409 95,419 75,429 53,438 35,446 0,446 7,443 28,435 49,427 70,418 90,408 109,398 128,387 147,375 166,363 184,350 202,337 219,323 236,309 252,294 268,278 284,262 299,246 313,229 327,212 340,193 353,175 365,156 377,137 388,118 398,99 408,79 417,58 425,38 433,17 439,0">
          <text:p/>
        </draw:polygon>
        <draw:polygon draw:style-name="gr96" draw:text-style-name="P57" draw:layer="layout" svg:width="0.429cm" svg:height="0.445cm" svg:x="11.019cm" svg:y="10.229cm" svg:viewBox="0 0 430 446" draw:points="430,0 429,4 422,26 414,47 405,68 395,89 385,110 375,130 363,150 351,170 339,189 325,209 311,227 296,245 281,262 266,279 250,296 233,312 216,327 199,342 181,357 163,370 144,384 125,396 105,408 85,420 65,430 44,440 32,446 0,446 18,438 39,429 59,419 79,409 99,397 118,386 137,373 155,360 173,347 191,333 208,318 225,303 241,287 257,271 272,254 287,237 301,219 314,200 328,182 341,163 352,144 364,124 374,104 384,84 393,63 402,43 410,21 417,0">
          <text:p/>
        </draw:polygon>
        <draw:polygon draw:style-name="gr97" draw:text-style-name="P58" draw:layer="layout" svg:width="0.41cm" svg:height="0.445cm" svg:x="11.051cm" svg:y="10.229cm" svg:viewBox="0 0 411 446" draw:points="411,0 409,8 402,30 393,52 384,73 375,95 364,116 354,136 342,156 330,176 317,196 304,216 290,235 275,253 260,271 244,288 228,305 210,321 193,337 175,352 157,366 138,380 119,394 99,407 80,419 59,431 39,441 30,446 0,446 12,440 33,430 53,420 73,408 93,396 112,384 131,370 149,357 167,342 184,327 201,312 218,296 235,279 250,262 265,245 280,227 293,209 307,189 319,170 331,150 343,130 353,110 363,89 373,68 382,47 390,26 397,4 398,0">
          <text:p/>
        </draw:polygon>
        <draw:polygon draw:style-name="gr98" draw:text-style-name="P59" draw:layer="layout" svg:width="0.393cm" svg:height="0.445cm" svg:x="11.081cm" svg:y="10.229cm" svg:viewBox="0 0 394 446" draw:points="394,0 391,12 383,34 375,56 366,78 356,100 346,121 335,142 323,163 310,183 297,203 284,223 269,242 255,261 239,279 223,297 207,314 190,330 172,346 154,361 135,376 115,391 96,404 76,417 56,430 35,441 27,446 0,446 9,441 29,431 50,419 69,407 89,394 108,380 128,366 146,352 164,337 181,321 198,305 214,288 230,271 245,253 260,235 274,216 287,196 300,176 312,156 324,136 334,116 345,95 354,73 363,52 372,30 379,8 381,0">
          <text:p/>
        </draw:polygon>
        <draw:polygon draw:style-name="gr99" draw:text-style-name="P60" draw:layer="layout" svg:width="0.38cm" svg:height="0.445cm" svg:x="11.108cm" svg:y="10.229cm" svg:viewBox="0 0 381 446" draw:points="381,0 376,16 368,38 360,61 350,83 340,105 330,127 318,148 307,169 294,190 281,211 267,231 252,250 237,269 222,287 205,305 188,322 171,339 153,355 135,371 116,386 97,401 77,415 56,428 35,440 26,446 0,446 8,441 29,430 49,417 69,404 89,391 108,376 127,361 145,346 163,330 180,314 196,297 212,279 228,261 242,242 257,223 270,203 283,183 296,163 308,142 319,121 329,100 339,78 348,56 356,34 364,12 367,0">
          <text:p/>
        </draw:polygon>
        <draw:polygon draw:style-name="gr100" draw:text-style-name="P61" draw:layer="layout" svg:width="0.367cm" svg:height="0.445cm" svg:x="11.134cm" svg:y="10.229cm" svg:viewBox="0 0 368 446" draw:points="368,0 362,19 354,43 345,66 336,88 326,111 315,133 303,154 291,176 278,196 265,218 251,238 236,258 221,277 205,295 188,314 171,331 154,348 136,365 117,381 98,396 78,411 58,425 38,438 24,446 0,446 9,440 31,428 51,415 71,401 90,386 109,371 127,355 145,339 162,322 179,305 196,287 211,269 226,250 241,231 255,211 268,190 281,169 292,148 304,127 314,105 324,83 334,61 342,38 350,16 355,0">
          <text:p/>
        </draw:polygon>
        <draw:polygon draw:style-name="gr101" draw:text-style-name="P62" draw:layer="layout" svg:width="0.356cm" svg:height="0.445cm" svg:x="11.158cm" svg:y="10.229cm" svg:viewBox="0 0 357 446" draw:points="357,0 350,23 342,47 333,70 323,93 313,116 302,138 290,160 278,182 265,203 251,225 237,245 222,265 206,285 190,304 173,322 156,340 138,357 120,374 101,390 81,406 61,421 41,435 24,446 0,446 13,438 34,425 54,411 74,396 93,381 112,365 130,348 147,331 164,314 181,295 197,277 212,258 227,238 241,218 254,196 267,176 279,154 291,133 302,111 312,88 321,66 330,43 338,19 344,0">
          <text:p/>
        </draw:polygon>
        <draw:polygon draw:style-name="gr102" draw:text-style-name="P63" draw:layer="layout" svg:width="0.345cm" svg:height="0.445cm" svg:x="11.182cm" svg:y="10.229cm" svg:viewBox="0 0 346 446" draw:points="346,0 345,3 337,27 328,51 319,75 310,98 299,121 288,144 276,166 264,188 251,211 237,232 222,253 207,273 191,293 175,312 158,331 140,349 122,367 103,384 84,400 64,416 44,431 23,446 0,446 16,435 36,421 56,406 76,390 95,374 113,357 131,340 148,322 165,304 181,285 197,265 212,245 226,225 240,203 253,182 265,160 277,138 288,116 298,93 308,70 317,47 325,23 332,0">
          <text:p/>
        </draw:polygon>
        <draw:polygon draw:style-name="gr103" draw:text-style-name="P64" draw:layer="layout" svg:width="0.341cm" svg:height="0.445cm" svg:x="11.205cm" svg:y="10.229cm" svg:viewBox="0 0 342 446" draw:points="342,0 340,8 332,33 324,57 315,82 305,106 294,129 283,152 271,175 258,198 244,221 230,243 214,264 199,284 182,305 166,324 148,344 130,362 112,380 92,398 73,414 53,431 32,446 0,446 21,431 41,416 61,400 80,384 99,367 117,349 135,331 152,312 168,293 184,273 199,253 214,232 229,211 242,188 254,166 266,144 277,121 288,98 297,75 306,51 315,27 322,3 323,0">
          <text:p/>
        </draw:polygon>
        <draw:polygon draw:style-name="gr104" draw:text-style-name="P65" draw:layer="layout" svg:width="0.329cm" svg:height="0.445cm" svg:x="11.237cm" svg:y="10.229cm" svg:viewBox="0 0 330 446" draw:points="330,0 326,13 318,39 310,64 300,89 290,113 279,137 268,161 255,184 242,208 228,231 214,253 198,275 183,296 166,317 149,337 131,356 112,375 93,394 73,412 53,429 32,445 31,446 0,446 21,431 41,414 60,398 81,380 99,362 117,344 135,324 151,305 168,284 183,264 198,243 212,221 226,198 239,175 251,152 262,129 273,106 283,82 292,57 300,33 308,8 310,0">
          <text:p/>
        </draw:polygon>
        <draw:polygon draw:style-name="gr105" draw:text-style-name="P66" draw:layer="layout" svg:width="0.317cm" svg:height="0.445cm" svg:x="11.268cm" svg:y="10.229cm" svg:viewBox="0 0 318 446" draw:points="318,0 313,19 305,44 296,70 287,95 276,120 264,145 252,169 240,193 226,218 212,241 197,264 182,286 165,307 148,329 131,349 113,369 94,389 74,407 54,426 34,443 30,446 0,446 1,445 22,429 42,412 61,394 80,375 99,356 117,337 134,317 151,296 166,275 182,253 196,231 210,208 223,184 236,161 247,137 258,113 269,89 279,64 287,39 295,13 299,0">
          <text:p/>
        </draw:polygon>
        <draw:polygon draw:style-name="gr106" draw:text-style-name="P67" draw:layer="layout" svg:width="0.306cm" svg:height="0.445cm" svg:x="11.298cm" svg:y="10.229cm" svg:viewBox="0 0 307 446" draw:points="307,0 301,24 293,50 284,76 274,102 264,128 252,153 240,178 227,202 213,227 199,251 184,274 168,297 151,319 133,341 115,362 96,382 77,402 57,421 37,440 30,446 0,446 4,443 24,426 44,407 64,389 83,369 101,349 118,329 135,307 153,286 168,264 183,241 197,218 211,193 223,169 235,145 246,120 257,95 266,70 275,44 283,19 288,0">
          <text:p/>
        </draw:polygon>
        <draw:path draw:style-name="gr107" draw:text-style-name="P68" draw:layer="layout" svg:width="0.323cm" svg:height="0.667cm" svg:x="11.328cm" svg:y="10.007cm" svg:viewBox="0 0 324 668" svg:d="M297 222l-1 2-7 27-8 27-9 27-10 27-11 26-12 26-12 25-14 25-14 25-14 24-16 24-16 23-18 22-18 22-18 22-19 21-20 20-20 20-12 11h-28l7-6 20-19 20-19 19-20 19-20 18-21 17-22 17-22 17-23 15-23 14-24 14-24 13-24 12-25 12-25 10-26 10-27 9-26 8-26 6-24zM310 0l14 15v13l-1 29-2 28-3 28-4 28-4 21z">
          <text:p/>
        </draw:path>
        <draw:polygon draw:style-name="gr108" draw:text-style-name="P69" draw:layer="layout" svg:width="0.314cm" svg:height="0.652cm" svg:x="11.356cm" svg:y="10.022cm" svg:viewBox="0 0 315 653" draw:points="282,208 282,148 286,127 290,99 293,70 295,42 296,13 296,0 315,18 314,43 311,72 308,101 304,130 299,158 293,186 287,214 279,242 270,270 261,297 251,324 240,351 228,377 215,403 202,428 188,454 172,478 157,502 140,526 123,549 105,571 86,593 66,615 45,635 27,653 0,653 12,642 32,622 52,602 72,581 90,559 108,537 125,515 141,492 157,468 171,444 185,419 199,394 211,369 223,343 234,317 244,291 253,264 261,237 268,210 269,208">
          <text:p/>
        </draw:polygon>
        <draw:polygon draw:style-name="gr109" draw:text-style-name="P70" draw:layer="layout" svg:width="0.305cm" svg:height="0.634cm" svg:x="11.383cm" svg:y="10.04cm" svg:viewBox="0 0 306 635" draw:points="306,18 305,26 303,55 300,85 296,114 291,143 285,171 278,200 270,229 261,257 252,284 241,312 230,339 218,366 205,392 191,420 177,445 161,470 145,495 128,519 111,542 92,565 73,588 53,610 33,631 28,635 0,635 19,617 40,597 59,575 78,553 96,531 113,508 130,484 145,460 161,436 175,410 188,384 201,358 213,332 224,305 234,278 243,251 252,223 260,195 266,167 272,139 277,111 281,82 284,54 287,25 288,0">
          <text:p/>
        </draw:polygon>
        <draw:polygon draw:style-name="gr110" draw:text-style-name="P71" draw:layer="layout" svg:width="0.295cm" svg:height="0.616cm" svg:x="11.41cm" svg:y="10.058cm" svg:viewBox="0 0 296 617" draw:points="296,18 295,39 291,69 287,100 282,129 276,159 269,188 261,217 252,245 242,274 232,302 220,330 208,357 194,384 180,411 165,437 149,462 133,487 115,512 97,536 79,559 59,582 39,604 27,617 0,617 5,613 25,592 45,570 64,547 83,524 100,501 117,477 133,452 149,427 163,402 177,375 190,349 202,322 214,295 225,267 234,240 243,212 251,183 258,154 264,126 269,97 273,67 276,37 278,8 279,0">
          <text:p/>
        </draw:polygon>
        <draw:polygon draw:style-name="gr111" draw:text-style-name="P72" draw:layer="layout" svg:width="0.286cm" svg:height="0.598cm" svg:x="11.437cm" svg:y="10.076cm" svg:viewBox="0 0 287 599" draw:points="287,17 286,23 283,53 279,84 273,114 267,144 260,173 252,203 243,232 233,261 222,290 210,318 198,346 184,374 170,402 155,428 138,454 121,480 104,505 85,529 66,553 46,577 26,599 0,599 12,586 32,564 52,541 70,518 88,494 106,469 122,444 138,419 154,393 168,365 181,338 193,311 205,283 215,255 225,226 234,198 242,169 249,140 255,110 260,81 264,51 268,21 269,0">
          <text:p/>
        </draw:polygon>
        <draw:polygon draw:style-name="gr112" draw:text-style-name="P73" draw:layer="layout" svg:width="0.277cm" svg:height="0.581cm" svg:x="11.463cm" svg:y="10.093cm" svg:viewBox="0 0 278 582" draw:points="278,17 276,39 271,70 266,101 259,132 252,162 244,192 235,222 225,252 214,281 202,310 189,338 175,366 161,394 145,421 129,447 112,473 94,499 75,524 55,548 35,572 25,582 0,582 20,560 41,536 60,512 79,488 96,463 113,437 129,411 144,385 158,358 172,330 184,302 196,274 207,245 217,216 226,187 234,157 241,128 247,98 253,68 257,36 260,6 261,0">
          <text:p/>
        </draw:polygon>
        <draw:polygon draw:style-name="gr113" draw:text-style-name="P74" draw:layer="layout" svg:width="0.269cm" svg:height="0.564cm" svg:x="11.488cm" svg:y="10.11cm" svg:viewBox="0 0 270 565" draw:points="270,17 269,24 265,55 259,87 253,118 245,149 237,179 228,210 217,240 206,270 194,299 181,329 166,358 151,386 135,413 119,440 101,467 83,493 64,518 44,543 25,565 0,565 9,555 29,531 49,507 68,482 86,456 103,430 119,404 135,377 149,349 163,321 177,292 189,263 200,234 210,204 219,174 227,144 234,114 241,83 246,52 251,22 253,0">
          <text:p/>
        </draw:polygon>
        <draw:polygon draw:style-name="gr114" draw:text-style-name="P75" draw:layer="layout" svg:width="0.255cm" svg:height="0.547cm" svg:x="11.513cm" svg:y="10.127cm" svg:viewBox="0 0 256 548" draw:points="256,11 252,40 246,72 240,104 232,135 224,166 214,197 204,227 193,257 180,287 167,316 153,345 138,374 122,402 105,429 87,456 69,482 50,508 29,534 17,548 0,548 19,526 39,500 59,475 77,449 95,422 111,395 127,368 142,340 156,311 169,282 181,253 192,223 203,193 212,162 220,132 228,101 234,70 240,38 244,7 245,0">
          <text:p/>
        </draw:polygon>
        <draw:polygon draw:style-name="gr115" draw:text-style-name="P76" draw:layer="layout" svg:width="0.249cm" svg:height="0.536cm" svg:x="11.53cm" svg:y="10.138cm" svg:viewBox="0 0 250 537" draw:points="250,11 247,31 242,63 235,95 228,127 219,158 209,190 199,220 187,251 175,281 161,312 147,341 132,370 116,398 99,426 81,453 62,480 42,506 21,531 16,537 0,537 12,523 32,498 52,472 70,446 88,419 105,392 121,364 136,335 150,306 163,276 176,246 187,216 197,186 207,155 215,124 223,93 229,61 235,29 239,0">
          <text:p/>
        </draw:polygon>
        <draw:polygon draw:style-name="gr116" draw:text-style-name="P77" draw:layer="layout" svg:width="0.244cm" svg:height="0.525cm" svg:x="11.546cm" svg:y="10.149cm" svg:viewBox="0 0 245 526" draw:points="245,11 244,22 238,55 231,88 224,120 215,152 205,183 195,215 183,245 170,276 157,306 142,336 127,365 110,393 93,421 75,449 56,476 35,502 17,526 0,526 5,520 26,495 46,469 65,442 83,415 100,387 116,359 131,330 145,301 159,271 171,241 183,210 193,180 203,148 212,117 219,85 226,52 231,20 234,0">
          <text:p/>
        </draw:polygon>
        <draw:polygon draw:style-name="gr117" draw:text-style-name="P78" draw:layer="layout" svg:width="0.238cm" svg:height="0.514cm" svg:x="11.563cm" svg:y="10.16cm" svg:viewBox="0 0 239 515" draw:points="239,11 239,13 233,46 227,79 219,111 209,143 199,175 188,207 177,238 164,269 150,299 135,329 120,360 103,389 86,417 67,445 48,472 28,499 16,515 0,515 18,491 38,465 57,438 75,410 92,382 109,353 124,324 139,294 152,264 165,233 177,203 187,171 197,140 206,108 213,76 221,44 227,11 228,0">
          <text:p/>
        </draw:polygon>
        <draw:polygon draw:style-name="gr118" draw:text-style-name="P79" draw:layer="layout" svg:width="0.233cm" svg:height="0.503cm" svg:x="11.579cm" svg:y="10.171cm" svg:viewBox="0 0 234 504" draw:points="234,11 230,37 223,70 215,103 206,137 196,169 184,201 172,233 159,264 145,295 130,325 115,355 98,384 80,413 62,441 42,469 22,496 16,504 0,504 12,488 32,461 51,434 70,406 87,378 104,349 119,319 134,289 148,259 161,228 172,197 183,165 194,133 203,100 211,68 217,35 223,2 223,0">
          <text:p/>
        </draw:polygon>
        <draw:polygon draw:style-name="gr119" draw:text-style-name="P80" draw:layer="layout" svg:width="0.228cm" svg:height="0.492cm" svg:x="11.595cm" svg:y="10.182cm" svg:viewBox="0 0 229 493" draw:points="229,11 226,29 219,62 211,95 202,128 192,161 181,193 169,225 156,257 141,288 126,319 110,349 93,379 75,408 56,437 37,465 16,492 16,493 0,493 6,485 26,458 46,430 64,402 82,372 99,343 114,313 129,283 143,252 157,221 169,189 180,157 190,125 199,92 207,59 214,26 218,0">
          <text:p/>
        </draw:polygon>
        <draw:polygon draw:style-name="gr120" draw:text-style-name="P81" draw:layer="layout" svg:width="0.223cm" svg:height="0.481cm" svg:x="11.611cm" svg:y="10.193cm" svg:viewBox="0 0 224 482" draw:points="224,11 222,20 215,54 207,88 198,121 188,155 177,188 164,220 151,252 137,283 122,314 106,345 87,375 69,404 50,433 31,461 15,482 0,482 0,481 21,454 40,426 59,397 77,368 94,339 111,309 126,278 140,247 153,215 165,183 176,151 186,117 195,84 203,51 210,18 213,0">
          <text:p/>
        </draw:polygon>
        <draw:polygon draw:style-name="gr121" draw:text-style-name="P82" draw:layer="layout" svg:width="0.219cm" svg:height="0.476cm" svg:x="11.626cm" svg:y="10.204cm" svg:viewBox="0 0 220 477" draw:points="220,11 219,11 212,47 204,81 195,114 185,148 173,181 161,213 148,246 133,278 118,309 102,340 84,370 66,400 47,429 26,458 11,477 11,471 0,471 16,450 35,422 55,393 73,364 91,334 107,303 122,272 136,241 149,209 162,177 173,144 183,111 192,78 200,44 207,9 209,0">
          <text:p/>
        </draw:polygon>
        <draw:polygon draw:style-name="gr122" draw:text-style-name="P83" draw:layer="layout" svg:width="0.218cm" svg:height="0.486cm" svg:x="11.637cm" svg:y="10.215cm" svg:viewBox="0 0 219 487" draw:points="219,10 213,37 205,72 196,106 186,140 174,173 162,206 148,240 134,272 118,304 101,335 84,365 66,396 46,425 25,454 4,482 0,487 0,466 15,447 36,418 55,389 73,359 91,329 107,298 122,267 137,235 150,201 162,169 174,136 184,102 193,69 201,35 208,0 209,0">
          <text:p/>
        </draw:polygon>
        <draw:polygon draw:style-name="gr122" draw:text-style-name="P83" draw:layer="layout" svg:width="0.229cm" svg:height="0.496cm" svg:x="11.637cm" svg:y="10.225cm" svg:viewBox="0 0 230 497" draw:points="230,11 226,30 217,65 208,99 197,133 186,167 173,201 160,234 145,266 129,298 112,330 94,361 75,391 55,422 35,451 13,480 0,497 0,477 4,472 25,444 45,414 65,385 83,354 100,324 118,293 134,261 148,229 162,196 174,163 186,130 196,96 205,62 213,27 219,0">
          <text:p/>
        </draw:polygon>
        <draw:polygon draw:style-name="gr123" draw:text-style-name="P84" draw:layer="layout" svg:width="0.239cm" svg:height="0.505cm" svg:x="11.637cm" svg:y="10.236cm" svg:viewBox="0 0 240 506" draw:points="240,10 238,22 229,57 220,92 209,127 198,161 184,195 170,229 155,261 139,294 122,326 104,357 86,388 66,418 45,448 23,477 1,505 0,506 0,486 13,469 35,440 55,411 75,381 94,351 111,320 128,288 144,256 159,224 172,191 185,157 197,123 208,88 217,54 226,19 230,0">
          <text:p/>
        </draw:polygon>
        <draw:polygon draw:style-name="gr124" draw:text-style-name="P85" draw:layer="layout" svg:width="0.25cm" svg:height="0.514cm" svg:x="11.637cm" svg:y="10.246cm" svg:viewBox="0 0 251 515" draw:points="251,11 250,15 242,50 232,85 221,120 209,155 196,189 181,223 166,256 150,290 133,322 115,354 96,385 76,415 55,445 33,474 10,503 0,515 0,496 1,495 23,467 45,438 66,408 86,378 104,347 122,316 139,284 155,250 170,218 184,184 198,150 209,116 220,82 229,47 238,12 240,0">
          <text:p/>
        </draw:polygon>
        <draw:polygon draw:style-name="gr125" draw:text-style-name="P86" draw:layer="layout" svg:width="0.26cm" svg:height="0.522cm" svg:x="11.637cm" svg:y="10.257cm" svg:viewBox="0 0 261 523" draw:points="261,10 254,42 244,78 233,113 221,148 208,182 194,216 178,250 162,283 144,316 126,348 107,379 86,410 65,440 43,471 20,500 0,523 0,504 10,492 33,463 55,433 76,403 96,373 115,342 133,310 150,278 166,245 181,212 196,178 209,144 221,109 232,74 242,39 250,4 251,0">
          <text:p/>
        </draw:polygon>
        <draw:polygon draw:style-name="gr125" draw:text-style-name="P86" draw:layer="layout" svg:width="0.271cm" svg:height="0.531cm" svg:x="11.637cm" svg:y="10.267cm" svg:viewBox="0 0 272 532" draw:points="272,11 266,35 256,72 245,108 233,143 220,178 205,212 190,246 174,280 156,313 138,345 118,377 97,408 75,439 53,469 30,498 5,526 0,532 0,513 20,490 43,461 65,431 86,401 107,370 127,339 145,307 163,274 179,241 194,207 208,173 221,139 233,104 244,69 254,32 261,0">
          <text:p/>
        </draw:polygon>
        <draw:polygon draw:style-name="gr126" draw:text-style-name="P87" draw:layer="layout" svg:width="0.281cm" svg:height="0.539cm" svg:x="11.637cm" svg:y="10.278cm" svg:viewBox="0 0 282 540" draw:points="282,10 278,27 268,64 257,100 245,135 231,171 217,205 201,241 185,275 167,308 149,341 129,373 108,404 86,435 64,465 40,495 15,523 0,540 0,521 5,515 31,487 54,458 76,428 98,397 118,366 138,334 156,302 174,269 190,235 205,200 220,166 233,131 245,96 256,60 266,24 272,0">
          <text:p/>
        </draw:polygon>
        <draw:polygon draw:style-name="gr127" draw:text-style-name="P88" draw:layer="layout" svg:width="0.291cm" svg:height="0.547cm" svg:x="11.637cm" svg:y="10.288cm" svg:viewBox="0 0 292 548" draw:points="292,11 290,20 280,57 269,94 256,130 243,165 228,200 213,235 196,269 178,303 159,336 138,368 117,401 96,432 73,463 49,493 24,522 0,548 0,530 15,513 39,485 63,455 85,425 107,394 128,362 148,330 167,297 185,264 201,230 217,195 231,161 245,125 257,90 268,54 278,17 282,0">
          <text:p/>
        </draw:polygon>
        <draw:polygon draw:style-name="gr128" draw:text-style-name="P89" draw:layer="layout" svg:width="0.307cm" svg:height="0.563cm" svg:x="11.637cm" svg:y="10.299cm" svg:viewBox="0 0 308 564" draw:points="308,15 298,51 287,88 274,126 260,162 246,198 230,233 213,268 195,302 175,336 155,368 133,401 111,432 88,463 63,494 38,523 12,551 0,564 0,537 24,511 49,482 73,452 96,421 117,390 138,358 159,326 178,293 196,259 213,225 228,190 243,155 256,120 269,83 280,46 290,9 292,0">
          <text:p/>
        </draw:polygon>
        <draw:polygon draw:style-name="gr129" draw:text-style-name="P90" draw:layer="layout" svg:width="0.322cm" svg:height="0.575cm" svg:x="11.637cm" svg:y="10.314cm" svg:viewBox="0 0 323 576" draw:points="323,15 316,42 304,79 292,116 278,153 263,189 247,225 229,260 211,295 192,330 171,364 149,396 127,428 102,460 78,490 52,520 26,549 0,576 0,549 12,536 38,508 63,479 88,448 111,417 134,386 155,353 175,320 195,286 213,252 230,217 246,182 260,146 274,110 287,73 298,36 308,0">
          <text:p/>
        </draw:polygon>
        <draw:polygon draw:style-name="gr130" draw:text-style-name="P91" draw:layer="layout" svg:width="0.337cm" svg:height="0.567cm" svg:x="11.637cm" svg:y="10.329cm" svg:viewBox="0 0 338 568" draw:points="338,16 334,32 321,70 308,108 294,146 279,183 263,219 245,255 226,290 207,325 186,359 164,392 141,424 133,435 0,568 0,561 26,534 52,505 78,475 102,445 126,413 148,381 170,349 191,315 210,281 228,246 246,211 262,175 277,138 291,101 303,64 315,27 322,0">
          <text:p/>
        </draw:polygon>
        <draw:polygon draw:style-name="gr131" draw:text-style-name="P92" draw:layer="layout" svg:width="0.22cm" svg:height="0.418cm" svg:x="11.77cm" svg:y="10.345cm" svg:viewBox="0 0 221 419" draw:points="221,15 219,21 207,60 194,98 180,136 163,173 147,210 129,246 110,282 90,318 72,347 0,419 8,408 31,376 53,343 74,308 93,273 112,238 130,202 146,166 161,129 176,92 189,54 201,16 205,0">
          <text:p/>
        </draw:polygon>
        <draw:polygon draw:style-name="gr132" draw:text-style-name="P93" draw:layer="layout" svg:width="0.163cm" svg:height="0.331cm" svg:x="11.842cm" svg:y="10.36cm" svg:viewBox="0 0 164 332" draw:points="164,15 153,51 140,90 125,129 109,167 92,204 74,241 54,277 53,279 0,332 18,303 38,268 57,232 76,196 92,159 108,122 122,84 135,45 147,6 149,0">
          <text:p/>
        </draw:polygon>
        <draw:polygon draw:style-name="gr132" draw:text-style-name="P93" draw:layer="layout" svg:width="0.12cm" svg:height="0.263cm" svg:x="11.895cm" svg:y="10.375cm" svg:viewBox="0 0 121 264" draw:points="121,10 112,39 98,79 84,117 68,156 50,193 32,230 30,233 0,264 1,262 20,225 38,188 55,151 72,113 87,74 100,36 111,0">
          <text:p/>
        </draw:polygon>
        <draw:polygon draw:style-name="gr133" draw:text-style-name="P94" draw:layer="layout" svg:width="0.1cm" svg:height="0.223cm" svg:x="11.925cm" svg:y="10.385cm" svg:viewBox="0 0 101 224" draw:points="101,10 94,33 80,73 65,112 49,151 32,190 29,196 0,224 2,221 21,184 38,146 54,107 68,69 82,29 91,0">
          <text:p/>
        </draw:polygon>
        <draw:polygon draw:style-name="gr133" draw:text-style-name="P94" draw:layer="layout" svg:width="0.082cm" svg:height="0.185cm" svg:x="11.953cm" svg:y="10.395cm" svg:viewBox="0 0 83 186" draw:points="83,10 77,27 63,68 48,108 32,146 25,161 0,186 3,180 20,142 36,103 51,64 65,23 72,0">
          <text:p/>
        </draw:polygon>
        <draw:polygon draw:style-name="gr134" draw:text-style-name="P95" draw:layer="layout" svg:width="0.068cm" svg:height="0.15cm" svg:x="11.978cm" svg:y="10.405cm" svg:viewBox="0 0 69 151" draw:points="69,10 64,21 51,61 35,102 25,127 0,151 8,136 24,97 39,57 52,17 58,0">
          <text:p/>
        </draw:polygon>
        <draw:polygon draw:style-name="gr134" draw:text-style-name="P95" draw:layer="layout" svg:width="0.053cm" svg:height="0.116cm" svg:x="12.002cm" svg:y="10.415cm" svg:viewBox="0 0 54 117" draw:points="54,10 52,15 38,55 23,93 0,117 10,91 26,51 40,11 44,0">
          <text:p/>
        </draw:polygon>
        <draw:polygon draw:style-name="gr135" draw:text-style-name="P96" draw:layer="layout" svg:width="0.04cm" svg:height="0.083cm" svg:x="12.025cm" svg:y="10.425cm" svg:viewBox="0 0 41 84" draw:points="41,10 27,51 23,62 0,84 15,46 29,5 31,0">
          <text:p/>
        </draw:polygon>
        <draw:polygon draw:style-name="gr135" draw:text-style-name="P96" draw:layer="layout" svg:width="0.028cm" svg:height="0.051cm" svg:x="12.047cm" svg:y="10.435cm" svg:viewBox="0 0 29 52" draw:points="29,10 21,31 0,52 4,40 19,0">
          <text:p/>
        </draw:polygon>
        <draw:polygon draw:style-name="gr136" draw:text-style-name="P97" draw:layer="layout" svg:width="0.014cm" svg:height="0.021cm" svg:x="12.067cm" svg:y="10.445cm" svg:viewBox="0 0 15 22" draw:points="15,8 0,22 9,0">
          <text:p/>
        </draw:polygon>
        <draw:polygon draw:style-name="gr137" draw:text-style-name="P2" draw:layer="layout" svg:width="1.329cm" svg:height="0.89cm" svg:x="10.752cm" svg:y="10.007cm" svg:viewBox="0 0 1330 891" draw:points="0,222 886,222 886,0 1330,446 886,891 886,668 0,668">
          <text:p/>
        </draw:polygon>
        <draw:polygon draw:style-name="gr56" draw:text-style-name="P17" draw:layer="layout" svg:width="0.04cm" svg:height="0.004cm" svg:x="19.727cm" svg:y="10.229cm" svg:viewBox="0 0 41 5" draw:points="0,0 41,0 36,1 29,2 22,4 15,5 7,5 0,5">
          <text:p/>
        </draw:polygon>
        <draw:polygon draw:style-name="gr56" draw:text-style-name="P17" draw:layer="layout" svg:width="0.067cm" svg:height="0.01cm" svg:x="19.727cm" svg:y="10.229cm" svg:viewBox="0 0 68 11" draw:points="68,0 66,1 59,3 51,5 44,6 36,7 29,8 22,10 14,11 7,11 0,11 0,4 7,4 14,4 21,3 28,2 35,1 41,0">
          <text:p/>
        </draw:polygon>
        <draw:polygon draw:style-name="gr57" draw:text-style-name="P18" draw:layer="layout" svg:width="0.086cm" svg:height="0.017cm" svg:x="19.727cm" svg:y="10.229cm" svg:viewBox="0 0 87 18" draw:points="87,0 82,2 75,6 67,8 60,10 53,12 46,13 38,15 31,16 23,16 16,17 7,17 0,18 0,11 7,11 15,11 23,10 30,9 37,8 44,7 51,6 59,4 66,1 68,0">
          <text:p/>
        </draw:polygon>
        <draw:polygon draw:style-name="gr57" draw:text-style-name="P18" draw:layer="layout" svg:width="0.102cm" svg:height="0.023cm" svg:x="19.727cm" svg:y="10.229cm" svg:viewBox="0 0 103 24" draw:points="103,0 98,3 91,6 84,8 76,11 69,14 62,16 54,18 47,19 39,21 32,22 24,23 16,23 8,24 0,24 0,18 7,17 16,17 23,16 31,16 38,15 46,13 53,11 60,9 67,7 75,5 82,2 87,0">
          <text:p/>
        </draw:polygon>
        <draw:polygon draw:style-name="gr58" draw:text-style-name="P19" draw:layer="layout" svg:width="0.116cm" svg:height="0.029cm" svg:x="19.727cm" svg:y="10.229cm" svg:viewBox="0 0 117 30" draw:points="117,0 115,2 108,6 101,9 93,12 86,15 78,18 71,20 63,22 56,24 47,26 39,27 31,28 23,29 16,30 8,30 0,30 0,24 8,24 15,23 23,23 31,22 38,21 46,19 54,18 62,16 69,14 76,12 84,9 91,7 98,3 103,0">
          <text:p/>
        </draw:polygon>
        <draw:polygon draw:style-name="gr59" draw:text-style-name="P20" draw:layer="layout" svg:width="0.129cm" svg:height="0.035cm" svg:x="19.727cm" svg:y="10.229cm" svg:viewBox="0 0 130 36" draw:points="130,0 125,4 118,7 110,11 103,14 96,17 88,20 80,24 72,26 64,28 56,30 48,32 40,33 32,34 24,35 16,36 8,36 0,36 0,30 8,30 16,30 23,29 31,28 39,27 47,26 55,24 62,21 70,19 78,17 86,14 93,11 101,8 108,5 115,2 117,0">
          <text:p/>
        </draw:polygon>
        <draw:polygon draw:style-name="gr59" draw:text-style-name="P20" draw:layer="layout" svg:width="0.141cm" svg:height="0.043cm" svg:x="19.727cm" svg:y="10.229cm" svg:viewBox="0 0 142 44" draw:points="142,0 142,2 135,6 128,10 120,14 113,18 105,21 98,24 90,27 81,30 73,32 65,34 57,36 49,38 41,39 33,41 25,41 16,42 8,42 0,44 0,36 8,36 16,36 24,35 32,34 40,33 48,32 56,30 64,28 72,26 79,24 88,21 96,18 103,15 110,12 118,8 125,5 130,0">
          <text:p/>
        </draw:polygon>
        <draw:polygon draw:style-name="gr60" draw:text-style-name="P21" draw:layer="layout" svg:width="0.153cm" svg:height="0.048cm" svg:x="19.727cm" svg:y="10.229cm" svg:viewBox="0 0 154 49" draw:points="154,0 152,1 145,6 138,10 131,15 123,18 116,22 107,26 99,29 91,32 83,35 75,37 67,39 59,42 50,44 42,46 34,47 25,48 17,48 8,49 0,49 0,43 8,42 16,42 25,40 33,40 41,38 49,37 57,35 65,33 73,31 81,29 89,26 97,23 104,20 113,17 120,13 128,9 135,5 142,1 142,0">
          <text:p/>
        </draw:polygon>
        <draw:polygon draw:style-name="gr61" draw:text-style-name="P22" draw:layer="layout" svg:width="0.164cm" svg:height="0.054cm" svg:x="19.727cm" svg:y="10.229cm" svg:viewBox="0 0 165 55" draw:points="165,0 163,1 156,6 149,11 141,16 134,20 126,24 118,29 110,32 102,36 94,39 86,42 77,44 68,46 60,49 52,50 43,52 34,53 26,54 17,55 9,55 0,55 0,49 8,49 17,48 25,48 34,47 42,46 50,44 59,42 67,40 75,38 84,36 92,33 100,30 108,26 116,22 123,18 131,15 138,10 145,6 152,1 154,0">
          <text:p/>
        </draw:polygon>
        <draw:polygon draw:style-name="gr61" draw:text-style-name="P22" draw:layer="layout" svg:width="0.174cm" svg:height="0.06cm" svg:x="19.727cm" svg:y="10.229cm" svg:viewBox="0 0 175 61" draw:points="175,0 174,2 167,8 160,13 152,17 145,22 137,27 129,31 121,35 113,38 105,42 96,45 88,48 80,50 71,53 62,55 54,56 45,58 36,59 27,60 18,61 9,61 0,61 0,55 9,55 17,55 27,54 35,53 44,52 53,50 61,49 69,46 78,44 86,42 94,39 102,36 110,32 118,29 126,25 134,21 141,17 149,12 156,7 163,2 165,0">
          <text:p/>
        </draw:polygon>
        <draw:polygon draw:style-name="gr62" draw:text-style-name="P23" draw:layer="layout" svg:width="0.184cm" svg:height="0.067cm" svg:x="19.727cm" svg:y="10.229cm" svg:viewBox="0 0 185 68" draw:points="185,0 178,6 170,12 163,17 155,22 148,27 140,31 132,36 124,40 115,44 107,47 99,51 90,54 81,56 73,59 64,61 55,63 45,64 36,65 27,66 18,67 9,68 0,68 0,61 9,61 18,61 26,60 35,59 44,58 54,56 62,55 71,53 80,50 88,48 96,45 105,42 113,38 121,35 129,30 137,26 145,21 152,16 160,12 167,7 174,1 175,0">
          <text:p/>
        </draw:polygon>
        <draw:polygon draw:style-name="gr63" draw:text-style-name="P24" draw:layer="layout" svg:width="0.194cm" svg:height="0.073cm" svg:x="19.727cm" svg:y="10.229cm" svg:viewBox="0 0 195 74" draw:points="195,0 189,5 182,11 174,17 167,22 159,27 151,33 143,38 135,42 126,46 118,50 109,53 101,57 92,60 83,62 74,65 65,67 55,69 46,70 37,72 28,73 18,73 9,74 0,74 0,68 9,68 18,67 27,66 36,65 45,64 54,63 64,61 73,59 81,56 90,54 99,51 107,47 115,44 124,40 132,36 140,32 148,27 155,22 163,17 170,12 178,6 185,0">
          <text:p/>
        </draw:polygon>
        <draw:polygon draw:style-name="gr63" draw:text-style-name="P24" draw:layer="layout" svg:width="0.203cm" svg:height="0.079cm" svg:x="19.727cm" svg:y="10.229cm" svg:viewBox="0 0 204 80" draw:points="204,0 200,4 193,10 185,16 178,22 170,27 162,33 154,38 146,43 138,47 129,52 120,55 112,59 103,62 94,66 85,68 76,71 67,73 56,75 47,77 38,78 28,79 19,80 9,80 0,80 0,74 9,74 18,73 28,73 37,72 46,70 55,69 64,67 74,65 83,62 92,60 101,57 109,53 118,50 126,46 135,42 143,38 151,33 159,27 167,22 174,17 182,11 189,5 195,0">
          <text:p/>
        </draw:polygon>
        <draw:polygon draw:style-name="gr63" draw:text-style-name="P24" draw:layer="layout" svg:width="0.212cm" svg:height="0.086cm" svg:x="19.727cm" svg:y="10.229cm" svg:viewBox="0 0 213 87" draw:points="213,0 211,2 204,9 197,16 189,22 182,28 174,33 166,39 157,44 149,49 140,53 132,57 123,61 114,65 105,68 96,71 86,74 76,77 67,79 57,81 48,83 38,84 29,85 19,86 9,86 0,87 0,80 9,80 19,80 28,79 38,78 47,77 56,75 66,73 75,71 84,68 93,66 103,62 112,59 120,55 129,52 138,47 146,43 154,38 162,33 170,28 178,23 185,17 193,10 200,4 204,0">
          <text:p/>
        </draw:polygon>
        <draw:polygon draw:style-name="gr64" draw:text-style-name="P25" draw:layer="layout" svg:width="0.221cm" svg:height="0.092cm" svg:x="19.727cm" svg:y="10.229cm" svg:viewBox="0 0 222 93" draw:points="222,0 216,7 208,14 201,21 193,27 185,33 177,39 169,44 161,49 152,54 143,59 134,63 125,67 116,71 107,74 98,77 88,80 79,83 69,85 60,87 49,89 39,90 29,91 20,92 10,93 0,93 0,87 9,86 19,86 29,85 38,84 48,83 58,81 68,79 77,77 87,74 96,71 105,68 114,65 123,61 132,57 140,53 149,49 157,44 166,39 174,33 182,28 189,22 197,16 204,10 211,2 213,0">
          <text:p/>
        </draw:polygon>
        <draw:polygon draw:style-name="gr64" draw:text-style-name="P25" draw:layer="layout" svg:width="0.23cm" svg:height="0.098cm" svg:x="19.727cm" svg:y="10.229cm" svg:viewBox="0 0 231 99" draw:points="231,0 227,4 220,12 212,19 205,26 197,32 189,38 181,44 172,49 163,55 154,60 145,64 136,69 127,73 118,77 108,80 99,83 89,86 79,89 70,91 60,93 50,95 40,97 30,98 20,98 10,99 0,99 0,93 10,93 20,92 29,91 39,90 49,89 59,87 68,85 78,83 87,80 97,77 106,74 115,71 124,67 133,63 142,59 151,54 160,49 169,44 177,39 185,33 193,27 201,21 208,14 216,8 222,0">
          <text:p/>
        </draw:polygon>
        <draw:polygon draw:style-name="gr64" draw:text-style-name="P25" draw:layer="layout" svg:width="0.239cm" svg:height="0.104cm" svg:x="19.727cm" svg:y="10.229cm" svg:viewBox="0 0 240 105" draw:points="240,0 239,1 232,9 224,17 217,24 209,30 201,37 193,43 184,49 176,55 167,60 158,65 149,70 139,74 129,79 120,82 110,86 101,89 91,92 81,95 71,98 61,100 51,101 41,103 31,104 20,105 10,105 0,105 0,99 10,99 20,98 30,98 40,97 50,95 60,93 70,91 79,89 89,86 99,83 108,80 118,77 127,73 136,69 145,64 155,60 164,55 172,49 181,44 189,38 197,32 205,26 212,19 220,11 227,4 231,0">
          <text:p/>
        </draw:polygon>
        <draw:polygon draw:style-name="gr65" draw:text-style-name="P26" draw:layer="layout" svg:width="0.247cm" svg:height="0.111cm" svg:x="19.727cm" svg:y="10.229cm" svg:viewBox="0 0 248 112" draw:points="248,0 243,6 236,13 228,21 221,28 213,34 205,41 196,47 188,53 179,60 170,65 161,71 151,75 141,80 132,84 122,88 112,92 103,95 93,98 83,101 72,104 62,106 52,108 42,109 31,110 21,111 10,111 0,112 0,105 10,105 20,105 31,104 41,103 51,101 61,100 71,98 81,95 91,92 101,89 110,86 120,82 129,79 139,74 148,70 158,65 167,60 176,54 184,48 193,42 201,36 209,29 217,23 224,16 232,9 239,1 240,0">
          <text:p/>
        </draw:polygon>
        <draw:polygon draw:style-name="gr66" draw:text-style-name="P27" draw:layer="layout" svg:width="0.256cm" svg:height="0.117cm" svg:x="19.727cm" svg:y="10.229cm" svg:viewBox="0 0 257 118" draw:points="257,0 255,2 248,10 240,18 233,25 225,32 217,40 208,47 200,53 191,59 182,65 173,71 164,76 155,81 145,86 135,90 126,94 116,98 106,101 95,104 85,107 75,110 64,112 54,114 43,115 32,116 21,117 10,118 0,118 0,112 10,111 21,111 31,110 43,109 53,108 63,106 73,104 84,101 94,98 104,95 113,92 123,88 133,84 142,80 152,75 161,71 170,65 179,60 188,54 196,48 205,42 213,34 221,28 228,21 236,13 243,6 248,0">
          <text:p/>
        </draw:polygon>
        <draw:polygon draw:style-name="gr66" draw:text-style-name="P27" draw:layer="layout" svg:width="0.264cm" svg:height="0.123cm" svg:x="19.727cm" svg:y="10.229cm" svg:viewBox="0 0 265 124" draw:points="265,0 260,6 252,14 245,22 237,30 229,37 221,44 212,51 204,57 195,64 186,69 176,75 167,80 157,87 148,91 138,96 127,100 117,104 106,107 96,110 86,113 75,116 64,118 54,120 43,121 32,123 22,124 11,124 0,124 0,118 10,118 21,117 32,116 42,115 53,114 63,112 74,110 84,107 94,104 105,101 115,98 125,94 135,90 145,86 155,80 164,75 173,70 182,64 191,58 200,52 208,46 217,39 225,32 233,25 240,18 248,10 255,2 257,0">
          <text:p/>
        </draw:polygon>
        <draw:polygon draw:style-name="gr67" draw:text-style-name="P28" draw:layer="layout" svg:width="0.272cm" svg:height="0.129cm" svg:x="19.727cm" svg:y="10.229cm" svg:viewBox="0 0 273 130" draw:points="273,0 272,2 263,10 256,19 248,28 240,35 232,43 224,50 215,57 206,63 197,70 188,76 179,82 169,87 159,92 149,97 139,102 129,106 119,110 108,113 98,117 87,119 76,122 66,124 55,126 44,128 33,129 22,130 11,130 0,130 0,124 11,124 22,124 32,123 43,121 54,120 64,118 75,116 86,113 96,110 106,107 117,104 127,100 137,96 147,91 156,87 166,81 175,76 185,70 194,65 203,58 211,52 220,45 228,38 236,31 244,22 251,14 259,6 264,0">
          <text:p/>
        </draw:polygon>
        <draw:polygon draw:style-name="gr68" draw:text-style-name="P29" draw:layer="layout" svg:width="0.28cm" svg:height="0.136cm" svg:x="19.727cm" svg:y="10.229cm" svg:viewBox="0 0 281 137" draw:points="281,0 276,6 269,15 262,23 254,31 246,39 237,46 229,54 220,61 211,67 202,74 192,80 183,86 173,91 163,97 153,103 143,107 132,112 122,116 111,119 101,123 90,125 79,128 68,130 57,132 46,134 34,135 23,136 11,137 0,137 0,130 11,130 23,130 34,129 45,128 56,126 67,124 77,122 88,119 99,117 109,113 120,110 130,106 140,102 150,96 160,91 170,86 180,81 189,75 198,69 207,62 216,56 225,49 233,42 241,34 249,27 257,19 264,10 272,2 273,0">
          <text:p/>
        </draw:polygon>
        <draw:polygon draw:style-name="gr68" draw:text-style-name="P29" draw:layer="layout" svg:width="0.288cm" svg:height="0.142cm" svg:x="19.727cm" svg:y="10.229cm" svg:viewBox="0 0 289 143" draw:points="289,0 288,1 281,10 274,19 266,27 258,35 250,43 241,51 233,58 224,66 215,73 205,79 196,85 186,91 176,97 166,102 156,107 145,112 135,116 124,120 113,124 102,128 91,131 80,133 69,137 58,139 46,140 35,141 24,142 12,143 0,143 0,137 12,137 23,136 34,134 46,133 57,131 68,129 79,127 90,124 101,122 111,118 122,115 132,111 143,106 153,102 163,97 173,91 183,86 192,80 202,74 211,67 220,61 229,54 237,46 246,39 254,31 262,23 269,15 276,6 281,0">
          <text:p/>
        </draw:polygon>
        <draw:polygon draw:style-name="gr69" draw:text-style-name="P30" draw:layer="layout" svg:width="0.296cm" svg:height="0.148cm" svg:x="19.727cm" svg:y="10.229cm" svg:viewBox="0 0 297 149" draw:points="297,0 293,5 286,14 279,23 271,32 263,40 254,48 246,56 237,63 228,71 218,78 209,84 199,91 189,97 178,102 168,108 157,113 147,118 136,122 125,126 114,130 103,134 92,138 81,140 69,143 58,145 46,146 35,148 23,149 11,149 0,149 0,143 11,143 23,142 34,141 45,140 57,139 68,137 79,133 90,131 101,128 112,124 123,120 134,116 144,112 155,107 165,102 175,97 185,91 196,85 205,79 215,73 224,66 233,58 241,51 250,43 258,35 266,27 274,19 281,10 288,1 289,0">
          <text:p/>
        </draw:polygon>
        <draw:polygon draw:style-name="gr70" draw:text-style-name="P31" draw:layer="layout" svg:width="0.304cm" svg:height="0.155cm" svg:x="19.727cm" svg:y="10.229cm" svg:viewBox="0 0 305 156" draw:points="305,0 298,9 291,19 283,28 275,37 267,45 259,54 250,61 241,69 232,77 222,84 212,90 203,97 192,103 182,109 172,115 161,120 150,125 139,129 128,133 116,137 105,141 93,144 82,146 70,149 59,151 47,153 35,154 23,155 12,155 0,156 0,149 11,149 23,149 35,148 46,146 58,145 69,143 81,140 92,138 103,135 114,131 126,127 137,123 148,119 158,114 169,109 179,103 189,98 199,92 209,85 218,79 228,72 237,64 246,57 254,49 263,41 271,33 279,24 286,15 293,5 297,0">
          <text:p/>
        </draw:polygon>
        <draw:polygon draw:style-name="gr71" draw:text-style-name="P32" draw:layer="layout" svg:width="0.311cm" svg:height="0.161cm" svg:x="19.727cm" svg:y="10.229cm" svg:viewBox="0 0 312 162" draw:points="312,0 310,3 303,13 296,22 288,31 280,40 271,49 263,57 254,65 245,73 235,81 226,88 216,96 206,102 196,109 185,114 175,120 164,125 153,130 142,135 130,139 119,143 108,147 96,150 84,153 73,155 61,157 49,159 37,160 25,161 12,162 0,162 0,156 12,155 24,155 36,154 48,153 60,151 71,149 83,146 94,144 106,141 117,137 128,133 139,129 150,125 161,120 172,115 182,109 192,103 203,97 212,89 222,83 232,76 241,68 250,60 259,53 267,44 275,36 283,27 291,18 298,9 305,0">
          <text:p/>
        </draw:polygon>
        <draw:polygon draw:style-name="gr72" draw:text-style-name="P33" draw:layer="layout" svg:width="0.319cm" svg:height="0.167cm" svg:x="19.727cm" svg:y="10.229cm" svg:viewBox="0 0 320 168" draw:points="320,0 316,7 308,17 301,26 293,35 284,44 276,53 267,62 258,70 249,78 239,85 229,93 219,100 208,107 198,113 187,119 176,125 165,130 154,135 143,140 132,144 120,149 108,153 97,156 85,159 73,161 61,163 49,165 36,166 24,167 12,168 0,168 0,162 12,162 24,161 36,160 48,159 60,157 72,155 83,153 95,150 107,147 118,142 129,138 141,134 152,129 163,124 174,119 184,113 195,108 205,101 216,95 226,88 235,81 245,73 254,65 263,57 271,49 280,40 288,31 296,22 303,13 310,3 312,0">
          <text:p/>
        </draw:polygon>
        <draw:polygon draw:style-name="gr73" draw:text-style-name="P34" draw:layer="layout" svg:width="0.327cm" svg:height="0.173cm" svg:x="19.727cm" svg:y="10.229cm" svg:viewBox="0 0 328 174" draw:points="328,0 320,10 312,20 304,30 296,40 288,49 279,58 270,67 261,76 252,84 242,91 232,99 222,106 212,113 201,119 190,125 179,131 168,137 157,142 145,147 134,151 122,155 110,159 98,162 86,165 74,167 62,170 49,171 37,173 25,174 12,174 0,174 0,168 12,168 24,167 36,166 49,165 61,163 73,161 85,159 97,156 108,153 120,149 132,145 143,141 154,136 165,131 176,126 187,120 198,114 208,108 218,101 228,94 238,86 248,79 257,71 266,62 275,53 283,44 292,35 300,26 307,17 315,7 319,0">
          <text:p/>
        </draw:polygon>
        <draw:polygon draw:style-name="gr73" draw:text-style-name="P34" draw:layer="layout" svg:width="0.334cm" svg:height="0.18cm" svg:x="19.727cm" svg:y="10.229cm" svg:viewBox="0 0 335 181" draw:points="335,0 333,4 326,14 318,24 310,34 302,44 294,53 285,62 276,72 266,80 257,88 247,96 237,104 227,111 216,118 205,125 194,131 183,137 172,142 160,148 149,152 136,157 124,161 112,165 100,168 87,171 75,174 63,176 50,177 38,179 25,180 12,180 0,181 0,174 12,174 25,174 37,173 49,171 62,170 74,167 86,165 98,162 110,159 122,155 134,151 145,147 158,142 169,137 180,131 191,125 202,119 213,113 223,106 233,99 243,91 253,84 262,76 271,67 280,58 289,49 297,40 305,30 313,20 321,10 328,0">
          <text:p/>
        </draw:polygon>
        <draw:polygon draw:style-name="gr74" draw:text-style-name="P35" draw:layer="layout" svg:width="0.342cm" svg:height="0.186cm" svg:x="19.727cm" svg:y="10.229cm" svg:viewBox="0 0 343 187" draw:points="343,0 338,7 331,18 323,28 315,38 307,49 298,58 289,67 280,76 271,85 261,93 251,101 241,109 230,116 218,123 207,130 196,136 185,142 173,148 162,153 150,158 138,163 126,167 114,171 101,174 89,177 76,180 64,182 51,184 38,185 25,186 13,187 0,187 0,181 12,180 25,180 38,179 50,177 63,176 75,174 87,171 100,168 112,165 124,161 136,157 148,152 159,148 171,142 182,137 193,131 204,125 215,118 227,111 237,104 247,96 257,88 266,80 276,72 285,63 294,54 302,45 310,34 318,24 326,14 333,4 335,0">
          <text:p/>
        </draw:polygon>
        <draw:polygon draw:style-name="gr75" draw:text-style-name="P36" draw:layer="layout" svg:width="0.357cm" svg:height="0.198cm" svg:x="19.727cm" svg:y="10.229cm" svg:viewBox="0 0 358 199" draw:points="358,0 356,3 349,14 341,25 333,36 325,46 316,56 307,66 298,75 289,85 279,93 269,102 258,110 248,118 237,126 226,133 215,140 203,146 192,153 180,158 168,164 156,170 143,175 131,179 118,183 105,186 93,189 80,192 67,194 54,196 40,198 26,199 13,199 0,199 0,187 13,187 25,186 39,185 52,184 65,182 77,180 90,177 102,174 115,171 127,167 139,162 151,157 163,152 174,147 186,141 197,135 208,129 219,122 230,115 241,108 251,100 261,92 271,84 280,75 289,66 298,57 307,48 315,38 323,28 331,18 338,7 343,0">
          <text:p/>
        </draw:polygon>
        <draw:polygon draw:style-name="gr76" draw:text-style-name="P37" draw:layer="layout" svg:width="0.371cm" svg:height="0.211cm" svg:x="19.727cm" svg:y="10.229cm" svg:viewBox="0 0 372 212" draw:points="372,0 366,10 359,21 351,33 343,43 334,54 326,64 316,74 307,84 297,94 287,103 277,112 266,120 255,128 244,136 233,144 221,151 209,157 197,164 185,171 173,176 160,182 147,186 135,191 121,195 107,198 94,202 81,204 68,207 54,209 41,210 27,211 13,212 0,212 0,199 13,199 26,199 39,198 53,196 66,194 79,192 92,189 104,186 117,183 131,179 143,175 156,170 168,164 180,158 192,153 203,146 215,140 226,133 237,126 248,118 258,110 269,102 279,93 289,85 298,75 307,66 316,56 325,46 333,36 341,25 349,14 356,3 358,0">
          <text:p/>
        </draw:polygon>
        <draw:polygon draw:style-name="gr77" draw:text-style-name="P38" draw:layer="layout" svg:width="0.386cm" svg:height="0.224cm" svg:x="19.727cm" svg:y="10.229cm" svg:viewBox="0 0 387 225" draw:points="387,0 384,5 377,17 369,28 361,40 353,51 344,62 335,73 326,83 316,93 306,103 295,112 285,121 274,130 263,138 251,148 240,155 228,163 215,169 203,176 191,182 178,188 165,193 151,198 137,203 124,207 111,211 97,214 83,217 70,219 56,221 42,223 28,224 14,224 0,225 0,212 13,212 27,211 41,210 54,209 68,207 81,204 94,202 107,198 121,195 134,191 146,186 160,182 173,176 185,171 197,165 209,158 221,152 233,145 244,136 255,128 266,120 277,112 287,103 297,94 307,84 316,74 326,64 334,54 343,43 351,33 359,21 366,10 372,0">
          <text:p/>
        </draw:polygon>
        <draw:polygon draw:style-name="gr77" draw:text-style-name="P38" draw:layer="layout" svg:width="0.4cm" svg:height="0.236cm" svg:x="19.727cm" svg:y="10.229cm" svg:viewBox="0 0 401 237" draw:points="401,0 395,11 388,24 380,36 371,47 363,59 354,70 344,81 335,92 325,102 314,112 304,122 293,131 282,140 270,149 258,157 246,165 234,172 221,179 209,186 196,193 183,198 169,204 156,209 142,214 129,218 115,222 101,225 87,228 71,231 57,234 43,235 29,236 14,237 0,237 0,224 14,223 28,223 42,222 56,220 70,218 84,216 98,213 112,210 125,206 138,202 152,197 165,192 178,187 191,181 203,175 215,168 228,162 240,154 251,147 263,138 274,130 285,121 295,112 306,103 316,93 326,83 335,73 344,62 353,51 361,40 369,28 377,17 384,5 387,0">
          <text:p/>
        </draw:polygon>
        <draw:polygon draw:style-name="gr78" draw:text-style-name="P39" draw:layer="layout" svg:width="0.415cm" svg:height="0.249cm" svg:x="19.727cm" svg:y="10.229cm" svg:viewBox="0 0 416 250" draw:points="416,0 413,5 406,18 398,30 390,43 382,55 373,68 363,79 354,90 343,101 333,112 322,122 311,132 300,142 288,151 276,160 264,168 252,176 239,184 227,191 213,198 200,205 187,211 173,217 159,222 145,227 131,231 117,235 102,238 88,241 73,244 59,246 44,248 29,249 15,249 0,250 0,237 14,237 29,236 43,235 57,234 71,231 86,229 100,226 114,223 128,219 141,215 155,210 168,205 182,199 195,194 208,187 220,180 233,173 245,166 257,158 269,150 281,141 292,132 303,123 313,113 324,103 334,93 343,82 354,71 363,59 371,47 380,36 388,24 395,11 401,0">
          <text:p/>
        </draw:polygon>
        <draw:polygon draw:style-name="gr79" draw:text-style-name="P40" draw:layer="layout" svg:width="0.429cm" svg:height="0.261cm" svg:x="19.727cm" svg:y="10.229cm" svg:viewBox="0 0 430 262" draw:points="430,0 424,11 417,24 409,37 400,51 392,63 383,75 373,87 363,99 353,110 342,121 332,131 320,141 309,151 297,161 285,170 272,179 260,187 247,195 234,202 220,210 207,216 193,222 179,228 163,234 149,239 135,243 120,247 105,251 90,254 75,256 60,258 45,260 30,261 15,262 0,262 0,250 15,249 29,249 44,248 59,246 73,244 88,241 102,238 117,235 131,231 145,227 159,222 173,217 188,211 201,205 214,198 228,191 240,184 253,176 265,168 277,160 289,151 301,142 312,132 323,122 334,112 344,101 354,90 363,79 373,68 382,56 390,44 398,30 406,18 413,5 416,0">
          <text:p/>
        </draw:polygon>
        <draw:polygon draw:style-name="gr79" draw:text-style-name="P40" draw:layer="layout" svg:width="0.443cm" svg:height="0.274cm" svg:x="19.727cm" svg:y="10.229cm" svg:viewBox="0 0 444 275" draw:points="444,0 442,3 435,18 427,31 419,45 411,58 402,70 392,83 382,95 372,107 361,118 350,130 339,140 328,151 316,161 304,171 291,180 278,189 265,198 252,206 239,213 225,221 211,228 197,234 182,240 168,245 153,251 138,255 123,259 108,263 93,266 77,269 62,271 46,273 31,274 15,275 0,275 0,262 15,262 30,261 45,260 60,258 75,256 90,254 105,251 120,247 135,243 149,239 163,234 178,228 192,222 206,216 219,210 233,202 246,195 259,187 271,179 284,170 296,161 308,151 319,141 331,131 341,121 352,110 362,99 372,87 382,75 392,63 400,51 409,38 417,25 424,12 430,0">
          <text:p/>
        </draw:polygon>
        <draw:polygon draw:style-name="gr80" draw:text-style-name="P41" draw:layer="layout" svg:width="0.457cm" svg:height="0.286cm" svg:x="19.727cm" svg:y="10.229cm" svg:viewBox="0 0 458 287" draw:points="458,0 454,9 446,23 438,37 430,50 421,64 412,77 402,90 392,102 382,114 371,126 360,137 349,149 337,159 325,170 312,181 300,190 286,199 273,208 260,217 246,224 232,232 217,239 203,246 188,252 173,257 158,262 143,267 127,271 112,275 95,278 79,281 64,283 48,285 32,286 16,287 0,287 0,275 15,275 31,274 46,273 62,271 77,269 93,266 108,263 124,259 139,255 154,251 169,245 183,240 198,234 212,228 226,221 240,213 253,206 266,198 279,189 292,180 305,170 317,160 329,150 340,139 351,129 362,117 373,106 383,94 392,82 402,69 411,57 419,44 427,30 435,17 442,3 444,0">
          <text:p/>
        </draw:polygon>
        <draw:polygon draw:style-name="gr81" draw:text-style-name="P42" draw:layer="layout" svg:width="0.471cm" svg:height="0.299cm" svg:x="19.727cm" svg:y="10.229cm" svg:viewBox="0 0 472 300" draw:points="472,0 465,15 457,29 449,43 441,58 432,72 422,85 412,98 402,111 391,123 380,136 369,147 357,159 345,170 333,180 320,191 307,200 294,210 280,219 266,227 252,235 236,243 222,250 207,257 192,263 176,269 161,274 145,279 129,283 113,287 97,291 81,293 65,296 49,298 33,299 16,300 0,300 0,287 16,287 32,286 48,285 64,283 79,281 95,278 111,275 126,271 142,267 157,262 172,257 187,252 202,246 216,239 231,232 245,224 260,217 273,208 286,199 300,190 312,181 325,171 337,160 349,150 360,138 371,127 382,115 392,103 402,91 412,78 421,65 430,50 438,37 446,23 454,9 458,0">
          <text:p/>
        </draw:polygon>
        <draw:polygon draw:style-name="gr82" draw:text-style-name="P43" draw:layer="layout" svg:width="0.485cm" svg:height="0.311cm" svg:x="19.727cm" svg:y="10.229cm" svg:viewBox="0 0 486 312" draw:points="486,0 483,5 476,20 468,35 460,50 451,64 442,78 432,92 422,105 412,118 401,131 390,143 378,155 366,167 353,178 340,189 327,200 313,211 300,220 286,229 271,238 257,246 242,254 227,262 212,269 196,275 180,281 165,286 149,291 132,296 116,300 100,303 83,306 67,308 50,310 33,311 17,312 0,312 0,300 16,300 33,299 49,298 65,296 81,293 97,291 113,287 129,283 145,279 161,274 176,269 192,263 207,257 222,250 236,243 251,235 265,227 279,219 293,210 306,200 319,191 332,179 344,169 356,158 369,146 380,135 391,122 402,110 412,97 422,84 432,71 441,57 449,43 457,29 465,15 472,0">
          <text:p/>
        </draw:polygon>
        <draw:polygon draw:style-name="gr83" draw:text-style-name="P44" draw:layer="layout" svg:width="0.498cm" svg:height="0.324cm" svg:x="19.727cm" svg:y="10.229cm" svg:viewBox="0 0 499 325" draw:points="499,0 495,11 487,26 479,41 471,56 462,71 452,85 441,99 431,113 420,126 409,139 398,152 386,164 373,176 361,188 348,199 334,209 321,220 307,230 292,239 278,248 263,256 248,264 232,273 217,280 201,287 185,293 169,298 152,303 136,308 119,312 102,315 85,318 68,321 51,323 34,324 17,325 0,325 0,312 17,312 33,311 50,310 67,308 83,306 100,303 116,300 132,296 149,291 165,286 180,281 196,275 212,268 227,261 242,253 257,245 271,237 286,228 300,219 313,210 327,199 340,189 353,178 365,167 377,155 389,143 400,131 411,118 421,105 431,92 441,78 451,64 460,50 468,35 476,20 483,5 486,0">
          <text:p/>
        </draw:polygon>
        <draw:polygon draw:style-name="gr84" draw:text-style-name="P45" draw:layer="layout" svg:width="0.512cm" svg:height="0.337cm" svg:x="19.727cm" svg:y="10.229cm" svg:viewBox="0 0 513 338" draw:points="513,0 506,16 498,33 489,48 480,63 471,78 462,93 452,107 441,121 430,135 419,148 407,161 395,174 382,186 369,198 356,209 342,220 328,231 314,241 299,251 284,260 269,268 253,277 238,284 222,292 205,298 189,304 172,310 156,315 139,320 122,324 104,328 87,331 70,333 52,335 35,336 17,337 0,338 0,325 17,325 34,324 51,323 68,321 85,318 102,315 119,312 136,308 152,303 169,298 185,293 201,287 217,280 232,273 248,265 263,257 278,249 292,240 307,231 321,221 334,210 348,200 361,189 373,177 386,165 398,153 409,140 420,127 431,114 441,100 451,86 461,72 470,57 478,42 486,27 494,11 499,0">
          <text:p/>
        </draw:polygon>
        <draw:polygon draw:style-name="gr85" draw:text-style-name="P46" draw:layer="layout" svg:width="0.526cm" svg:height="0.349cm" svg:x="19.727cm" svg:y="10.229cm" svg:viewBox="0 0 527 350" draw:points="527,0 525,5 517,21 510,38 501,54 492,70 482,85 472,100 462,115 451,129 440,143 428,157 416,170 404,183 391,195 377,207 364,219 350,230 335,241 321,251 306,261 290,271 275,279 259,288 243,296 227,303 210,310 193,316 176,322 159,327 142,332 124,336 107,340 89,343 71,346 54,348 36,349 18,350 0,350 0,338 17,337 35,336 52,335 70,333 87,331 104,328 122,324 139,320 156,315 172,310 189,304 205,298 222,292 238,284 253,277 269,268 284,260 299,251 314,241 328,231 342,220 356,209 369,198 382,186 395,174 407,161 419,148 430,135 441,121 452,107 462,93 471,78 480,63 490,48 498,32 506,16 513,0">
          <text:p/>
        </draw:polygon>
        <draw:polygon draw:style-name="gr86" draw:text-style-name="P47" draw:layer="layout" svg:width="0.539cm" svg:height="0.362cm" svg:x="19.727cm" svg:y="10.229cm" svg:viewBox="0 0 540 363" draw:points="540,0 536,10 529,27 521,43 512,59 503,76 494,92 482,107 472,122 461,137 449,151 438,165 425,179 412,192 399,204 386,217 372,229 357,240 343,251 328,262 312,272 297,281 281,290 265,299 248,307 232,315 215,322 197,328 180,334 163,339 145,344 127,349 109,352 91,355 73,358 55,360 36,361 18,362 0,363 0,350 18,350 36,349 54,348 71,346 89,343 107,340 124,336 142,332 159,327 176,322 193,316 210,310 227,303 243,296 259,288 275,279 290,271 306,261 321,251 335,241 350,230 364,219 377,207 391,195 404,183 416,170 428,157 440,143 451,129 462,115 472,100 482,85 492,70 501,53 510,37 517,21 525,5 527,0">
          <text:p/>
        </draw:polygon>
        <draw:polygon draw:style-name="gr87" draw:text-style-name="P48" draw:layer="layout" svg:width="0.553cm" svg:height="0.374cm" svg:x="19.727cm" svg:y="10.229cm" svg:viewBox="0 0 554 375" draw:points="554,0 548,15 540,33 532,50 523,66 514,83 504,98 494,114 483,129 472,144 460,159 447,173 434,187 421,201 408,214 394,226 380,238 365,250 350,261 335,272 319,282 303,292 287,301 270,310 254,318 237,326 219,333 202,340 184,346 166,351 148,356 130,361 112,365 93,368 75,370 56,373 37,374 19,375 0,375 0,363 18,362 36,361 55,360 73,358 91,355 109,352 127,349 145,344 163,339 180,334 197,328 215,322 232,315 248,307 265,299 281,290 297,281 312,272 328,262 343,251 357,240 372,229 386,217 399,204 412,192 425,179 438,165 449,151 462,137 473,122 483,107 494,92 503,76 512,60 521,44 529,27 536,10 540,0">
          <text:p/>
        </draw:polygon>
        <draw:polygon draw:style-name="gr87" draw:text-style-name="P48" draw:layer="layout" svg:width="0.566cm" svg:height="0.387cm" svg:x="19.727cm" svg:y="10.229cm" svg:viewBox="0 0 567 388" draw:points="567,0 567,2 559,20 552,37 543,54 534,71 525,88 515,104 504,120 493,136 482,151 470,166 457,181 444,195 431,208 417,222 403,235 389,247 374,259 358,270 342,281 326,292 310,302 293,311 276,320 259,329 242,337 224,344 206,351 188,357 170,363 151,368 133,372 114,376 95,379 76,382 57,384 38,385 19,387 0,388 0,374 19,374 37,373 56,372 75,369 93,367 112,364 130,360 148,355 166,350 184,345 202,339 219,332 237,325 254,317 270,309 287,300 303,291 319,281 335,271 350,260 365,249 381,237 395,225 409,213 422,200 435,186 448,172 460,158 472,143 483,128 494,113 504,97 514,82 523,65 532,49 540,32 548,15 554,0">
          <text:p/>
        </draw:polygon>
        <draw:polygon draw:style-name="gr88" draw:text-style-name="P49" draw:layer="layout" svg:width="0.58cm" svg:height="0.399cm" svg:x="19.727cm" svg:y="10.229cm" svg:viewBox="0 0 581 400" draw:points="581,0 578,7 571,25 563,43 554,60 545,77 535,94 525,111 515,127 503,143 492,159 479,174 467,189 454,203 440,217 426,231 412,244 397,257 382,269 366,281 350,292 334,303 317,313 300,323 283,333 265,341 247,349 228,357 210,364 192,370 173,376 154,381 135,385 116,389 97,393 78,395 58,397 39,399 19,400 0,400 0,388 19,387 38,386 57,385 76,383 95,380 114,377 133,373 151,369 170,364 188,358 206,352 224,345 242,338 260,330 277,321 294,311 311,302 327,292 343,281 359,270 374,259 389,247 403,235 417,222 431,208 444,195 457,181 470,166 482,151 493,136 504,120 515,104 525,88 534,71 543,54 552,37 559,20 567,2 567,0">
          <text:p/>
        </draw:polygon>
        <draw:polygon draw:style-name="gr89" draw:text-style-name="P50" draw:layer="layout" svg:width="0.593cm" svg:height="0.412cm" svg:x="19.727cm" svg:y="10.229cm" svg:viewBox="0 0 594 413" draw:points="594,0 590,11 582,30 574,48 565,66 556,83 546,101 536,118 525,134 514,151 502,166 489,182 476,197 463,212 449,226 435,240 420,254 405,267 389,280 373,292 357,303 340,314 323,325 306,334 289,344 271,352 253,361 234,368 215,375 197,382 178,388 158,393 138,398 119,402 99,405 79,408 59,410 40,412 20,412 0,413 0,400 19,400 39,399 58,397 78,395 97,393 116,389 135,385 155,381 174,376 193,370 211,364 229,357 248,349 265,341 283,333 300,323 317,314 334,304 350,293 366,282 382,270 397,258 412,244 426,231 440,217 454,203 467,189 479,174 492,159 503,143 515,127 525,111 535,94 545,77 554,60 563,43 571,25 578,7 581,0">
          <text:p/>
        </draw:polygon>
        <draw:polygon draw:style-name="gr89" draw:text-style-name="P50" draw:layer="layout" svg:width="0.607cm" svg:height="0.424cm" svg:x="19.727cm" svg:y="10.229cm" svg:viewBox="0 0 608 425" draw:points="608,0 602,16 594,35 586,53 577,71 566,89 556,107 545,124 534,142 523,159 510,175 498,191 485,206 471,221 457,236 442,250 427,264 412,277 396,290 380,302 363,314 346,325 329,335 311,345 293,355 275,364 256,372 238,380 219,387 200,394 180,400 161,405 141,410 121,414 101,417 81,420 61,422 40,424 20,425 0,425 0,413 20,412 40,412 59,410 79,408 99,405 119,402 138,398 157,393 177,388 196,382 214,375 233,368 252,361 270,352 288,344 305,334 322,325 339,314 356,303 372,292 388,280 404,267 419,254 434,241 448,227 462,213 475,198 488,183 501,167 513,152 524,134 535,118 545,101 555,83 564,66 573,48 582,30 590,11 594,0">
          <text:p/>
        </draw:polygon>
        <draw:polygon draw:style-name="gr90" draw:text-style-name="P51" draw:layer="layout" svg:width="0.62cm" svg:height="0.437cm" svg:x="19.727cm" svg:y="10.229cm" svg:viewBox="0 0 621 438" draw:points="621,0 621,1 613,22 605,41 597,60 588,78 578,96 568,114 557,132 546,149 534,166 521,183 508,199 495,215 481,230 467,245 452,259 436,273 420,287 404,300 387,312 370,324 353,335 335,346 317,356 299,366 280,375 261,384 242,392 223,399 203,406 184,412 164,417 144,422 123,426 103,430 82,433 62,435 41,437 21,438 0,438 0,425 20,425 40,424 61,422 81,420 101,417 121,414 141,410 161,405 180,400 200,394 219,387 238,380 256,372 275,364 293,355 311,345 329,335 346,325 363,314 380,302 396,290 412,277 428,264 443,250 458,236 472,221 486,206 499,191 511,175 524,159 535,142 546,125 557,108 567,90 577,72 586,54 594,36 602,16 608,0">
          <text:p/>
        </draw:polygon>
        <draw:polygon draw:style-name="gr91" draw:text-style-name="P52" draw:layer="layout" svg:width="0.633cm" svg:height="0.445cm" svg:x="19.727cm" svg:y="10.229cm" svg:viewBox="0 0 634 446" draw:points="634,0 632,6 625,25 617,45 608,64 599,83 589,102 579,120 568,138 556,155 544,173 531,190 518,207 504,223 490,239 476,254 460,268 445,283 429,296 412,310 395,322 378,334 361,346 343,357 324,367 306,377 287,387 267,395 248,403 228,411 207,418 187,424 167,429 146,434 126,439 105,442 84,445 78,446 0,446 0,438 21,438 41,437 62,435 82,433 103,430 123,426 144,422 164,417 184,412 203,406 224,399 243,392 262,384 281,375 300,366 318,356 336,346 354,335 371,324 388,312 405,300 421,287 436,273 452,259 467,245 481,230 495,215 508,198 521,182 534,165 546,148 557,131 568,113 578,95 588,77 597,59 605,40 613,21 621,1 621,0">
          <text:p/>
        </draw:polygon>
        <draw:polygon draw:style-name="gr92" draw:text-style-name="P53" draw:layer="layout" svg:width="0.569cm" svg:height="0.445cm" svg:x="19.805cm" svg:y="10.229cm" svg:viewBox="0 0 570 446" draw:points="570,0 566,10 559,30 550,50 542,69 532,89 522,108 511,126 500,145 488,163 476,180 463,197 450,215 436,231 421,247 406,263 391,278 375,292 358,306 341,319 324,332 306,345 288,357 270,368 251,378 232,388 213,398 193,407 174,415 153,423 133,430 113,436 92,442 74,446 0,446 6,445 27,442 48,439 68,434 89,429 109,424 129,418 149,411 169,403 188,395 208,387 227,377 245,367 264,357 282,346 299,334 316,322 333,310 350,296 367,283 382,268 398,254 412,239 426,223 440,207 453,190 466,173 478,155 490,138 501,120 511,102 521,83 530,64 539,45 547,25 554,6 556,0">
          <text:p/>
        </draw:polygon>
        <draw:polygon draw:style-name="gr93" draw:text-style-name="P54" draw:layer="layout" svg:width="0.508cm" svg:height="0.445cm" svg:x="19.879cm" svg:y="10.229cm" svg:viewBox="0 0 509 446" draw:points="509,0 504,14 496,34 488,55 479,75 469,94 459,114 448,133 437,151 425,170 412,187 399,206 385,223 371,240 357,256 341,272 326,287 309,302 293,316 276,329 258,343 240,355 222,367 203,379 184,389 165,400 144,409 124,418 104,427 84,434 63,441 49,446 0,446 18,442 39,436 59,430 79,423 100,415 119,407 139,398 159,388 178,378 197,368 215,357 233,345 251,332 268,319 285,306 301,292 317,278 332,263 347,247 362,231 376,215 389,197 402,180 414,163 426,145 437,126 448,108 458,89 468,69 476,50 485,30 492,10 496,0">
          <text:p/>
        </draw:polygon>
        <draw:polygon draw:style-name="gr94" draw:text-style-name="P55" draw:layer="layout" svg:width="0.472cm" svg:height="0.445cm" svg:x="19.928cm" svg:y="10.229cm" svg:viewBox="0 0 473 446" draw:points="473,0 467,18 459,39 451,60 441,80 432,100 421,120 410,139 398,158 386,177 373,195 360,214 346,231 332,248 317,264 301,280 285,296 269,311 252,325 234,339 217,353 198,365 180,378 161,389 141,400 121,411 101,421 80,430 60,438 40,446 0,446 14,441 35,434 55,427 75,418 95,409 115,400 135,389 154,379 173,367 191,355 209,343 227,329 244,316 260,302 277,287 292,272 308,256 322,240 336,223 350,206 363,187 376,170 388,151 399,133 410,114 420,94 430,75 439,55 447,34 455,14 460,0">
          <text:p/>
        </draw:polygon>
        <draw:polygon draw:style-name="gr95" draw:text-style-name="P56" draw:layer="layout" svg:width="0.445cm" svg:height="0.445cm" svg:x="19.968cm" svg:y="10.229cm" svg:viewBox="0 0 446 446" draw:points="446,0 446,1 439,23 431,44 422,65 413,85 403,106 392,126 381,145 369,165 357,184 344,202 330,221 316,239 301,256 286,273 269,289 253,305 236,320 219,335 201,349 183,363 164,376 145,388 126,400 106,411 86,422 66,432 45,441 34,446 0,446 20,438 40,430 61,421 81,411 100,400 120,389 139,378 157,365 176,353 193,339 211,325 228,311 244,296 260,280 276,264 292,248 306,231 320,214 333,195 346,177 358,158 370,139 381,120 392,100 401,80 411,60 419,39 427,18 433,0">
          <text:p/>
        </draw:polygon>
        <draw:polygon draw:style-name="gr96" draw:text-style-name="P57" draw:layer="layout" svg:width="0.424cm" svg:height="0.445cm" svg:x="20.002cm" svg:y="10.229cm" svg:viewBox="0 0 425 446" draw:points="425,0 424,5 417,27 408,48 400,70 390,91 380,111 369,132 358,152 346,171 333,191 320,211 306,229 291,247 276,265 261,282 245,298 228,314 211,330 194,345 176,359 157,373 137,386 118,399 99,411 78,422 58,433 37,443 32,446 0,446 11,441 32,432 52,422 72,411 92,400 111,388 130,376 150,363 168,349 186,335 203,320 220,305 236,289 252,273 267,256 282,239 296,221 310,202 323,184 335,165 347,145 358,126 369,106 379,85 388,65 397,44 405,23 412,1 412,0">
          <text:p/>
        </draw:polygon>
        <draw:polygon draw:style-name="gr97" draw:text-style-name="P58" draw:layer="layout" svg:width="0.406cm" svg:height="0.445cm" svg:x="20.034cm" svg:y="10.229cm" svg:viewBox="0 0 407 446" draw:points="407,0 404,9 396,31 388,53 379,75 369,96 359,117 348,138 336,158 324,178 311,198 298,218 284,237 269,255 254,273 238,290 222,307 205,323 188,339 170,354 151,369 133,383 114,397 94,410 74,422 54,433 33,444 30,446 0,446 5,443 27,433 47,422 68,411 87,399 106,386 125,373 144,359 162,345 179,330 196,314 213,298 229,282 244,265 259,247 274,229 288,211 301,191 314,171 326,152 337,132 348,111 358,91 368,70 376,48 385,27 392,5 393,0">
          <text:p/>
        </draw:polygon>
        <draw:polygon draw:style-name="gr98" draw:text-style-name="P59" draw:layer="layout" svg:width="0.39cm" svg:height="0.445cm" svg:x="20.063cm" svg:y="10.229cm" svg:viewBox="0 0 391 446" draw:points="391,0 387,13 379,35 371,58 362,80 351,101 340,123 329,144 317,165 305,185 292,206 278,225 264,244 249,263 233,281 217,299 201,316 184,333 166,349 148,364 129,379 110,393 91,407 71,420 50,433 30,444 27,446 0,446 3,444 24,433 44,422 64,410 84,397 103,383 121,369 140,354 158,339 175,323 192,307 208,290 224,273 239,255 254,237 268,218 281,198 294,178 306,158 318,138 329,117 339,96 349,75 358,53 367,31 375,9 378,0">
          <text:p/>
        </draw:polygon>
        <draw:polygon draw:style-name="gr99" draw:text-style-name="P60" draw:layer="layout" svg:width="0.376cm" svg:height="0.445cm" svg:x="20.09cm" svg:y="10.229cm" svg:viewBox="0 0 377 446" draw:points="377,0 372,17 364,40 355,62 345,85 335,107 324,128 313,150 301,171 288,192 275,213 261,233 247,252 231,271 216,289 199,307 183,325 165,342 147,358 129,374 110,389 90,403 71,417 50,431 30,443 25,446 0,446 3,444 23,433 44,420 64,407 83,393 102,379 121,364 139,349 157,333 174,316 190,299 206,281 222,263 237,244 251,225 265,206 278,185 290,165 302,144 313,123 324,101 334,80 343,58 352,35 360,13 364,0">
          <text:p/>
        </draw:polygon>
        <draw:polygon draw:style-name="gr100" draw:text-style-name="P61" draw:layer="layout" svg:width="0.364cm" svg:height="0.445cm" svg:x="20.115cm" svg:y="10.229cm" svg:viewBox="0 0 365 446" draw:points="365,0 359,20 351,44 342,67 333,90 322,112 312,134 300,156 288,177 275,198 261,220 247,240 233,260 217,279 201,298 185,316 167,334 150,351 131,367 113,383 94,399 74,414 54,428 33,441 25,446 0,446 5,443 25,431 47,417 66,403 86,389 105,374 123,358 141,342 159,325 175,307 192,289 207,271 223,252 237,233 251,213 264,192 277,171 289,150 300,128 311,107 321,85 330,62 339,40 347,17 352,0">
          <text:p/>
        </draw:polygon>
        <draw:polygon draw:style-name="gr101" draw:text-style-name="P62" draw:layer="layout" svg:width="0.352cm" svg:height="0.445cm" svg:x="20.14cm" svg:y="10.229cm" svg:viewBox="0 0 353 446" draw:points="353,0 346,24 338,48 329,71 319,95 309,117 298,140 286,162 274,184 261,206 247,227 232,247 217,267 202,287 186,306 169,325 151,343 133,360 115,377 95,393 75,409 55,424 35,438 23,446 0,446 7,441 28,428 48,414 68,399 87,383 106,367 125,351 142,334 160,316 176,298 192,279 208,260 222,240 236,220 250,198 263,177 275,156 287,134 297,112 308,90 317,67 326,44 334,20 340,0">
          <text:p/>
        </draw:polygon>
        <draw:polygon draw:style-name="gr102" draw:text-style-name="P63" draw:layer="layout" svg:width="0.342cm" svg:height="0.445cm" svg:x="20.163cm" svg:y="10.229cm" svg:viewBox="0 0 343 446" draw:points="343,0 342,4 335,28 326,52 317,76 308,100 297,123 286,146 274,168 261,190 248,213 234,234 220,255 204,275 188,295 171,314 154,333 136,351 118,369 99,386 80,403 60,419 40,434 23,446 0,446 12,438 32,424 52,409 72,393 91,377 109,360 127,343 145,325 162,306 178,287 194,267 209,247 224,227 238,206 251,184 263,162 275,140 286,117 296,95 306,71 315,48 323,24 330,0">
          <text:p/>
        </draw:polygon>
        <draw:polygon draw:style-name="gr103" draw:text-style-name="P64" draw:layer="layout" svg:width="0.339cm" svg:height="0.445cm" svg:x="20.186cm" svg:y="10.229cm" svg:viewBox="0 0 340 446" draw:points="340,0 337,9 329,34 321,59 312,83 302,107 291,131 280,154 268,177 254,200 240,223 226,245 211,266 195,287 179,307 162,327 145,346 126,365 108,383 89,400 69,417 48,434 32,446 0,446 17,434 37,419 57,403 76,386 95,369 113,351 131,333 148,314 164,295 180,275 196,255 210,234 224,213 237,190 250,168 262,146 274,123 285,100 294,76 303,52 312,28 319,4 320,0">
          <text:p/>
        </draw:polygon>
        <draw:polygon draw:style-name="gr104" draw:text-style-name="P65" draw:layer="layout" svg:width="0.326cm" svg:height="0.445cm" svg:x="20.218cm" svg:y="10.229cm" svg:viewBox="0 0 327 446" draw:points="327,0 323,14 315,40 307,65 297,90 287,114 276,139 265,163 252,186 239,210 225,233 210,255 195,277 179,298 162,319 144,339 126,359 108,378 89,397 69,414 49,432 31,446 0,446 16,434 37,417 57,400 76,383 94,365 113,346 130,327 147,307 164,287 180,266 195,245 209,223 223,200 236,177 248,154 259,131 270,107 280,83 289,59 297,34 305,9 308,0">
          <text:p/>
        </draw:polygon>
        <draw:polygon draw:style-name="gr105" draw:text-style-name="P66" draw:layer="layout" svg:width="0.315cm" svg:height="0.445cm" svg:x="20.249cm" svg:y="10.229cm" svg:viewBox="0 0 316 446" draw:points="316,0 310,20 302,46 293,71 284,97 273,122 262,147 250,171 238,195 224,220 210,243 195,266 179,288 163,310 146,331 128,352 110,372 91,391 72,410 51,429 31,446 0,446 19,432 39,414 59,397 78,378 96,359 114,339 131,319 148,298 164,277 179,255 194,233 208,210 221,186 234,163 245,139 256,114 266,90 276,65 284,40 292,14 296,0">
          <text:p/>
        </draw:polygon>
        <draw:polygon draw:style-name="gr106" draw:text-style-name="P67" draw:layer="layout" svg:width="0.304cm" svg:height="0.445cm" svg:x="20.279cm" svg:y="10.229cm" svg:viewBox="0 0 305 446" draw:points="305,0 298,25 290,51 281,78 271,104 261,129 249,155 237,180 224,204 210,229 196,253 181,276 164,299 147,321 129,343 111,364 93,385 73,405 53,424 33,443 29,446 0,446 20,429 41,410 60,391 79,372 97,352 115,331 132,310 148,288 164,266 180,243 194,220 208,195 220,171 232,147 243,122 254,97 263,71 272,46 280,20 286,0">
          <text:p/>
        </draw:polygon>
        <draw:path draw:style-name="gr107" draw:text-style-name="P68" draw:layer="layout" svg:width="0.322cm" svg:height="0.667cm" svg:x="20.308cm" svg:y="10.007cm" svg:viewBox="0 0 323 668" svg:d="M296 222l-1 3-8 27-8 27-9 27-10 28-11 26-12 26-12 25-13 25-14 25-15 24-16 24-16 23-17 23-18 22-18 22-20 21-20 20-21 20-9 8h-28l4-3 20-19 20-19 20-20 19-21 18-21 18-22 17-22 16-23 15-23 14-24 14-24 13-24 12-25 12-26 10-25 10-27 9-27 8-26 7-25zM313 0l10 10v18l-1 29-3 28-3 28-3 22z">
          <text:p/>
        </draw:path>
        <draw:polygon draw:style-name="gr108" draw:text-style-name="P69" draw:layer="layout" svg:width="0.313cm" svg:height="0.657cm" svg:x="20.336cm" svg:y="10.017cm" svg:viewBox="0 0 314 658" draw:points="285,213 285,125 288,103 291,75 294,47 295,18 295,0 314,19 312,48 310,77 307,106 303,134 298,164 292,192 285,220 278,248 269,276 260,304 249,331 238,357 226,384 214,410 200,435 186,461 171,485 155,510 138,533 121,556 102,579 83,601 63,622 43,643 28,658 0,658 9,650 30,630 49,610 69,589 87,567 106,545 123,522 139,499 155,475 170,451 184,426 197,401 209,376 221,350 232,324 242,297 251,270 259,243 267,216 268,213">
          <text:p/>
        </draw:polygon>
        <draw:polygon draw:style-name="gr109" draw:text-style-name="P70" draw:layer="layout" svg:width="0.303cm" svg:height="0.638cm" svg:x="20.364cm" svg:y="10.036cm" svg:viewBox="0 0 304 639" draw:points="304,18 303,30 301,60 298,89 293,118 288,147 282,176 275,205 268,234 259,262 249,290 239,318 228,345 215,372 202,398 189,424 174,450 158,475 142,501 125,525 107,549 89,572 70,594 50,616 29,638 28,639 0,639 15,624 36,603 56,582 74,560 93,537 110,514 127,490 143,465 158,441 172,415 186,390 198,364 210,337 221,311 232,284 241,256 250,228 257,200 264,172 270,144 275,115 279,87 282,58 284,29 286,0">
          <text:p/>
        </draw:polygon>
        <draw:polygon draw:style-name="gr110" draw:text-style-name="P71" draw:layer="layout" svg:width="0.294cm" svg:height="0.62cm" svg:x="20.391cm" svg:y="10.054cm" svg:viewBox="0 0 295 621" draw:points="295,18 293,43 289,73 285,103 280,133 274,163 267,193 258,222 249,251 239,279 228,307 217,335 204,363 191,390 177,417 162,443 146,468 130,494 112,518 94,542 75,566 56,589 36,611 26,621 0,621 1,620 22,598 42,576 61,554 79,531 97,507 114,483 130,458 146,433 161,407 174,381 187,355 200,328 211,301 221,273 231,245 240,217 247,188 254,158 260,129 265,100 271,71 274,42 276,12 277,0">
          <text:p/>
        </draw:polygon>
        <draw:polygon draw:style-name="gr111" draw:text-style-name="P72" draw:layer="layout" svg:width="0.285cm" svg:height="0.602cm" svg:x="20.417cm" svg:y="10.072cm" svg:viewBox="0 0 286 603" draw:points="286,17 285,27 282,58 278,88 272,119 266,149 259,179 251,208 242,238 232,267 221,295 209,324 196,352 183,379 168,407 152,433 136,460 119,486 102,511 83,536 64,560 44,583 26,603 0,603 10,593 30,571 49,548 68,524 86,500 104,476 120,449 136,424 151,398 165,371 179,344 192,316 203,288 214,260 224,232 233,203 241,174 248,145 254,115 259,85 263,55 267,25 269,0">
          <text:p/>
        </draw:polygon>
        <draw:polygon draw:style-name="gr112" draw:text-style-name="P73" draw:layer="layout" svg:width="0.276cm" svg:height="0.585cm" svg:x="20.443cm" svg:y="10.089cm" svg:viewBox="0 0 277 586" draw:points="277,17 275,43 270,74 265,105 258,137 251,167 243,197 234,227 223,257 212,286 200,315 187,344 174,372 159,400 144,427 127,454 109,480 91,505 72,531 52,555 32,579 26,586 0,586 18,566 38,543 57,519 76,494 93,469 110,444 127,417 143,391 157,363 170,336 183,308 195,279 206,251 216,222 225,192 233,163 240,133 246,102 252,71 256,41 259,10 260,0">
          <text:p/>
        </draw:polygon>
        <draw:polygon draw:style-name="gr113" draw:text-style-name="P74" draw:layer="layout" svg:width="0.267cm" svg:height="0.568cm" svg:x="20.469cm" svg:y="10.106cm" svg:viewBox="0 0 268 569" draw:points="268,17 267,28 263,60 257,92 251,123 243,154 235,185 226,215 214,245 203,275 191,305 178,334 163,363 149,392 133,420 116,447 98,473 80,500 61,525 41,550 25,569 0,569 6,562 26,538 46,514 65,488 83,463 100,437 117,410 132,382 147,354 160,326 173,297 185,268 196,239 207,209 216,179 225,149 232,119 239,88 244,57 249,26 251,0">
          <text:p/>
        </draw:polygon>
        <draw:polygon draw:style-name="gr114" draw:text-style-name="P75" draw:layer="layout" svg:width="0.254cm" svg:height="0.551cm" svg:x="20.494cm" svg:y="10.123cm" svg:viewBox="0 0 255 552" draw:points="255,12 255,13 250,45 245,78 238,110 230,141 222,172 212,203 202,234 191,264 178,294 165,323 151,352 136,381 119,409 102,436 84,463 65,490 46,516 26,541 16,552 0,552 16,533 36,508 55,483 73,456 91,430 108,403 124,375 139,347 154,318 167,289 179,259 190,229 201,199 210,169 218,138 226,107 232,76 238,43 242,11 243,0">
          <text:p/>
        </draw:polygon>
        <draw:polygon draw:style-name="gr115" draw:text-style-name="P76" draw:layer="layout" svg:width="0.249cm" svg:height="0.539cm" svg:x="20.51cm" svg:y="10.135cm" svg:viewBox="0 0 250 540" draw:points="250,11 247,35 241,67 234,99 227,131 218,163 208,194 197,225 185,256 173,286 159,316 145,345 130,375 113,403 96,431 78,459 59,485 40,511 19,537 17,540 0,540 10,529 30,504 49,478 68,451 86,424 103,397 119,369 134,339 148,310 161,281 174,251 185,221 195,190 206,159 214,128 222,97 229,65 234,33 239,1 239,0">
          <text:p/>
        </draw:polygon>
        <draw:polygon draw:style-name="gr116" draw:text-style-name="P77" draw:layer="layout" svg:width="0.243cm" svg:height="0.528cm" svg:x="20.527cm" svg:y="10.146cm" svg:viewBox="0 0 244 529" draw:points="244,11 242,26 236,59 230,91 222,123 213,156 203,188 193,219 181,250 168,281 155,311 140,341 125,370 108,399 91,427 73,455 54,482 34,508 17,529 0,529 2,526 24,500 43,474 62,448 80,420 97,392 114,364 129,335 143,306 157,276 169,246 181,215 191,184 201,153 210,120 217,88 224,56 230,24 233,0">
          <text:p/>
        </draw:polygon>
        <draw:polygon draw:style-name="gr117" draw:text-style-name="P78" draw:layer="layout" svg:width="0.238cm" svg:height="0.517cm" svg:x="20.543cm" svg:y="10.157cm" svg:viewBox="0 0 239 518" draw:points="239,11 238,17 233,50 226,83 218,115 209,148 199,180 188,211 177,243 164,274 150,304 135,334 120,364 103,393 85,423 67,451 48,478 27,505 16,518 0,518 17,497 37,471 57,444 75,415 92,387 109,358 124,329 139,299 152,269 165,238 177,207 187,176 197,144 206,112 214,80 220,48 226,15 228,0">
          <text:p/>
        </draw:polygon>
        <draw:polygon draw:style-name="gr118" draw:text-style-name="P79" draw:layer="layout" svg:width="0.233cm" svg:height="0.506cm" svg:x="20.559cm" svg:y="10.168cm" svg:viewBox="0 0 234 507" draw:points="234,11 229,41 222,75 214,107 204,140 194,173 183,206 171,237 158,269 144,300 129,330 114,360 97,389 79,418 60,447 41,474 21,502 16,507 0,507 11,494 31,467 50,440 68,412 86,383 103,354 118,324 133,294 147,264 160,233 171,201 182,169 192,137 201,104 210,72 217,39 222,6 223,0">
          <text:p/>
        </draw:polygon>
        <draw:polygon draw:style-name="gr119" draw:text-style-name="P80" draw:layer="layout" svg:width="0.228cm" svg:height="0.495cm" svg:x="20.575cm" svg:y="10.179cm" svg:viewBox="0 0 229 496" draw:points="229,11 225,33 218,66 210,100 201,133 190,165 179,198 167,230 154,262 140,293 125,324 109,354 92,384 74,413 55,443 35,471 16,496 0,496 5,491 25,463 44,435 63,406 81,377 98,348 113,318 128,288 142,257 155,225 167,194 178,162 188,129 198,96 206,64 213,30 218,0">
          <text:p/>
        </draw:polygon>
        <draw:polygon draw:style-name="gr120" draw:text-style-name="P81" draw:layer="layout" svg:width="0.223cm" svg:height="0.484cm" svg:x="20.591cm" svg:y="10.19cm" svg:viewBox="0 0 224 485" draw:points="224,11 222,24 215,58 206,92 197,125 187,158 176,191 163,225 149,257 135,288 120,319 104,350 86,380 68,410 49,439 29,467 16,485 0,485 19,460 39,432 58,403 76,374 93,344 109,314 124,283 138,252 151,220 163,187 175,154 185,122 194,89 202,55 209,22 213,0">
          <text:p/>
        </draw:polygon>
        <draw:polygon draw:style-name="gr121" draw:text-style-name="P82" draw:layer="layout" svg:width="0.218cm" svg:height="0.476cm" svg:x="20.607cm" svg:y="10.201cm" svg:viewBox="0 0 219 477" draw:points="219,11 218,15 211,51 203,85 193,119 183,152 172,185 159,218 146,251 131,283 115,314 99,345 81,376 63,406 44,435 23,464 13,477 13,474 0,474 13,456 33,428 52,399 70,369 88,339 104,308 120,277 134,246 148,214 160,181 171,148 181,115 190,82 199,48 206,13 208,0">
          <text:p/>
        </draw:polygon>
        <draw:polygon draw:style-name="gr122" draw:text-style-name="P83" draw:layer="layout" svg:width="0.215cm" svg:height="0.486cm" svg:x="20.62cm" svg:y="10.212cm" svg:viewBox="0 0 216 487" draw:points="216,10 210,41 202,76 192,110 182,144 170,178 158,211 144,245 130,277 113,309 96,340 79,371 60,401 41,431 21,460 0,487 0,466 10,453 31,424 50,395 68,365 86,334 102,303 117,272 133,240 146,206 159,173 170,140 180,107 190,73 198,39 205,4 206,0">
          <text:p/>
        </draw:polygon>
        <draw:polygon draw:style-name="gr122" draw:text-style-name="P83" draw:layer="layout" svg:width="0.226cm" svg:height="0.496cm" svg:x="20.62cm" svg:y="10.222cm" svg:viewBox="0 0 227 497" draw:points="227,11 222,34 214,69 204,104 194,138 181,172 169,205 155,239 140,271 124,304 107,335 90,366 71,397 51,428 31,457 9,486 0,497 0,477 21,450 41,420 60,390 79,360 96,329 113,298 129,266 143,234 157,201 169,168 181,134 191,100 202,66 210,31 216,0">
          <text:p/>
        </draw:polygon>
        <draw:polygon draw:style-name="gr123" draw:text-style-name="P84" draw:layer="layout" svg:width="0.237cm" svg:height="0.505cm" svg:x="20.62cm" svg:y="10.233cm" svg:viewBox="0 0 238 506" draw:points="238,11 234,26 226,61 216,96 206,132 194,166 181,200 167,234 152,267 136,299 119,331 102,363 83,394 63,424 42,454 19,483 0,506 0,486 9,475 32,446 52,417 72,387 91,356 108,325 125,294 141,261 156,229 170,195 182,162 194,128 204,93 214,58 222,23 227,0">
          <text:p/>
        </draw:polygon>
        <draw:polygon draw:style-name="gr124" draw:text-style-name="P85" draw:layer="layout" svg:width="0.247cm" svg:height="0.514cm" svg:x="20.62cm" svg:y="10.244cm" svg:viewBox="0 0 248 515" draw:points="248,10 247,18 238,53 228,89 218,124 206,158 193,193 179,227 164,260 148,294 130,326 112,358 93,389 73,420 52,450 30,479 7,508 0,515 0,495 20,472 42,443 63,413 83,383 102,352 119,320 136,287 152,255 167,222 181,188 194,154 206,120 216,85 226,50 234,15 238,0">
          <text:p/>
        </draw:polygon>
        <draw:polygon draw:style-name="gr125" draw:text-style-name="P86" draw:layer="layout" svg:width="0.258cm" svg:height="0.523cm" svg:x="20.62cm" svg:y="10.254cm" svg:viewBox="0 0 259 524" draw:points="259,11 250,46 241,82 230,118 218,153 205,187 190,222 175,255 159,289 141,321 123,354 104,385 83,416 61,446 39,477 16,506 0,524 0,505 6,498 29,469 51,439 73,409 93,378 112,347 130,315 148,283 164,250 179,217 193,183 206,148 218,114 228,79 238,43 247,8 248,0">
          <text:p/>
        </draw:polygon>
        <draw:polygon draw:style-name="gr125" draw:text-style-name="P86" draw:layer="layout" svg:width="0.268cm" svg:height="0.532cm" svg:x="20.62cm" svg:y="10.265cm" svg:viewBox="0 0 269 533" draw:points="269,10 262,39 253,75 242,111 229,147 216,182 202,217 186,251 170,284 152,317 133,350 113,382 93,413 71,444 49,474 25,503 1,531 0,533 0,513 16,495 39,466 61,436 82,406 103,375 122,344 140,311 159,279 175,245 190,212 205,177 218,143 230,108 241,71 250,35 259,0">
          <text:p/>
        </draw:polygon>
        <draw:polygon draw:style-name="gr126" draw:text-style-name="P87" draw:layer="layout" svg:width="0.279cm" svg:height="0.54cm" svg:x="20.62cm" svg:y="10.275cm" svg:viewBox="0 0 280 541" draw:points="280,11 275,32 265,68 254,104 241,140 228,176 213,211 198,246 181,280 163,313 145,346 125,379 104,410 81,441 59,471 35,501 10,530 0,541 0,523 1,521 25,493 49,464 71,434 94,403 114,372 134,340 152,307 170,274 186,241 202,206 216,171 229,136 242,100 253,65 262,29 269,0">
          <text:p/>
        </draw:polygon>
        <draw:polygon draw:style-name="gr127" draw:text-style-name="P88" draw:layer="layout" svg:width="0.289cm" svg:height="0.548cm" svg:x="20.62cm" svg:y="10.286cm" svg:viewBox="0 0 290 549" draw:points="290,10 287,24 277,61 265,97 253,133 240,169 225,205 209,239 192,274 174,307 156,341 136,373 115,406 93,438 70,468 46,498 20,527 0,549 0,530 10,519 35,490 60,460 82,430 104,398 125,367 145,334 163,301 181,268 198,234 213,200 228,165 241,129 254,93 265,57 275,21 280,0">
          <text:p/>
        </draw:polygon>
        <draw:polygon draw:style-name="gr128" draw:text-style-name="P89" draw:layer="layout" svg:width="0.305cm" svg:height="0.565cm" svg:x="20.62cm" svg:y="10.296cm" svg:viewBox="0 0 306 566" draw:points="306,16 305,18 295,56 283,93 271,130 257,167 242,203 226,238 209,273 190,308 171,341 150,374 129,407 107,439 83,470 59,500 34,529 8,558 0,566 0,539 20,517 45,488 69,458 92,428 114,396 135,364 155,332 173,298 191,265 209,230 225,196 240,160 253,123 265,87 277,51 287,14 290,0">
          <text:p/>
        </draw:polygon>
        <draw:polygon draw:style-name="gr129" draw:text-style-name="P90" draw:layer="layout" svg:width="0.32cm" svg:height="0.576cm" svg:x="20.62cm" svg:y="10.312cm" svg:viewBox="0 0 321 577" draw:points="321,15 313,45 301,83 288,120 275,157 259,193 243,229 226,265 207,300 188,334 167,368 146,401 123,434 99,465 75,496 49,526 23,555 0,577 0,550 8,542 35,513 60,484 84,454 108,423 130,391 151,358 172,324 191,291 209,256 226,221 242,186 257,150 271,114 283,77 295,40 305,2 306,0">
          <text:p/>
        </draw:polygon>
        <draw:polygon draw:style-name="gr130" draw:text-style-name="P91" draw:layer="layout" svg:width="0.335cm" svg:height="0.569cm" svg:x="20.62cm" svg:y="10.327cm" svg:viewBox="0 0 336 570" draw:points="336,15 331,35 319,74 305,112 291,149 276,187 259,223 242,259 223,295 203,329 182,364 160,397 137,430 128,442 0,570 0,562 22,540 48,511 74,481 98,450 122,419 145,386 166,353 187,320 206,286 225,251 242,215 258,178 274,142 287,105 300,68 312,30 321,0">
          <text:p/>
        </draw:polygon>
        <draw:polygon draw:style-name="gr131" draw:text-style-name="P92" draw:layer="layout" svg:width="0.223cm" svg:height="0.426cm" svg:x="20.748cm" svg:y="10.342cm" svg:viewBox="0 0 224 427" draw:points="224,16 221,26 209,65 196,104 182,142 166,179 149,216 131,253 112,289 91,324 73,355 0,427 9,415 32,382 54,349 75,314 95,280 115,244 132,208 149,172 164,135 178,98 191,59 203,20 208,0">
          <text:p/>
        </draw:polygon>
        <draw:polygon draw:style-name="gr132" draw:text-style-name="P93" draw:layer="layout" svg:width="0.165cm" svg:height="0.338cm" svg:x="20.821cm" svg:y="10.358cm" svg:viewBox="0 0 166 339" draw:points="166,15 154,54 141,93 126,132 110,170 93,207 75,244 56,282 54,285 0,339 18,308 38,273 58,236 76,199 93,162 109,125 123,87 136,49 148,10 151,0">
          <text:p/>
        </draw:polygon>
        <draw:polygon draw:style-name="gr132" draw:text-style-name="P93" draw:layer="layout" svg:width="0.122cm" svg:height="0.269cm" svg:x="20.874cm" svg:y="10.373cm" svg:viewBox="0 0 123 270" draw:points="123,10 112,43 98,83 84,121 68,160 51,198 32,235 31,239 0,270 2,267 21,229 39,192 56,155 72,117 87,78 100,39 112,0">
          <text:p/>
        </draw:polygon>
        <draw:polygon draw:style-name="gr133" draw:text-style-name="P94" draw:layer="layout" svg:width="0.101cm" svg:height="0.229cm" svg:x="20.905cm" svg:y="10.383cm" svg:viewBox="0 0 102 230" draw:points="102,10 94,37 80,77 65,116 48,155 31,193 27,201 0,230 1,226 20,188 37,150 54,111 68,73 82,33 92,0">
          <text:p/>
        </draw:polygon>
        <draw:polygon draw:style-name="gr133" draw:text-style-name="P94" draw:layer="layout" svg:width="0.084cm" svg:height="0.191cm" svg:x="20.932cm" svg:y="10.393cm" svg:viewBox="0 0 85 192" draw:points="85,10 79,31 65,71 50,111 34,150 27,166 0,192 4,184 21,145 38,106 53,67 67,27 75,0">
          <text:p/>
        </draw:polygon>
        <draw:polygon draw:style-name="gr134" draw:text-style-name="P95" draw:layer="layout" svg:width="0.068cm" svg:height="0.155cm" svg:x="20.958cm" svg:y="10.403cm" svg:viewBox="0 0 69 156" draw:points="69,10 65,25 51,66 36,106 25,132 0,156 7,141 24,102 39,62 53,21 59,0">
          <text:p/>
        </draw:polygon>
        <draw:polygon draw:style-name="gr134" draw:text-style-name="P95" draw:layer="layout" svg:width="0.054cm" svg:height="0.121cm" svg:x="20.982cm" svg:y="10.413cm" svg:viewBox="0 0 55 122" draw:points="55,10 53,19 38,60 23,99 0,122 11,96 26,55 40,15 44,0">
          <text:p/>
        </draw:polygon>
        <draw:polygon draw:style-name="gr135" draw:text-style-name="P96" draw:layer="layout" svg:width="0.041cm" svg:height="0.088cm" svg:x="21.005cm" svg:y="10.423cm" svg:viewBox="0 0 42 89" draw:points="42,10 42,13 27,54 23,68 0,89 16,50 30,9 32,0">
          <text:p/>
        </draw:polygon>
        <draw:polygon draw:style-name="gr135" draw:text-style-name="P96" draw:layer="layout" svg:width="0.029cm" svg:height="0.057cm" svg:x="21.027cm" svg:y="10.433cm" svg:viewBox="0 0 30 58" draw:points="30,10 22,37 0,58 4,45 20,3 20,0">
          <text:p/>
        </draw:polygon>
        <draw:polygon draw:style-name="gr136" draw:text-style-name="P97" draw:layer="layout" svg:width="0.017cm" svg:height="0.026cm" svg:x="21.048cm" svg:y="10.443cm" svg:viewBox="0 0 18 27" draw:points="18,9 0,27 9,0">
          <text:p/>
        </draw:polygon>
        <draw:polygon draw:style-name="gr138" draw:text-style-name="P98" draw:layer="layout" svg:width="0cm" svg:height="0.444cm" svg:x="19.727cm" svg:y="10.229cm" svg:viewBox="0 0 0 445" draw:points="0,0 0,445">
          <text:p/>
        </draw:polygon>
        <draw:polygon draw:style-name="gr137" draw:text-style-name="P2" draw:layer="layout" svg:width="1.338cm" svg:height="0.89cm" svg:x="19.727cm" svg:y="10.007cm" svg:viewBox="0 0 1339 891" draw:points="0,222 893,222 893,0 1339,446 893,891 893,668 0,668">
          <text:p/>
        </draw:polygon>
        <draw:frame draw:style-name="gr55" draw:text-style-name="P4" draw:layer="layout" svg:width="0.63cm" svg:height="0.552cm" svg:x="22.055cm" svg:y="12.97cm">
          <draw:text-box>
            <text:p text:style-name="P3"><text:span text:style-name="T3">file</text:span></text:p>
          </draw:text-box>
        </draw:frame>
      </draw:page>
      <draw:page draw:name="page6" draw:style-name="dp1" draw:master-page-name="master-page3">
        <draw:polygon draw:style-name="gr1" draw:text-style-name="P1" draw:layer="layout" svg:width="33.866cm" svg:height="19.049cm" svg:x="0cm" svg:y="0cm" svg:viewBox="0 0 33867 19050" draw:points="0,0 33867,0 33867,19050 0,19050">
          <text:p/>
        </draw:polygon>
        <draw:polygon draw:style-name="gr8" draw:text-style-name="P6" draw:layer="layout" svg:width="2.175cm" svg:height="0.128cm" svg:x="0cm" svg:y="3.056cm" svg:viewBox="0 0 2176 129" draw:points="0,0 2176,0 2176,129 0,129">
          <text:p/>
        </draw:polygon>
        <draw:path draw:style-name="gr139" draw:text-style-name="P1" draw:layer="layout" svg:width="5.266cm" svg:height="5.122cm" svg:x="15.176cm" svg:y="8.462cm" svg:viewBox="0 0 5267 5123" svg:d="M0 854c0-472 382-854 854-854h3560c471 0 853 382 853 854v3415c0 472-382 854-853 854h-3560c-472 0-854-382-854-854z">
          <text:p/>
        </draw:path>
        <draw:frame draw:style-name="gr2" draw:text-style-name="P2" draw:layer="layout" svg:width="3.36cm" svg:height="1.396cm" svg:x="16.264cm" svg:y="8.831cm">
          <draw:image xlink:href="Pictures/10000000000000DE0000005C0BDA0805.png" xlink:type="simple" xlink:show="embed" xlink:actuate="onLoad" draw:mime-type="image/png">
            <text:p/>
          </draw:image>
        </draw:frame>
        <draw:polygon draw:style-name="gr140" draw:text-style-name="P2" draw:layer="layout" svg:width="3.369cm" svg:height="1.405cm" svg:x="16.26cm" svg:y="8.826cm" svg:viewBox="0 0 3370 1406" draw:points="0,0 3370,0 3370,1406 0,1406">
          <text:p/>
        </draw:polygon>
        <draw:frame draw:style-name="gr2" draw:text-style-name="P2" draw:layer="layout" svg:width="2.818cm" svg:height="1.337cm" svg:x="16.248cm" svg:y="10.414cm">
          <draw:image xlink:href="Pictures/10000000000000DC00000068CBE0408A.png" xlink:type="simple" xlink:show="embed" xlink:actuate="onLoad" draw:mime-type="image/png">
            <text:p/>
          </draw:image>
        </draw:frame>
        <draw:frame draw:style-name="gr2" draw:text-style-name="P2" draw:layer="layout" svg:width="1.989cm" svg:height="1.227cm" svg:x="16.248cm" svg:y="11.896cm">
          <draw:image xlink:href="Pictures/100000000000009C0000006149FFC21E.png" xlink:type="simple" xlink:show="embed" xlink:actuate="onLoad" draw:mime-type="image/png">
            <text:p/>
          </draw:image>
        </draw:frame>
        <draw:frame draw:style-name="gr2" draw:text-style-name="P2" draw:layer="layout" svg:width="2.133cm" svg:height="1.066cm" svg:x="17.137cm" svg:y="3.454cm">
          <draw:image xlink:href="Pictures/10000000000000E000000070F6138BEF.jpg" xlink:type="simple" xlink:show="embed" xlink:actuate="onLoad" draw:mime-type="image/jpeg">
            <text:p/>
          </draw:image>
        </draw:frame>
        <draw:frame draw:style-name="gr2" draw:text-style-name="P2" draw:layer="layout" svg:width="4.19cm" svg:height="1.625cm" svg:x="9.491cm" svg:y="6.35cm">
          <draw:image xlink:href="Pictures/1000000000000101000000642026CBC8.png" xlink:type="simple" xlink:show="embed" xlink:actuate="onLoad" draw:mime-type="image/png">
            <text:p/>
          </draw:image>
        </draw:frame>
        <draw:path draw:style-name="gr139" draw:text-style-name="P1" draw:layer="layout" svg:width="5.013cm" svg:height="1.888cm" svg:x="9.977cm" svg:y="4.457cm" svg:viewBox="0 0 5014 1889" svg:d="M0 316c0-175 141-316 315-316h4384c174 0 315 141 315 316v1259c0 174-141 314-315 314h-4384c-174 0-315-140-315-314z">
          <text:p/>
        </draw:path>
        <draw:frame draw:style-name="gr141" draw:text-style-name="P9" draw:layer="layout" svg:width="14.259cm" svg:height="1.309cm" svg:x="0.899cm" svg:y="1.518cm">
          <draw:text-box>
            <text:p text:style-name="P3"><text:span text:style-name="T7">Architecture diagram (to be)</text:span></text:p>
          </draw:text-box>
        </draw:frame>
        <draw:frame draw:style-name="gr142" draw:text-style-name="P4" draw:layer="layout" svg:width="2.295cm" svg:height="0.552cm" svg:x="11.426cm" svg:y="4.902cm">
          <draw:text-box>
            <text:p text:style-name="P3"><text:span text:style-name="T13">ETL2SQL </text:span></text:p>
          </draw:text-box>
        </draw:frame>
        <draw:path draw:style-name="gr8" draw:text-style-name="P6" draw:layer="layout" svg:width="1.363cm" svg:height="1.193cm" svg:x="1.439cm" svg:y="7.299cm" svg:viewBox="0 0 1364 1194" svg:d="M0 0c0 94 305 170 682 170s682-76 682-170v1023c0 94-305 171-682 171s-682-77-682-171z">
          <text:p/>
        </draw:path>
        <draw:path draw:style-name="gr38" draw:text-style-name="P13" draw:layer="layout" svg:width="1.363cm" svg:height="0.341cm" svg:x="1.439cm" svg:y="7.128cm" svg:viewBox="0 0 1364 342" svg:d="M0 171c0-94 305-171 682-171s682 77 682 171c0 95-305 171-682 171s-682-76-682-171z">
          <text:p/>
        </draw:path>
        <draw:path draw:style-name="gr39" draw:text-style-name="P2" draw:layer="layout" svg:width="1.363cm" svg:height="1.364cm" svg:x="1.439cm" svg:y="7.128cm" svg:viewBox="0 0 1364 1365" svg:d="M1364 171c0 94-305 170-682 170s-682-76-682-170 305-171 682-171 682 77 682 171zM1364 171v1023c0 94-305 171-682 171s-682-77-682-171v-1023">
          <text:p/>
        </draw:path>
        <draw:frame draw:style-name="gr143" draw:text-style-name="P4" draw:layer="layout" svg:width="1.858cm" svg:height="0.552cm" svg:x="11.426cm" svg:y="5.494cm">
          <draw:text-box>
            <text:p text:style-name="P3"><text:span text:style-name="T13">software</text:span></text:p>
          </draw:text-box>
        </draw:frame>
        <draw:path draw:style-name="gr8" draw:text-style-name="P6" draw:layer="layout" svg:width="1.694cm" svg:height="1.378cm" svg:x="3.318cm" svg:y="7.128cm" svg:viewBox="0 0 1695 1379" svg:d="M0 1329c729 177 729-176 1459-176v-918h-1459zM121 235v-119h1448v924c-55 0-110 6-110 6v-811zM233 116v-116h1462v921c-63 0-126 5-126 5v-810z">
          <text:p/>
        </draw:path>
        <draw:path draw:style-name="gr39" draw:text-style-name="P2" draw:layer="layout" svg:width="1.694cm" svg:height="1.378cm" svg:x="3.318cm" svg:y="7.128cm" svg:viewBox="0 0 1695 1379" svg:d="M0 235h1459v918c-730 0-730 353-1459 176zM121 235v-119h1448v924c-55 0-110 6-110 6M233 116v-116h1462v921c-63 0-126 5-126 5">
          <text:p/>
        </draw:path>
        <draw:frame draw:style-name="gr144" draw:text-style-name="P99" draw:layer="layout" svg:width="0.825cm" svg:height="0.314cm" svg:x="1.719cm" svg:y="7.748cm">
          <draw:text-box>
            <text:p text:style-name="P3"><text:span text:style-name="T14">Oracle</text:span></text:p>
          </draw:text-box>
        </draw:frame>
        <draw:path draw:style-name="gr8" draw:text-style-name="P6" draw:layer="layout" svg:width="1.363cm" svg:height="1.185cm" svg:x="1.439cm" svg:y="4.834cm" svg:viewBox="0 0 1364 1186" svg:d="M0 0c0 93 305 169 682 169s682-76 682-169v1017c0 93-305 169-682 169s-682-76-682-169z">
          <text:p/>
        </draw:path>
        <draw:path draw:style-name="gr38" draw:text-style-name="P13" draw:layer="layout" svg:width="1.363cm" svg:height="0.338cm" svg:x="1.439cm" svg:y="4.665cm" svg:viewBox="0 0 1364 339" svg:d="M0 169c0-94 305-169 682-169s682 75 682 169-305 170-682 170-682-76-682-170z">
          <text:p/>
        </draw:path>
        <draw:path draw:style-name="gr39" draw:text-style-name="P2" draw:layer="layout" svg:width="1.363cm" svg:height="1.354cm" svg:x="1.439cm" svg:y="4.665cm" svg:viewBox="0 0 1364 1355" svg:d="M1364 170c0 93-305 169-682 169s-682-76-682-169c0-94 305-170 682-170s682 76 682 170zM1364 170v1016c0 93-305 169-682 169s-682-76-682-169v-1016">
          <text:p/>
        </draw:path>
        <draw:frame draw:style-name="gr145" draw:text-style-name="P100" draw:layer="layout" svg:width="0.505cm" svg:height="0.442cm" svg:x="3.792cm" svg:y="7.712cm">
          <draw:text-box>
            <text:p text:style-name="P3"><text:span text:style-name="T15">file</text:span></text:p>
          </draw:text-box>
        </draw:frame>
        <draw:path draw:style-name="gr8" draw:text-style-name="P6" draw:layer="layout" svg:width="1.693cm" svg:height="1.377cm" svg:x="3.268cm" svg:y="4.673cm" svg:viewBox="0 0 1694 1378" svg:d="M0 1329c728 176 728-176 1458-176v-917h-1458zM120 236v-120h1448v923c-55 0-110 7-110 7v-810zM233 116v-116h1461v921c-63 0-126 4-126 4v-809z">
          <text:p/>
        </draw:path>
        <draw:path draw:style-name="gr39" draw:text-style-name="P2" draw:layer="layout" svg:width="1.693cm" svg:height="1.377cm" svg:x="3.268cm" svg:y="4.673cm" svg:viewBox="0 0 1694 1378" svg:d="M0 236h1458v917c-730 0-730 352-1458 176zM120 236v-120h1448v923c-55 0-110 7-110 7M233 116v-116h1461v921c-63 0-126 4-126 4">
          <text:p/>
        </draw:path>
        <draw:frame draw:style-name="gr146" draw:text-style-name="P99" draw:layer="layout" svg:width="0.546cm" svg:height="0.314cm" svg:x="1.846cm" svg:y="5.278cm">
          <draw:text-box>
            <text:p text:style-name="P3"><text:span text:style-name="T14">DB2</text:span></text:p>
          </draw:text-box>
        </draw:frame>
        <draw:path draw:style-name="gr8" draw:text-style-name="P6" draw:layer="layout" svg:width="1.363cm" svg:height="1.193cm" svg:x="1.439cm" svg:y="9.754cm" svg:viewBox="0 0 1364 1194" svg:d="M0 0c0 94 305 171 682 171s682-77 682-171v1024c0 94-305 170-682 170s-682-76-682-170z">
          <text:p/>
        </draw:path>
        <draw:path draw:style-name="gr38" draw:text-style-name="P13" draw:layer="layout" svg:width="1.363cm" svg:height="0.341cm" svg:x="1.439cm" svg:y="9.584cm" svg:viewBox="0 0 1364 342" svg:d="M0 171c0-95 305-171 682-171s682 76 682 171c0 94-305 171-682 171s-682-77-682-171z">
          <text:p/>
        </draw:path>
        <draw:path draw:style-name="gr39" draw:text-style-name="P2" draw:layer="layout" svg:width="1.363cm" svg:height="1.363cm" svg:x="1.439cm" svg:y="9.584cm" svg:viewBox="0 0 1364 1364" svg:d="M1364 170c0 94-305 171-682 171s-682-77-682-171 305-170 682-170 682 76 682 170zM1364 170v1024c0 94-305 170-682 170s-682-76-682-170v-1024">
          <text:p/>
        </draw:path>
        <draw:frame draw:style-name="gr145" draw:text-style-name="P100" draw:layer="layout" svg:width="0.505cm" svg:height="0.442cm" svg:x="3.744cm" svg:y="5.252cm">
          <draw:text-box>
            <text:p text:style-name="P3"><text:span text:style-name="T15">file</text:span></text:p>
          </draw:text-box>
        </draw:frame>
        <draw:path draw:style-name="gr8" draw:text-style-name="P6" draw:layer="layout" svg:width="1.694cm" svg:height="1.385cm" svg:x="3.318cm" svg:y="9.584cm" svg:viewBox="0 0 1695 1386" svg:d="M0 1337c729 177 729-178 1459-178v-923h-1459zM121 236v-119h1448v928c-55 0-110 7-110 7v-816zM233 117v-117h1462v926c-63 0-126 5-126 5v-814z">
          <text:p/>
        </draw:path>
        <draw:path draw:style-name="gr39" draw:text-style-name="P2" draw:layer="layout" svg:width="1.694cm" svg:height="1.385cm" svg:x="3.318cm" svg:y="9.584cm" svg:viewBox="0 0 1695 1386" svg:d="M0 236h1459v923c-730 0-730 355-1459 178zM121 236v-119h1448v928c-55 0-110 7-110 7M233 117v-117h1462v926c-63 0-126 5-126 5">
          <text:p/>
        </draw:path>
        <draw:frame draw:style-name="gr147" draw:text-style-name="P99" draw:layer="layout" svg:width="0.934cm" svg:height="0.314cm" svg:x="1.668cm" svg:y="10.205cm">
          <draw:text-box>
            <text:p text:style-name="P3"><text:span text:style-name="T14">Sybase</text:span></text:p>
          </draw:text-box>
        </draw:frame>
        <draw:path draw:style-name="gr8" draw:text-style-name="P6" draw:layer="layout" svg:width="1.363cm" svg:height="1.193cm" svg:x="1.439cm" svg:y="12.218cm" svg:viewBox="0 0 1364 1194" svg:d="M0 0c0 94 305 170 682 170s682-76 682-170v1023c0 94-305 171-682 171s-682-77-682-171z">
          <text:p/>
        </draw:path>
        <draw:path draw:style-name="gr38" draw:text-style-name="P13" draw:layer="layout" svg:width="1.363cm" svg:height="0.34cm" svg:x="1.439cm" svg:y="12.048cm" svg:viewBox="0 0 1364 341" svg:d="M0 171c0-94 305-171 682-171s682 77 682 171-305 170-682 170-682-76-682-170z">
          <text:p/>
        </draw:path>
        <draw:path draw:style-name="gr39" draw:text-style-name="P2" draw:layer="layout" svg:width="1.363cm" svg:height="1.363cm" svg:x="1.439cm" svg:y="12.048cm" svg:viewBox="0 0 1364 1364" svg:d="M1364 170c0 94-305 170-682 170s-682-76-682-170 305-170 682-170 682 76 682 170zM1364 170v1023c0 94-305 171-682 171s-682-77-682-171v-1023">
          <text:p/>
        </draw:path>
        <draw:frame draw:style-name="gr145" draw:text-style-name="P100" draw:layer="layout" svg:width="0.505cm" svg:height="0.442cm" svg:x="3.791cm" svg:y="10.171cm">
          <draw:text-box>
            <text:p text:style-name="P3"><text:span text:style-name="T15">file</text:span></text:p>
          </draw:text-box>
        </draw:frame>
        <draw:path draw:style-name="gr8" draw:text-style-name="P6" draw:layer="layout" svg:width="1.693cm" svg:height="1.377cm" svg:x="3.217cm" svg:y="12.048cm" svg:viewBox="0 0 1694 1378" svg:d="M0 1328c729 177 729-176 1459-176v-917h-1459zM120 235v-119h1449v923c-55 0-110 6-110 6v-810zM233 116v-116h1461v919c-63 0-125 5-125 5v-808z">
          <text:p/>
        </draw:path>
        <draw:path draw:style-name="gr39" draw:text-style-name="P2" draw:layer="layout" svg:width="1.693cm" svg:height="1.377cm" svg:x="3.217cm" svg:y="12.048cm" svg:viewBox="0 0 1694 1378" svg:d="M0 235h1459v917c-730 0-730 353-1459 176zM120 235v-119h1449v923c-55 0-110 6-110 6M233 116v-116h1461v919c-63 0-125 5-125 5">
          <text:p/>
        </draw:path>
        <draw:frame draw:style-name="gr148" draw:text-style-name="P99" draw:layer="layout" svg:width="0.732cm" svg:height="0.314cm" svg:x="1.761cm" svg:y="12.672cm">
          <draw:text-box>
            <text:p text:style-name="P3"><text:span text:style-name="T14">Mysql</text:span></text:p>
          </draw:text-box>
        </draw:frame>
        <draw:path draw:style-name="gr8" draw:text-style-name="P6" draw:layer="layout" svg:width="1.363cm" svg:height="1.192cm" svg:x="1.439cm" svg:y="14.716cm" svg:viewBox="0 0 1364 1193" svg:d="M0 0c0 94 305 170 682 170s682-76 682-170v1023c0 94-305 170-682 170s-682-76-682-170z">
          <text:p/>
        </draw:path>
        <draw:path draw:style-name="gr38" draw:text-style-name="P13" draw:layer="layout" svg:width="1.363cm" svg:height="0.341cm" svg:x="1.439cm" svg:y="14.545cm" svg:viewBox="0 0 1364 342" svg:d="M0 171c0-95 305-171 682-171s682 76 682 171-305 171-682 171-682-76-682-171z">
          <text:p/>
        </draw:path>
        <draw:path draw:style-name="gr39" draw:text-style-name="P2" draw:layer="layout" svg:width="1.363cm" svg:height="1.363cm" svg:x="1.439cm" svg:y="14.545cm" svg:viewBox="0 0 1364 1364" svg:d="M1364 171c0 94-305 170-682 170s-682-76-682-170c0-95 305-171 682-171s682 76 682 171zM1364 171v1023c0 94-305 170-682 170s-682-76-682-170v-1023">
          <text:p/>
        </draw:path>
        <draw:frame draw:style-name="gr145" draw:text-style-name="P100" draw:layer="layout" svg:width="0.505cm" svg:height="0.442cm" svg:x="3.689cm" svg:y="12.63cm">
          <draw:text-box>
            <text:p text:style-name="P3"><text:span text:style-name="T15">file</text:span></text:p>
          </draw:text-box>
        </draw:frame>
        <draw:path draw:style-name="gr8" draw:text-style-name="P6" draw:layer="layout" svg:width="1.693cm" svg:height="1.385cm" svg:x="3.234cm" svg:y="14.664cm" svg:viewBox="0 0 1694 1386" svg:d="M0 1337c729 177 729-179 1458-179v-922h-1458zM120 236v-119h1449v928c-56 0-111 6-111 6v-815zM233 117v-117h1461v925c-63 0-125 5-125 5v-813z">
          <text:p/>
        </draw:path>
        <draw:path draw:style-name="gr39" draw:text-style-name="P2" draw:layer="layout" svg:width="1.693cm" svg:height="1.385cm" svg:x="3.234cm" svg:y="14.664cm" svg:viewBox="0 0 1694 1386" svg:d="M0 236h1458v922c-729 0-729 356-1458 179zM120 236v-119h1449v928c-56 0-111 6-111 6M233 117v-117h1461v925c-63 0-125 5-125 5">
          <text:p/>
        </draw:path>
        <draw:frame draw:style-name="gr149" draw:text-style-name="P99" draw:layer="layout" svg:width="0.281cm" svg:height="0.314cm" svg:x="1.981cm" svg:y="15.166cm">
          <draw:text-box>
            <text:p text:style-name="P3"><text:span text:style-name="T14">…</text:span></text:p>
          </draw:text-box>
        </draw:frame>
        <draw:path draw:style-name="gr8" draw:text-style-name="P6" draw:layer="layout" svg:width="2.337cm" svg:height="2.053cm" svg:x="16.662cm" svg:y="14.49cm" svg:viewBox="0 0 2338 2054" svg:d="M0 0c0 161 523 292 1169 292s1169-131 1169-292v1762c0 162-523 292-1169 292s-1169-130-1169-292z">
          <text:p/>
        </draw:path>
        <draw:path draw:style-name="gr38" draw:text-style-name="P13" draw:layer="layout" svg:width="2.337cm" svg:height="0.584cm" svg:x="16.662cm" svg:y="14.198cm" svg:viewBox="0 0 2338 585" svg:d="M0 293c0-161 523-293 1169-293s1169 132 1169 293-523 292-1169 292-1169-131-1169-292z">
          <text:p/>
        </draw:path>
        <draw:path draw:style-name="gr39" draw:text-style-name="P2" draw:layer="layout" svg:width="2.337cm" svg:height="2.345cm" svg:x="16.662cm" svg:y="14.198cm" svg:viewBox="0 0 2338 2346" svg:d="M2338 292c0 161-523 292-1169 292s-1169-131-1169-292 523-292 1169-292 1169 131 1169 292zM2338 292v1762c0 162-523 292-1169 292s-1169-130-1169-292v-1762">
          <text:p/>
        </draw:path>
        <draw:frame draw:style-name="gr145" draw:text-style-name="P100" draw:layer="layout" svg:width="0.505cm" svg:height="0.442cm" svg:x="3.705cm" svg:y="15.252cm">
          <draw:text-box>
            <text:p text:style-name="P3"><text:span text:style-name="T15">file</text:span></text:p>
          </draw:text-box>
        </draw:frame>
        <draw:polygon draw:style-name="gr150" draw:text-style-name="P101" draw:layer="layout" svg:width="4.384cm" svg:height="0.211cm" svg:x="5.592cm" svg:y="5.295cm" svg:viewBox="0 0 4385 212" draw:points="0,76 4173,89 4174,0 4385,107 4173,212 4173,124 0,112">
          <text:p/>
        </draw:polygon>
        <draw:frame draw:style-name="gr144" draw:text-style-name="P99" draw:layer="layout" svg:width="0.825cm" svg:height="0.314cm" svg:x="17.434cm" svg:y="15.371cm">
          <draw:text-box>
            <text:p text:style-name="P3"><text:span text:style-name="T14">Oracle</text:span></text:p>
          </draw:text-box>
        </draw:frame>
        <draw:polygon draw:style-name="gr151" draw:text-style-name="P102" draw:layer="layout" svg:width="4.343cm" svg:height="0.034cm" svg:x="1.412cm" svg:y="3.994cm" svg:viewBox="0 0 4344 35" draw:points="0,0 4344,0 4344,35 0,35">
          <text:p/>
        </draw:polygon>
        <draw:polygon draw:style-name="gr152" draw:text-style-name="P103" draw:layer="layout" svg:width="3.841cm" svg:height="0.211cm" svg:x="5.659cm" svg:y="7.058cm" svg:viewBox="0 0 3842 212" draw:points="1,24 3631,89 3632,0 3842,110 3628,212 3630,124 0,59">
          <text:p/>
        </draw:polygon>
        <draw:polygon draw:style-name="gr150" draw:text-style-name="P101" draw:layer="layout" svg:width="2.832cm" svg:height="3.073cm" svg:x="14.977cm" svg:y="5.393cm" svg:viewBox="0 0 2833 3074" draw:points="26,0 2702,2907 2767,2847 2833,3074 2612,2990 2676,2931 0,24">
          <text:p/>
        </draw:polygon>
        <draw:polygon draw:style-name="gr152" draw:text-style-name="P103" draw:layer="layout" svg:width="4.124cm" svg:height="1.353cm" svg:x="13.681cm" svg:y="7.15cm" svg:viewBox="0 0 4125 1354" draw:points="10,0 3929,1236 3955,1152 4125,1316 3892,1354 3918,1270 0,33">
          <text:p/>
        </draw:polygon>
        <draw:polygon draw:style-name="gr150" draw:text-style-name="P101" draw:layer="layout" svg:width="0.212cm" svg:height="0.62cm" svg:x="17.72cm" svg:y="13.584cm" svg:viewBox="0 0 213 621" draw:points="107,0 124,409 213,405 116,621 0,414 88,410 71,1">
          <text:p/>
        </draw:polygon>
        <draw:path draw:style-name="gr53" draw:text-style-name="P15" draw:layer="layout" svg:width="1.363cm" svg:height="1.193cm" svg:x="28.651cm" svg:y="7.299cm" svg:viewBox="0 0 1364 1194" svg:d="M0 0c0 94 305 170 682 170s682-76 682-170v1023c0 94-305 171-682 171s-682-77-682-171z">
          <text:p/>
        </draw:path>
        <draw:path draw:style-name="gr54" draw:text-style-name="P16" draw:layer="layout" svg:width="1.363cm" svg:height="0.341cm" svg:x="28.651cm" svg:y="7.128cm" svg:viewBox="0 0 1364 342" svg:d="M0 171c0-94 305-171 682-171s682 77 682 171c0 95-305 171-682 171s-682-76-682-171z">
          <text:p/>
        </draw:path>
        <draw:path draw:style-name="gr39" draw:text-style-name="P2" draw:layer="layout" svg:width="1.363cm" svg:height="1.364cm" svg:x="28.651cm" svg:y="7.128cm" svg:viewBox="0 0 1364 1365" svg:d="M1364 171c0 94-305 170-682 170s-682-76-682-170 305-171 682-171 682 77 682 171zM1364 171v1023c0 94-305 171-682 171s-682-77-682-171v-1023">
          <text:p/>
        </draw:path>
        <draw:frame draw:style-name="gr153" draw:text-style-name="P4" draw:layer="layout" svg:width="4.342cm" svg:height="0.552cm" svg:x="1.413cm" svg:y="3.501cm">
          <draw:text-box>
            <text:p text:style-name="P3"><text:span text:style-name="T13">Source Applications</text:span></text:p>
          </draw:text-box>
        </draw:frame>
        <draw:frame draw:style-name="gr154" draw:text-style-name="P14" draw:layer="layout" svg:width="0.852cm" svg:height="0.399cm" svg:x="28.915cm" svg:y="7.501cm">
          <draw:text-box>
            <text:p text:style-name="P3"><text:span text:style-name="T12">Oracl</text:span></text:p>
          </draw:text-box>
        </draw:frame>
        <draw:path draw:style-name="gr53" draw:text-style-name="P15" draw:layer="layout" svg:width="1.694cm" svg:height="1.378cm" svg:x="30.53cm" svg:y="7.128cm" svg:viewBox="0 0 1695 1379" svg:d="M0 1329c729 177 729-176 1459-176v-918h-1459zM120 235v-119h1449v924c-55 0-110 6-110 6v-811zM233 116v-116h1462v921c-63 0-126 5-126 5v-810z">
          <text:p/>
        </draw:path>
        <draw:path draw:style-name="gr39" draw:text-style-name="P2" draw:layer="layout" svg:width="1.694cm" svg:height="1.378cm" svg:x="30.53cm" svg:y="7.128cm" svg:viewBox="0 0 1695 1379" svg:d="M0 235h1459v918c-730 0-730 353-1459 176zM120 235v-119h1449v924c-55 0-110 6-110 6M233 116v-116h1462v921c-63 0-126 5-126 5">
          <text:p/>
        </draw:path>
        <draw:frame draw:style-name="gr155" draw:text-style-name="P14" draw:layer="layout" svg:width="0.355cm" svg:height="0.399cm" svg:x="29.246cm" svg:y="7.925cm">
          <draw:text-box>
            <text:p text:style-name="P3"><text:span text:style-name="T12">e</text:span></text:p>
          </draw:text-box>
        </draw:frame>
        <draw:path draw:style-name="gr53" draw:text-style-name="P15" draw:layer="layout" svg:width="1.363cm" svg:height="1.185cm" svg:x="28.651cm" svg:y="4.834cm" svg:viewBox="0 0 1364 1186" svg:d="M0 0c0 93 305 169 682 169s682-76 682-169v1017c0 93-305 169-682 169s-682-76-682-169z">
          <text:p/>
        </draw:path>
        <draw:path draw:style-name="gr54" draw:text-style-name="P16" draw:layer="layout" svg:width="1.363cm" svg:height="0.338cm" svg:x="28.651cm" svg:y="4.665cm" svg:viewBox="0 0 1364 339" svg:d="M0 169c0-94 305-169 682-169s682 75 682 169-305 170-682 170-682-76-682-170z">
          <text:p/>
        </draw:path>
        <draw:path draw:style-name="gr39" draw:text-style-name="P2" draw:layer="layout" svg:width="1.363cm" svg:height="1.354cm" svg:x="28.651cm" svg:y="4.665cm" svg:viewBox="0 0 1364 1355" svg:d="M1364 170c0 93-305 169-682 169s-682-76-682-169c0-94 305-170 682-170s682 76 682 170zM1364 170v1016c0 93-305 169-682 169s-682-76-682-169v-1016">
          <text:p/>
        </draw:path>
        <draw:frame draw:style-name="gr156" draw:text-style-name="P14" draw:layer="layout" svg:width="0.457cm" svg:height="0.399cm" svg:x="31.032cm" svg:y="7.729cm">
          <draw:text-box>
            <text:p text:style-name="P3"><text:span text:style-name="T12">file</text:span></text:p>
          </draw:text-box>
        </draw:frame>
        <draw:path draw:style-name="gr53" draw:text-style-name="P15" draw:layer="layout" svg:width="1.694cm" svg:height="1.377cm" svg:x="30.48cm" svg:y="4.673cm" svg:viewBox="0 0 1695 1378" svg:d="M0 1329c729 176 729-176 1459-176v-917h-1459zM120 236v-120h1449v923c-55 0-110 7-110 7v-810zM233 116v-116h1462v921c-63 0-126 4-126 4v-809z">
          <text:p/>
        </draw:path>
        <draw:path draw:style-name="gr39" draw:text-style-name="P2" draw:layer="layout" svg:width="1.694cm" svg:height="1.377cm" svg:x="30.48cm" svg:y="4.673cm" svg:viewBox="0 0 1695 1378" svg:d="M0 236h1459v917c-730 0-730 352-1459 176zM120 236v-120h1449v923c-55 0-110 7-110 7M233 116v-116h1462v921c-63 0-126 4-126 4">
          <text:p/>
        </draw:path>
        <draw:frame draw:style-name="gr42" draw:text-style-name="P14" draw:layer="layout" svg:width="0.694cm" svg:height="0.399cm" svg:x="29cm" svg:y="5.243cm">
          <draw:text-box>
            <text:p text:style-name="P3"><text:span text:style-name="T12">DB2</text:span></text:p>
          </draw:text-box>
        </draw:frame>
        <draw:path draw:style-name="gr53" draw:text-style-name="P15" draw:layer="layout" svg:width="1.363cm" svg:height="1.193cm" svg:x="28.651cm" svg:y="9.754cm" svg:viewBox="0 0 1364 1194" svg:d="M0 0c0 94 305 171 682 171s682-77 682-171v1024c0 94-305 170-682 170s-682-76-682-170z">
          <text:p/>
        </draw:path>
        <draw:path draw:style-name="gr54" draw:text-style-name="P16" draw:layer="layout" svg:width="1.363cm" svg:height="0.341cm" svg:x="28.651cm" svg:y="9.584cm" svg:viewBox="0 0 1364 342" svg:d="M0 171c0-95 305-171 682-171s682 76 682 171c0 94-305 171-682 171s-682-77-682-171z">
          <text:p/>
        </draw:path>
        <draw:path draw:style-name="gr39" draw:text-style-name="P2" draw:layer="layout" svg:width="1.363cm" svg:height="1.363cm" svg:x="28.651cm" svg:y="9.584cm" svg:viewBox="0 0 1364 1364" svg:d="M1364 170c0 94-305 171-682 171s-682-77-682-171 305-170 682-170 682 76 682 170zM1364 170v1024c0 94-305 170-682 170s-682-76-682-170v-1024">
          <text:p/>
        </draw:path>
        <draw:frame draw:style-name="gr156" draw:text-style-name="P14" draw:layer="layout" svg:width="0.457cm" svg:height="0.399cm" svg:x="30.983cm" svg:y="5.27cm">
          <draw:text-box>
            <text:p text:style-name="P3"><text:span text:style-name="T12">file</text:span></text:p>
          </draw:text-box>
        </draw:frame>
        <draw:frame draw:style-name="gr157" draw:text-style-name="P14" draw:layer="layout" svg:width="0.813cm" svg:height="0.399cm" svg:x="28.941cm" svg:y="9.958cm">
          <draw:text-box>
            <text:p text:style-name="P3"><text:span text:style-name="T12">Syba</text:span></text:p>
          </draw:text-box>
        </draw:frame>
        <draw:path draw:style-name="gr53" draw:text-style-name="P15" draw:layer="layout" svg:width="1.694cm" svg:height="1.385cm" svg:x="30.53cm" svg:y="9.584cm" svg:viewBox="0 0 1695 1386" svg:d="M0 1337c729 177 729-178 1459-178v-923h-1459zM120 236v-119h1449v928c-55 0-110 7-110 7v-816zM233 117v-117h1462v926c-63 0-126 5-126 5v-814z">
          <text:p/>
        </draw:path>
        <draw:path draw:style-name="gr39" draw:text-style-name="P2" draw:layer="layout" svg:width="1.694cm" svg:height="1.385cm" svg:x="30.53cm" svg:y="9.584cm" svg:viewBox="0 0 1695 1386" svg:d="M0 236h1459v923c-730 0-730 355-1459 178zM120 236v-119h1449v928c-55 0-110 7-110 7M233 117v-117h1462v926c-63 0-126 5-126 5">
          <text:p/>
        </draw:path>
        <draw:frame draw:style-name="gr158" draw:text-style-name="P14" draw:layer="layout" svg:width="0.378cm" svg:height="0.399cm" svg:x="29.161cm" svg:y="10.384cm">
          <draw:text-box>
            <text:p text:style-name="P3"><text:span text:style-name="T12">se</text:span></text:p>
          </draw:text-box>
        </draw:frame>
        <draw:path draw:style-name="gr53" draw:text-style-name="P15" draw:layer="layout" svg:width="1.363cm" svg:height="1.193cm" svg:x="28.651cm" svg:y="12.218cm" svg:viewBox="0 0 1364 1194" svg:d="M0 0c0 94 305 170 682 170s682-76 682-170v1023c0 94-305 171-682 171s-682-77-682-171z">
          <text:p/>
        </draw:path>
        <draw:path draw:style-name="gr54" draw:text-style-name="P16" draw:layer="layout" svg:width="1.363cm" svg:height="0.34cm" svg:x="28.651cm" svg:y="12.048cm" svg:viewBox="0 0 1364 341" svg:d="M0 171c0-94 305-171 682-171s682 77 682 171-305 170-682 170-682-76-682-170z">
          <text:p/>
        </draw:path>
        <draw:path draw:style-name="gr39" draw:text-style-name="P2" draw:layer="layout" svg:width="1.363cm" svg:height="1.363cm" svg:x="28.651cm" svg:y="12.048cm" svg:viewBox="0 0 1364 1364" svg:d="M1364 170c0 94-305 170-682 170s-682-76-682-170 305-170 682-170 682 76 682 170zM1364 170v1023c0 94-305 171-682 171s-682-77-682-171v-1023">
          <text:p/>
        </draw:path>
        <draw:frame draw:style-name="gr156" draw:text-style-name="P14" draw:layer="layout" svg:width="0.457cm" svg:height="0.399cm" svg:x="31.03cm" svg:y="10.189cm">
          <draw:text-box>
            <text:p text:style-name="P3"><text:span text:style-name="T12">file</text:span></text:p>
          </draw:text-box>
        </draw:frame>
        <draw:frame draw:style-name="gr154" draw:text-style-name="P14" draw:layer="layout" svg:width="0.852cm" svg:height="0.399cm" svg:x="28.924cm" svg:y="12.425cm">
          <draw:text-box>
            <text:p text:style-name="P3"><text:span text:style-name="T12">Mysq</text:span></text:p>
          </draw:text-box>
        </draw:frame>
        <draw:path draw:style-name="gr53" draw:text-style-name="P15" draw:layer="layout" svg:width="1.693cm" svg:height="1.377cm" svg:x="30.429cm" svg:y="12.048cm" svg:viewBox="0 0 1694 1378" svg:d="M0 1328c729 177 729-176 1458-176v-917h-1458zM120 235v-119h1448v923c-55 0-110 6-110 6v-810zM233 116v-116h1461v919c-63 0-126 5-126 5v-808z">
          <text:p/>
        </draw:path>
        <draw:path draw:style-name="gr39" draw:text-style-name="P2" draw:layer="layout" svg:width="1.693cm" svg:height="1.377cm" svg:x="30.429cm" svg:y="12.048cm" svg:viewBox="0 0 1694 1378" svg:d="M0 235h1458v917c-729 0-729 353-1458 176zM120 235v-119h1448v923c-55 0-110 6-110 6M233 116v-116h1461v919c-63 0-126 5-126 5">
          <text:p/>
        </draw:path>
        <draw:frame draw:style-name="gr155" draw:text-style-name="P14" draw:layer="layout" svg:width="0.355cm" svg:height="0.399cm" svg:x="29.297cm" svg:y="12.849cm">
          <draw:text-box>
            <text:p text:style-name="P3"><text:span text:style-name="T12">l</text:span></text:p>
          </draw:text-box>
        </draw:frame>
        <draw:path draw:style-name="gr53" draw:text-style-name="P15" draw:layer="layout" svg:width="1.363cm" svg:height="1.192cm" svg:x="28.651cm" svg:y="14.716cm" svg:viewBox="0 0 1364 1193" svg:d="M0 0c0 94 305 170 682 170s682-76 682-170v1023c0 94-305 170-682 170s-682-76-682-170z">
          <text:p/>
        </draw:path>
        <draw:path draw:style-name="gr54" draw:text-style-name="P16" draw:layer="layout" svg:width="1.363cm" svg:height="0.341cm" svg:x="28.651cm" svg:y="14.545cm" svg:viewBox="0 0 1364 342" svg:d="M0 171c0-95 305-171 682-171s682 76 682 171-305 171-682 171-682-76-682-171z">
          <text:p/>
        </draw:path>
        <draw:path draw:style-name="gr39" draw:text-style-name="P2" draw:layer="layout" svg:width="1.363cm" svg:height="1.363cm" svg:x="28.651cm" svg:y="14.545cm" svg:viewBox="0 0 1364 1364" svg:d="M1364 171c0 94-305 170-682 170s-682-76-682-170c0-95 305-171 682-171s682 76 682 171zM1364 171v1023c0 94-305 170-682 170s-682-76-682-170v-1023">
          <text:p/>
        </draw:path>
        <draw:frame draw:style-name="gr156" draw:text-style-name="P14" draw:layer="layout" svg:width="0.457cm" svg:height="0.399cm" svg:x="30.928cm" svg:y="12.648cm">
          <draw:text-box>
            <text:p text:style-name="P3"><text:span text:style-name="T12">file</text:span></text:p>
          </draw:text-box>
        </draw:frame>
        <draw:path draw:style-name="gr53" draw:text-style-name="P15" draw:layer="layout" svg:width="1.693cm" svg:height="1.385cm" svg:x="30.446cm" svg:y="14.664cm" svg:viewBox="0 0 1694 1386" svg:d="M0 1337c728 177 728-179 1458-179v-922h-1458zM120 236v-119h1448v928c-55 0-110 6-110 6v-815zM232 117v-117h1462v925c-63 0-126 5-126 5v-813z">
          <text:p/>
        </draw:path>
        <draw:path draw:style-name="gr39" draw:text-style-name="P2" draw:layer="layout" svg:width="1.693cm" svg:height="1.385cm" svg:x="30.446cm" svg:y="14.664cm" svg:viewBox="0 0 1694 1386" svg:d="M0 236h1458v922c-730 0-730 356-1458 179zM120 236v-119h1448v928c-55 0-110 6-110 6M232 117v-117h1462v925c-63 0-126 5-126 5">
          <text:p/>
        </draw:path>
        <draw:frame draw:style-name="gr46" draw:text-style-name="P14" draw:layer="layout" svg:width="0.358cm" svg:height="0.399cm" svg:x="29.162cm" svg:y="15.131cm">
          <draw:text-box>
            <text:p text:style-name="P3"><text:span text:style-name="T12">…</text:span></text:p>
          </draw:text-box>
        </draw:frame>
        <draw:frame draw:style-name="gr156" draw:text-style-name="P14" draw:layer="layout" svg:width="0.457cm" svg:height="0.399cm" svg:x="30.944cm" svg:y="15.27cm">
          <draw:text-box>
            <text:p text:style-name="P3"><text:span text:style-name="T12">file</text:span></text:p>
          </draw:text-box>
        </draw:frame>
        <draw:polygon draw:style-name="gr151" draw:text-style-name="P102" draw:layer="layout" svg:width="4.199cm" svg:height="0.034cm" svg:x="28.11cm" svg:y="3.994cm" svg:viewBox="0 0 4200 35" draw:points="0,0 4200,0 4200,35 0,35">
          <text:p/>
        </draw:polygon>
        <draw:frame draw:style-name="gr2" draw:text-style-name="P2" draw:layer="layout" svg:width="4.021cm" svg:height="2.243cm" svg:x="21.133cm" svg:y="5.622cm">
          <draw:image xlink:href="Pictures/100000000000013C000000B0D4050415.png" xlink:type="simple" xlink:show="embed" xlink:actuate="onLoad" draw:mime-type="image/png">
            <text:p/>
          </draw:image>
        </draw:frame>
        <draw:polygon draw:style-name="gr150" draw:text-style-name="P101" draw:layer="layout" svg:width="7.512cm" svg:height="0.679cm" svg:x="20.441cm" svg:y="10.362cm" svg:viewBox="0 0 7513 680" draw:points="3,680 7304,123 7310,212 7513,90 7294,0 7301,88 0,645">
          <text:p/>
        </draw:polygon>
        <draw:polygon draw:style-name="gr150" draw:text-style-name="P101" draw:layer="layout" svg:width="1.954cm" svg:height="1.718cm" svg:x="19.186cm" svg:y="6.752cm" svg:viewBox="0 0 1955 1719" draw:points="23,1719 1808,152 1866,219 1955,0 1727,60 1785,126 0,1693">
          <text:p/>
        </draw:polygon>
        <draw:frame draw:style-name="gr159" draw:text-style-name="P4" draw:layer="layout" svg:width="4.206cm" svg:height="0.552cm" svg:x="28.118cm" svg:y="3.501cm">
          <draw:text-box>
            <text:p text:style-name="P3"><text:span text:style-name="T13">Target Applications</text:span></text:p>
          </draw:text-box>
        </draw:frame>
        <draw:line draw:style-name="gr160" draw:text-style-name="P2" draw:layer="layout" svg:x1="1.113cm" svg:y1="16.827cm" svg:x2="5.016cm" svg:y2="16.827cm">
          <text:p/>
        </draw:line>
        <draw:frame draw:style-name="gr161" draw:text-style-name="P4" draw:layer="layout" svg:width="2.131cm" svg:height="0.552cm" svg:x="1.908cm" svg:y="17.093cm">
          <draw:text-box>
            <text:p text:style-name="P3"><text:span text:style-name="T13">Upstream</text:span></text:p>
          </draw:text-box>
        </draw:frame>
        <draw:line draw:style-name="gr160" draw:text-style-name="P2" draw:layer="layout" svg:x1="15.565cm" svg:y1="16.827cm" svg:x2="21.228cm" svg:y2="16.827cm">
          <text:p/>
        </draw:line>
        <draw:frame draw:style-name="gr162" draw:text-style-name="P4" draw:layer="layout" svg:width="4.15cm" svg:height="0.552cm" svg:x="16.326cm" svg:y="17.093cm">
          <draw:text-box>
            <text:p text:style-name="P3"><text:span text:style-name="T13">ETL(ODS, staging)</text:span></text:p>
          </draw:text-box>
        </draw:frame>
        <draw:line draw:style-name="gr160" draw:text-style-name="P2" draw:layer="layout" svg:x1="28.435cm" svg:y1="16.827cm" svg:x2="32.338cm" svg:y2="16.827cm">
          <text:p/>
        </draw:line>
        <draw:frame draw:style-name="gr163" draw:text-style-name="P4" draw:layer="layout" svg:width="2.758cm" svg:height="0.552cm" svg:x="29.167cm" svg:y="17.093cm">
          <draw:text-box>
            <text:p text:style-name="P3"><text:span text:style-name="T13">Downstream</text:span></text:p>
          </draw:text-box>
        </draw:frame>
        <draw:frame draw:style-name="gr164" draw:text-style-name="P100" draw:layer="layout" svg:width="2.474cm" svg:height="0.442cm" svg:x="19.765cm" svg:y="3.551cm">
          <draw:text-box>
            <text:p text:style-name="P3"><text:span text:style-name="T16">Source code </text:span></text:p>
          </draw:text-box>
        </draw:frame>
        <draw:frame draw:style-name="gr165" draw:text-style-name="P100" draw:layer="layout" svg:width="1.927cm" svg:height="0.442cm" svg:x="19.765cm" svg:y="4.018cm">
          <draw:text-box>
            <text:p text:style-name="P3"><text:span text:style-name="T16">repository</text:span></text:p>
          </draw:text-box>
        </draw:frame>
        <draw:polygon draw:style-name="gr150" draw:text-style-name="P101" draw:layer="layout" svg:width="1.874cm" svg:height="0.211cm" svg:x="20.07cm" svg:y="0.952cm" svg:viewBox="0 0 1875 212" draw:points="0,75 1664,88 1665,0 1875,107 1663,212 1664,123 0,111">
          <text:p/>
        </draw:polygon>
        <draw:polygon draw:style-name="gr152" draw:text-style-name="P103" draw:layer="layout" svg:width="1.874cm" svg:height="0.212cm" svg:x="20.07cm" svg:y="1.542cm" svg:viewBox="0 0 1875 213" draw:points="0,136 1664,125 1665,213 1875,105 1663,0 1664,89 0,101">
          <text:p/>
        </draw:polygon>
        <draw:frame draw:style-name="gr166" draw:text-style-name="P100" draw:layer="layout" svg:width="4.136cm" svg:height="0.442cm" svg:x="21.827cm" svg:y="5.312cm">
          <draw:text-box>
            <text:p text:style-name="P3"><text:span text:style-name="T16">Centralized Log query</text:span></text:p>
          </draw:text-box>
        </draw:frame>
        <draw:frame draw:style-name="gr163" draw:text-style-name="P4" draw:layer="layout" svg:width="2.758cm" svg:height="0.552cm" svg:x="22.621cm" svg:y="0.783cm">
          <draw:text-box>
            <text:p text:style-name="P3"><text:span text:style-name="T13">Existing task</text:span></text:p>
          </draw:text-box>
        </draw:frame>
        <draw:path draw:style-name="gr139" draw:text-style-name="P1" draw:layer="layout" svg:width="5.266cm" svg:height="5.114cm" svg:x="15.718cm" svg:y="8.784cm" svg:viewBox="0 0 5267 5115" svg:d="M0 852c0-471 382-852 852-852h3563c470 0 852 381 852 852v3410c0 471-382 853-852 853h-3563c-470 0-852-382-852-853z">
          <text:p/>
        </draw:path>
        <draw:frame draw:style-name="gr2" draw:text-style-name="P2" draw:layer="layout" svg:width="3.36cm" svg:height="1.396cm" svg:x="16.62cm" svg:y="9.457cm">
          <draw:image xlink:href="Pictures/10000000000000DE0000005C0BDA0805.png" xlink:type="simple" xlink:show="embed" xlink:actuate="onLoad" draw:mime-type="image/png">
            <text:p/>
          </draw:image>
        </draw:frame>
        <draw:polygon draw:style-name="gr140" draw:text-style-name="P2" draw:layer="layout" svg:width="3.37cm" svg:height="1.405cm" svg:x="16.615cm" svg:y="9.453cm" svg:viewBox="0 0 3371 1406" draw:points="0,0 3371,0 3371,1406 0,1406">
          <text:p/>
        </draw:polygon>
        <draw:frame draw:style-name="gr2" draw:text-style-name="P2" draw:layer="layout" svg:width="1.989cm" svg:height="1.235cm" svg:x="16.798cm" svg:y="11.498cm">
          <draw:image xlink:href="Pictures/100000000000009C0000006149FFC21E.png" xlink:type="simple" xlink:show="embed" xlink:actuate="onLoad" draw:mime-type="image/png">
            <text:p/>
          </draw:image>
        </draw:frame>
        <draw:frame draw:style-name="gr167" draw:text-style-name="P4" draw:layer="layout" svg:width="2.458cm" svg:height="0.552cm" svg:x="22.621cm" svg:y="1.388cm">
          <draw:text-box>
            <text:p text:style-name="P3"><text:span text:style-name="T13">Future task</text:span></text:p>
          </draw:text-box>
        </draw:frame>
        <draw:frame draw:style-name="gr168" draw:text-style-name="P100" draw:layer="layout" svg:width="1.249cm" svg:height="0.442cm" svg:x="21.341cm" svg:y="8.865cm">
          <draw:text-box>
            <text:p text:style-name="P3"><text:span text:style-name="T17">Cluster</text:span></text:p>
          </draw:text-box>
        </draw:frame>
        <draw:frame draw:style-name="gr169" draw:text-style-name="P4" draw:layer="layout" svg:width="2.65cm" svg:height="0.552cm" svg:x="16.768cm" svg:y="12.897cm">
          <draw:text-box>
            <text:p text:style-name="P3"><text:span text:style-name="T13">Java/python</text:span></text:p>
          </draw:text-box>
        </draw:frame>
        <draw:frame draw:style-name="gr170" draw:text-style-name="P4" draw:layer="layout" svg:width="2.84cm" svg:height="0.552cm" svg:x="16.448cm" svg:y="10.92cm">
          <draw:text-box>
            <text:p text:style-name="P3"><text:span text:style-name="T13">2.File import:</text:span></text:p>
          </draw:text-box>
        </draw:frame>
        <draw:polygon draw:style-name="gr152" draw:text-style-name="P103" draw:layer="layout" svg:width="6.971cm" svg:height="0.634cm" svg:x="20.983cm" svg:y="10.726cm" svg:viewBox="0 0 6972 635" draw:points="3,635 6762,123 6768,211 6972,90 6753,0 6759,88 0,600">
          <text:p/>
        </draw:polygon>
        <draw:path draw:style-name="gr171" draw:text-style-name="P2" draw:layer="layout" svg:width="4.632cm" svg:height="12.328cm" svg:x="0.96cm" svg:y="4.22cm" svg:viewBox="0 0 4633 12329" svg:d="M0 772c0-426 346-772 772-772h3089c426 0 772 346 772 772v10785c0 426-346 772-772 772h-3089c-426 0-772-346-772-772z">
          <text:p/>
        </draw:path>
        <draw:path draw:style-name="gr171" draw:text-style-name="P2" draw:layer="layout" svg:width="4.631cm" svg:height="12.327cm" svg:x="27.952cm" svg:y="4.288cm" svg:viewBox="0 0 4632 12328" svg:d="M0 772c0-426 346-772 772-772h3089c426 0 771 346 771 772v10784c0 427-345 772-771 772h-3089c-426 0-772-345-772-772z">
          <text:p/>
        </draw:path>
        <draw:polygon draw:style-name="gr152" draw:text-style-name="P103" draw:layer="layout" svg:width="1.473cm" svg:height="1.324cm" svg:x="19.804cm" svg:y="7.141cm" svg:viewBox="0 0 1474 1325" draw:points="23,1325 1328,156 1387,221 1474,0 1246,63 1305,128 0,1298">
          <text:p/>
        </draw:polygon>
        <draw:polygon draw:style-name="gr172" draw:text-style-name="P104" draw:layer="layout" svg:width="8.002cm" svg:height="5.241cm" svg:x="6.498cm" svg:y="13.127cm" svg:viewBox="0 0 8003 5242" draw:points="0,0 8003,0 8003,5242 0,5242">
          <text:p/>
        </draw:polygon>
        <draw:frame draw:style-name="gr173" draw:text-style-name="P4" draw:layer="layout" svg:width="3.114cm" svg:height="0.552cm" svg:x="16.43cm" svg:y="9.153cm">
          <draw:text-box>
            <text:p text:style-name="P3"><text:span text:style-name="T13">1.Pl/SQL shell</text:span></text:p>
          </draw:text-box>
        </draw:frame>
        <draw:frame draw:style-name="gr174" draw:text-style-name="P4" draw:layer="layout" svg:width="2.512cm" svg:height="0.552cm" svg:x="9.197cm" svg:y="13.296cm">
          <draw:text-box>
            <text:p text:style-name="P3"><text:span text:style-name="T18">Advantage</text:span></text:p>
          </draw:text-box>
        </draw:frame>
        <draw:frame draw:style-name="gr175" draw:text-style-name="P105" draw:layer="layout" svg:width="0.422cm" svg:height="0.475cm" svg:x="11.671cm" svg:y="13.358cm">
          <draw:text-box>
            <text:p text:style-name="P3"><text:span text:style-name="T19">: </text:span></text:p>
          </draw:text-box>
        </draw:frame>
        <draw:frame draw:style-name="gr176" draw:text-style-name="P105" draw:layer="layout" svg:width="7.474cm" svg:height="0.475cm" svg:x="6.75cm" svg:y="13.883cm">
          <draw:text-box>
            <text:p text:style-name="P3"><text:span text:style-name="T19">-----------------------------------------------------</text:span></text:p>
          </draw:text-box>
        </draw:frame>
        <draw:frame draw:style-name="gr175" draw:text-style-name="P105" draw:layer="layout" svg:width="0.422cm" svg:height="0.475cm" svg:x="6.75cm" svg:y="14.391cm">
          <draw:text-box>
            <text:p text:style-name="P3"><text:span text:style-name="T19">1.</text:span></text:p>
          </draw:text-box>
        </draw:frame>
        <draw:frame draw:style-name="gr177" draw:text-style-name="P105" draw:layer="layout" svg:width="5.296cm" svg:height="0.475cm" svg:x="7.351cm" svg:y="14.391cm">
          <draw:text-box>
            <text:p text:style-name="P3"><text:span text:style-name="T19">Use software to extract SQL</text:span></text:p>
          </draw:text-box>
        </draw:frame>
        <draw:frame draw:style-name="gr178" draw:text-style-name="P105" draw:layer="layout" svg:width="0.423cm" svg:height="0.475cm" svg:x="6.75cm" svg:y="14.898cm">
          <draw:text-box>
            <text:p text:style-name="P3"><text:span text:style-name="T19">2.</text:span></text:p>
          </draw:text-box>
        </draw:frame>
        <draw:frame draw:style-name="gr179" draw:text-style-name="P105" draw:layer="layout" svg:width="4.779cm" svg:height="0.475cm" svg:x="7.351cm" svg:y="14.898cm">
          <draw:text-box>
            <text:p text:style-name="P3"><text:span text:style-name="T19">Use mature open-source </text:span></text:p>
          </draw:text-box>
        </draw:frame>
        <draw:frame draw:style-name="gr180" draw:text-style-name="P105" draw:layer="layout" svg:width="5.626cm" svg:height="0.475cm" svg:x="7.351cm" svg:y="15.407cm">
          <draw:text-box>
            <text:p text:style-name="P3"><text:span text:style-name="T19">software/owned to implement </text:span></text:p>
          </draw:text-box>
        </draw:frame>
        <draw:frame draw:style-name="gr181" draw:text-style-name="P105" draw:layer="layout" svg:width="1.461cm" svg:height="0.475cm" svg:x="7.351cm" svg:y="15.915cm">
          <draw:text-box>
            <text:p text:style-name="P3"><text:span text:style-name="T19">solution</text:span></text:p>
          </draw:text-box>
        </draw:frame>
        <draw:frame draw:style-name="gr175" draw:text-style-name="P105" draw:layer="layout" svg:width="0.422cm" svg:height="0.475cm" svg:x="6.75cm" svg:y="16.423cm">
          <draw:text-box>
            <text:p text:style-name="P3"><text:span text:style-name="T19">3.</text:span></text:p>
          </draw:text-box>
        </draw:frame>
        <draw:frame draw:style-name="gr182" draw:text-style-name="P105" draw:layer="layout" svg:width="5.156cm" svg:height="0.475cm" svg:x="7.351cm" svg:y="16.423cm">
          <draw:text-box>
            <text:p text:style-name="P3"><text:span text:style-name="T19">Enhance the log monitoring</text:span></text:p>
          </draw:text-box>
        </draw:frame>
        <draw:frame draw:style-name="gr178" draw:text-style-name="P105" draw:layer="layout" svg:width="0.423cm" svg:height="0.475cm" svg:x="6.75cm" svg:y="16.93cm">
          <draw:text-box>
            <text:p text:style-name="P3"><text:span text:style-name="T19">4.</text:span></text:p>
          </draw:text-box>
        </draw:frame>
        <draw:frame draw:style-name="gr183" draw:text-style-name="P105" draw:layer="layout" svg:width="6.52cm" svg:height="0.475cm" svg:x="7.351cm" svg:y="16.93cm">
          <draw:text-box>
            <text:p text:style-name="P3"><text:span text:style-name="T19">Not to change existing architecture</text:span></text:p>
          </draw:text-box>
        </draw:frame>
        <draw:frame draw:style-name="gr175" draw:text-style-name="P105" draw:layer="layout" svg:width="0.422cm" svg:height="0.475cm" svg:x="6.75cm" svg:y="17.44cm">
          <draw:text-box>
            <text:p text:style-name="P3"><text:span text:style-name="T19">5.</text:span></text:p>
          </draw:text-box>
        </draw:frame>
        <draw:path draw:style-name="gr184" draw:text-style-name="P104" draw:layer="layout" svg:width="0.609cm" svg:height="0.61cm" svg:x="9.072cm" svg:y="3.839cm" svg:viewBox="0 0 610 611" svg:d="M0 306c0-168 136-306 304-306 170 0 306 138 306 306s-136 305-306 305c-168 0-304-137-304-305z">
          <text:p/>
        </draw:path>
        <draw:frame draw:style-name="gr185" draw:text-style-name="P105" draw:layer="layout" svg:width="4.309cm" svg:height="0.475cm" svg:x="7.351cm" svg:y="17.44cm">
          <draw:text-box>
            <text:p text:style-name="P3"><text:span text:style-name="T19">Managed source code </text:span></text:p>
          </draw:text-box>
        </draw:frame>
        <draw:path draw:style-name="gr184" draw:text-style-name="P104" draw:layer="layout" svg:width="0.61cm" svg:height="0.61cm" svg:x="9.088cm" svg:y="6.04cm" svg:viewBox="0 0 611 611" svg:d="M0 305c0-168 137-305 305-305 170 0 306 137 306 305 0 170-136 306-306 306-168 0-305-136-305-306z">
          <text:p/>
        </draw:path>
        <draw:frame draw:style-name="gr186" draw:text-style-name="P4" draw:layer="layout" svg:width="0.49cm" svg:height="0.552cm" svg:x="9.24cm" svg:y="3.883cm">
          <draw:text-box>
            <text:p text:style-name="P3"><text:span text:style-name="T3">1</text:span></text:p>
          </draw:text-box>
        </draw:frame>
        <draw:path draw:style-name="gr184" draw:text-style-name="P104" draw:layer="layout" svg:width="0.602cm" svg:height="0.61cm" svg:x="20.535cm" svg:y="5.016cm" svg:viewBox="0 0 603 611" svg:d="M0 306c0-169 135-306 302-306 166 0 301 137 301 306 0 168-135 305-301 305-167 0-302-137-302-305z">
          <text:p/>
        </draw:path>
        <draw:frame draw:style-name="gr187" draw:text-style-name="P4" draw:layer="layout" svg:width="0.491cm" svg:height="0.552cm" svg:x="9.252cm" svg:y="6.089cm">
          <draw:text-box>
            <text:p text:style-name="P3"><text:span text:style-name="T3">2</text:span></text:p>
          </draw:text-box>
        </draw:frame>
        <draw:path draw:style-name="gr184" draw:text-style-name="P104" draw:layer="layout" svg:width="0.61cm" svg:height="0.61cm" svg:x="26.995cm" svg:y="4.152cm" svg:viewBox="0 0 611 611" svg:d="M0 305c0-168 138-305 306-305 169 0 305 137 305 305 0 169-136 306-305 306-168 0-306-137-306-306z">
          <text:p/>
        </draw:path>
        <draw:frame draw:style-name="gr186" draw:text-style-name="P4" draw:layer="layout" svg:width="0.49cm" svg:height="0.552cm" svg:x="20.7cm" svg:y="5.064cm">
          <draw:text-box>
            <text:p text:style-name="P3"><text:span text:style-name="T3">3</text:span></text:p>
          </draw:text-box>
        </draw:frame>
        <draw:path draw:style-name="gr184" draw:text-style-name="P104" draw:layer="layout" svg:width="0.609cm" svg:height="0.61cm" svg:x="17.056cm" svg:y="2.662cm" svg:viewBox="0 0 610 611" svg:d="M0 306c0-168 136-306 305-306s305 138 305 306-136 305-305 305-305-137-305-305z">
          <text:p/>
        </draw:path>
        <draw:frame draw:style-name="gr186" draw:text-style-name="P4" draw:layer="layout" svg:width="0.49cm" svg:height="0.552cm" svg:x="27.165cm" svg:y="4.2cm">
          <draw:text-box>
            <text:p text:style-name="P3"><text:span text:style-name="T3">4</text:span></text:p>
          </draw:text-box>
        </draw:frame>
        <draw:path draw:style-name="gr184" draw:text-style-name="P104" draw:layer="layout" svg:width="0.609cm" svg:height="0.601cm" svg:x="14.118cm" svg:y="10.951cm" svg:viewBox="0 0 610 602" svg:d="M0 302c0-167 136-302 305-302s305 135 305 302c0 166-136 300-305 300s-305-134-305-300z">
          <text:p/>
        </draw:path>
        <draw:frame draw:style-name="gr186" draw:text-style-name="P4" draw:layer="layout" svg:width="0.49cm" svg:height="0.552cm" svg:x="17.224cm" svg:y="2.704cm">
          <draw:text-box>
            <text:p text:style-name="P3"><text:span text:style-name="T3">5</text:span></text:p>
          </draw:text-box>
        </draw:frame>
        <draw:frame draw:style-name="gr187" draw:text-style-name="P4" draw:layer="layout" svg:width="0.491cm" svg:height="0.552cm" svg:x="14.288cm" svg:y="10.994cm">
          <draw:text-box>
            <text:p text:style-name="P3"><text:span text:style-name="T3">2</text:span></text:p>
          </draw:text-box>
        </draw:frame>
      </draw:page>
      <draw:page draw:name="page7" draw:style-name="dp1" draw:master-page-name="master-page3">
        <draw:polygon draw:style-name="gr1" draw:text-style-name="P1" draw:layer="layout" svg:width="33.866cm" svg:height="19.049cm" svg:x="0cm" svg:y="0cm" svg:viewBox="0 0 33867 19050" draw:points="0,0 33867,0 33867,19050 0,19050">
          <text:p/>
        </draw:polygon>
        <draw:frame draw:style-name="gr188" draw:text-style-name="P12" draw:layer="layout" svg:width="22.199cm" svg:height="2.237cm" svg:x="2.384cm" svg:y="7.643cm">
          <draw:text-box>
            <text:p text:style-name="P3"><text:span text:style-name="T11">Implementation approach</text:span></text:p>
          </draw:text-box>
        </draw:frame>
      </draw:page>
      <draw:page draw:name="page8" draw:style-name="dp1" draw:master-page-name="master-page3">
        <draw:polygon draw:style-name="gr8" draw:text-style-name="P6" draw:layer="layout" svg:width="2.175cm" svg:height="0.128cm" svg:x="0cm" svg:y="3.056cm" svg:viewBox="0 0 2176 129" draw:points="0,0 2176,0 2176,129 0,129">
          <text:p/>
        </draw:polygon>
        <draw:polygon draw:style-name="gr45" draw:text-style-name="P6" draw:layer="layout" svg:width="4.961cm" svg:height="1.575cm" svg:x="1.405cm" svg:y="5.435cm" svg:viewBox="0 0 4962 1576" draw:points="0,0 4962,0 4962,1576 0,1576">
          <text:p/>
        </draw:polygon>
        <draw:frame draw:style-name="gr189" draw:text-style-name="P9" draw:layer="layout" svg:width="9.347cm" svg:height="1.309cm" svg:x="0.789cm" svg:y="1.511cm">
          <draw:text-box>
            <text:p text:style-name="P3"><text:span text:style-name="T7">Migration process </text:span></text:p>
          </draw:text-box>
        </draw:frame>
        <draw:polygon draw:style-name="gr45" draw:text-style-name="P6" draw:layer="layout" svg:width="4.961cm" svg:height="1.575cm" svg:x="9.516cm" svg:y="5.435cm" svg:viewBox="0 0 4962 1576" draw:points="0,0 4962,0 4962,1576 0,1576">
          <text:p/>
        </draw:polygon>
        <draw:frame draw:style-name="gr190" draw:text-style-name="P4" draw:layer="layout" svg:width="4.423cm" svg:height="0.552cm" svg:x="1.748cm" svg:y="5.971cm">
          <draw:text-box>
            <text:p text:style-name="P3"><text:span text:style-name="T3">Existing Informatica </text:span></text:p>
          </draw:text-box>
        </draw:frame>
        <draw:polygon draw:style-name="gr191" draw:text-style-name="P104" draw:layer="layout" svg:width="4.953cm" svg:height="1.574cm" svg:x="17.627cm" svg:y="10.397cm" svg:viewBox="0 0 4954 1575" draw:points="0,0 4954,0 4954,1575 0,1575">
          <text:p/>
        </draw:polygon>
        <draw:frame draw:style-name="gr169" draw:text-style-name="P4" draw:layer="layout" svg:width="2.65cm" svg:height="0.552cm" svg:x="10.756cm" svg:y="5.971cm">
          <draw:text-box>
            <text:p text:style-name="P3"><text:span text:style-name="T3">Downgrade </text:span></text:p>
          </draw:text-box>
        </draw:frame>
        <draw:frame draw:style-name="gr192" draw:text-style-name="P4" draw:layer="layout" svg:width="4.205cm" svg:height="0.552cm" svg:x="18.003cm" svg:y="10.547cm">
          <draw:text-box>
            <text:p text:style-name="P3"><text:span text:style-name="T3">Full system <text:s/>launch</text:span></text:p>
          </draw:text-box>
        </draw:frame>
        <draw:frame draw:style-name="gr193" draw:text-style-name="P4" draw:layer="layout" svg:width="0.548cm" svg:height="0.552cm" svg:x="18.655cm" svg:y="11.276cm">
          <draw:text-box>
            <text:p text:style-name="P3"><text:span text:style-name="T3">In </text:span></text:p>
          </draw:text-box>
        </draw:frame>
        <draw:frame draw:style-name="gr194" draw:text-style-name="P106" draw:layer="layout" svg:width="0.708cm" svg:height="0.712cm" svg:x="19.205cm" svg:y="11.146cm">
          <draw:text-box>
            <text:p text:style-name="P3"><text:span text:style-name="T20">10</text:span></text:p>
          </draw:text-box>
        </draw:frame>
        <draw:polygon draw:style-name="gr191" draw:text-style-name="P104" draw:layer="layout" svg:width="4.961cm" svg:height="1.574cm" svg:x="1.405cm" svg:y="10.397cm" svg:viewBox="0 0 4962 1575" draw:points="0,0 4962,0 4962,1575 0,1575">
          <text:p/>
        </draw:polygon>
        <draw:frame draw:style-name="gr195" draw:text-style-name="P4" draw:layer="layout" svg:width="1.53cm" svg:height="0.552cm" svg:x="20.043cm" svg:y="11.276cm">
          <draw:text-box>
            <text:p text:style-name="P3"><text:span text:style-name="T3">Sprints</text:span></text:p>
          </draw:text-box>
        </draw:frame>
        <draw:frame draw:style-name="gr196" draw:text-style-name="P4" draw:layer="layout" svg:width="2.812cm" svg:height="0.552cm" svg:x="2.554cm" svg:y="10.632cm">
          <draw:text-box>
            <text:p text:style-name="P3"><text:span text:style-name="T3">New system </text:span></text:p>
          </draw:text-box>
        </draw:frame>
        <draw:polygon draw:style-name="gr191" draw:text-style-name="P104" draw:layer="layout" svg:width="5.511cm" svg:height="1.736cm" svg:x="9.237cm" svg:y="10.312cm" svg:viewBox="0 0 5512 1737" draw:points="0,0 5512,0 5512,1737 0,1737">
          <text:p/>
        </draw:polygon>
        <draw:frame draw:style-name="gr197" draw:text-style-name="P4" draw:layer="layout" svg:width="2.95cm" svg:height="0.552cm" svg:x="2.486cm" svg:y="11.225cm">
          <draw:text-box>
            <text:p text:style-name="P3"><text:span text:style-name="T3">development </text:span></text:p>
          </draw:text-box>
        </draw:frame>
        <draw:polygon draw:style-name="gr45" draw:text-style-name="P6" draw:layer="layout" svg:width="4.953cm" svg:height="1.575cm" svg:x="23.723cm" svg:y="5.435cm" svg:viewBox="0 0 4954 1576" draw:points="0,0 4954,0 4954,1576 0,1576">
          <text:p/>
        </draw:polygon>
        <draw:frame draw:style-name="gr198" draw:text-style-name="P4" draw:layer="layout" svg:width="4.805cm" svg:height="0.552cm" svg:x="9.659cm" svg:y="10.927cm">
          <draw:text-box>
            <text:p text:style-name="P3"><text:span text:style-name="T3">Partial system launch </text:span></text:p>
          </draw:text-box>
        </draw:frame>
        <draw:polygon draw:style-name="gr199" draw:text-style-name="P107" draw:layer="layout" svg:width="0cm" svg:height="0cm" svg:x="9.85cm" svg:y="7.874cm" svg:viewBox="0 0 0 1" draw:points="0,0 0,1">
          <text:p/>
        </draw:polygon>
        <draw:polygon draw:style-name="gr200" draw:text-style-name="P108" draw:layer="layout" svg:width="0.021cm" svg:height="0.024cm" svg:x="9.85cm" svg:y="7.874cm" svg:viewBox="0 0 22 25" draw:points="0,1 0,0 22,0 0,25">
          <text:p/>
        </draw:polygon>
        <draw:polygon draw:style-name="gr201" draw:text-style-name="P109" draw:layer="layout" svg:width="0.042cm" svg:height="0.048cm" svg:x="9.85cm" svg:y="7.874cm" svg:viewBox="0 0 43 49" draw:points="0,24 22,0 43,0 0,49">
          <text:p/>
        </draw:polygon>
        <draw:polygon draw:style-name="gr56" draw:text-style-name="P17" draw:layer="layout" svg:width="0.063cm" svg:height="0.072cm" svg:x="9.85cm" svg:y="7.874cm" svg:viewBox="0 0 64 73" draw:points="0,49 43,0 64,0 0,73">
          <text:p/>
        </draw:polygon>
        <draw:polygon draw:style-name="gr202" draw:text-style-name="P110" draw:layer="layout" svg:width="0.084cm" svg:height="0.095cm" svg:x="9.85cm" svg:y="7.874cm" svg:viewBox="0 0 85 96" draw:points="0,73 63,0 85,0 0,96">
          <text:p/>
        </draw:polygon>
        <draw:polygon draw:style-name="gr59" draw:text-style-name="P20" draw:layer="layout" svg:width="0.105cm" svg:height="0.119cm" svg:x="9.85cm" svg:y="7.874cm" svg:viewBox="0 0 106 120" draw:points="0,96 85,0 106,0 0,120">
          <text:p/>
        </draw:polygon>
        <draw:polygon draw:style-name="gr60" draw:text-style-name="P21" draw:layer="layout" svg:width="0.126cm" svg:height="0.143cm" svg:x="9.85cm" svg:y="7.874cm" svg:viewBox="0 0 127 144" draw:points="0,120 106,0 127,0 0,144">
          <text:p/>
        </draw:polygon>
        <draw:polygon draw:style-name="gr61" draw:text-style-name="P22" draw:layer="layout" svg:width="0.147cm" svg:height="0.166cm" svg:x="9.85cm" svg:y="7.874cm" svg:viewBox="0 0 148 167" draw:points="0,144 127,0 148,0 0,167">
          <text:p/>
        </draw:polygon>
        <draw:polygon draw:style-name="gr63" draw:text-style-name="P24" draw:layer="layout" svg:width="0.168cm" svg:height="0.19cm" svg:x="9.85cm" svg:y="7.874cm" svg:viewBox="0 0 169 191" draw:points="0,167 148,0 169,0 0,191">
          <text:p/>
        </draw:polygon>
        <draw:polygon draw:style-name="gr203" draw:text-style-name="P111" draw:layer="layout" svg:width="0.189cm" svg:height="0.214cm" svg:x="9.85cm" svg:y="7.874cm" svg:viewBox="0 0 190 215" draw:points="0,191 169,0 190,0 0,215">
          <text:p/>
        </draw:polygon>
        <draw:polygon draw:style-name="gr64" draw:text-style-name="P25" draw:layer="layout" svg:width="0.209cm" svg:height="0.237cm" svg:x="9.85cm" svg:y="7.874cm" svg:viewBox="0 0 210 238" draw:points="0,215 190,0 210,0 0,238">
          <text:p/>
        </draw:polygon>
        <draw:polygon draw:style-name="gr65" draw:text-style-name="P26" draw:layer="layout" svg:width="0.23cm" svg:height="0.261cm" svg:x="9.85cm" svg:y="7.874cm" svg:viewBox="0 0 231 262" draw:points="0,238 210,0 231,0 0,262">
          <text:p/>
        </draw:polygon>
        <draw:polygon draw:style-name="gr66" draw:text-style-name="P27" draw:layer="layout" svg:width="0.251cm" svg:height="0.285cm" svg:x="9.85cm" svg:y="7.874cm" svg:viewBox="0 0 252 286" draw:points="0,262 231,0 252,0 0,286">
          <text:p/>
        </draw:polygon>
        <draw:polygon draw:style-name="gr68" draw:text-style-name="P29" draw:layer="layout" svg:width="0.272cm" svg:height="0.308cm" svg:x="9.85cm" svg:y="7.874cm" svg:viewBox="0 0 273 309" draw:points="0,286 252,0 273,0 0,309">
          <text:p/>
        </draw:polygon>
        <draw:polygon draw:style-name="gr70" draw:text-style-name="P31" draw:layer="layout" svg:width="0.293cm" svg:height="0.332cm" svg:x="9.85cm" svg:y="7.874cm" svg:viewBox="0 0 294 333" draw:points="0,309 273,0 294,0 0,333">
          <text:p/>
        </draw:polygon>
        <draw:polygon draw:style-name="gr71" draw:text-style-name="P32" draw:layer="layout" svg:width="0.314cm" svg:height="0.356cm" svg:x="9.85cm" svg:y="7.874cm" svg:viewBox="0 0 315 357" draw:points="0,333 294,0 315,0 0,357">
          <text:p/>
        </draw:polygon>
        <draw:polygon draw:style-name="gr73" draw:text-style-name="P34" draw:layer="layout" svg:width="0.335cm" svg:height="0.379cm" svg:x="9.85cm" svg:y="7.874cm" svg:viewBox="0 0 336 380" draw:points="0,357 315,0 336,0 0,380">
          <text:p/>
        </draw:polygon>
        <draw:polygon draw:style-name="gr74" draw:text-style-name="P35" draw:layer="layout" svg:width="0.356cm" svg:height="0.403cm" svg:x="9.85cm" svg:y="7.874cm" svg:viewBox="0 0 357 404" draw:points="0,380 336,0 357,0 0,404">
          <text:p/>
        </draw:polygon>
        <draw:polygon draw:style-name="gr204" draw:text-style-name="P112" draw:layer="layout" svg:width="0.377cm" svg:height="0.427cm" svg:x="9.85cm" svg:y="7.874cm" svg:viewBox="0 0 378 428" draw:points="0,404 357,0 378,0 0,428">
          <text:p/>
        </draw:polygon>
        <draw:polygon draw:style-name="gr76" draw:text-style-name="P37" draw:layer="layout" svg:width="0.398cm" svg:height="0.45cm" svg:x="9.85cm" svg:y="7.874cm" svg:viewBox="0 0 399 451" draw:points="0,427 378,0 399,0 0,451">
          <text:p/>
        </draw:polygon>
        <draw:path draw:style-name="gr77" draw:text-style-name="P38" draw:layer="layout" svg:width="0.753cm" svg:height="0.85cm" svg:x="9.516cm" svg:y="7.874cm" svg:viewBox="0 0 754 851" svg:d="M0 848h5l-2 3zM334 451l399-451h21l-420 475z">
          <text:p/>
        </draw:path>
        <draw:path draw:style-name="gr78" draw:text-style-name="P39" draw:layer="layout" svg:width="0.77cm" svg:height="0.861cm" svg:x="9.519cm" svg:y="7.874cm" svg:viewBox="0 0 771 862" svg:d="M23 848l-12 14-11-11 2-3zM332 475l419-475h20l-439 499z">
          <text:p/>
        </draw:path>
        <draw:path draw:style-name="gr205" draw:text-style-name="P113" draw:layer="layout" svg:width="0.78cm" svg:height="0.872cm" svg:x="9.53cm" svg:y="7.874cm" svg:viewBox="0 0 781 873" svg:d="M33 848l-22 25-11-11 12-14zM321 499l439-499h21l-460 522z">
          <text:p/>
        </draw:path>
        <draw:path draw:style-name="gr79" draw:text-style-name="P40" draw:layer="layout" svg:width="0.79cm" svg:height="0.883cm" svg:x="9.541cm" svg:y="7.874cm" svg:viewBox="0 0 791 884" svg:d="M43 848l-32 36-11-11 22-25zM309 522l461-522h21l-482 546z">
          <text:p/>
        </draw:path>
        <draw:path draw:style-name="gr206" draw:text-style-name="P114" draw:layer="layout" svg:width="0.8cm" svg:height="0.894cm" svg:x="9.552cm" svg:y="7.874cm" svg:viewBox="0 0 801 895" svg:d="M53 848l-42 47-11-11 32-36zM298 545l482-545h21l-503 569z">
          <text:p/>
        </draw:path>
        <draw:path draw:style-name="gr80" draw:text-style-name="P41" draw:layer="layout" svg:width="0.81cm" svg:height="0.905cm" svg:x="9.563cm" svg:y="7.874cm" svg:viewBox="0 0 811 906" svg:d="M63 848l-52 58-11-11 42-47zM287 569l503-569h21l-524 593z">
          <text:p/>
        </draw:path>
        <draw:path draw:style-name="gr82" draw:text-style-name="P43" draw:layer="layout" svg:width="0.82cm" svg:height="0.917cm" svg:x="9.574cm" svg:y="7.874cm" svg:viewBox="0 0 821 918" svg:d="M73 848l-62 70-11-12 52-58zM276 593l524-593h21l-545 616z">
          <text:p/>
        </draw:path>
        <draw:path draw:style-name="gr207" draw:text-style-name="P115" draw:layer="layout" svg:width="0.83cm" svg:height="0.928cm" svg:x="9.585cm" svg:y="7.874cm" svg:viewBox="0 0 831 929" svg:d="M82 848l-71 81-11-11 62-70zM265 617l545-617h21l-566 641z">
          <text:p/>
        </draw:path>
        <draw:path draw:style-name="gr83" draw:text-style-name="P44" draw:layer="layout" svg:width="0.84cm" svg:height="0.939cm" svg:x="9.596cm" svg:y="7.874cm" svg:viewBox="0 0 841 940" svg:d="M93 848l-81 92-12-11 72-81zM255 641l565-641h21l-586 665z">
          <text:p/>
        </draw:path>
        <draw:path draw:style-name="gr208" draw:text-style-name="P116" draw:layer="layout" svg:width="0.849cm" svg:height="0.95cm" svg:x="9.608cm" svg:y="7.874cm" svg:viewBox="0 0 850 951" svg:d="M101 848l-90 103-11-11 80-92zM243 665l586-665h21l-607 688z">
          <text:p/>
        </draw:path>
        <draw:path draw:style-name="gr86" draw:text-style-name="P47" draw:layer="layout" svg:width="0.859cm" svg:height="0.961cm" svg:x="9.619cm" svg:y="7.874cm" svg:viewBox="0 0 860 962" svg:d="M111 848l-100 114-11-11 90-103zM231 688l608-688h21l-629 712z">
          <text:p/>
        </draw:path>
        <draw:path draw:style-name="gr209" draw:text-style-name="P117" draw:layer="layout" svg:width="0.868cm" svg:height="0.972cm" svg:x="9.63cm" svg:y="7.874cm" svg:viewBox="0 0 869 973" svg:d="M121 848l-110 125-11-11 100-114zM220 712l629-712h20l-649 736z">
          <text:p/>
        </draw:path>
        <draw:path draw:style-name="gr87" draw:text-style-name="P48" draw:layer="layout" svg:width="0.878cm" svg:height="0.983cm" svg:x="9.641cm" svg:y="7.874cm" svg:viewBox="0 0 879 984" svg:d="M131 848l-120 136-11-11 110-125zM209 736l649-736h21v1l-670 758z">
          <text:p/>
        </draw:path>
        <draw:path draw:style-name="gr88" draw:text-style-name="P49" draw:layer="layout" svg:width="0.867cm" svg:height="0.993cm" svg:x="9.652cm" svg:y="7.874cm" svg:viewBox="0 0 868 994" svg:d="M141 847l-130 147-11-11 120-136zM198 758l670-758v23l-670 759z">
          <text:p/>
        </draw:path>
        <draw:path draw:style-name="gr88" draw:text-style-name="P49" draw:layer="layout" svg:width="0.856cm" svg:height="0.981cm" svg:x="9.663cm" svg:y="7.897cm" svg:viewBox="0 0 857 982" svg:d="M151 824l-140 158-11-11 130-147zM188 759l669-759v24l-669 759z">
          <text:p/>
        </draw:path>
        <draw:path draw:style-name="gr89" draw:text-style-name="P50" draw:layer="layout" svg:width="0.845cm" svg:height="0.968cm" svg:x="9.674cm" svg:y="7.921cm" svg:viewBox="0 0 846 969" svg:d="M162 800l-151 169-11-11 141-158zM177 759l669-759v24l-669 758z">
          <text:p/>
        </draw:path>
        <draw:polygon draw:style-name="gr210" draw:text-style-name="P118" draw:layer="layout" svg:width="0.834cm" svg:height="0.956cm" svg:x="9.685cm" svg:y="7.945cm" svg:viewBox="0 0 835 957" draw:points="165,776 165,758 835,0 835,23 11,957 0,945 150,776">
          <text:p/>
        </draw:polygon>
        <draw:polygon draw:style-name="gr90" draw:text-style-name="P51" draw:layer="layout" svg:width="0.823cm" svg:height="0.944cm" svg:x="9.696cm" svg:y="7.968cm" svg:viewBox="0 0 824 945" draw:points="824,24 11,945 0,934 824,0">
          <text:p/>
        </draw:polygon>
        <draw:polygon draw:style-name="gr92" draw:text-style-name="P53" draw:layer="layout" svg:width="0.812cm" svg:height="0.931cm" svg:x="9.707cm" svg:y="7.992cm" svg:viewBox="0 0 813 932" draw:points="813,24 12,932 0,921 813,0">
          <text:p/>
        </draw:polygon>
        <draw:polygon draw:style-name="gr211" draw:text-style-name="P119" draw:layer="layout" svg:width="0.8cm" svg:height="0.918cm" svg:x="9.719cm" svg:y="8.016cm" svg:viewBox="0 0 801 919" draw:points="801,23 11,919 0,908 801,0">
          <text:p/>
        </draw:polygon>
        <draw:polygon draw:style-name="gr212" draw:text-style-name="P120" draw:layer="layout" svg:width="0.789cm" svg:height="0.906cm" svg:x="9.73cm" svg:y="8.039cm" svg:viewBox="0 0 790 907" draw:points="790,24 11,907 0,896 790,0">
          <text:p/>
        </draw:polygon>
        <draw:polygon draw:style-name="gr95" draw:text-style-name="P56" draw:layer="layout" svg:width="0.778cm" svg:height="0.893cm" svg:x="9.741cm" svg:y="8.063cm" svg:viewBox="0 0 779 894" draw:points="779,24 11,894 0,883 779,0">
          <text:p/>
        </draw:polygon>
        <draw:polygon draw:style-name="gr96" draw:text-style-name="P57" draw:layer="layout" svg:width="0.767cm" svg:height="0.88cm" svg:x="9.752cm" svg:y="8.087cm" svg:viewBox="0 0 768 881" draw:points="768,23 11,881 0,870 768,0">
          <text:p/>
        </draw:polygon>
        <draw:polygon draw:style-name="gr213" draw:text-style-name="P121" draw:layer="layout" svg:width="0.756cm" svg:height="0.868cm" svg:x="9.763cm" svg:y="8.11cm" svg:viewBox="0 0 757 869" draw:points="757,24 11,869 0,858 757,0">
          <text:p/>
        </draw:polygon>
        <draw:polygon draw:style-name="gr97" draw:text-style-name="P58" draw:layer="layout" svg:width="0.745cm" svg:height="0.855cm" svg:x="9.774cm" svg:y="8.134cm" svg:viewBox="0 0 746 856" draw:points="746,24 11,856 0,845 746,0">
          <text:p/>
        </draw:polygon>
        <draw:polygon draw:style-name="gr99" draw:text-style-name="P60" draw:layer="layout" svg:width="0.734cm" svg:height="0.842cm" svg:x="9.785cm" svg:y="8.158cm" svg:viewBox="0 0 735 843" draw:points="735,23 11,843 0,832 735,0">
          <text:p/>
        </draw:polygon>
        <draw:polygon draw:style-name="gr214" draw:text-style-name="P122" draw:layer="layout" svg:width="0.723cm" svg:height="0.831cm" svg:x="9.796cm" svg:y="8.181cm" svg:viewBox="0 0 724 832" draw:points="724,24 11,832 0,820 724,0">
          <text:p/>
        </draw:polygon>
        <draw:polygon draw:style-name="gr101" draw:text-style-name="P62" draw:layer="layout" svg:width="0.712cm" svg:height="0.818cm" svg:x="9.807cm" svg:y="8.205cm" svg:viewBox="0 0 713 819" draw:points="713,24 12,819 0,808 713,0">
          <text:p/>
        </draw:polygon>
        <draw:polygon draw:style-name="gr102" draw:text-style-name="P63" draw:layer="layout" svg:width="0.7cm" svg:height="0.805cm" svg:x="9.819cm" svg:y="8.229cm" svg:viewBox="0 0 701 806" draw:points="701,23 11,806 0,795 701,0">
          <text:p/>
        </draw:polygon>
        <draw:polygon draw:style-name="gr102" draw:text-style-name="P63" draw:layer="layout" svg:width="0.689cm" svg:height="0.782cm" svg:x="9.83cm" svg:y="8.252cm" svg:viewBox="0 0 690 783" draw:points="690,0 0,783">
          <text:p/>
        </draw:polygon>
        <draw:polygon draw:style-name="gr102" draw:text-style-name="P63" draw:layer="layout" svg:width="0.689cm" svg:height="0.782cm" svg:x="9.83cm" svg:y="8.252cm" svg:viewBox="0 0 690 783" draw:points="690,0 0,783">
          <text:p/>
        </draw:polygon>
        <draw:polygon draw:style-name="gr215" draw:text-style-name="P123" draw:layer="layout" svg:width="0.689cm" svg:height="0.793cm" svg:x="9.83cm" svg:y="8.252cm" svg:viewBox="0 0 690 794" draw:points="690,24 11,794 0,783 690,0">
          <text:p/>
        </draw:polygon>
        <draw:polygon draw:style-name="gr103" draw:text-style-name="P64" draw:layer="layout" svg:width="0.678cm" svg:height="0.78cm" svg:x="9.841cm" svg:y="8.276cm" svg:viewBox="0 0 679 781" draw:points="679,24 11,781 0,770 679,0">
          <text:p/>
        </draw:polygon>
        <draw:polygon draw:style-name="gr104" draw:text-style-name="P65" draw:layer="layout" svg:width="0.667cm" svg:height="0.767cm" svg:x="9.852cm" svg:y="8.3cm" svg:viewBox="0 0 668 768" draw:points="668,23 11,768 0,757 668,0">
          <text:p/>
        </draw:polygon>
        <draw:polygon draw:style-name="gr105" draw:text-style-name="P66" draw:layer="layout" svg:width="0.656cm" svg:height="0.755cm" svg:x="9.863cm" svg:y="8.323cm" svg:viewBox="0 0 657 756" draw:points="657,24 11,756 0,745 657,0">
          <text:p/>
        </draw:polygon>
        <draw:polygon draw:style-name="gr105" draw:text-style-name="P66" draw:layer="layout" svg:width="0.645cm" svg:height="0.742cm" svg:x="9.874cm" svg:y="8.347cm" svg:viewBox="0 0 646 743" draw:points="646,24 11,743 0,732 646,0">
          <text:p/>
        </draw:polygon>
        <draw:polygon draw:style-name="gr216" draw:text-style-name="P124" draw:layer="layout" svg:width="0.634cm" svg:height="0.729cm" svg:x="9.885cm" svg:y="8.371cm" svg:viewBox="0 0 635 730" draw:points="635,24 11,730 0,719 635,0">
          <text:p/>
        </draw:polygon>
        <draw:polygon draw:style-name="gr106" draw:text-style-name="P67" draw:layer="layout" svg:width="0.623cm" svg:height="0.717cm" svg:x="9.896cm" svg:y="8.394cm" svg:viewBox="0 0 624 718" draw:points="624,24 11,718 0,707 624,0">
          <text:p/>
        </draw:polygon>
        <draw:polygon draw:style-name="gr108" draw:text-style-name="P69" draw:layer="layout" svg:width="0.612cm" svg:height="0.705cm" svg:x="9.907cm" svg:y="8.418cm" svg:viewBox="0 0 613 706" draw:points="613,24 11,706 0,694 613,0">
          <text:p/>
        </draw:polygon>
        <draw:polygon draw:style-name="gr108" draw:text-style-name="P69" draw:layer="layout" svg:width="0.601cm" svg:height="0.692cm" svg:x="9.918cm" svg:y="8.442cm" svg:viewBox="0 0 602 693" draw:points="602,24 12,693 0,682 602,0">
          <text:p/>
        </draw:polygon>
        <draw:polygon draw:style-name="gr217" draw:text-style-name="P125" draw:layer="layout" svg:width="0.589cm" svg:height="0.679cm" svg:x="9.93cm" svg:y="8.466cm" svg:viewBox="0 0 590 680" draw:points="590,24 11,680 0,669 590,0">
          <text:p/>
        </draw:polygon>
        <draw:polygon draw:style-name="gr109" draw:text-style-name="P70" draw:layer="layout" svg:width="0.578cm" svg:height="0.667cm" svg:x="9.941cm" svg:y="8.489cm" svg:viewBox="0 0 579 668" draw:points="579,24 11,668 0,657 579,0">
          <text:p/>
        </draw:polygon>
        <draw:polygon draw:style-name="gr218" draw:text-style-name="P126" draw:layer="layout" svg:width="0.567cm" svg:height="0.654cm" svg:x="9.952cm" svg:y="8.513cm" svg:viewBox="0 0 568 655" draw:points="568,24 11,655 0,644 568,0">
          <text:p/>
        </draw:polygon>
        <draw:polygon draw:style-name="gr110" draw:text-style-name="P71" draw:layer="layout" svg:width="0.556cm" svg:height="0.641cm" svg:x="9.963cm" svg:y="8.537cm" svg:viewBox="0 0 557 642" draw:points="557,23 11,642 0,631 557,0">
          <text:p/>
        </draw:polygon>
        <draw:polygon draw:style-name="gr111" draw:text-style-name="P72" draw:layer="layout" svg:width="0.545cm" svg:height="0.629cm" svg:x="9.974cm" svg:y="8.56cm" svg:viewBox="0 0 546 630" draw:points="546,24 11,630 0,619 546,0">
          <text:p/>
        </draw:polygon>
        <draw:polygon draw:style-name="gr112" draw:text-style-name="P73" draw:layer="layout" svg:width="0.534cm" svg:height="0.616cm" svg:x="9.985cm" svg:y="8.584cm" svg:viewBox="0 0 535 617" draw:points="535,24 11,617 0,606 535,0">
          <text:p/>
        </draw:polygon>
        <draw:polygon draw:style-name="gr219" draw:text-style-name="P127" draw:layer="layout" svg:width="0.523cm" svg:height="0.603cm" svg:x="9.996cm" svg:y="8.608cm" svg:viewBox="0 0 524 604" draw:points="524,23 11,604 0,593 524,0">
          <text:p/>
        </draw:polygon>
        <draw:polygon draw:style-name="gr113" draw:text-style-name="P74" draw:layer="layout" svg:width="0.512cm" svg:height="0.591cm" svg:x="10.007cm" svg:y="8.631cm" svg:viewBox="0 0 513 592" draw:points="513,24 11,592 0,581 513,0">
          <text:p/>
        </draw:polygon>
        <draw:polygon draw:style-name="gr114" draw:text-style-name="P75" draw:layer="layout" svg:width="0.501cm" svg:height="0.579cm" svg:x="10.018cm" svg:y="8.655cm" svg:viewBox="0 0 502 580" draw:points="502,24 11,580 0,568 502,0">
          <text:p/>
        </draw:polygon>
        <draw:polygon draw:style-name="gr115" draw:text-style-name="P76" draw:layer="layout" svg:width="0.49cm" svg:height="0.566cm" svg:x="10.029cm" svg:y="8.679cm" svg:viewBox="0 0 491 567" draw:points="491,23 12,567 0,556 491,0">
          <text:p/>
        </draw:polygon>
        <draw:polygon draw:style-name="gr116" draw:text-style-name="P77" draw:layer="layout" svg:width="0.483cm" svg:height="0.554cm" svg:x="10.041cm" svg:y="8.702cm" svg:viewBox="0 0 484 555" draw:points="479,18 484,18 11,555 0,544 479,0">
          <text:p/>
        </draw:polygon>
        <draw:polygon draw:style-name="gr117" draw:text-style-name="P78" draw:layer="layout" svg:width="0.493cm" svg:height="0.547cm" svg:x="10.052cm" svg:y="8.72cm" svg:viewBox="0 0 494 548" draw:points="494,0 11,548 0,537 473,0">
          <text:p/>
        </draw:polygon>
        <draw:polygon draw:style-name="gr118" draw:text-style-name="P79" draw:layer="layout" svg:width="0.503cm" svg:height="0.558cm" svg:x="10.063cm" svg:y="8.72cm" svg:viewBox="0 0 504 559" draw:points="504,0 11,559 0,548 483,0">
          <text:p/>
        </draw:polygon>
        <draw:polygon draw:style-name="gr119" draw:text-style-name="P80" draw:layer="layout" svg:width="0.513cm" svg:height="0.569cm" svg:x="10.074cm" svg:y="8.72cm" svg:viewBox="0 0 514 570" draw:points="514,0 11,570 0,559 493,0">
          <text:p/>
        </draw:polygon>
        <draw:polygon draw:style-name="gr120" draw:text-style-name="P81" draw:layer="layout" svg:width="0.523cm" svg:height="0.58cm" svg:x="10.085cm" svg:y="8.72cm" svg:viewBox="0 0 524 581" draw:points="524,0 11,581 0,570 503,0">
          <text:p/>
        </draw:polygon>
        <draw:polygon draw:style-name="gr121" draw:text-style-name="P82" draw:layer="layout" svg:width="0.533cm" svg:height="0.591cm" svg:x="10.096cm" svg:y="8.72cm" svg:viewBox="0 0 534 592" draw:points="534,0 11,592 0,581 513,0">
          <text:p/>
        </draw:polygon>
        <draw:polygon draw:style-name="gr122" draw:text-style-name="P83" draw:layer="layout" svg:width="0.543cm" svg:height="0.602cm" svg:x="10.107cm" svg:y="8.72cm" svg:viewBox="0 0 544 603" draw:points="544,0 11,603 0,592 523,0">
          <text:p/>
        </draw:polygon>
        <draw:polygon draw:style-name="gr122" draw:text-style-name="P83" draw:layer="layout" svg:width="0.553cm" svg:height="0.614cm" svg:x="10.118cm" svg:y="8.72cm" svg:viewBox="0 0 554 615" draw:points="554,0 11,615 0,603 533,0">
          <text:p/>
        </draw:polygon>
        <draw:polygon draw:style-name="gr123" draw:text-style-name="P84" draw:layer="layout" svg:width="0.563cm" svg:height="0.625cm" svg:x="10.129cm" svg:y="8.72cm" svg:viewBox="0 0 564 626" draw:points="564,0 11,626 0,615 543,0">
          <text:p/>
        </draw:polygon>
        <draw:polygon draw:style-name="gr124" draw:text-style-name="P85" draw:layer="layout" svg:width="0.573cm" svg:height="0.636cm" svg:x="10.14cm" svg:y="8.72cm" svg:viewBox="0 0 574 637" draw:points="574,0 12,637 0,626 553,0">
          <text:p/>
        </draw:polygon>
        <draw:polygon draw:style-name="gr125" draw:text-style-name="P86" draw:layer="layout" svg:width="0.581cm" svg:height="0.648cm" svg:x="10.152cm" svg:y="8.72cm" svg:viewBox="0 0 582 649" draw:points="582,0 11,649 0,637 562,0">
          <text:p/>
        </draw:polygon>
        <draw:polygon draw:style-name="gr125" draw:text-style-name="P86" draw:layer="layout" svg:width="0.591cm" svg:height="0.658cm" svg:x="10.163cm" svg:y="8.72cm" svg:viewBox="0 0 592 659" draw:points="592,0 11,659 0,648 571,0">
          <text:p/>
        </draw:polygon>
        <draw:polygon draw:style-name="gr126" draw:text-style-name="P87" draw:layer="layout" svg:width="0.601cm" svg:height="0.669cm" svg:x="10.174cm" svg:y="8.72cm" svg:viewBox="0 0 602 670" draw:points="602,0 11,670 0,659 581,0">
          <text:p/>
        </draw:polygon>
        <draw:polygon draw:style-name="gr127" draw:text-style-name="P88" draw:layer="layout" svg:width="0.611cm" svg:height="0.669cm" svg:x="10.185cm" svg:y="8.72cm" svg:viewBox="0 0 612 670" draw:points="612,0 178,492 0,670 591,0">
          <text:p/>
        </draw:polygon>
        <draw:polygon draw:style-name="gr128" draw:text-style-name="P89" draw:layer="layout" svg:width="0.454cm" svg:height="0.491cm" svg:x="10.363cm" svg:y="8.72cm" svg:viewBox="0 0 455 492" draw:points="455,0 178,313 0,492 434,0">
          <text:p/>
        </draw:polygon>
        <draw:polygon draw:style-name="gr128" draw:text-style-name="P89" draw:layer="layout" svg:width="0.297cm" svg:height="0.313cm" svg:x="10.541cm" svg:y="8.72cm" svg:viewBox="0 0 298 314" draw:points="298,0 178,135 0,314 277,0">
          <text:p/>
        </draw:polygon>
        <draw:polygon draw:style-name="gr129" draw:text-style-name="P90" draw:layer="layout" svg:width="0.135cm" svg:height="0.135cm" svg:x="10.719cm" svg:y="8.72cm" svg:viewBox="0 0 136 136" draw:points="136,0 0,136 120,0">
          <text:p/>
        </draw:polygon>
        <draw:polygon draw:style-name="gr220" draw:text-style-name="P2" draw:layer="layout" svg:width="1.338cm" svg:height="1.516cm" svg:x="9.516cm" svg:y="7.874cm" svg:viewBox="0 0 1339 1517" draw:points="0,848 334,848 334,0 1004,0 1004,848 1339,848 670,1517">
          <text:p/>
        </draw:polygon>
        <draw:frame draw:style-name="gr221" draw:text-style-name="P4" draw:layer="layout" svg:width="3.358cm" svg:height="0.552cm" svg:x="24.592cm" svg:y="5.971cm">
          <draw:text-box>
            <text:p text:style-name="P3"><text:span text:style-name="T3">Decommission </text:span></text:p>
          </draw:text-box>
        </draw:frame>
        <draw:frame draw:style-name="gr222" draw:text-style-name="P105" draw:layer="layout" svg:width="3.226cm" svg:height="0.475cm" svg:x="11.553cm" svg:y="8.067cm">
          <draw:text-box>
            <text:p text:style-name="P3"><text:span text:style-name="T21">migrate into new </text:span></text:p>
          </draw:text-box>
        </draw:frame>
        <draw:polygon draw:style-name="gr191" draw:text-style-name="P104" draw:layer="layout" svg:width="5.613cm" svg:height="1.575cm" svg:x="25.874cm" svg:y="10.405cm" svg:viewBox="0 0 5614 1576" draw:points="0,0 5614,0 5614,1576 0,1576">
          <text:p/>
        </draw:polygon>
        <draw:frame draw:style-name="gr223" draw:text-style-name="P105" draw:layer="layout" svg:width="2.966cm" svg:height="0.475cm" svg:x="11.553cm" svg:y="8.576cm">
          <draw:text-box>
            <text:p text:style-name="P3"><text:span text:style-name="T21">system Partially</text:span></text:p>
          </draw:text-box>
        </draw:frame>
        <draw:frame draw:style-name="gr224" draw:text-style-name="P4" draw:layer="layout" svg:width="4.479cm" svg:height="0.552cm" svg:x="26.585cm" svg:y="10.641cm">
          <draw:text-box>
            <text:p text:style-name="P3"><text:span text:style-name="T3">maintain &amp; enhance </text:span></text:p>
          </draw:text-box>
        </draw:frame>
        <draw:polygon draw:style-name="gr150" draw:text-style-name="P101" draw:layer="layout" svg:width="3.147cm" svg:height="0.212cm" svg:x="6.371cm" svg:y="6.121cm" svg:viewBox="0 0 3148 213" draw:points="0,88 2936,88 2936,0 3148,107 2936,213 2936,124 0,124">
          <text:p/>
        </draw:polygon>
        <draw:polygon draw:style-name="gr150" draw:text-style-name="P101" draw:layer="layout" svg:width="2.871cm" svg:height="0.212cm" svg:x="6.371cm" svg:y="11.082cm" svg:viewBox="0 0 2872 213" draw:points="0,124 2660,124 2660,213 2872,106 2660,0 2660,89 0,89">
          <text:p/>
        </draw:polygon>
        <draw:polygon draw:style-name="gr150" draw:text-style-name="P101" draw:layer="layout" svg:width="2.871cm" svg:height="0.212cm" svg:x="14.753cm" svg:y="11.082cm" svg:viewBox="0 0 2872 213" draw:points="0,89 2660,89 2660,0 2872,106 2660,213 2660,124 0,124">
          <text:p/>
        </draw:polygon>
        <draw:polygon draw:style-name="gr150" draw:text-style-name="P101" draw:layer="layout" svg:width="3.29cm" svg:height="0.211cm" svg:x="22.584cm" svg:y="11.091cm" svg:viewBox="0 0 3291 212" draw:points="0,80 3080,88 3080,0 3291,106 3079,212 3080,124 0,115">
          <text:p/>
        </draw:polygon>
        <draw:polygon draw:style-name="gr45" draw:text-style-name="P6" draw:layer="layout" svg:width="4.961cm" svg:height="1.575cm" svg:x="17.094cm" svg:y="5.435cm" svg:viewBox="0 0 4962 1576" draw:points="0,0 4962,0 4962,1576 0,1576">
          <text:p/>
        </draw:polygon>
        <draw:frame draw:style-name="gr225" draw:text-style-name="P4" draw:layer="layout" svg:width="2.594cm" svg:height="0.552cm" svg:x="27.399cm" svg:y="11.233cm">
          <draw:text-box>
            <text:p text:style-name="P3"><text:span text:style-name="T3">new system</text:span></text:p>
          </draw:text-box>
        </draw:frame>
        <draw:polygon draw:style-name="gr199" draw:text-style-name="P107" draw:layer="layout" svg:width="0cm" svg:height="0cm" svg:x="17.396cm" svg:y="7.907cm" svg:viewBox="0 0 0 0" draw:points="0,0">
          <text:p/>
        </draw:polygon>
        <draw:polygon draw:style-name="gr200" draw:text-style-name="P108" draw:layer="layout" svg:width="0.021cm" svg:height="0.024cm" svg:x="17.396cm" svg:y="7.907cm" svg:viewBox="0 0 22 25" draw:points="0,0 22,0 0,25">
          <text:p/>
        </draw:polygon>
        <draw:polygon draw:style-name="gr201" draw:text-style-name="P109" draw:layer="layout" svg:width="0.042cm" svg:height="0.048cm" svg:x="17.396cm" svg:y="7.907cm" svg:viewBox="0 0 43 49" draw:points="0,25 22,0 43,0 0,49">
          <text:p/>
        </draw:polygon>
        <draw:polygon draw:style-name="gr56" draw:text-style-name="P17" draw:layer="layout" svg:width="0.063cm" svg:height="0.072cm" svg:x="17.396cm" svg:y="7.907cm" svg:viewBox="0 0 64 73" draw:points="0,49 43,0 64,0 0,73">
          <text:p/>
        </draw:polygon>
        <draw:polygon draw:style-name="gr202" draw:text-style-name="P110" draw:layer="layout" svg:width="0.085cm" svg:height="0.096cm" svg:x="17.396cm" svg:y="7.907cm" svg:viewBox="0 0 86 97" draw:points="0,73 64,0 86,0 0,97">
          <text:p/>
        </draw:polygon>
        <draw:polygon draw:style-name="gr59" draw:text-style-name="P20" draw:layer="layout" svg:width="0.106cm" svg:height="0.119cm" svg:x="17.396cm" svg:y="7.907cm" svg:viewBox="0 0 107 120" draw:points="0,97 85,0 107,0 0,120">
          <text:p/>
        </draw:polygon>
        <draw:polygon draw:style-name="gr60" draw:text-style-name="P21" draw:layer="layout" svg:width="0.127cm" svg:height="0.143cm" svg:x="17.396cm" svg:y="7.907cm" svg:viewBox="0 0 128 144" draw:points="0,120 107,0 128,0 0,144">
          <text:p/>
        </draw:polygon>
        <draw:polygon draw:style-name="gr61" draw:text-style-name="P22" draw:layer="layout" svg:width="0.148cm" svg:height="0.167cm" svg:x="17.396cm" svg:y="7.907cm" svg:viewBox="0 0 149 168" draw:points="0,143 128,0 149,0 0,168">
          <text:p/>
        </draw:polygon>
        <draw:polygon draw:style-name="gr63" draw:text-style-name="P24" draw:layer="layout" svg:width="0.169cm" svg:height="0.191cm" svg:x="17.396cm" svg:y="7.907cm" svg:viewBox="0 0 170 192" draw:points="0,167 148,0 170,0 0,192">
          <text:p/>
        </draw:polygon>
        <draw:polygon draw:style-name="gr203" draw:text-style-name="P111" draw:layer="layout" svg:width="0.19cm" svg:height="0.215cm" svg:x="17.396cm" svg:y="7.907cm" svg:viewBox="0 0 191 216" draw:points="0,192 170,0 191,0 0,216">
          <text:p/>
        </draw:polygon>
        <draw:polygon draw:style-name="gr64" draw:text-style-name="P25" draw:layer="layout" svg:width="0.211cm" svg:height="0.238cm" svg:x="17.396cm" svg:y="7.907cm" svg:viewBox="0 0 212 239" draw:points="0,216 191,0 212,0 0,239">
          <text:p/>
        </draw:polygon>
        <draw:polygon draw:style-name="gr65" draw:text-style-name="P26" draw:layer="layout" svg:width="0.232cm" svg:height="0.262cm" svg:x="17.396cm" svg:y="7.907cm" svg:viewBox="0 0 233 263" draw:points="0,239 212,0 233,0 0,263">
          <text:p/>
        </draw:polygon>
        <draw:polygon draw:style-name="gr66" draw:text-style-name="P27" draw:layer="layout" svg:width="0.253cm" svg:height="0.286cm" svg:x="17.396cm" svg:y="7.907cm" svg:viewBox="0 0 254 287" draw:points="0,263 233,0 254,0 0,287">
          <text:p/>
        </draw:polygon>
        <draw:polygon draw:style-name="gr68" draw:text-style-name="P29" draw:layer="layout" svg:width="0.274cm" svg:height="0.31cm" svg:x="17.396cm" svg:y="7.907cm" svg:viewBox="0 0 275 311" draw:points="0,287 254,0 275,0 0,311">
          <text:p/>
        </draw:polygon>
        <draw:polygon draw:style-name="gr70" draw:text-style-name="P31" draw:layer="layout" svg:width="0.295cm" svg:height="0.334cm" svg:x="17.396cm" svg:y="7.907cm" svg:viewBox="0 0 296 335" draw:points="0,311 275,0 296,0 0,335">
          <text:p/>
        </draw:polygon>
        <draw:polygon draw:style-name="gr71" draw:text-style-name="P32" draw:layer="layout" svg:width="0.316cm" svg:height="0.358cm" svg:x="17.396cm" svg:y="7.907cm" svg:viewBox="0 0 317 359" draw:points="0,335 296,0 317,0 0,359">
          <text:p/>
        </draw:polygon>
        <draw:polygon draw:style-name="gr73" draw:text-style-name="P34" draw:layer="layout" svg:width="0.337cm" svg:height="0.381cm" svg:x="17.396cm" svg:y="7.907cm" svg:viewBox="0 0 338 382" draw:points="0,359 317,0 338,0 0,382">
          <text:p/>
        </draw:polygon>
        <draw:polygon draw:style-name="gr74" draw:text-style-name="P35" draw:layer="layout" svg:width="0.358cm" svg:height="0.405cm" svg:x="17.396cm" svg:y="7.907cm" svg:viewBox="0 0 359 406" draw:points="0,382 338,0 359,0 0,406">
          <text:p/>
        </draw:polygon>
        <draw:polygon draw:style-name="gr204" draw:text-style-name="P112" draw:layer="layout" svg:width="0.379cm" svg:height="0.429cm" svg:x="17.396cm" svg:y="7.907cm" svg:viewBox="0 0 380 430" draw:points="0,406 359,0 380,0 0,430">
          <text:p/>
        </draw:polygon>
        <draw:polygon draw:style-name="gr76" draw:text-style-name="P37" draw:layer="layout" svg:width="0.4cm" svg:height="0.453cm" svg:x="17.396cm" svg:y="7.907cm" svg:viewBox="0 0 401 454" draw:points="0,430 380,0 401,0 0,454">
          <text:p/>
        </draw:polygon>
        <draw:path draw:style-name="gr77" draw:text-style-name="P38" draw:layer="layout" svg:width="0.757cm" svg:height="0.854cm" svg:x="17.06cm" svg:y="7.907cm" svg:viewBox="0 0 758 855" svg:d="M0 852h5l-2 3zM336 454l401-454h21l-422 478z">
          <text:p/>
        </draw:path>
        <draw:path draw:style-name="gr78" draw:text-style-name="P39" draw:layer="layout" svg:width="0.775cm" svg:height="0.865cm" svg:x="17.063cm" svg:y="7.907cm" svg:viewBox="0 0 776 866" svg:d="M23 852l-12 14-11-11 2-3zM333 478l422-478h21l-443 501z">
          <text:p/>
        </draw:path>
        <draw:path draw:style-name="gr205" draw:text-style-name="P113" draw:layer="layout" svg:width="0.785cm" svg:height="0.877cm" svg:x="17.074cm" svg:y="7.907cm" svg:viewBox="0 0 786 878" svg:d="M34 852l-23 26-11-12 12-14zM322 501l443-501h21l-464 525z">
          <text:p/>
        </draw:path>
        <draw:path draw:style-name="gr79" draw:text-style-name="P40" draw:layer="layout" svg:width="0.795cm" svg:height="0.888cm" svg:x="17.085cm" svg:y="7.907cm" svg:viewBox="0 0 796 889" svg:d="M45 852l-33 37-12-11 24-26zM312 525l463-525h21l-484 549z">
          <text:p/>
        </draw:path>
        <draw:path draw:style-name="gr206" draw:text-style-name="P114" draw:layer="layout" svg:width="0.805cm" svg:height="0.899cm" svg:x="17.096cm" svg:y="7.907cm" svg:viewBox="0 0 806 900" svg:d="M54 852l-43 48-11-11 33-37zM301 548l484-548h21l-505 572z">
          <text:p/>
        </draw:path>
        <draw:path draw:style-name="gr80" draw:text-style-name="P41" draw:layer="layout" svg:width="0.815cm" svg:height="0.91cm" svg:x="17.107cm" svg:y="7.907cm" svg:viewBox="0 0 816 911" svg:d="M64 852l-52 59-12-11 43-48zM289 572l506-572h21l-527 596z">
          <text:p/>
        </draw:path>
        <draw:path draw:style-name="gr82" draw:text-style-name="P43" draw:layer="layout" svg:width="0.824cm" svg:height="0.921cm" svg:x="17.119cm" svg:y="7.907cm" svg:viewBox="0 0 825 922" svg:d="M73 852l-62 70-11-11 52-59zM277 596l527-596h21l-548 619z">
          <text:p/>
        </draw:path>
        <draw:path draw:style-name="gr207" draw:text-style-name="P115" draw:layer="layout" svg:width="0.834cm" svg:height="0.932cm" svg:x="17.13cm" svg:y="7.907cm" svg:viewBox="0 0 835 933" svg:d="M83 852l-72 81-11-11 62-70zM266 620l548-620h21l-569 644z">
          <text:p/>
        </draw:path>
        <draw:path draw:style-name="gr83" draw:text-style-name="P44" draw:layer="layout" svg:width="0.844cm" svg:height="0.944cm" svg:x="17.141cm" svg:y="7.907cm" svg:viewBox="0 0 845 945" svg:d="M93 852l-82 93-11-12 72-81zM256 644l568-644h21l-589 668z">
          <text:p/>
        </draw:path>
        <draw:path draw:style-name="gr208" draw:text-style-name="P116" draw:layer="layout" svg:width="0.854cm" svg:height="0.955cm" svg:x="17.152cm" svg:y="7.907cm" svg:viewBox="0 0 855 956" svg:d="M103 852l-92 104-11-11 82-93zM244 668l590-668h21l-611 692z">
          <text:p/>
        </draw:path>
        <draw:path draw:style-name="gr86" draw:text-style-name="P47" draw:layer="layout" svg:width="0.864cm" svg:height="0.966cm" svg:x="17.163cm" svg:y="7.907cm" svg:viewBox="0 0 865 967" svg:d="M113 852l-102 115-11-11 92-104zM233 692l611-692h21l-632 716z">
          <text:p/>
        </draw:path>
        <draw:path draw:style-name="gr209" draw:text-style-name="P117" draw:layer="layout" svg:width="0.874cm" svg:height="0.977cm" svg:x="17.174cm" svg:y="7.907cm" svg:viewBox="0 0 875 978" svg:d="M123 852l-111 126-12-11 102-115zM222 716l632-716h21l-653 740z">
          <text:p/>
        </draw:path>
        <draw:path draw:style-name="gr87" draw:text-style-name="P48" draw:layer="layout" svg:width="0.883cm" svg:height="0.988cm" svg:x="17.186cm" svg:y="7.907cm" svg:viewBox="0 0 884 989" svg:d="M133 852l-122 137-11-11 112-126zM211 740l652-740h21l-673 763z">
          <text:p/>
        </draw:path>
        <draw:path draw:style-name="gr88" draw:text-style-name="P49" draw:layer="layout" svg:width="0.872cm" svg:height="0.999cm" svg:x="17.197cm" svg:y="7.907cm" svg:viewBox="0 0 873 1000" svg:d="M142 852l-131 148-11-11 121-137zM199 763l674-763v24l-674 763z">
          <text:p/>
        </draw:path>
        <draw:path draw:style-name="gr88" draw:text-style-name="P49" draw:layer="layout" svg:width="0.861cm" svg:height="0.987cm" svg:x="17.208cm" svg:y="7.931cm" svg:viewBox="0 0 862 988" svg:d="M152 828l-141 160-11-12 131-148zM188 763l674-763v24l-674 763z">
          <text:p/>
        </draw:path>
        <draw:path draw:style-name="gr89" draw:text-style-name="P50" draw:layer="layout" svg:width="0.85cm" svg:height="0.974cm" svg:x="17.219cm" svg:y="7.955cm" svg:viewBox="0 0 851 975" svg:d="M162 804l-151 171-11-11 141-160zM177 763l674-763v24l-674 763z">
          <text:p/>
        </draw:path>
        <draw:polygon draw:style-name="gr210" draw:text-style-name="P118" draw:layer="layout" svg:width="0.839cm" svg:height="0.961cm" svg:x="17.23cm" svg:y="7.979cm" svg:viewBox="0 0 840 962" draw:points="166,780 166,763 840,0 840,24 12,962 0,951 151,780">
          <text:p/>
        </draw:polygon>
        <draw:polygon draw:style-name="gr90" draw:text-style-name="P51" draw:layer="layout" svg:width="0.827cm" svg:height="0.948cm" svg:x="17.242cm" svg:y="8.003cm" svg:viewBox="0 0 828 949" draw:points="828,23 11,949 0,938 828,0">
          <text:p/>
        </draw:polygon>
        <draw:polygon draw:style-name="gr92" draw:text-style-name="P53" draw:layer="layout" svg:width="0.816cm" svg:height="0.936cm" svg:x="17.253cm" svg:y="8.026cm" svg:viewBox="0 0 817 937" draw:points="817,24 11,937 0,926 817,0">
          <text:p/>
        </draw:polygon>
        <draw:polygon draw:style-name="gr211" draw:text-style-name="P119" draw:layer="layout" svg:width="0.805cm" svg:height="0.923cm" svg:x="17.264cm" svg:y="8.05cm" svg:viewBox="0 0 806 924" draw:points="806,24 11,924 0,913 806,0">
          <text:p/>
        </draw:polygon>
        <draw:polygon draw:style-name="gr212" draw:text-style-name="P120" draw:layer="layout" svg:width="0.794cm" svg:height="0.911cm" svg:x="17.275cm" svg:y="8.074cm" svg:viewBox="0 0 795 912" draw:points="795,24 11,912 0,900 795,0">
          <text:p/>
        </draw:polygon>
        <draw:polygon draw:style-name="gr95" draw:text-style-name="P56" draw:layer="layout" svg:width="0.783cm" svg:height="0.898cm" svg:x="17.286cm" svg:y="8.098cm" svg:viewBox="0 0 784 899" draw:points="784,24 11,899 0,888 784,0">
          <text:p/>
        </draw:polygon>
        <draw:polygon draw:style-name="gr96" draw:text-style-name="P57" draw:layer="layout" svg:width="0.772cm" svg:height="0.885cm" svg:x="17.297cm" svg:y="8.122cm" svg:viewBox="0 0 773 886" draw:points="773,24 12,886 0,875 773,0">
          <text:p/>
        </draw:polygon>
        <draw:polygon draw:style-name="gr213" draw:text-style-name="P121" draw:layer="layout" svg:width="0.76cm" svg:height="0.872cm" svg:x="17.309cm" svg:y="8.146cm" svg:viewBox="0 0 761 873" draw:points="761,23 11,873 0,862 761,0">
          <text:p/>
        </draw:polygon>
        <draw:polygon draw:style-name="gr97" draw:text-style-name="P58" draw:layer="layout" svg:width="0.749cm" svg:height="0.86cm" svg:x="17.32cm" svg:y="8.169cm" svg:viewBox="0 0 750 861" draw:points="750,24 11,861 0,849 750,0">
          <text:p/>
        </draw:polygon>
        <draw:polygon draw:style-name="gr99" draw:text-style-name="P60" draw:layer="layout" svg:width="0.738cm" svg:height="0.847cm" svg:x="17.331cm" svg:y="8.193cm" svg:viewBox="0 0 739 848" draw:points="739,24 11,848 0,837 739,0">
          <text:p/>
        </draw:polygon>
        <draw:polygon draw:style-name="gr214" draw:text-style-name="P122" draw:layer="layout" svg:width="0.727cm" svg:height="0.835cm" svg:x="17.342cm" svg:y="8.217cm" svg:viewBox="0 0 728 836" draw:points="728,24 11,836 0,824 728,0">
          <text:p/>
        </draw:polygon>
        <draw:polygon draw:style-name="gr101" draw:text-style-name="P62" draw:layer="layout" svg:width="0.716cm" svg:height="0.822cm" svg:x="17.353cm" svg:y="8.241cm" svg:viewBox="0 0 717 823" draw:points="717,24 11,823 0,812 717,0">
          <text:p/>
        </draw:polygon>
        <draw:polygon draw:style-name="gr102" draw:text-style-name="P63" draw:layer="layout" svg:width="0.705cm" svg:height="0.809cm" svg:x="17.364cm" svg:y="8.265cm" svg:viewBox="0 0 706 810" draw:points="706,23 12,810 0,799 706,0">
          <text:p/>
        </draw:polygon>
        <draw:polygon draw:style-name="gr102" draw:text-style-name="P63" draw:layer="layout" svg:width="0.693cm" svg:height="0.786cm" svg:x="17.376cm" svg:y="8.288cm" svg:viewBox="0 0 694 787" draw:points="694,0 0,787">
          <text:p/>
        </draw:polygon>
        <draw:polygon draw:style-name="gr102" draw:text-style-name="P63" draw:layer="layout" svg:width="0.693cm" svg:height="0.786cm" svg:x="17.376cm" svg:y="8.288cm" svg:viewBox="0 0 694 787" draw:points="694,0 0,787">
          <text:p/>
        </draw:polygon>
        <draw:polygon draw:style-name="gr215" draw:text-style-name="P123" draw:layer="layout" svg:width="0.693cm" svg:height="0.797cm" svg:x="17.376cm" svg:y="8.288cm" svg:viewBox="0 0 694 798" draw:points="694,24 11,798 0,787 694,0">
          <text:p/>
        </draw:polygon>
        <draw:polygon draw:style-name="gr103" draw:text-style-name="P64" draw:layer="layout" svg:width="0.682cm" svg:height="0.784cm" svg:x="17.387cm" svg:y="8.312cm" svg:viewBox="0 0 683 785" draw:points="683,24 12,785 0,774 683,0">
          <text:p/>
        </draw:polygon>
        <draw:polygon draw:style-name="gr104" draw:text-style-name="P65" draw:layer="layout" svg:width="0.671cm" svg:height="0.771cm" svg:x="17.398cm" svg:y="8.336cm" svg:viewBox="0 0 672 772" draw:points="672,24 11,772 0,761 672,0">
          <text:p/>
        </draw:polygon>
        <draw:polygon draw:style-name="gr105" draw:text-style-name="P66" draw:layer="layout" svg:width="0.66cm" svg:height="0.759cm" svg:x="17.409cm" svg:y="8.36cm" svg:viewBox="0 0 661 760" draw:points="661,24 11,760 0,748 661,0">
          <text:p/>
        </draw:polygon>
        <draw:polygon draw:style-name="gr105" draw:text-style-name="P66" draw:layer="layout" svg:width="0.649cm" svg:height="0.746cm" svg:x="17.42cm" svg:y="8.384cm" svg:viewBox="0 0 650 747" draw:points="650,23 11,747 0,736 650,0">
          <text:p/>
        </draw:polygon>
        <draw:polygon draw:style-name="gr216" draw:text-style-name="P124" draw:layer="layout" svg:width="0.638cm" svg:height="0.734cm" svg:x="17.431cm" svg:y="8.407cm" svg:viewBox="0 0 639 735" draw:points="639,25 12,735 0,724 639,0">
          <text:p/>
        </draw:polygon>
        <draw:polygon draw:style-name="gr106" draw:text-style-name="P67" draw:layer="layout" svg:width="0.626cm" svg:height="0.721cm" svg:x="17.443cm" svg:y="8.431cm" svg:viewBox="0 0 627 722" draw:points="627,24 11,722 0,711 627,0">
          <text:p/>
        </draw:polygon>
        <draw:polygon draw:style-name="gr108" draw:text-style-name="P69" draw:layer="layout" svg:width="0.615cm" svg:height="0.708cm" svg:x="17.454cm" svg:y="8.455cm" svg:viewBox="0 0 616 709" draw:points="616,24 11,709 0,698 616,0">
          <text:p/>
        </draw:polygon>
        <draw:polygon draw:style-name="gr108" draw:text-style-name="P69" draw:layer="layout" svg:width="0.604cm" svg:height="0.695cm" svg:x="17.465cm" svg:y="8.479cm" svg:viewBox="0 0 605 696" draw:points="605,24 11,696 0,685 605,0">
          <text:p/>
        </draw:polygon>
        <draw:polygon draw:style-name="gr217" draw:text-style-name="P125" draw:layer="layout" svg:width="0.593cm" svg:height="0.683cm" svg:x="17.476cm" svg:y="8.503cm" svg:viewBox="0 0 594 684" draw:points="594,24 11,684 0,672 594,0">
          <text:p/>
        </draw:polygon>
        <draw:polygon draw:style-name="gr109" draw:text-style-name="P70" draw:layer="layout" svg:width="0.582cm" svg:height="0.671cm" svg:x="17.487cm" svg:y="8.526cm" svg:viewBox="0 0 583 672" draw:points="583,24 11,672 0,661 583,0">
          <text:p/>
        </draw:polygon>
        <draw:polygon draw:style-name="gr218" draw:text-style-name="P126" draw:layer="layout" svg:width="0.571cm" svg:height="0.658cm" svg:x="17.498cm" svg:y="8.55cm" svg:viewBox="0 0 572 659" draw:points="572,24 12,659 0,648 572,0">
          <text:p/>
        </draw:polygon>
        <draw:polygon draw:style-name="gr110" draw:text-style-name="P71" draw:layer="layout" svg:width="0.559cm" svg:height="0.645cm" svg:x="17.51cm" svg:y="8.574cm" svg:viewBox="0 0 560 646" draw:points="560,24 11,646 0,635 560,0">
          <text:p/>
        </draw:polygon>
        <draw:polygon draw:style-name="gr111" draw:text-style-name="P72" draw:layer="layout" svg:width="0.548cm" svg:height="0.632cm" svg:x="17.521cm" svg:y="8.598cm" svg:viewBox="0 0 549 633" draw:points="549,24 11,633 0,622 549,0">
          <text:p/>
        </draw:polygon>
        <draw:polygon draw:style-name="gr112" draw:text-style-name="P73" draw:layer="layout" svg:width="0.537cm" svg:height="0.619cm" svg:x="17.532cm" svg:y="8.622cm" svg:viewBox="0 0 538 620" draw:points="538,24 11,620 0,609 538,0">
          <text:p/>
        </draw:polygon>
        <draw:polygon draw:style-name="gr219" draw:text-style-name="P127" draw:layer="layout" svg:width="0.526cm" svg:height="0.607cm" svg:x="17.543cm" svg:y="8.646cm" svg:viewBox="0 0 527 608" draw:points="527,23 11,608 0,596 527,0">
          <text:p/>
        </draw:polygon>
        <draw:polygon draw:style-name="gr113" draw:text-style-name="P74" draw:layer="layout" svg:width="0.515cm" svg:height="0.595cm" svg:x="17.554cm" svg:y="8.669cm" svg:viewBox="0 0 516 596" draw:points="516,24 11,596 0,585 516,0">
          <text:p/>
        </draw:polygon>
        <draw:polygon draw:style-name="gr114" draw:text-style-name="P75" draw:layer="layout" svg:width="0.504cm" svg:height="0.582cm" svg:x="17.565cm" svg:y="8.693cm" svg:viewBox="0 0 505 583" draw:points="505,24 12,583 0,572 505,0">
          <text:p/>
        </draw:polygon>
        <draw:polygon draw:style-name="gr115" draw:text-style-name="P76" draw:layer="layout" svg:width="0.492cm" svg:height="0.569cm" svg:x="17.577cm" svg:y="8.717cm" svg:viewBox="0 0 493 570" draw:points="493,24 11,570 0,559 493,0">
          <text:p/>
        </draw:polygon>
        <draw:polygon draw:style-name="gr116" draw:text-style-name="P77" draw:layer="layout" svg:width="0.487cm" svg:height="0.556cm" svg:x="17.588cm" svg:y="8.741cm" svg:viewBox="0 0 488 557" draw:points="482,17 488,17 11,557 0,546 482,0">
          <text:p/>
        </draw:polygon>
        <draw:polygon draw:style-name="gr117" draw:text-style-name="P78" draw:layer="layout" svg:width="0.497cm" svg:height="0.551cm" svg:x="17.599cm" svg:y="8.758cm" svg:viewBox="0 0 498 552" draw:points="498,0 11,552 0,540 477,0">
          <text:p/>
        </draw:polygon>
        <draw:polygon draw:style-name="gr118" draw:text-style-name="P79" draw:layer="layout" svg:width="0.507cm" svg:height="0.562cm" svg:x="17.61cm" svg:y="8.758cm" svg:viewBox="0 0 508 563" draw:points="508,0 11,563 0,552 487,0">
          <text:p/>
        </draw:polygon>
        <draw:polygon draw:style-name="gr119" draw:text-style-name="P80" draw:layer="layout" svg:width="0.517cm" svg:height="0.573cm" svg:x="17.621cm" svg:y="8.758cm" svg:viewBox="0 0 518 574" draw:points="518,0 11,574 0,563 497,0">
          <text:p/>
        </draw:polygon>
        <draw:polygon draw:style-name="gr120" draw:text-style-name="P81" draw:layer="layout" svg:width="0.527cm" svg:height="0.584cm" svg:x="17.632cm" svg:y="8.758cm" svg:viewBox="0 0 528 585" draw:points="528,0 12,585 0,574 506,0">
          <text:p/>
        </draw:polygon>
        <draw:polygon draw:style-name="gr121" draw:text-style-name="P82" draw:layer="layout" svg:width="0.536cm" svg:height="0.595cm" svg:x="17.644cm" svg:y="8.758cm" svg:viewBox="0 0 537 596" draw:points="537,0 11,596 0,585 516,0">
          <text:p/>
        </draw:polygon>
        <draw:polygon draw:style-name="gr122" draw:text-style-name="P83" draw:layer="layout" svg:width="0.546cm" svg:height="0.606cm" svg:x="17.655cm" svg:y="8.758cm" svg:viewBox="0 0 547 607" draw:points="547,0 11,607 0,596 526,0">
          <text:p/>
        </draw:polygon>
        <draw:polygon draw:style-name="gr122" draw:text-style-name="P83" draw:layer="layout" svg:width="0.556cm" svg:height="0.618cm" svg:x="17.666cm" svg:y="8.758cm" svg:viewBox="0 0 557 619" draw:points="557,0 11,619 0,607 536,0">
          <text:p/>
        </draw:polygon>
        <draw:polygon draw:style-name="gr123" draw:text-style-name="P84" draw:layer="layout" svg:width="0.566cm" svg:height="0.629cm" svg:x="17.677cm" svg:y="8.758cm" svg:viewBox="0 0 567 630" draw:points="567,0 11,630 0,619 546,0">
          <text:p/>
        </draw:polygon>
        <draw:polygon draw:style-name="gr124" draw:text-style-name="P85" draw:layer="layout" svg:width="0.576cm" svg:height="0.64cm" svg:x="17.688cm" svg:y="8.758cm" svg:viewBox="0 0 577 641" draw:points="577,0 11,641 0,630 556,0">
          <text:p/>
        </draw:polygon>
        <draw:polygon draw:style-name="gr125" draw:text-style-name="P86" draw:layer="layout" svg:width="0.586cm" svg:height="0.651cm" svg:x="17.699cm" svg:y="8.758cm" svg:viewBox="0 0 587 652" draw:points="587,0 12,652 0,641 566,0">
          <text:p/>
        </draw:polygon>
        <draw:polygon draw:style-name="gr125" draw:text-style-name="P86" draw:layer="layout" svg:width="0.595cm" svg:height="0.662cm" svg:x="17.711cm" svg:y="8.758cm" svg:viewBox="0 0 596 663" draw:points="596,0 11,663 0,652 575,0">
          <text:p/>
        </draw:polygon>
        <draw:polygon draw:style-name="gr126" draw:text-style-name="P87" draw:layer="layout" svg:width="0.606cm" svg:height="0.673cm" svg:x="17.722cm" svg:y="8.758cm" svg:viewBox="0 0 607 674" draw:points="607,0 11,674 0,663 585,0">
          <text:p/>
        </draw:polygon>
        <draw:polygon draw:style-name="gr127" draw:text-style-name="P88" draw:layer="layout" svg:width="0.616cm" svg:height="0.673cm" svg:x="17.733cm" svg:y="8.758cm" svg:viewBox="0 0 617 674" draw:points="617,0 180,494 0,674 596,0">
          <text:p/>
        </draw:polygon>
        <draw:polygon draw:style-name="gr128" draw:text-style-name="P89" draw:layer="layout" svg:width="0.457cm" svg:height="0.493cm" svg:x="17.913cm" svg:y="8.758cm" svg:viewBox="0 0 458 494" draw:points="458,0 182,313 0,494 437,0">
          <text:p/>
        </draw:polygon>
        <draw:polygon draw:style-name="gr128" draw:text-style-name="P89" draw:layer="layout" svg:width="0.297cm" svg:height="0.313cm" svg:x="18.094cm" svg:y="8.758cm" svg:viewBox="0 0 298 314" draw:points="298,0 181,132 0,314 277,0">
          <text:p/>
        </draw:polygon>
        <draw:polygon draw:style-name="gr129" draw:text-style-name="P90" draw:layer="layout" svg:width="0.132cm" svg:height="0.132cm" svg:x="18.274cm" svg:y="8.758cm" svg:viewBox="0 0 133 133" draw:points="133,0 0,133 118,0">
          <text:p/>
        </draw:polygon>
        <draw:polygon draw:style-name="gr220" draw:text-style-name="P2" draw:layer="layout" svg:width="1.346cm" svg:height="1.525cm" svg:x="17.06cm" svg:y="7.907cm" svg:viewBox="0 0 1347 1526" draw:points="0,853 336,853 336,0 1009,0 1009,853 1347,853 673,1526">
          <text:p/>
        </draw:polygon>
        <draw:frame draw:style-name="gr226" draw:text-style-name="P4" draw:layer="layout" svg:width="3.55cm" svg:height="0.552cm" svg:x="17.801cm" svg:y="5.971cm">
          <draw:text-box>
            <text:p text:style-name="P3"><text:span text:style-name="T3">Stop informatica</text:span></text:p>
          </draw:text-box>
        </draw:frame>
        <draw:frame draw:style-name="gr227" draw:text-style-name="P105" draw:layer="layout" svg:width="2.873cm" svg:height="0.475cm" svg:x="19.104cm" svg:y="8.107cm">
          <draw:text-box>
            <text:p text:style-name="P3"><text:span text:style-name="T21">migrate all into </text:span></text:p>
          </draw:text-box>
        </draw:frame>
        <draw:polygon draw:style-name="gr150" draw:text-style-name="P101" draw:layer="layout" svg:width="2.616cm" svg:height="0.212cm" svg:x="14.482cm" svg:y="6.121cm" svg:viewBox="0 0 2617 213" draw:points="0,124 2404,124 2404,213 2617,107 2404,0 2404,88 0,88">
          <text:p/>
        </draw:polygon>
        <draw:polygon draw:style-name="gr150" draw:text-style-name="P101" draw:layer="layout" svg:width="1.668cm" svg:height="0.212cm" svg:x="22.059cm" svg:y="6.121cm" svg:viewBox="0 0 1669 213" draw:points="0,88 1458,88 1458,0 1669,107 1458,213 1458,124 0,124">
          <text:p/>
        </draw:polygon>
        <draw:frame draw:style-name="gr228" draw:text-style-name="P105" draw:layer="layout" svg:width="2.237cm" svg:height="0.475cm" svg:x="19.104cm" svg:y="8.615cm">
          <draw:text-box>
            <text:p text:style-name="P3"><text:span text:style-name="T21">new system</text:span></text:p>
          </draw:text-box>
        </draw:frame>
        <draw:frame draw:style-name="gr229" draw:text-style-name="P4" draw:layer="layout" svg:width="22.054cm" svg:height="0.552cm" svg:x="0.798cm" svg:y="14.884cm">
          <draw:text-box>
            <text:p text:style-name="P3"><text:span text:style-name="T13">Kickoff <text:s text:c="20"/>System Investigation <text:s text:c="12"/>Architecture design <text:s text:c="21"/>Partial launch <text:s text:c="8"/></text:span></text:p>
          </draw:text-box>
        </draw:frame>
        <draw:polygon draw:style-name="gr150" draw:text-style-name="P101" draw:layer="layout" svg:width="31.519cm" svg:height="0.211cm" svg:x="1.409cm" svg:y="13.936cm" svg:viewBox="0 0 31520 212" draw:points="0,88 31308,88 31308,0 31520,106 31308,212 31308,124 0,124">
          <text:p/>
        </draw:polygon>
        <draw:path draw:style-name="gr230" draw:text-style-name="P6" draw:layer="layout" svg:width="0.763cm" svg:height="0.763cm" svg:x="1.367cm" svg:y="13.677cm" svg:viewBox="0 0 764 764" svg:d="M0 382c0-211 170-382 382-382 210 0 382 171 382 382 0 212-172 382-382 382-212 0-382-170-382-382z">
          <text:p/>
        </draw:path>
        <draw:path draw:style-name="gr230" draw:text-style-name="P6" draw:layer="layout" svg:width="0.763cm" svg:height="0.763cm" svg:x="7.319cm" svg:y="13.677cm" svg:viewBox="0 0 764 764" svg:d="M0 382c0-211 172-382 382-382 211 0 382 171 382 382 0 212-171 382-382 382-210 0-382-170-382-382z">
          <text:p/>
        </draw:path>
        <draw:path draw:style-name="gr230" draw:text-style-name="P6" draw:layer="layout" svg:width="0.77cm" svg:height="0.763cm" svg:x="13.263cm" svg:y="13.677cm" svg:viewBox="0 0 771 764" svg:d="M0 382c0-211 172-382 386-382 212 0 385 171 385 382 0 212-173 382-385 382-214 0-386-170-386-382z">
          <text:p/>
        </draw:path>
        <draw:path draw:style-name="gr230" draw:text-style-name="P6" draw:layer="layout" svg:width="0.77cm" svg:height="0.763cm" svg:x="31.119cm" svg:y="13.677cm" svg:viewBox="0 0 771 764" svg:d="M0 382c0-211 173-382 386-382s385 171 385 382c0 212-172 382-385 382s-386-170-386-382z">
          <text:p/>
        </draw:path>
        <draw:path draw:style-name="gr230" draw:text-style-name="P6" draw:layer="layout" svg:width="0.77cm" svg:height="0.763cm" svg:x="19.215cm" svg:y="13.677cm" svg:viewBox="0 0 771 764" svg:d="M0 382c0-211 172-382 385-382 214 0 386 171 386 382 0 212-172 382-386 382-213 0-385-170-385-382z">
          <text:p/>
        </draw:path>
        <draw:path draw:style-name="gr230" draw:text-style-name="P6" draw:layer="layout" svg:width="0.77cm" svg:height="0.763cm" svg:x="25.167cm" svg:y="13.677cm" svg:viewBox="0 0 771 764" svg:d="M0 382c0-211 172-382 385-382s386 171 386 382c0 212-173 382-386 382s-385-170-385-382z">
          <text:p/>
        </draw:path>
        <draw:frame draw:style-name="gr231" draw:text-style-name="P4" draw:layer="layout" svg:width="8.462cm" svg:height="0.552cm" svg:x="24.426cm" svg:y="14.884cm">
          <draw:text-box>
            <text:p text:style-name="P3"><text:span text:style-name="T13">Full launch <text:s text:c="27"/>Warranty <text:s/></text:span></text:p>
          </draw:text-box>
        </draw:frame>
        <draw:frame draw:style-name="gr232" draw:text-style-name="P4" draw:layer="layout" svg:width="3.14cm" svg:height="0.552cm" svg:x="30.167cm" svg:y="15.777cm">
          <draw:text-box>
            <text:p text:style-name="P3"><text:span text:style-name="T13">Post-Warranty</text:span></text:p>
          </draw:text-box>
        </draw:frame>
      </draw:page>
      <draw:page draw:name="page9" draw:style-name="dp1" draw:master-page-name="master-page3">
        <draw:polygon draw:style-name="gr8" draw:text-style-name="P6" draw:layer="layout" svg:width="2.175cm" svg:height="0.128cm" svg:x="0cm" svg:y="3.056cm" svg:viewBox="0 0 2176 129" draw:points="0,0 2176,0 2176,129 0,129">
          <text:p/>
        </draw:polygon>
        <draw:path draw:style-name="gr45" draw:text-style-name="P6" draw:layer="layout" svg:width="4.58cm" svg:height="1.659cm" svg:x="0.855cm" svg:y="8.263cm" svg:viewBox="0 0 4581 1660" svg:d="M0 277c0-153 123-277 276-277h4029c152 0 276 124 276 277v1107c0 153-124 276-276 276h-4029c-153 0-276-123-276-276z">
          <text:p/>
        </draw:path>
        <draw:frame draw:style-name="gr233" draw:text-style-name="P9" draw:layer="layout" svg:width="22.466cm" svg:height="1.309cm" svg:x="0.899cm" svg:y="1.518cm">
          <draw:text-box>
            <text:p text:style-name="P3"><text:span text:style-name="T7">Working modes after migration(3 scenarios) </text:span></text:p>
          </draw:text-box>
        </draw:frame>
        <draw:path draw:style-name="gr8" draw:text-style-name="P6" draw:layer="layout" svg:width="4.429cm" svg:height="1.659cm" svg:x="10.033cm" svg:y="8.263cm" svg:viewBox="0 0 4430 1660" svg:d="M0 277c0-153 124-277 277-277h3876c153 0 277 124 277 277v1107c0 153-124 276-277 276h-3876c-153 0-277-123-277-276z">
          <text:p/>
        </draw:path>
        <draw:path draw:style-name="gr39" draw:text-style-name="P2" draw:layer="layout" svg:width="4.429cm" svg:height="1.659cm" svg:x="10.033cm" svg:y="8.263cm" svg:viewBox="0 0 4430 1660" svg:d="M0 277c0-153 124-277 277-277h3876c153 0 277 124 277 277v1107c0 153-124 276-277 276h-3876c-153 0-277-123-277-276z">
          <text:p/>
        </draw:path>
        <draw:frame draw:style-name="gr234" draw:text-style-name="P4" draw:layer="layout" svg:width="3.359cm" svg:height="0.552cm" svg:x="1.463cm" svg:y="8.841cm">
          <draw:text-box>
            <text:p text:style-name="P3"><text:span text:style-name="T3">Informatica Job</text:span></text:p>
          </draw:text-box>
        </draw:frame>
        <draw:frame draw:style-name="gr235" draw:text-style-name="P4" draw:layer="layout" svg:width="2.267cm" svg:height="0.552cm" svg:x="11.12cm" svg:y="8.545cm">
          <draw:text-box>
            <text:p text:style-name="P3"><text:span text:style-name="T3">Control M/</text:span></text:p>
          </draw:text-box>
        </draw:frame>
        <draw:polygon draw:style-name="gr236" draw:text-style-name="P6" draw:layer="layout" svg:width="1.744cm" svg:height="0.856cm" svg:x="6.654cm" svg:y="8.669cm" svg:viewBox="0 0 1745 857" draw:points="0,214 1318,214 1318,0 1745,429 1318,857 1318,643 0,643">
          <text:p/>
        </draw:polygon>
        <draw:path draw:style-name="gr45" draw:text-style-name="P6" draw:layer="layout" svg:width="5.241cm" svg:height="1.659cm" svg:x="18.05cm" svg:y="8.263cm" svg:viewBox="0 0 5242 1660" svg:d="M0 277c0-153 124-277 277-277h4689c152 0 276 124 276 277v1107c0 153-124 276-276 276h-4689c-153 0-277-123-277-276z">
          <text:p/>
        </draw:path>
        <draw:frame draw:style-name="gr237" draw:text-style-name="P4" draw:layer="layout" svg:width="2.049cm" svg:height="0.552cm" svg:x="11.222cm" svg:y="9.137cm">
          <draw:text-box>
            <text:p text:style-name="P3"><text:span text:style-name="T3">NiFi/ java</text:span></text:p>
          </draw:text-box>
        </draw:frame>
        <draw:polygon draw:style-name="gr236" draw:text-style-name="P6" draw:layer="layout" svg:width="1.735cm" svg:height="0.856cm" svg:x="15.333cm" svg:y="8.669cm" svg:viewBox="0 0 1736 857" draw:points="0,214 1309,214 1309,0 1736,429 1309,857 1309,643 0,643">
          <text:p/>
        </draw:polygon>
        <draw:frame draw:style-name="gr238" draw:text-style-name="P4" draw:layer="layout" svg:width="1.722cm" svg:height="0.552cm" svg:x="19.879cm" svg:y="8.841cm">
          <draw:text-box>
            <text:p text:style-name="P3"><text:span text:style-name="T3">PLSQL </text:span></text:p>
          </draw:text-box>
        </draw:frame>
        <draw:frame draw:style-name="gr239" draw:text-style-name="P128" draw:layer="layout" svg:width="1.555cm" svg:height="0.42cm" svg:x="6.502cm" svg:y="7.698cm">
          <draw:text-box>
            <text:p text:style-name="P3"><text:span text:style-name="T22">Existing </text:span></text:p>
          </draw:text-box>
        </draw:frame>
        <draw:polygon draw:style-name="gr240" draw:text-style-name="P6" draw:layer="layout" svg:width="1.919cm" svg:height="1.401cm" svg:x="6.514cm" svg:y="10.97cm" svg:viewBox="0 0 1920 1402" draw:points="217,0 1660,848 1768,663 1920,1250 1334,1402 1443,1217 0,368">
          <text:p/>
        </draw:polygon>
        <draw:path draw:style-name="gr45" draw:text-style-name="P6" draw:layer="layout" svg:width="4.437cm" svg:height="1.659cm" svg:x="9.541cm" svg:y="12.048cm" svg:viewBox="0 0 4438 1660" svg:d="M0 276c0-153 124-276 277-276h3884c153 0 277 123 277 276v1107c0 153-124 277-277 277h-3884c-153 0-277-124-277-277z">
          <text:p/>
        </draw:path>
        <draw:frame draw:style-name="gr241" draw:text-style-name="P128" draw:layer="layout" svg:width="1.285cm" svg:height="0.42cm" svg:x="6.502cm" svg:y="8.138cm">
          <draw:text-box>
            <text:p text:style-name="P3"><text:span text:style-name="T22">reports</text:span></text:p>
          </draw:text-box>
        </draw:frame>
        <draw:frame draw:style-name="gr242" draw:text-style-name="P4" draw:layer="layout" svg:width="1.394cm" svg:height="0.552cm" svg:x="11.137cm" svg:y="12.329cm">
          <draw:text-box>
            <text:p text:style-name="P3"><text:span text:style-name="T3">Kettle </text:span></text:p>
          </draw:text-box>
        </draw:frame>
        <draw:frame draw:style-name="gr243" draw:text-style-name="P4" draw:layer="layout" svg:width="2.814cm" svg:height="0.552cm" svg:x="10.366cm" svg:y="12.923cm">
          <draw:text-box>
            <text:p text:style-name="P3"><text:span text:style-name="T3">development</text:span></text:p>
          </draw:text-box>
        </draw:frame>
        <draw:polygon draw:style-name="gr236" draw:text-style-name="P6" draw:layer="layout" svg:width="0.855cm" svg:height="0.94cm" svg:x="11.76cm" svg:y="10.515cm" svg:viewBox="0 0 856 941" draw:points="213,941 213,429 0,429 427,0 856,429 642,429 642,941">
          <text:p/>
        </draw:polygon>
        <draw:path draw:style-name="gr244" draw:text-style-name="P129" draw:layer="layout" svg:width="1.071cm" svg:height="1.023cm" svg:x="17.531cm" svg:y="6.007cm" svg:viewBox="0 0 1072 1024" svg:d="M984 708c-108 261-407 385-667 277-263-108-386-408-278-669 109-261 408-384 668-277 144 60 252 181 296 330h69l-122 143-170-143h68c-79-186-293-272-479-193-185 79-273 293-193 480 79 185 293 272 479 193 88-38 158-108 194-196z">
          <text:p/>
        </draw:path>
        <draw:frame draw:style-name="gr245" draw:text-style-name="P128" draw:layer="layout" svg:width="2.155cm" svg:height="0.42cm" svg:x="5.264cm" svg:y="11.875cm">
          <draw:text-box>
            <text:p text:style-name="P3"><text:span text:style-name="T22">New reports</text:span></text:p>
          </draw:text-box>
        </draw:frame>
        <draw:frame draw:style-name="gr246" draw:text-style-name="P128" draw:layer="layout" svg:width="1.513cm" svg:height="0.42cm" svg:x="19.003cm" svg:y="5.928cm">
          <draw:text-box>
            <text:p text:style-name="P3"><text:span text:style-name="T22">Reports </text:span></text:p>
          </draw:text-box>
        </draw:frame>
        <draw:polygon draw:style-name="gr236" draw:text-style-name="P6" draw:layer="layout" svg:width="1.05cm" svg:height="0.982cm" svg:x="20.142cm" svg:y="6.781cm" svg:viewBox="0 0 1051 983" draw:points="0,259 526,0 1051,259 733,259 733,725 1051,725 526,983 0,725 319,725 319,259">
          <text:p/>
        </draw:polygon>
        <draw:path draw:style-name="gr45" draw:text-style-name="P6" draw:layer="layout" svg:width="5.249cm" svg:height="1.66cm" svg:x="26.28cm" svg:y="8.212cm" svg:viewBox="0 0 5250 1661" svg:d="M0 277c0-153 124-277 277-277h4697c153 0 276 124 276 277v1107c0 153-123 277-276 277h-4697c-153 0-277-124-277-277z">
          <text:p/>
        </draw:path>
        <draw:frame draw:style-name="gr247" draw:text-style-name="P128" draw:layer="layout" svg:width="2.279cm" svg:height="0.42cm" svg:x="19.003cm" svg:y="6.368cm">
          <draw:text-box>
            <text:p text:style-name="P3"><text:span text:style-name="T22">maintenance</text:span></text:p>
          </draw:text-box>
        </draw:frame>
        <draw:polygon draw:style-name="gr236" draw:text-style-name="P6" draw:layer="layout" svg:width="1.736cm" svg:height="0.856cm" svg:x="23.96cm" svg:y="8.669cm" svg:viewBox="0 0 1737 857" draw:points="0,214 1309,214 1309,0 1737,429 1309,857 1309,643 0,643">
          <text:p/>
        </draw:polygon>
        <draw:path draw:style-name="gr184" draw:text-style-name="P104" draw:layer="layout" svg:width="0.872cm" svg:height="0.881cm" svg:x="5.744cm" svg:y="6.667cm" svg:viewBox="0 0 873 882" svg:d="M0 440c0-243 195-440 436-440s437 197 437 440-196 442-437 442-436-199-436-442z">
          <text:p/>
        </draw:path>
        <draw:frame draw:style-name="gr143" draw:text-style-name="P4" draw:layer="layout" svg:width="1.858cm" svg:height="0.552cm" svg:x="28.059cm" svg:y="8.788cm">
          <draw:text-box>
            <text:p text:style-name="P3"><text:span text:style-name="T3">Reports </text:span></text:p>
          </draw:text-box>
        </draw:frame>
        <draw:path draw:style-name="gr184" draw:text-style-name="P104" draw:layer="layout" svg:width="0.872cm" svg:height="0.873cm" svg:x="4.415cm" svg:y="10.993cm" svg:viewBox="0 0 873 874" svg:d="M0 436c0-240 195-436 437-436 241 0 436 196 436 436 0 241-195 438-436 438-242 0-437-197-437-438z">
          <text:p/>
        </draw:path>
        <draw:frame draw:style-name="gr186" draw:text-style-name="P4" draw:layer="layout" svg:width="0.49cm" svg:height="0.552cm" svg:x="6.043cm" svg:y="6.848cm">
          <draw:text-box>
            <text:p text:style-name="P3"><text:span text:style-name="T3">1</text:span></text:p>
          </draw:text-box>
        </draw:frame>
        <draw:path draw:style-name="gr184" draw:text-style-name="P104" draw:layer="layout" svg:width="0.88cm" svg:height="0.872cm" svg:x="18.309cm" svg:y="4.83cm" svg:viewBox="0 0 881 873" svg:d="M0 436c0-241 197-436 440-436 244 0 441 195 441 436s-197 437-441 437c-243 0-440-196-440-437z">
          <text:p/>
        </draw:path>
        <draw:frame draw:style-name="gr186" draw:text-style-name="P4" draw:layer="layout" svg:width="0.49cm" svg:height="0.552cm" svg:x="4.713cm" svg:y="11.172cm">
          <draw:text-box>
            <text:p text:style-name="P3"><text:span text:style-name="T3">2</text:span></text:p>
          </draw:text-box>
        </draw:frame>
        <draw:path draw:style-name="gr248" draw:text-style-name="P130" draw:layer="layout" svg:width="14.741cm" svg:height="2.269cm" svg:x="18.626cm" svg:y="14.816cm" svg:viewBox="0 0 14742 2270" svg:d="M0 378c0-209 169-378 378-378h13985c209 0 379 169 379 378v1513c0 209-170 379-379 379h-13985c-209 0-378-170-378-379z">
          <text:p/>
        </draw:path>
        <draw:frame draw:style-name="gr186" draw:text-style-name="P4" draw:layer="layout" svg:width="0.49cm" svg:height="0.552cm" svg:x="18.612cm" svg:y="5.007cm">
          <draw:text-box>
            <text:p text:style-name="P3"><text:span text:style-name="T3">3</text:span></text:p>
          </draw:text-box>
        </draw:frame>
        <draw:frame draw:style-name="gr186" draw:text-style-name="P4" draw:layer="layout" svg:width="0.49cm" svg:height="0.552cm" svg:x="18.997cm" svg:y="15.097cm">
          <draw:text-box>
            <text:p text:style-name="P3"><text:span text:style-name="T13">1.</text:span></text:p>
          </draw:text-box>
        </draw:frame>
        <draw:frame draw:style-name="gr249" draw:text-style-name="P4" draw:layer="layout" svg:width="7.016cm" svg:height="0.552cm" svg:x="20.268cm" svg:y="15.097cm">
          <draw:text-box>
            <text:p text:style-name="P3"><text:span text:style-name="T13">Replacement existing workflow <text:s/></text:span></text:p>
          </draw:text-box>
        </draw:frame>
        <draw:frame draw:style-name="gr250" draw:text-style-name="P4" draw:layer="layout" svg:width="0.49cm" svg:height="0.543cm" svg:x="27.306cm" svg:y="15.1cm">
          <draw:text-box>
            <text:p text:style-name="P3"><text:span text:style-name="T23"></text:span></text:p>
          </draw:text-box>
        </draw:frame>
        <draw:frame draw:style-name="gr251" draw:text-style-name="P4" draw:layer="layout" svg:width="0.985cm" svg:height="0.552cm" svg:x="27.932cm" svg:y="15.097cm">
          <draw:text-box>
            <text:p text:style-name="P3"><text:span text:style-name="T13">SQL</text:span></text:p>
          </draw:text-box>
        </draw:frame>
        <draw:frame draw:style-name="gr250" draw:text-style-name="P4" draw:layer="layout" svg:width="0.49cm" svg:height="0.543cm" svg:x="28.914cm" svg:y="15.1cm">
          <draw:text-box>
            <text:p text:style-name="P3"><text:span text:style-name="T23"></text:span></text:p>
          </draw:text-box>
        </draw:frame>
        <draw:frame draw:style-name="gr169" draw:text-style-name="P4" draw:layer="layout" svg:width="2.65cm" svg:height="0.552cm" svg:x="29.541cm" svg:y="15.097cm">
          <draw:text-box>
            <text:p text:style-name="P3"><text:span text:style-name="T13">pl/SQL shell</text:span></text:p>
          </draw:text-box>
        </draw:frame>
        <draw:frame draw:style-name="gr186" draw:text-style-name="P4" draw:layer="layout" svg:width="0.49cm" svg:height="0.552cm" svg:x="18.997cm" svg:y="15.69cm">
          <draw:text-box>
            <text:p text:style-name="P3"><text:span text:style-name="T13">2.</text:span></text:p>
          </draw:text-box>
        </draw:frame>
        <draw:frame draw:style-name="gr252" draw:text-style-name="P4" draw:layer="layout" svg:width="4.341cm" svg:height="0.552cm" svg:x="20.268cm" svg:y="15.69cm">
          <draw:text-box>
            <text:p text:style-name="P3"><text:span text:style-name="T13">New ETL workflow <text:s/></text:span></text:p>
          </draw:text-box>
        </draw:frame>
        <draw:frame draw:style-name="gr250" draw:text-style-name="P4" draw:layer="layout" svg:width="0.49cm" svg:height="0.543cm" svg:x="24.63cm" svg:y="15.693cm">
          <draw:text-box>
            <text:p text:style-name="P3"><text:span text:style-name="T23"></text:span></text:p>
          </draw:text-box>
        </draw:frame>
        <draw:frame draw:style-name="gr253" draw:text-style-name="P4" draw:layer="layout" svg:width="1.258cm" svg:height="0.552cm" svg:x="25.248cm" svg:y="15.69cm">
          <draw:text-box>
            <text:p text:style-name="P3"><text:span text:style-name="T13">Kettle</text:span></text:p>
          </draw:text-box>
        </draw:frame>
        <draw:frame draw:style-name="gr187" draw:text-style-name="P4" draw:layer="layout" svg:width="0.491cm" svg:height="0.552cm" svg:x="18.997cm" svg:y="16.282cm">
          <draw:text-box>
            <text:p text:style-name="P3"><text:span text:style-name="T13">3.</text:span></text:p>
          </draw:text-box>
        </draw:frame>
        <draw:frame draw:style-name="gr254" draw:text-style-name="P4" draw:layer="layout" svg:width="4.997cm" svg:height="0.552cm" svg:x="20.268cm" svg:y="16.282cm">
          <draw:text-box>
            <text:p text:style-name="P3"><text:span text:style-name="T13">Maintenance workflow </text:span></text:p>
          </draw:text-box>
        </draw:frame>
        <draw:frame draw:style-name="gr255" draw:text-style-name="P4" draw:layer="layout" svg:width="0.491cm" svg:height="0.543cm" svg:x="25.281cm" svg:y="16.285cm">
          <draw:text-box>
            <text:p text:style-name="P3"><text:span text:style-name="T23"></text:span></text:p>
          </draw:text-box>
        </draw:frame>
        <draw:frame draw:style-name="gr142" draw:text-style-name="P4" draw:layer="layout" svg:width="2.295cm" svg:height="0.552cm" svg:x="25.9cm" svg:y="16.282cm">
          <draw:text-box>
            <text:p text:style-name="P3"><text:span text:style-name="T13">SQL / ETL</text:span></text:p>
          </draw:text-box>
        </draw:frame>
      </draw:page>
      <draw:page draw:name="page10" draw:style-name="dp1" draw:master-page-name="master-page3">
        <draw:polygon draw:style-name="gr1" draw:text-style-name="P1" draw:layer="layout" svg:width="33.866cm" svg:height="19.049cm" svg:x="0cm" svg:y="0cm" svg:viewBox="0 0 33867 19050" draw:points="0,0 33867,0 33867,19050 0,19050">
          <text:p/>
        </draw:polygon>
        <draw:polygon draw:style-name="gr8" draw:text-style-name="P6" draw:layer="layout" svg:width="2.175cm" svg:height="0.128cm" svg:x="0cm" svg:y="3.056cm" svg:viewBox="0 0 2176 129" draw:points="0,0 2176,0 2176,129 0,129">
          <text:p/>
        </draw:polygon>
        <draw:polygon draw:style-name="gr8" draw:text-style-name="P6" draw:layer="layout" svg:width="4.318cm" svg:height="1.414cm" svg:x="2.006cm" svg:y="3.581cm" svg:viewBox="0 0 4319 1415" draw:points="0,0 4319,0 4319,1415 0,1415">
          <text:p/>
        </draw:polygon>
        <draw:frame draw:style-name="gr256" draw:text-style-name="P9" draw:layer="layout" svg:width="15.346cm" svg:height="1.309cm" svg:x="0.899cm" svg:y="1.518cm">
          <draw:text-box>
            <text:p text:style-name="P3"><text:span text:style-name="T7">Detailed implementation steps</text:span></text:p>
          </draw:text-box>
        </draw:frame>
        <draw:polygon draw:style-name="gr8" draw:text-style-name="P6" draw:layer="layout" svg:width="4.86cm" svg:height="1.414cm" svg:x="7.687cm" svg:y="3.581cm" svg:viewBox="0 0 4861 1415" draw:points="0,0 4861,0 4861,1415 0,1415">
          <text:p/>
        </draw:polygon>
        <draw:frame draw:style-name="gr257" draw:text-style-name="P4" draw:layer="layout" svg:width="2.759cm" svg:height="0.552cm" svg:x="2.792cm" svg:y="4.03cm">
          <draw:text-box>
            <text:p text:style-name="P3"><text:span text:style-name="T3">Investigation</text:span></text:p>
          </draw:text-box>
        </draw:frame>
        <draw:polygon draw:style-name="gr8" draw:text-style-name="P6" draw:layer="layout" svg:width="4.86cm" svg:height="1.414cm" svg:x="13.91cm" svg:y="3.581cm" svg:viewBox="0 0 4861 1415" draw:points="0,0 4861,0 4861,1415 0,1415">
          <text:p/>
        </draw:polygon>
        <draw:frame draw:style-name="gr258" draw:text-style-name="P4" draw:layer="layout" svg:width="4.424cm" svg:height="0.552cm" svg:x="7.972cm" svg:y="4.03cm">
          <draw:text-box>
            <text:p text:style-name="P3"><text:span text:style-name="T3">Architecture Design </text:span></text:p>
          </draw:text-box>
        </draw:frame>
        <draw:polygon draw:style-name="gr8" draw:text-style-name="P6" draw:layer="layout" svg:width="4.86cm" svg:height="1.414cm" svg:x="20.142cm" svg:y="3.581cm" svg:viewBox="0 0 4861 1415" draw:points="0,0 4861,0 4861,1415 0,1415">
          <text:p/>
        </draw:polygon>
        <draw:frame draw:style-name="gr259" draw:text-style-name="P4" draw:layer="layout" svg:width="3.496cm" svg:height="0.552cm" svg:x="14.673cm" svg:y="4.03cm">
          <draw:text-box>
            <text:p text:style-name="P3"><text:span text:style-name="T3">Implementation </text:span></text:p>
          </draw:text-box>
        </draw:frame>
        <draw:polygon draw:style-name="gr8" draw:text-style-name="P6" draw:layer="layout" svg:width="4.86cm" svg:height="1.414cm" svg:x="26.365cm" svg:y="3.581cm" svg:viewBox="0 0 4861 1415" draw:points="0,0 4861,0 4861,1415 0,1415">
          <text:p/>
        </draw:polygon>
        <draw:frame draw:style-name="gr260" draw:text-style-name="P4" draw:layer="layout" svg:width="1.749cm" svg:height="0.552cm" svg:x="21.774cm" svg:y="4.03cm">
          <draw:text-box>
            <text:p text:style-name="P3"><text:span text:style-name="T3">Testing </text:span></text:p>
          </draw:text-box>
        </draw:frame>
        <draw:polygon draw:style-name="gr150" draw:text-style-name="P101" draw:layer="layout" svg:width="33.406cm" svg:height="0.212cm" svg:x="0.004cm" svg:y="5.367cm" svg:viewBox="0 0 33407 213" draw:points="0,90 33196,90 33196,0 33407,107 33196,213 33196,125 0,125">
          <text:p/>
        </draw:polygon>
        <draw:line draw:style-name="gr160" draw:text-style-name="P2" draw:layer="layout" svg:x1="6.853cm" svg:y1="5.473cm" svg:x2="6.853cm" svg:y2="17.925cm">
          <text:p/>
        </draw:line>
        <draw:line draw:style-name="gr160" draw:text-style-name="P2" draw:layer="layout" svg:x1="13.161cm" svg:y1="5.473cm" svg:x2="13.161cm" svg:y2="17.925cm">
          <text:p/>
        </draw:line>
        <draw:line draw:style-name="gr160" draw:text-style-name="P2" draw:layer="layout" svg:x1="19.477cm" svg:y1="5.473cm" svg:x2="19.477cm" svg:y2="17.925cm">
          <text:p/>
        </draw:line>
        <draw:line draw:style-name="gr160" draw:text-style-name="P2" draw:layer="layout" svg:x1="25.793cm" svg:y1="5.473cm" svg:x2="25.793cm" svg:y2="17.925cm">
          <text:p/>
        </draw:line>
        <draw:polygon draw:style-name="gr61" draw:text-style-name="P22" draw:layer="layout" svg:width="0.029cm" svg:height="0.002cm" svg:x="6.604cm" svg:y="4.055cm" svg:viewBox="0 0 30 3" draw:points="0,0 30,0 25,1 18,1 12,3 6,3 0,3">
          <text:p/>
        </draw:polygon>
        <draw:polygon draw:style-name="gr61" draw:text-style-name="P22" draw:layer="layout" svg:width="0.05cm" svg:height="0.006cm" svg:x="6.604cm" svg:y="4.055cm" svg:viewBox="0 0 51 7" draw:points="51,0 49,0 44,2 38,3 31,5 25,6 19,7 13,7 7,7 0,7 0,2 6,2 12,2 18,1 24,1 29,0">
          <text:p/>
        </draw:polygon>
        <draw:polygon draw:style-name="gr62" draw:text-style-name="P23" draw:layer="layout" svg:width="0.065cm" svg:height="0.011cm" svg:x="6.604cm" svg:y="4.055cm" svg:viewBox="0 0 66 12" draw:points="66,0 62,1 56,3 50,5 44,6 38,7 32,8 26,9 19,11 13,11 7,12 0,12 0,6 7,6 13,6 19,6 26,5 32,4 38,3 44,2 49,0 51,0">
          <text:p/>
        </draw:polygon>
        <draw:polygon draw:style-name="gr63" draw:text-style-name="P24" draw:layer="layout" svg:width="0.077cm" svg:height="0.015cm" svg:x="6.604cm" svg:y="4.055cm" svg:viewBox="0 0 78 16" draw:points="78,0 76,1 70,4 64,6 58,8 52,10 44,11 38,12 32,14 26,14 19,15 13,16 7,16 0,16 0,12 7,12 13,11 19,11 25,10 31,9 37,8 43,7 50,6 56,4 62,1 66,0">
          <text:p/>
        </draw:polygon>
        <draw:polygon draw:style-name="gr63" draw:text-style-name="P24" draw:layer="layout" svg:width="0.087cm" svg:height="0.019cm" svg:x="6.604cm" svg:y="4.055cm" svg:viewBox="0 0 88 20" draw:points="88,0 83,3 77,6 71,8 65,10 58,12 52,14 45,15 39,17 33,18 26,19 20,19 13,20 7,20 0,20 0,16 7,16 13,16 19,15 26,14 32,14 38,12 44,11 51,10 57,8 64,6 70,4 76,1 78,0">
          <text:p/>
        </draw:polygon>
        <draw:polygon draw:style-name="gr63" draw:text-style-name="P24" draw:layer="layout" svg:width="0.097cm" svg:height="0.024cm" svg:x="6.604cm" svg:y="4.055cm" svg:viewBox="0 0 98 25" draw:points="98,0 97,1 91,4 85,7 79,10 73,12 65,14 59,16 53,18 46,20 40,21 33,22 27,23 20,24 14,24 7,25 0,25 0,20 7,20 13,20 20,19 26,19 33,18 39,17 45,15 52,14 58,12 64,10 71,8 77,6 83,2 88,0">
          <text:p/>
        </draw:polygon>
        <draw:polygon draw:style-name="gr64" draw:text-style-name="P25" draw:layer="layout" svg:width="0.106cm" svg:height="0.028cm" svg:x="6.604cm" svg:y="4.055cm" svg:viewBox="0 0 107 29" draw:points="107,0 105,1 99,5 93,8 87,11 80,14 74,16 68,18 60,20 54,22 47,24 41,25 34,26 27,27 21,28 14,28 7,29 0,29 0,25 7,25 14,24 20,24 27,23 33,22 40,21 46,20 53,18 59,16 66,14 73,12 79,10 85,6 91,4 97,1 98,0">
          <text:p/>
        </draw:polygon>
        <draw:polygon draw:style-name="gr64" draw:text-style-name="P25" draw:layer="layout" svg:width="0.115cm" svg:height="0.032cm" svg:x="6.604cm" svg:y="4.055cm" svg:viewBox="0 0 116 33" draw:points="116,0 113,2 107,5 101,8 94,11 88,14 82,17 75,19 69,21 61,24 55,26 48,28 41,29 35,31 28,31 21,32 14,33 7,33 0,33 0,29 7,29 14,28 21,28 27,27 34,26 41,24 47,23 54,21 60,19 68,17 74,15 80,13 87,10 93,8 99,5 105,1 107,0">
          <text:p/>
        </draw:polygon>
        <draw:polygon draw:style-name="gr64" draw:text-style-name="P25" draw:layer="layout" svg:width="0.123cm" svg:height="0.036cm" svg:x="6.604cm" svg:y="4.055cm" svg:viewBox="0 0 124 37" draw:points="124,0 121,2 115,5 109,9 103,12 96,15 90,18 83,21 77,23 70,26 64,28 57,29 50,32 42,34 35,35 28,36 21,36 14,37 7,37 0,37 0,33 7,33 14,33 21,32 28,30 35,30 41,28 49,27 56,25 62,24 69,21 75,19 82,17 88,14 94,11 101,8 107,5 113,2 116,0">
          <text:p/>
        </draw:polygon>
        <draw:polygon draw:style-name="gr65" draw:text-style-name="P26" draw:layer="layout" svg:width="0.13cm" svg:height="0.041cm" svg:x="6.604cm" svg:y="4.055cm" svg:viewBox="0 0 131 42" draw:points="131,0 129,2 123,6 117,10 111,14 105,17 98,20 92,23 85,26 78,28 72,31 65,33 58,35 51,36 44,38 36,39 29,40 22,41 15,41 8,42 0,42 0,37 7,37 14,37 21,36 28,36 35,35 43,34 50,32 57,30 64,29 70,27 77,24 83,22 90,19 96,16 103,13 109,10 115,6 121,2 124,0">
          <text:p/>
        </draw:polygon>
        <draw:polygon draw:style-name="gr66" draw:text-style-name="P27" draw:layer="layout" svg:width="0.138cm" svg:height="0.045cm" svg:x="6.604cm" svg:y="4.055cm" svg:viewBox="0 0 139 46" draw:points="139,0 137,1 131,5 125,9 119,13 113,16 106,21 100,24 93,27 87,30 80,32 73,35 66,37 59,39 52,40 45,42 37,43 29,44 22,45 15,46 8,46 0,46 0,42 8,42 15,41 22,41 29,40 36,39 44,38 51,36 58,35 65,33 72,31 78,28 85,26 92,23 98,20 105,16 111,13 117,9 123,5 129,2 131,0">
          <text:p/>
        </draw:polygon>
        <draw:polygon draw:style-name="gr66" draw:text-style-name="P27" draw:layer="layout" svg:width="0.145cm" svg:height="0.049cm" svg:x="6.604cm" svg:y="4.055cm" svg:viewBox="0 0 146 50" draw:points="146,0 140,4 134,9 128,13 121,17 115,20 108,24 102,27 95,30 87,33 80,35 73,39 66,41 59,43 52,45 45,46 37,47 30,48 23,49 15,50 8,50 0,50 0,46 8,46 15,46 22,45 29,44 37,43 44,42 51,40 58,39 65,36 72,34 79,31 86,29 92,26 100,23 106,20 113,16 119,13 125,9 131,5 137,1 139,0">
          <text:p/>
        </draw:polygon>
        <draw:polygon draw:style-name="gr67" draw:text-style-name="P28" draw:layer="layout" svg:width="0.152cm" svg:height="0.054cm" svg:x="6.604cm" svg:y="4.055cm" svg:viewBox="0 0 153 55" draw:points="153,0 148,3 142,8 136,12 130,16 124,20 116,24 109,27 103,31 96,34 89,37 82,39 75,42 67,44 60,46 53,48 45,49 38,51 31,52 23,54 16,54 8,54 0,55 0,49 8,49 15,49 23,48 30,47 37,46 45,45 52,44 59,42 66,40 73,38 80,35 87,33 94,30 101,27 107,24 114,20 121,17 128,13 134,9 140,4 146,0">
          <text:p/>
        </draw:polygon>
        <draw:polygon draw:style-name="gr68" draw:text-style-name="P29" draw:layer="layout" svg:width="0.158cm" svg:height="0.058cm" svg:x="6.604cm" svg:y="4.055cm" svg:viewBox="0 0 159 59" draw:points="159,0 157,2 151,7 145,11 139,16 132,20 126,25 119,29 112,32 105,36 98,39 91,42 84,44 77,47 69,49 61,51 54,53 46,55 39,56 31,57 23,58 16,58 8,59 0,59 0,55 8,54 16,54 23,54 31,53 38,52 45,50 53,49 60,47 67,45 76,43 83,40 90,38 97,35 104,32 110,28 117,25 124,20 130,16 136,12 142,8 148,3 153,0">
          <text:p/>
        </draw:polygon>
        <draw:polygon draw:style-name="gr68" draw:text-style-name="P29" draw:layer="layout" svg:width="0.165cm" svg:height="0.062cm" svg:x="6.604cm" svg:y="4.055cm" svg:viewBox="0 0 166 63" draw:points="166,0 160,5 154,11 148,16 141,20 135,24 128,29 121,32 114,36 107,40 100,43 93,46 86,48 78,51 71,53 63,55 56,57 48,59 40,60 32,61 24,62 16,63 8,63 0,63 0,59 8,59 16,58 23,58 31,57 40,56 47,55 55,53 62,51 70,49 77,47 84,44 91,42 98,39 105,36 112,32 119,29 126,25 132,21 139,17 145,12 151,8 157,2 159,0">
          <text:p/>
        </draw:polygon>
        <draw:polygon draw:style-name="gr69" draw:text-style-name="P30" draw:layer="layout" svg:width="0.171cm" svg:height="0.066cm" svg:x="6.604cm" svg:y="4.055cm" svg:viewBox="0 0 172 67" draw:points="172,0 169,3 163,9 156,14 150,19 144,24 137,28 130,32 123,36 116,40 108,43 101,47 94,50 86,53 79,55 71,57 63,60 56,61 48,63 40,64 32,65 24,66 16,67 8,67 0,67 0,63 8,63 16,63 24,62 32,61 39,60 47,59 55,57 62,55 70,53 77,51 85,48 92,46 99,43 106,40 114,36 121,32 128,29 135,24 141,20 148,16 154,11 160,6 166,0">
          <text:p/>
        </draw:polygon>
        <draw:polygon draw:style-name="gr70" draw:text-style-name="P31" draw:layer="layout" svg:width="0.177cm" svg:height="0.071cm" svg:x="6.604cm" svg:y="4.055cm" svg:viewBox="0 0 178 72" draw:points="178,0 177,1 170,7 164,12 158,17 152,22 145,26 138,31 131,35 124,39 117,44 110,47 103,51 95,54 88,57 80,59 72,62 64,64 57,66 49,67 41,69 33,70 25,71 17,71 9,72 0,72 0,67 8,67 16,67 24,66 32,65 40,64 48,63 56,61 63,60 71,57 79,55 86,53 94,50 101,47 108,43 115,39 122,35 129,31 136,27 143,23 149,18 155,13 162,8 168,3 171,0">
          <text:p/>
        </draw:polygon>
        <draw:polygon draw:style-name="gr71" draw:text-style-name="P32" draw:layer="layout" svg:width="0.184cm" svg:height="0.075cm" svg:x="6.604cm" svg:y="4.055cm" svg:viewBox="0 0 185 76" draw:points="185,0 180,4 174,10 168,15 162,20 155,25 148,30 141,34 134,39 127,43 120,47 113,50 105,55 98,58 90,61 82,63 73,66 65,68 57,70 49,71 41,73 33,74 25,75 17,76 9,76 0,76 0,72 9,72 17,71 25,71 33,70 41,69 49,67 57,66 64,64 72,62 81,59 89,57 96,54 104,50 111,46 118,43 125,39 132,35 139,31 146,26 153,22 159,17 165,12 171,7 177,1 178,0">
          <text:p/>
        </draw:polygon>
        <draw:polygon draw:style-name="gr72" draw:text-style-name="P33" draw:layer="layout" svg:width="0.19cm" svg:height="0.079cm" svg:x="6.604cm" svg:y="4.055cm" svg:viewBox="0 0 191 80" draw:points="191,0 189,2 183,7 177,13 171,19 164,25 158,30 151,34 144,39 137,43 129,47 122,51 115,55 106,58 98,62 90,65 83,67 75,70 67,72 58,74 50,76 42,77 34,78 25,79 17,80 9,80 0,80 0,76 9,76 17,76 25,75 33,74 41,73 49,71 57,70 65,68 73,66 81,63 89,61 97,58 104,55 113,51 120,48 127,44 134,40 141,35 148,31 155,26 162,21 168,16 174,10 180,4 185,0">
          <text:p/>
        </draw:polygon>
        <draw:polygon draw:style-name="gr73" draw:text-style-name="P34" draw:layer="layout" svg:width="0.196cm" svg:height="0.084cm" svg:x="6.604cm" svg:y="4.055cm" svg:viewBox="0 0 197 85" draw:points="197,0 192,5 186,10 180,16 173,22 167,27 160,32 153,37 146,42 139,46 131,50 123,55 115,59 108,62 100,66 92,69 84,71 76,74 68,76 59,78 51,80 43,81 34,82 26,83 17,84 9,84 0,85 0,80 9,80 17,80 25,79 34,78 42,77 50,76 58,74 67,72 75,70 83,67 90,65 98,62 106,58 114,55 121,50 129,46 137,42 144,38 151,33 158,29 164,24 171,18 177,13 183,7 189,2 191,0">
          <text:p/>
        </draw:polygon>
        <draw:polygon draw:style-name="gr73" draw:text-style-name="P34" draw:layer="layout" svg:width="0.202cm" svg:height="0.088cm" svg:x="6.604cm" svg:y="4.055cm" svg:viewBox="0 0 203 89" draw:points="203,0 201,1 195,8 189,14 183,19 176,25 169,30 163,36 156,40 148,45 141,50 134,54 125,58 117,62 109,65 101,69 93,72 85,74 77,77 69,80 60,82 52,84 43,85 35,87 26,88 18,88 9,89 0,89 0,85 9,84 17,84 26,83 34,82 43,81 51,80 59,77 68,75 76,73 84,70 92,68 100,65 108,61 115,58 123,54 130,50 139,46 146,42 153,37 160,32 167,27 173,22 180,16 186,10 192,5 197,0">
          <text:p/>
        </draw:polygon>
        <draw:polygon draw:style-name="gr74" draw:text-style-name="P35" draw:layer="layout" svg:width="0.207cm" svg:height="0.092cm" svg:x="6.604cm" svg:y="4.055cm" svg:viewBox="0 0 208 93" draw:points="208,0 204,4 198,11 192,17 186,23 179,28 172,34 165,40 158,45 151,50 143,54 136,59 128,63 120,67 112,70 104,74 96,77 87,80 78,82 70,84 61,86 53,88 44,90 35,91 27,92 18,93 9,93 0,93 0,89 9,89 18,88 26,88 35,87 43,85 52,84 60,82 69,80 77,78 85,75 94,73 102,70 110,66 118,63 126,59 134,55 141,51 148,46 156,41 163,36 169,30 176,25 183,19 189,14 195,8 201,1 203,0">
          <text:p/>
        </draw:polygon>
        <draw:polygon draw:style-name="gr75" draw:text-style-name="P36" draw:layer="layout" svg:width="0.219cm" svg:height="0.101cm" svg:x="6.604cm" svg:y="4.055cm" svg:viewBox="0 0 220 102" draw:points="220,0 217,4 211,10 204,17 198,23 191,29 184,35 177,40 170,46 163,51 155,56 148,61 140,65 132,69 124,73 115,77 107,81 99,84 90,87 82,89 73,92 64,94 55,97 45,98 36,99 28,100 19,101 10,102 0,102 0,92 9,92 18,92 27,91 35,90 44,89 54,87 62,85 71,83 79,81 88,79 96,76 104,73 112,69 120,66 128,62 136,58 143,53 151,49 158,44 165,39 172,34 179,28 186,23 192,17 198,11 204,4 208,0">
          <text:p/>
        </draw:polygon>
        <draw:polygon draw:style-name="gr76" draw:text-style-name="P37" draw:layer="layout" svg:width="0.23cm" svg:height="0.109cm" svg:x="6.604cm" svg:y="4.055cm" svg:viewBox="0 0 231 110" draw:points="231,0 229,2 223,9 217,16 210,23 204,29 197,36 190,42 183,48 175,54 168,59 160,64 151,69 143,74 135,78 126,82 118,86 109,90 101,93 92,96 83,99 74,101 65,103 56,105 47,107 38,108 28,109 19,110 10,110 0,110 0,102 10,102 19,101 28,100 36,99 45,98 54,97 63,95 72,93 81,90 89,88 98,85 106,82 114,78 123,74 131,70 139,66 147,62 155,57 163,52 170,47 177,41 184,36 191,29 198,23 204,17 211,10 217,4 220,0">
          <text:p/>
        </draw:polygon>
        <draw:polygon draw:style-name="gr77" draw:text-style-name="P38" draw:layer="layout" svg:width="0.241cm" svg:height="0.118cm" svg:x="6.604cm" svg:y="4.055cm" svg:viewBox="0 0 242 119" draw:points="242,0 235,8 229,15 222,22 216,29 209,35 202,42 194,48 187,54 179,60 171,65 163,71 155,75 147,80 139,85 130,89 121,93 112,96 104,101 94,104 85,107 76,109 67,112 57,113 48,115 39,116 29,117 20,118 10,119 0,119 0,110 10,110 19,110 28,109 38,108 47,107 56,105 65,103 74,101 83,98 92,95 101,92 109,89 118,85 126,81 135,77 143,73 151,68 159,63 167,58 174,53 182,47 189,41 196,35 203,29 209,23 216,16 222,9 228,2 230,0">
          <text:p/>
        </draw:polygon>
        <draw:polygon draw:style-name="gr77" draw:text-style-name="P38" draw:layer="layout" svg:width="0.252cm" svg:height="0.126cm" svg:x="6.604cm" svg:y="4.055cm" svg:viewBox="0 0 253 127" draw:points="253,0 249,5 242,13 236,21 229,28 223,35 216,43 208,49 201,56 193,62 185,68 177,73 169,79 161,84 152,89 143,93 135,98 126,102 117,105 107,109 98,112 89,115 79,118 70,120 60,122 50,124 40,125 30,126 20,127 10,127 0,127 0,119 10,119 20,118 29,117 39,116 48,115 58,113 68,112 77,109 86,107 95,104 105,101 113,97 122,94 131,90 140,86 148,81 156,76 164,72 172,66 180,61 188,55 195,49 203,43 210,35 217,29 223,22 230,15 236,8 242,0">
          <text:p/>
        </draw:polygon>
        <draw:polygon draw:style-name="gr78" draw:text-style-name="P39" draw:layer="layout" svg:width="0.262cm" svg:height="0.135cm" svg:x="6.604cm" svg:y="4.055cm" svg:viewBox="0 0 263 136" draw:points="263,0 261,3 255,11 249,19 242,26 236,35 229,42 221,49 214,56 206,62 198,69 190,75 182,80 174,86 165,91 156,96 147,101 138,105 129,110 120,113 110,117 101,120 91,123 81,126 72,128 62,130 51,132 41,133 31,135 21,135 11,136 0,136 0,127 10,127 20,127 30,126 40,125 49,124 60,122 70,120 79,118 89,115 98,112 107,109 117,105 126,102 135,98 143,93 152,89 161,84 169,79 177,73 185,68 193,62 201,56 208,49 216,43 223,36 229,28 236,21 242,13 249,5 253,0">
          <text:p/>
        </draw:polygon>
        <draw:polygon draw:style-name="gr79" draw:text-style-name="P40" draw:layer="layout" svg:width="0.273cm" svg:height="0.144cm" svg:x="6.604cm" svg:y="4.055cm" svg:viewBox="0 0 274 145" draw:points="274,0 268,8 262,16 256,25 249,33 242,41 235,48 227,55 220,62 212,69 204,75 195,82 187,88 178,93 169,99 160,104 151,109 142,113 132,117 123,121 113,125 103,128 94,131 84,134 73,137 63,139 52,140 42,142 32,143 21,144 11,144 0,145 0,136 11,136 21,135 31,135 41,133 51,132 62,130 72,128 81,126 91,123 101,120 110,117 120,113 129,110 138,105 147,101 156,96 165,91 174,86 182,80 190,75 198,69 206,62 214,56 221,49 229,42 236,35 242,27 249,19 255,11 261,3 263,0">
          <text:p/>
        </draw:polygon>
        <draw:polygon draw:style-name="gr79" draw:text-style-name="P40" draw:layer="layout" svg:width="0.283cm" svg:height="0.152cm" svg:x="6.604cm" svg:y="4.055cm" svg:viewBox="0 0 284 153" draw:points="284,0 281,4 275,13 269,21 262,29 255,38 248,45 241,53 233,60 225,68 217,74 209,81 200,87 192,94 183,99 174,105 164,110 155,115 146,120 136,124 126,129 116,133 106,137 96,140 86,142 75,145 65,147 54,149 44,150 33,152 22,152 11,153 0,153 0,145 11,144 21,144 33,143 43,142 53,140 63,139 73,137 84,134 94,131 103,128 113,124 123,120 132,116 142,112 151,108 160,103 169,98 178,92 187,87 195,81 204,74 212,68 220,61 227,54 235,47 242,40 249,32 256,24 262,16 268,8 274,0">
          <text:p/>
        </draw:polygon>
        <draw:polygon draw:style-name="gr80" draw:text-style-name="P41" draw:layer="layout" svg:width="0.293cm" svg:height="0.161cm" svg:x="6.604cm" svg:y="4.055cm" svg:viewBox="0 0 294 162" draw:points="294,0 288,9 282,18 276,27 269,36 262,44 253,52 246,60 238,68 230,75 222,82 213,89 204,95 195,102 186,108 177,113 168,119 158,124 148,129 138,133 128,137 118,141 108,145 97,148 87,151 76,153 66,156 55,157 44,159 33,160 22,161 11,162 0,162 0,153 11,153 22,152 32,152 43,150 53,149 64,147 74,145 85,142 95,140 105,137 115,133 125,129 135,125 145,121 154,116 163,111 173,106 182,100 191,95 199,88 208,82 216,75 224,69 232,61 240,54 247,46 254,39 262,30 269,21 275,13 281,4 284,0">
          <text:p/>
        </draw:polygon>
        <draw:polygon draw:style-name="gr81" draw:text-style-name="P42" draw:layer="layout" svg:width="0.303cm" svg:height="0.169cm" svg:x="6.604cm" svg:y="4.055cm" svg:viewBox="0 0 304 170" draw:points="304,0 302,4 296,14 289,23 282,32 275,40 268,49 261,57 253,65 245,73 237,80 228,89 219,96 210,102 201,109 191,115 181,121 172,126 162,131 152,136 142,141 131,145 121,149 110,153 100,156 89,159 78,162 67,164 56,166 45,167 34,169 23,170 12,170 0,170 0,162 11,162 22,161 33,160 44,159 55,157 66,156 76,153 87,151 97,148 108,145 118,141 128,137 138,133 148,129 158,124 168,119 177,113 186,108 196,102 205,95 214,89 223,81 231,74 239,67 247,59 254,51 262,43 269,35 276,26 282,18 288,9 294,0">
          <text:p/>
        </draw:polygon>
        <draw:polygon draw:style-name="gr82" draw:text-style-name="P43" draw:layer="layout" svg:width="0.313cm" svg:height="0.178cm" svg:x="6.604cm" svg:y="4.055cm" svg:viewBox="0 0 314 179" draw:points="314,0 309,9 303,18 296,28 289,37 282,46 275,55 267,63 259,71 251,79 242,87 234,94 225,101 215,109 206,116 197,122 187,128 177,134 167,139 156,144 146,149 136,153 125,157 114,161 102,164 91,167 80,170 69,172 57,174 46,176 35,177 23,178 12,179 0,179 0,170 12,170 23,170 34,169 45,167 56,166 67,164 78,162 89,159 100,156 111,153 122,149 132,145 143,141 153,136 163,131 173,126 182,121 192,115 201,109 210,101 219,95 228,88 237,80 245,73 253,65 261,57 268,49 275,40 282,32 289,23 296,14 302,4 304,0">
          <text:p/>
        </draw:polygon>
        <draw:polygon draw:style-name="gr83" draw:text-style-name="P44" draw:layer="layout" svg:width="0.323cm" svg:height="0.186cm" svg:x="6.604cm" svg:y="4.055cm" svg:viewBox="0 0 324 187" draw:points="324,0 322,3 315,13 309,23 302,33 295,42 288,51 280,60 272,69 264,77 256,85 247,93 238,101 229,108 220,115 210,122 200,128 190,135 180,141 170,147 159,152 148,157 138,161 127,165 116,169 104,173 93,176 82,178 70,181 59,183 47,184 36,186 24,187 12,187 0,187 0,179 12,179 23,178 35,177 46,176 57,174 69,172 80,170 91,167 102,164 113,161 124,157 135,153 145,149 155,144 166,139 176,134 186,127 196,121 205,115 214,108 224,101 233,94 241,87 250,79 258,71 266,63 274,55 281,46 288,37 295,28 302,18 308,9 313,0">
          <text:p/>
        </draw:polygon>
        <draw:polygon draw:style-name="gr84" draw:text-style-name="P45" draw:layer="layout" svg:width="0.333cm" svg:height="0.195cm" svg:x="6.604cm" svg:y="4.055cm" svg:viewBox="0 0 334 196" draw:points="334,0 330,8 323,18 317,28 310,38 303,47 295,57 287,66 279,75 271,83 262,92 254,100 244,107 235,115 226,123 216,130 206,137 195,143 184,149 174,154 163,160 152,165 141,169 130,173 118,177 107,181 95,184 84,187 72,189 60,191 48,193 36,194 24,195 12,196 0,196 0,187 12,187 24,187 36,186 47,184 59,183 70,181 82,178 93,176 104,173 116,169 127,165 138,161 148,157 159,152 170,147 180,141 190,135 200,129 211,123 221,115 230,108 239,101 248,93 257,85 265,77 273,69 281,60 289,51 296,42 303,33 310,23 316,13 322,3 324,0">
          <text:p/>
        </draw:polygon>
        <draw:polygon draw:style-name="gr85" draw:text-style-name="P46" draw:layer="layout" svg:width="0.343cm" svg:height="0.204cm" svg:x="6.604cm" svg:y="4.055cm" svg:viewBox="0 0 344 205" draw:points="344,0 343,2 337,12 331,23 324,33 317,43 309,53 302,62 294,72 286,81 277,89 268,98 259,106 250,115 240,123 231,130 221,137 210,144 200,150 189,156 178,162 167,167 156,172 145,177 134,181 122,185 110,189 98,192 87,195 75,198 61,200 49,201 37,203 25,204 13,204 0,205 0,196 12,196 24,195 36,194 48,193 60,191 73,189 85,187 96,184 108,181 119,177 131,173 142,169 153,165 164,160 175,154 185,149 196,143 206,137 216,130 226,123 235,116 244,108 254,100 262,92 271,83 279,75 287,66 295,57 303,47 310,38 317,28 323,18 330,8 334,0">
          <text:p/>
        </draw:polygon>
        <draw:polygon draw:style-name="gr86" draw:text-style-name="P47" draw:layer="layout" svg:width="0.353cm" svg:height="0.212cm" svg:x="6.604cm" svg:y="4.055cm" svg:viewBox="0 0 354 213" draw:points="354,0 351,6 344,17 338,27 331,38 324,48 316,58 308,68 300,77 292,87 283,96 274,105 265,114 254,122 245,129 235,137 224,144 214,151 203,158 192,164 181,170 170,175 159,180 147,185 135,190 124,194 112,197 100,201 87,203 75,206 63,208 50,210 38,211 26,212 13,213 0,213 0,205 13,204 25,204 37,203 49,201 61,200 74,198 86,195 97,192 109,189 121,185 133,181 144,177 155,172 166,167 177,162 188,156 199,150 209,144 220,137 230,130 239,123 249,115 258,107 268,99 277,90 286,82 294,72 302,62 309,53 317,43 324,33 331,23 337,12 343,2 344,0">
          <text:p/>
        </draw:polygon>
        <draw:polygon draw:style-name="gr87" draw:text-style-name="P48" draw:layer="layout" svg:width="0.362cm" svg:height="0.221cm" svg:x="6.604cm" svg:y="4.055cm" svg:viewBox="0 0 363 222" draw:points="363,0 358,10 352,22 345,33 338,43 331,54 323,64 315,74 307,84 298,93 289,102 280,111 271,120 261,128 251,136 241,144 230,151 220,158 209,165 198,171 186,177 175,183 163,188 151,193 139,198 127,202 115,205 103,209 90,212 78,214 64,217 51,218 39,220 26,221 13,221 0,222 0,213 13,213 26,212 38,211 50,210 63,208 75,206 88,203 101,201 113,197 125,194 136,190 148,185 160,180 171,175 182,170 193,164 204,158 215,151 225,144 236,137 246,129 255,122 265,114 274,105 283,96 292,87 300,78 308,69 316,59 324,49 331,39 338,28 344,18 351,6 354,0">
          <text:p/>
        </draw:polygon>
        <draw:polygon draw:style-name="gr87" draw:text-style-name="P48" draw:layer="layout" svg:width="0.372cm" svg:height="0.229cm" svg:x="6.604cm" svg:y="4.055cm" svg:viewBox="0 0 373 230" draw:points="373,0 372,2 366,14 359,25 352,36 345,47 338,58 330,68 322,79 313,88 304,98 295,108 286,117 276,125 266,134 255,142 245,150 234,157 223,165 212,171 201,178 189,185 177,191 165,196 153,201 141,206 129,210 116,214 104,217 91,220 78,223 65,225 53,227 40,228 27,229 14,230 0,230 0,222 13,221 26,221 39,220 51,218 64,217 77,214 89,212 102,209 114,205 126,202 138,198 150,193 162,188 174,183 185,176 197,170 208,164 219,157 229,150 240,143 250,135 260,127 271,119 280,110 289,101 298,92 307,83 315,73 323,63 331,53 338,42 345,32 352,21 358,10 363,0">
          <text:p/>
        </draw:polygon>
        <draw:polygon draw:style-name="gr88" draw:text-style-name="P49" draw:layer="layout" svg:width="0.381cm" svg:height="0.238cm" svg:x="6.604cm" svg:y="4.055cm" svg:viewBox="0 0 382 239" draw:points="382,0 379,6 373,18 366,30 359,41 352,52 345,63 337,74 328,84 320,95 311,105 301,115 292,124 282,133 272,141 261,150 251,158 240,165 229,173 217,180 206,186 194,193 182,198 170,204 158,209 145,214 133,218 120,222 107,225 94,229 81,231 68,234 55,235 40,237 27,238 14,239 0,239 0,230 14,230 27,229 40,228 54,227 66,225 79,223 92,220 105,217 117,214 130,210 142,206 154,201 166,196 178,191 190,185 202,179 213,172 224,166 235,158 246,151 256,143 266,135 276,126 286,118 295,109 304,99 313,88 322,79 330,68 338,58 345,47 352,36 359,25 366,14 372,2 373,0">
          <text:p/>
        </draw:polygon>
        <draw:path draw:style-name="gr89" draw:text-style-name="P50" draw:layer="layout" svg:width="0.433cm" svg:height="0.432cm" svg:x="6.604cm" svg:y="3.869cm" svg:viewBox="0 0 434 433" svg:d="M392 186l-5 10-6 12-7 12-7 12-8 12-8 11-8 11-8 10-9 11-9 10-10 10-9 9-10 9-11 9-10 9-11 8-11 8-12 7-11 7-12 7-12 6-12 6-13 6-12 5-13 5-13 4-13 4-13 4-13 3-14 3-14 2-13 2-14 1-13 1-14 1h-14v-8h14l13-1 13-1 14-2 13-1 13-3 14-2 13-4 13-3 13-4 12-4 13-5 12-5 12-6 12-5 12-7 11-6 12-7 11-8 11-7 10-8 11-9 10-8 10-9 9-9 10-10 9-10 8-10 9-10 8-11 7-11 7-12 7-11 7-12 6-12 3-6zM433 0l1 1v12l-1 12z">
          <text:p/>
        </draw:path>
        <draw:path draw:style-name="gr89" draw:text-style-name="P50" draw:layer="layout" svg:width="0.441cm" svg:height="0.44cm" svg:x="6.604cm" svg:y="3.87cm" svg:viewBox="0 0 442 441" svg:d="M401 185v2l-6 12-7 12-7 12-7 12-8 12-8 11-8 11-9 11-9 10-9 11-10 11-10 9-10 10-10 9-11 8-11 9-12 8-11 7-12 7-13 7-12 7-13 6-12 6-13 5-13 5-13 4-13 4-14 4-13 3-14 3-13 2-14 2-14 2-14 1-14 1h-14v-9h14l14-1 13-1 14-1 13-2 14-2 13-3 13-3 13-4 13-4 13-4 13-5 12-5 13-6 12-6 12-6 13-7 11-7 12-7 11-8 11-8 10-9 11-9 10-9 9-10 10-10 9-10 9-11 8-10 8-11 8-11 8-11 7-12 7-12 6-12 5-10zM433 24l1-12v-12l8 8v5 13l-1 14-2 14-2 14-2 13-2 8z">
          <text:p/>
        </draw:path>
        <draw:path draw:style-name="gr90" draw:text-style-name="P51" draw:layer="layout" svg:width="0.45cm" svg:height="0.44cm" svg:x="6.604cm" svg:y="3.878cm" svg:viewBox="0 0 451 441" svg:d="M411 177l-3 5-6 13-6 12-7 13-8 12-8 12-8 11-9 11-9 11-9 11-10 11-10 11-10 10-10 9-11 9-11 9-11 9-12 8-12 7-12 8-12 7-12 6-13 7-13 5-13 6-13 5-14 4-13 5-14 3-13 4-14 2-14 3-14 2-14 1-14 2h-14-15v-8h14l14-1 14-1 14-2 14-2 13-2 14-3 13-3 14-4 13-4 13-4 13-5 13-5 12-6 13-6 12-7 12-7 12-7 11-7 12-8 11-9 11-8 10-9 10-10 10-9 10-11 9-11 9-10 9-11 9-11 8-11 8-12 7-12 7-12 7-12 6-12v-2zM433 81l2-8 2-13 2-14 2-14 1-14v-13-5l9 8-1 11-1 14-1 14-2 14-3 14-3 14-3 14-4 13z">
          <text:p/>
        </draw:path>
        <draw:path draw:style-name="gr91" draw:text-style-name="P52" draw:layer="layout" svg:width="0.458cm" svg:height="0.441cm" svg:x="6.604cm" svg:y="3.886cm" svg:viewBox="0 0 459 442" svg:d="M420 169l-4 9-6 13-7 13-7 12-8 12-7 12-9 12-8 12-9 11-10 11-9 11-10 11-11 10-10 10-11 9-12 9-11 9-12 8-12 8-12 7-13 7-12 7-13 6-14 6-13 6-13 5-14 5-14 4-14 4-14 3-14 3-14 2-14 2-14 2-15 1-15 1h-15v-9h15 15l14-2 14-1 14-2 14-3 14-2 13-4 14-3 13-5 14-4 13-5 13-6 13-5 13-7 12-6 12-7 12-8 12-7 12-8 11-9 11-9 11-9 10-9 10-10 10-11 10-11 9-11 9-11 8-11 8-11 8-12 8-12 7-13 6-12 6-13 3-5zM433 108l4-13 3-14 3-14 3-14 2-14 1-14 1-14 1-11 8 8v4l-1 14-2 14-2 14-2 15-3 14-4 14-3 14-5 13-4 12z">
          <text:p/>
        </draw:path>
        <draw:path draw:style-name="gr92" draw:text-style-name="P53" draw:layer="layout" svg:width="0.466cm" svg:height="0.442cm" svg:x="6.604cm" svg:y="3.894cm" svg:viewBox="0 0 467 443" svg:d="M430 161l-6 13-7 13-6 13-8 12-7 13-8 12-9 12-9 12-9 11-9 11-10 11-10 12-11 10-11 10-11 9-11 10-12 8-12 9-12 8-13 8-13 7-13 7-13 6-13 6-14 6-13 5-14 5-15 4-14 4-15 3-14 3-14 3-15 2-15 2-14 1h-15l-15 1v-9h15l14-1 15-1 14-2 14-2 14-2 14-3 14-3 14-4 15-4 14-5 13-5 13-6 14-6 13-6 12-7 13-7 12-7 12-8 12-8 11-9 12-9 11-9 10-10 11-10 10-12 9-10 10-11 9-11 8-12 9-12 7-12 8-12 7-12 7-13 6-13 4-9zM433 128l4-12 5-13 3-14 4-14 3-14 2-15 2-14 2-14 1-14v-4l8 9-1 10-1 14-2 15-3 14-3 15-3 14-4 14-5 14-4 14-5 14-3 5z">
          <text:p/>
        </draw:path>
        <draw:polygon draw:style-name="gr93" draw:text-style-name="P54" draw:layer="layout" svg:width="0.474cm" svg:height="0.441cm" svg:x="6.604cm" svg:y="3.903cm" svg:viewBox="0 0 475 442" draw:points="433,152 433,143 436,138 441,124 445,110 450,96 454,82 457,68 460,53 463,39 465,24 466,10 467,0 475,7 475,11 473,25 471,40 468,55 465,69 462,84 458,98 454,113 449,127 444,141 438,155 432,168 425,182 418,195 411,208 403,220 395,233 386,245 377,257 368,269 358,280 348,292 338,303 327,313 316,323 305,333 293,342 281,351 269,360 255,368 242,376 230,383 216,390 203,397 189,403 176,409 162,414 147,419 133,423 119,427 104,431 90,434 75,436 60,438 45,440 30,441 15,442 0,442 0,434 15,433 30,433 44,432 59,430 74,428 88,425 102,422 117,419 131,415 145,411 159,406 172,401 186,395 199,389 212,383 225,376 238,369 251,361 264,353 276,344 288,336 299,326 310,317 321,307 332,297 342,285 352,274 361,263 370,252 379,240 388,228 396,216 403,203 411,191 417,178 424,165 430,152">
          <text:p/>
        </draw:polygon>
        <draw:polygon draw:style-name="gr94" draw:text-style-name="P55" draw:layer="layout" svg:width="0.482cm" svg:height="0.443cm" svg:x="6.604cm" svg:y="3.91cm" svg:viewBox="0 0 483 444" draw:points="483,8 482,19 479,34 477,49 474,64 470,79 466,94 462,108 457,123 451,137 446,151 439,165 433,178 426,192 418,205 410,218 402,231 393,243 384,255 374,267 364,279 353,291 343,302 332,313 321,323 309,333 297,342 285,351 273,360 260,368 247,376 234,384 220,391 207,398 193,404 179,410 164,415 150,420 136,425 121,429 106,432 91,435 76,438 61,440 46,442 31,443 16,443 0,444 0,435 15,435 30,434 45,433 60,431 75,429 90,427 104,424 119,420 133,416 147,412 162,407 176,402 189,396 203,390 216,383 230,376 242,369 255,361 268,353 280,344 292,335 304,326 315,316 326,306 337,296 347,284 357,273 367,262 377,250 386,238 395,226 403,213 411,201 418,188 425,175 432,161 438,148 444,134 449,120 454,106 458,91 462,77 465,62 468,48 471,33 473,18 475,4 475,0">
          <text:p/>
        </draw:polygon>
        <draw:polygon draw:style-name="gr95" draw:text-style-name="P56" draw:layer="layout" svg:width="0.49cm" svg:height="0.443cm" svg:x="6.604cm" svg:y="3.918cm" svg:viewBox="0 0 491 444" draw:points="491,8 490,12 487,28 484,43 481,58 478,73 473,88 469,103 464,118 458,132 453,146 446,160 439,174 432,188 424,201 416,215 408,228 399,240 390,253 380,265 370,276 360,289 349,300 338,311 326,321 314,331 302,341 290,350 277,359 264,368 251,376 238,383 224,391 210,397 196,404 182,410 167,415 153,420 138,425 123,429 108,432 93,436 78,438 62,440 47,442 31,443 16,444 0,444 0,436 16,435 31,435 46,434 61,432 76,430 91,427 106,424 121,421 136,417 150,412 164,407 179,402 193,396 207,390 220,383 234,376 247,368 260,360 273,352 285,343 297,334 309,325 321,315 332,305 343,294 353,283 364,271 373,259 383,247 392,235 401,223 409,210 417,197 425,184 432,170 438,157 445,143 450,129 456,115 461,100 465,86 469,71 473,56 476,41 478,26 481,11 482,0">
          <text:p/>
        </draw:polygon>
        <draw:polygon draw:style-name="gr96" draw:text-style-name="P57" draw:layer="layout" svg:width="0.497cm" svg:height="0.444cm" svg:x="6.604cm" svg:y="3.926cm" svg:viewBox="0 0 498 445" draw:points="498,8 496,21 494,37 491,52 487,67 483,83 478,98 473,113 467,127 461,142 455,156 448,170 441,184 433,198 425,211 416,224 407,237 397,250 388,262 377,274 367,287 356,298 345,309 333,320 321,330 309,340 296,349 283,358 270,367 257,375 243,383 229,390 215,397 201,404 186,410 171,415 156,420 141,425 126,429 111,433 95,436 79,439 63,441 48,443 32,444 16,445 0,445 0,436 16,436 31,435 47,434 62,432 78,430 94,428 109,424 124,421 139,417 154,412 168,407 183,402 197,396 211,389 225,383 239,375 252,368 265,360 278,351 291,342 303,333 315,323 327,313 339,303 350,292 361,280 371,268 381,257 391,245 400,232 409,220 417,207 425,193 433,180 440,166 447,152 454,138 459,124 465,110 470,95 474,80 479,65 482,50 485,35 488,20 490,4 491,0">
          <text:p/>
        </draw:polygon>
        <draw:polygon draw:style-name="gr97" draw:text-style-name="P58" draw:layer="layout" svg:width="0.505cm" svg:height="0.444cm" svg:x="6.604cm" svg:y="3.934cm" svg:viewBox="0 0 506 445" draw:points="506,7 505,14 502,30 499,46 495,62 491,77 486,92 481,107 475,122 469,137 463,152 456,166 448,180 440,194 432,208 423,221 414,234 404,247 394,260 384,272 373,285 362,296 350,307 339,318 326,328 314,338 301,348 288,357 275,366 261,374 247,382 233,390 219,397 204,404 188,410 173,415 158,420 143,425 127,429 112,433 96,436 80,439 64,441 48,443 33,444 17,445 0,445 0,437 16,437 32,436 48,435 63,433 79,431 94,428 110,425 125,421 140,417 155,412 170,407 185,402 200,396 215,389 229,382 243,375 257,367 270,359 283,350 296,341 309,332 321,322 333,312 345,301 356,290 367,278 377,266 388,254 397,242 407,229 416,216 425,203 433,190 441,176 448,162 455,148 461,134 467,119 473,105 478,90 483,75 487,59 491,44 494,29 496,13 498,0">
          <text:p/>
        </draw:polygon>
        <draw:polygon draw:style-name="gr98" draw:text-style-name="P59" draw:layer="layout" svg:width="0.512cm" svg:height="0.446cm" svg:x="6.604cm" svg:y="3.941cm" svg:viewBox="0 0 513 447" draw:points="513,8 513,9 511,25 507,41 503,57 499,72 494,88 489,103 483,119 477,134 470,148 463,163 456,177 448,192 439,205 430,219 421,232 411,245 401,258 390,270 379,283 368,295 356,307 344,317 332,328 319,338 306,348 292,357 278,366 264,375 250,383 236,391 221,398 206,404 191,411 176,416 161,422 145,426 129,431 114,435 98,438 82,441 65,443 49,445 33,446 17,447 0,447 0,438 17,438 33,437 48,436 64,434 80,432 96,429 112,426 127,422 143,418 158,413 173,408 188,403 203,397 218,390 232,383 246,375 260,367 274,359 287,350 301,341 314,331 326,321 339,311 350,300 362,289 373,277 384,265 394,253 404,240 414,227 423,214 432,201 440,187 448,173 456,159 463,145 469,130 475,115 481,100 486,85 491,70 495,55 499,39 502,23 505,7 506,0">
          <text:p/>
        </draw:polygon>
        <draw:polygon draw:style-name="gr99" draw:text-style-name="P60" draw:layer="layout" svg:width="0.52cm" svg:height="0.447cm" svg:x="6.604cm" svg:y="3.949cm" svg:viewBox="0 0 521 448" draw:points="521,7 519,18 516,35 512,51 507,67 503,83 497,98 491,114 485,129 478,144 471,159 463,174 455,188 446,202 437,216 428,229 418,243 407,256 396,268 385,280 373,293 361,305 349,316 336,327 323,337 310,347 297,356 283,366 269,374 254,382 240,390 225,397 210,404 194,411 179,416 163,422 147,427 132,431 115,435 99,438 83,441 67,443 50,445 34,447 17,447 0,448 0,439 17,439 33,438 49,437 65,435 82,433 98,430 114,427 129,423 145,418 161,414 176,408 191,403 206,396 221,390 236,383 250,375 264,367 278,358 292,349 305,340 318,330 331,320 343,309 355,299 367,286 378,275 389,262 400,250 411,237 421,224 430,211 439,197 448,184 456,169 463,155 470,140 477,126 483,111 489,95 494,80 499,64 503,49 507,33 511,17 513,1 513,0">
          <text:p/>
        </draw:polygon>
        <draw:polygon draw:style-name="gr100" draw:text-style-name="P61" draw:layer="layout" svg:width="0.527cm" svg:height="0.448cm" svg:x="6.604cm" svg:y="3.956cm" svg:viewBox="0 0 528 449" draw:points="528,8 527,13 524,30 520,46 516,62 511,78 505,94 499,110 492,125 485,141 478,156 470,171 461,185 453,200 443,214 434,227 424,241 413,254 402,267 391,279 379,292 367,304 355,315 342,326 329,337 315,347 301,357 287,366 273,375 258,383 244,391 228,398 213,405 198,412 182,417 166,423 150,428 134,432 117,436 101,440 84,443 68,445 51,447 34,448 17,449 0,449 0,441 17,440 34,440 50,438 67,436 83,434 99,431 115,428 132,424 147,420 163,415 179,409 194,404 210,397 225,390 240,383 254,375 269,367 283,359 297,349 310,340 323,330 336,320 349,309 361,298 373,285 385,273 396,261 406,249 417,236 427,222 436,209 445,195 454,181 462,167 470,152 477,137 484,122 490,107 496,91 503,76 507,60 512,44 516,28 519,11 521,0">
          <text:p/>
        </draw:polygon>
        <draw:polygon draw:style-name="gr101" draw:text-style-name="P62" draw:layer="layout" svg:width="0.535cm" svg:height="0.449cm" svg:x="6.604cm" svg:y="3.964cm" svg:viewBox="0 0 536 450" draw:points="536,7 532,23 528,40 524,57 519,73 513,89 507,105 501,121 494,136 486,152 478,167 470,182 461,196 451,210 442,224 431,238 421,251 409,264 398,277 386,289 374,302 361,314 348,325 335,336 321,346 307,356 293,365 278,374 264,382 248,390 233,398 218,405 202,411 186,418 170,423 153,428 137,433 120,437 103,440 87,443 69,445 52,447 35,449 18,449 0,450 0,441 17,441 34,440 51,439 68,437 85,435 102,432 118,428 135,424 151,420 167,415 183,409 199,404 214,397 229,390 245,383 259,375 274,367 288,358 302,349 316,339 330,329 343,318 356,307 368,296 380,283 392,271 403,259 414,246 425,233 435,219 444,206 454,192 462,177 471,163 479,148 486,133 493,117 499,102 505,86 511,70 516,54 520,38 524,22 527,5 528,0">
          <text:p/>
        </draw:polygon>
        <draw:polygon draw:style-name="gr102" draw:text-style-name="P63" draw:layer="layout" svg:width="0.542cm" svg:height="0.45cm" svg:x="6.604cm" svg:y="3.971cm" svg:viewBox="0 0 543 451" draw:points="543,7 541,18 537,35 532,52 527,68 521,85 515,101 509,117 501,133 494,149 486,164 477,179 468,194 458,208 448,223 438,236 427,250 416,263 404,276 392,288 380,301 367,313 354,324 340,335 326,346 312,356 298,365 283,374 268,383 252,391 237,399 221,406 205,412 189,419 172,424 155,429 138,434 121,438 104,441 87,444 70,447 52,449 35,450 18,451 0,451 0,443 18,442 35,442 52,440 69,438 86,436 102,433 119,430 136,426 152,421 170,416 186,411 202,404 218,398 233,391 248,383 264,375 278,367 293,358 307,349 321,339 335,329 348,318 361,307 374,294 386,282 398,270 409,257 421,244 431,231 442,217 451,203 461,189 470,175 478,160 486,145 494,129 501,114 507,98 513,82 519,66 524,50 528,33 532,16 536,0">
          <text:p/>
        </draw:polygon>
        <draw:polygon draw:style-name="gr103" draw:text-style-name="P64" draw:layer="layout" svg:width="0.553cm" svg:height="0.45cm" svg:x="6.604cm" svg:y="3.978cm" svg:viewBox="0 0 554 451" draw:points="554,11 553,14 549,31 544,48 539,65 533,82 527,99 520,115 513,131 505,147 497,163 488,179 479,194 469,209 459,223 448,237 437,251 426,265 414,278 401,292 388,304 375,316 362,327 348,338 334,349 319,359 304,369 288,378 273,387 257,395 241,403 225,411 209,417 192,424 175,429 158,435 141,439 124,443 106,447 89,450 86,451 0,451 0,444 18,444 35,443 52,442 70,440 87,437 104,434 121,431 138,427 155,422 171,417 188,412 204,405 220,399 236,392 251,384 267,376 282,367 297,358 312,349 326,339 340,328 354,317 367,306 380,295 392,281 404,269 416,256 427,243 438,229 448,216 458,201 468,187 477,172 486,157 494,142 501,126 509,110 515,94 521,78 527,61 532,45 537,28 541,11 543,0">
          <text:p/>
        </draw:polygon>
        <draw:polygon draw:style-name="gr104" draw:text-style-name="P65" draw:layer="layout" svg:width="0.478cm" svg:height="0.439cm" svg:x="6.689cm" svg:y="3.989cm" svg:viewBox="0 0 479 440" draw:points="479,11 476,24 471,41 465,58 459,76 453,93 446,109 439,126 431,142 422,158 413,175 404,191 394,206 383,221 372,235 361,249 349,263 337,277 324,290 311,302 298,314 284,326 270,338 255,349 240,359 224,369 209,378 193,387 177,396 161,404 144,411 127,418 110,425 93,431 76,436 63,440 0,440 3,439 20,436 38,432 55,428 72,424 89,418 106,413 123,406 139,400 155,392 171,384 187,376 202,367 217,358 233,348 248,338 262,327 276,316 289,305 302,293 315,281 328,268 340,255 351,241 362,227 373,213 383,199 393,184 402,168 411,152 419,136 427,120 434,104 441,88 447,71 453,54 458,37 463,20 467,3 468,0">
          <text:p/>
        </draw:polygon>
        <draw:polygon draw:style-name="gr105" draw:text-style-name="P66" draw:layer="layout" svg:width="0.425cm" svg:height="0.428cm" svg:x="6.752cm" svg:y="4cm" svg:viewBox="0 0 426 429" draw:points="426,11 425,16 420,34 415,51 409,70 402,87 395,104 387,121 379,138 370,154 361,171 352,186 341,202 331,217 320,232 308,247 296,261 283,274 270,288 256,301 242,313 228,325 214,337 199,348 184,359 168,369 152,378 136,388 120,396 103,405 86,412 69,419 52,426 44,429 0,429 13,425 30,420 47,414 64,407 81,400 98,393 114,385 130,376 146,367 161,358 176,348 191,338 206,327 220,315 234,303 247,291 260,279 274,266 286,252 298,238 309,224 320,210 331,195 341,180 350,164 359,148 368,132 376,116 383,99 390,83 396,66 402,47 408,30 413,13 416,0">
          <text:p/>
        </draw:polygon>
        <draw:polygon draw:style-name="gr106" draw:text-style-name="P67" draw:layer="layout" svg:width="0.392cm" svg:height="0.417cm" svg:x="6.796cm" svg:y="4.011cm" svg:viewBox="0 0 393 418" draw:points="393,10 388,26 383,44 377,62 370,80 363,98 355,115 347,132 338,149 328,165 318,181 308,197 297,213 286,228 274,243 261,257 249,271 236,285 222,298 208,311 193,323 179,335 163,346 148,358 132,369 116,379 99,388 83,397 66,405 48,413 36,418 0,418 8,415 25,408 42,401 60,394 77,385 93,377 109,367 125,358 141,347 156,336 171,325 185,313 199,301 213,289 226,276 239,262 252,249 264,235 276,220 287,205 297,190 308,174 317,159 326,142 335,126 343,109 351,92 358,75 365,58 371,40 376,23 381,5 382,0">
          <text:p/>
        </draw:polygon>
        <draw:polygon draw:style-name="gr107" draw:text-style-name="P68" draw:layer="layout" svg:width="0.366cm" svg:height="0.407cm" svg:x="6.832cm" svg:y="4.021cm" svg:viewBox="0 0 367 408" draw:points="367,11 365,20 359,38 353,57 346,75 339,93 331,110 322,128 313,145 303,162 293,178 282,194 270,210 259,226 247,241 234,257 221,271 208,285 194,298 179,311 165,324 149,336 134,348 118,359 102,369 85,380 69,389 51,398 34,407 32,408 0,408 11,403 29,395 46,387 62,378 79,369 95,359 111,348 126,337 142,326 156,314 171,302 185,289 199,276 212,262 224,248 237,233 249,218 260,203 271,187 281,171 292,155 302,139 311,122 319,105 327,88 334,70 341,52 347,34 352,16 357,0">
          <text:p/>
        </draw:polygon>
        <draw:polygon draw:style-name="gr108" draw:text-style-name="P69" draw:layer="layout" svg:width="0.345cm" svg:height="0.396cm" svg:x="6.864cm" svg:y="4.032cm" svg:viewBox="0 0 346 397" draw:points="346,10 345,12 339,31 333,50 326,69 318,87 310,105 301,124 292,141 282,158 272,175 261,192 250,208 238,224 226,239 213,254 199,269 185,283 170,297 156,310 141,323 125,335 110,347 93,358 77,369 60,380 43,389 29,397 0,397 2,396 19,387 37,378 53,369 70,358 86,348 102,337 117,325 133,313 147,300 162,287 176,274 190,260 203,246 216,231 228,216 239,200 251,184 261,168 271,152 281,135 290,118 299,99 307,82 314,64 321,46 327,27 333,9 335,0">
          <text:p/>
        </draw:polygon>
        <draw:polygon draw:style-name="gr109" draw:text-style-name="P70" draw:layer="layout" svg:width="0.326cm" svg:height="0.387cm" svg:x="6.893cm" svg:y="4.042cm" svg:viewBox="0 0 327 388" draw:points="327,11 322,26 316,45 309,64 301,83 293,101 284,119 274,137 264,155 254,172 243,189 231,205 219,222 206,237 193,253 180,268 166,282 151,296 136,310 121,323 105,335 88,347 72,359 55,370 38,381 27,388 0,388 14,379 31,370 48,359 64,348 81,337 97,325 113,313 128,300 142,287 157,273 170,259 184,244 197,229 209,214 221,198 232,182 243,165 253,148 263,131 272,114 281,96 289,78 297,60 304,41 310,22 316,3 317,0">
          <text:p/>
        </draw:polygon>
        <draw:polygon draw:style-name="gr110" draw:text-style-name="P71" draw:layer="layout" svg:width="0.309cm" svg:height="0.376cm" svg:x="6.92cm" svg:y="4.052cm" svg:viewBox="0 0 310 377" draw:points="310,11 308,19 301,39 294,58 286,77 277,96 268,114 259,132 249,150 238,168 226,185 215,202 202,218 189,234 176,250 162,266 148,281 133,295 118,309 102,323 86,336 70,348 53,360 36,371 26,377 0,377 11,371 28,360 46,349 62,337 78,325 94,313 109,300 124,286 139,272 153,257 166,242 179,226 192,211 204,194 216,178 227,161 237,144 247,126 257,108 266,90 274,72 282,53 289,34 295,15 300,0">
          <text:p/>
        </draw:polygon>
        <draw:polygon draw:style-name="gr111" draw:text-style-name="P72" draw:layer="layout" svg:width="0.294cm" svg:height="0.365cm" svg:x="6.946cm" svg:y="4.063cm" svg:viewBox="0 0 295 366" draw:points="295,10 294,12 287,32 280,52 272,71 263,90 253,109 243,129 233,147 222,165 210,182 198,199 185,216 172,233 159,249 145,264 130,279 115,294 99,308 83,322 67,335 50,347 33,359 24,366 0,366 9,360 26,349 43,337 59,325 75,312 91,298 106,284 121,270 135,255 149,240 162,224 175,208 188,192 199,175 211,158 222,140 232,121 241,103 250,85 260,66 268,47 275,28 282,8 284,0">
          <text:p/>
        </draw:polygon>
        <draw:polygon draw:style-name="gr112" draw:text-style-name="P73" draw:layer="layout" svg:width="0.28cm" svg:height="0.355cm" svg:x="6.97cm" svg:y="4.073cm" svg:viewBox="0 0 281 356" draw:points="281,10 275,26 268,46 259,66 251,86 241,105 231,124 221,142 209,161 198,179 185,196 173,213 158,230 144,246 130,262 115,277 100,292 84,307 68,320 51,334 34,347 23,356 0,356 9,348 26,336 43,324 59,311 75,297 91,283 106,268 121,253 135,238 148,222 161,205 175,188 187,171 199,154 210,136 220,118 230,99 239,80 248,61 256,42 263,22 270,2 271,0">
          <text:p/>
        </draw:polygon>
        <draw:polygon draw:style-name="gr113" draw:text-style-name="P74" draw:layer="layout" svg:width="0.267cm" svg:height="0.345cm" svg:x="6.993cm" svg:y="4.083cm" svg:viewBox="0 0 268 346" draw:points="268,10 264,21 257,41 248,61 239,81 230,101 219,120 209,139 197,158 185,176 173,194 160,211 146,229 132,246 117,262 102,277 86,293 69,307 53,321 36,335 22,346 0,346 11,338 28,325 45,311 61,298 77,283 93,268 108,253 122,237 136,221 150,203 162,186 175,169 186,151 198,132 208,114 218,95 228,76 236,56 245,36 252,16 258,0">
          <text:p/>
        </draw:polygon>
        <draw:polygon draw:style-name="gr114" draw:text-style-name="P75" draw:layer="layout" svg:width="0.252cm" svg:height="0.335cm" svg:x="7.015cm" svg:y="4.093cm" svg:viewBox="0 0 253 336" draw:points="253,7 250,14 243,34 234,55 225,75 215,96 205,115 194,134 183,153 170,172 158,190 144,207 130,224 115,241 101,258 85,273 69,289 53,304 36,318 19,332 14,336 0,336 14,325 31,311 47,297 63,283 79,267 94,252 109,236 123,219 137,202 151,185 163,167 175,149 187,130 197,111 208,92 217,71 226,51 235,31 242,11 246,0">
          <text:p/>
        </draw:polygon>
        <draw:polygon draw:style-name="gr115" draw:text-style-name="P76" draw:layer="layout" svg:width="0.244cm" svg:height="0.333cm" svg:x="7.029cm" svg:y="4.1cm" svg:viewBox="0 0 245 334" draw:points="245,7 244,10 237,30 228,51 219,72 209,93 199,112 187,132 176,151 163,169 150,188 136,206 122,223 108,240 93,256 77,272 61,288 45,303 28,318 10,332 6,334 6,329 0,329 5,325 22,311 39,297 55,282 71,266 87,251 101,234 116,217 129,200 143,183 155,165 168,146 180,127 191,108 201,89 211,69 220,48 229,27 236,7 239,0">
          <text:p/>
        </draw:polygon>
        <draw:polygon draw:style-name="gr116" draw:text-style-name="P77" draw:layer="layout" svg:width="0.245cm" svg:height="0.337cm" svg:x="7.035cm" svg:y="4.107cm" svg:viewBox="0 0 246 338" draw:points="246,7 238,27 230,48 221,68 211,88 200,109 189,129 177,148 165,167 151,186 137,204 123,221 108,239 93,255 77,272 61,287 44,302 27,317 9,331 0,338 0,327 4,325 22,311 39,296 55,281 71,265 87,249 102,233 116,216 130,199 144,181 157,162 170,144 181,125 193,104 203,85 213,64 222,44 231,23 238,3 239,0">
          <text:p/>
        </draw:polygon>
        <draw:polygon draw:style-name="gr117" draw:text-style-name="P78" draw:layer="layout" svg:width="0.252cm" svg:height="0.341cm" svg:x="7.035cm" svg:y="4.114cm" svg:viewBox="0 0 253 342" draw:points="253,6 246,23 238,44 228,65 218,85 208,106 196,125 184,145 172,165 159,184 145,202 130,220 115,237 99,254 83,271 67,287 50,302 33,317 15,331 0,342 0,331 9,324 27,310 44,295 61,280 77,265 93,248 108,232 124,214 138,197 152,179 165,160 177,140 189,121 200,101 211,81 221,61 230,41 238,20 246,0">
          <text:p/>
        </draw:polygon>
        <draw:polygon draw:style-name="gr118" draw:text-style-name="P79" draw:layer="layout" svg:width="0.258cm" svg:height="0.346cm" svg:x="7.035cm" svg:y="4.12cm" svg:viewBox="0 0 259 347" draw:points="259,7 254,20 246,41 236,62 226,83 215,104 204,124 191,143 179,163 165,182 152,201 137,219 122,237 106,254 90,271 74,287 56,302 38,317 20,332 1,346 0,347 0,336 15,325 33,311 50,296 68,281 84,265 100,248 116,231 130,214 145,196 159,177 172,158 184,139 196,119 208,100 218,79 228,59 238,38 246,17 253,0">
          <text:p/>
        </draw:polygon>
        <draw:polygon draw:style-name="gr119" draw:text-style-name="P80" draw:layer="layout" svg:width="0.265cm" svg:height="0.349cm" svg:x="7.035cm" svg:y="4.127cm" svg:viewBox="0 0 266 350" draw:points="266,6 262,16 253,38 244,59 233,80 222,101 210,121 198,141 185,161 171,180 157,199 143,217 127,235 112,253 95,270 79,286 61,302 44,317 25,332 7,346 0,350 0,340 1,339 20,325 38,310 56,295 73,280 89,264 105,247 121,229 136,211 151,193 164,175 178,156 190,136 203,117 214,97 226,76 236,55 246,34 254,13 259,0">
          <text:p/>
        </draw:polygon>
        <draw:polygon draw:style-name="gr120" draw:text-style-name="P81" draw:layer="layout" svg:width="0.272cm" svg:height="0.353cm" svg:x="7.035cm" svg:y="4.133cm" svg:viewBox="0 0 273 354" draw:points="273,7 270,13 261,35 252,57 241,78 230,99 218,119 206,140 193,159 179,179 165,198 150,216 134,234 118,252 101,269 84,286 67,302 49,318 30,332 12,347 0,354 0,344 7,340 25,326 44,311 61,296 79,279 95,263 112,246 127,229 143,211 158,193 172,174 186,155 199,135 211,115 223,95 233,74 244,53 253,32 262,10 266,0">
          <text:p/>
        </draw:polygon>
        <draw:polygon draw:style-name="gr121" draw:text-style-name="P82" draw:layer="layout" svg:width="0.278cm" svg:height="0.357cm" svg:x="7.035cm" svg:y="4.14cm" svg:viewBox="0 0 279 358" draw:points="279,7 278,9 269,32 259,53 249,75 238,96 226,117 213,137 200,157 186,177 172,196 157,215 141,233 125,251 109,268 91,284 74,301 55,317 36,332 17,347 0,358 0,347 12,340 30,325 49,311 68,294 85,278 102,262 119,245 135,227 150,209 165,191 179,172 193,152 206,133 218,112 230,92 241,71 252,50 261,28 270,6 273,0">
          <text:p/>
        </draw:polygon>
        <draw:polygon draw:style-name="gr122" draw:text-style-name="P83" draw:layer="layout" svg:width="0.285cm" svg:height="0.36cm" svg:x="7.035cm" svg:y="4.147cm" svg:viewBox="0 0 286 361" draw:points="286,6 277,28 267,50 256,72 245,93 233,114 220,135 206,155 192,175 178,194 162,213 147,232 130,249 114,267 96,284 78,300 60,316 41,331 22,345 2,360 0,361 0,350 17,339 36,324 54,309 73,294 90,277 108,261 124,244 140,226 156,208 171,189 185,170 199,150 213,130 226,110 238,89 249,68 259,46 269,25 278,2 279,0">
          <text:p/>
        </draw:polygon>
        <draw:polygon draw:style-name="gr122" draw:text-style-name="P83" draw:layer="layout" svg:width="0.291cm" svg:height="0.365cm" svg:x="7.035cm" svg:y="4.153cm" svg:viewBox="0 0 292 366" draw:points="292,7 285,25 275,49 264,71 253,92 240,114 228,134 214,155 200,175 185,195 170,214 154,232 138,250 121,268 103,285 84,301 65,317 46,333 27,347 7,361 0,366 0,355 2,354 22,340 41,326 60,311 78,295 97,279 115,262 131,244 148,227 163,208 179,189 193,170 207,150 220,130 233,109 245,88 256,67 267,45 277,22 286,0">
          <text:p/>
        </draw:polygon>
        <draw:polygon draw:style-name="gr123" draw:text-style-name="P84" draw:layer="layout" svg:width="0.298cm" svg:height="0.368cm" svg:x="7.035cm" svg:y="4.16cm" svg:viewBox="0 0 299 369" draw:points="299,7 293,22 283,44 272,68 260,89 248,111 234,132 220,153 206,173 191,193 176,212 160,231 143,249 126,267 108,284 90,301 71,317 51,332 32,347 11,362 0,369 0,359 7,354 27,340 46,326 65,310 84,294 102,278 120,261 137,243 153,225 169,207 184,188 199,168 213,148 227,127 239,107 253,85 264,64 275,41 285,18 292,0">
          <text:p/>
        </draw:polygon>
        <draw:polygon draw:style-name="gr124" draw:text-style-name="P85" draw:layer="layout" svg:width="0.305cm" svg:height="0.371cm" svg:x="7.035cm" svg:y="4.167cm" svg:viewBox="0 0 306 372" draw:points="306,6 301,18 290,41 279,63 268,86 255,108 242,130 228,151 214,171 199,191 183,211 167,230 150,248 133,266 115,283 95,300 76,317 57,332 37,347 16,362 0,372 0,362 11,355 32,340 51,325 71,310 90,294 108,277 127,260 144,242 161,224 177,205 192,186 207,166 221,146 235,125 248,104 260,81 272,60 283,37 293,15 299,0">
          <text:p/>
        </draw:polygon>
        <draw:polygon draw:style-name="gr125" draw:text-style-name="P86" draw:layer="layout" svg:width="0.311cm" svg:height="0.375cm" svg:x="7.035cm" svg:y="4.173cm" svg:viewBox="0 0 312 376" draw:points="312,7 308,16 298,39 287,61 275,84 263,106 248,127 234,149 220,170 205,190 189,210 172,229 155,248 138,266 120,284 101,301 82,317 62,333 42,348 21,363 0,376 0,366 16,356 37,341 57,326 76,311 95,294 114,277 132,260 149,242 166,224 182,205 198,185 213,165 227,145 241,123 255,101 268,80 279,57 290,35 301,12 306,0">
          <text:p/>
        </draw:polygon>
        <draw:polygon draw:style-name="gr125" draw:text-style-name="P86" draw:layer="layout" svg:width="0.318cm" svg:height="0.378cm" svg:x="7.035cm" svg:y="4.18cm" svg:viewBox="0 0 319 379" draw:points="319,6 316,12 306,35 295,58 283,81 270,103 257,125 243,146 228,168 212,189 196,208 180,228 163,247 145,265 127,283 108,300 87,317 67,333 47,348 26,363 5,377 0,379 0,369 21,356 42,341 62,326 82,310 102,294 121,277 139,259 156,241 173,222 190,203 206,183 221,162 235,141 249,120 263,99 275,77 287,54 298,32 308,9 312,0">
          <text:p/>
        </draw:polygon>
        <draw:polygon draw:style-name="gr126" draw:text-style-name="P87" draw:layer="layout" svg:width="0.324cm" svg:height="0.382cm" svg:x="7.035cm" svg:y="4.186cm" svg:viewBox="0 0 325 383" draw:points="325,7 324,9 314,33 302,56 290,79 277,101 264,123 250,145 235,166 218,187 202,208 185,228 168,247 150,265 131,283 112,301 93,317 72,334 52,349 31,364 9,378 0,383 0,373 5,371 26,357 47,342 67,327 87,311 107,294 126,277 144,259 162,241 179,222 195,201 211,182 227,161 243,140 257,119 270,97 283,75 295,52 306,29 316,6 319,0">
          <text:p/>
        </draw:polygon>
        <draw:polygon draw:style-name="gr127" draw:text-style-name="P88" draw:layer="layout" svg:width="0.331cm" svg:height="0.385cm" svg:x="7.035cm" svg:y="4.193cm" svg:viewBox="0 0 332 386" draw:points="332,6 321,30 310,53 298,76 285,99 271,121 257,143 242,164 226,185 210,205 193,225 175,246 157,264 138,282 119,300 99,317 79,333 57,349 36,364 14,378 0,386 0,376 9,371 31,357 52,342 73,327 94,310 113,294 132,276 151,258 169,240 186,220 203,200 219,180 235,159 250,138 264,116 277,94 290,72 302,49 314,26 324,2 325,0">
          <text:p/>
        </draw:polygon>
        <draw:polygon draw:style-name="gr128" draw:text-style-name="P89" draw:layer="layout" svg:width="0.341cm" svg:height="0.395cm" svg:x="7.035cm" svg:y="4.199cm" svg:viewBox="0 0 342 396" draw:points="342,10 333,29 321,53 309,76 296,99 282,122 266,144 255,160 59,357 43,369 21,383 0,396 0,380 14,372 36,358 57,343 78,326 98,310 118,293 137,275 156,257 174,239 192,219 209,199 225,179 241,158 256,137 270,115 285,93 298,70 310,47 321,24 332,0">
          <text:p/>
        </draw:polygon>
        <draw:path draw:style-name="gr129" draw:text-style-name="P90" draw:layer="layout" svg:width="0.35cm" svg:height="0.399cm" svg:x="7.035cm" svg:y="4.209cm" svg:viewBox="0 0 351 400" svg:d="M351 10l-6 14-12 25-13 23-13 24-6 9-45 45 11-16 15-22 14-23 13-23 12-23 12-24 9-19zM14 392l-9 6-5 2v-14l21-14 22-14 16-12z">
          <text:p/>
        </draw:path>
        <draw:path draw:style-name="gr130" draw:text-style-name="P91" draw:layer="layout" svg:width="0.36cm" svg:height="0.395cm" svg:x="7.035cm" svg:y="4.219cm" svg:viewBox="0 0 361 396" svg:d="M361 9l-5 11-12 24-8 16-36 35 6-9 13-24 14-23 12-25 6-14zM0 396v-6l5-2 9-6z">
          <text:p/>
        </draw:path>
        <draw:polygon draw:style-name="gr131" draw:text-style-name="P92" draw:layer="layout" svg:width="0.035cm" svg:height="0.051cm" svg:x="7.37cm" svg:y="4.228cm" svg:viewBox="0 0 36 52" draw:points="36,10 33,16 30,22 0,52 8,36 20,11 25,0">
          <text:p/>
        </draw:polygon>
        <draw:polygon draw:style-name="gr132" draw:text-style-name="P93" draw:layer="layout" svg:width="0.009cm" svg:height="0.012cm" svg:x="7.399cm" svg:y="4.238cm" svg:viewBox="0 0 10 13" draw:points="10,3 0,13 3,7 7,0">
          <text:p/>
        </draw:polygon>
        <draw:polygon draw:style-name="gr220" draw:text-style-name="P2" draw:layer="layout" svg:width="0.805cm" svg:height="0.745cm" svg:x="6.604cm" svg:y="3.869cm" svg:viewBox="0 0 806 746" draw:points="0,186 433,186 433,0 806,373 433,746 433,560 0,560">
          <text:p/>
        </draw:polygon>
        <draw:polygon draw:style-name="gr61" draw:text-style-name="P22" draw:layer="layout" svg:width="0.02cm" svg:height="0.001cm" svg:x="12.869cm" svg:y="4.055cm" svg:viewBox="0 0 21 2" draw:points="0,0 21,0 18,0 13,2 7,2 0,2">
          <text:p/>
        </draw:polygon>
        <draw:polygon draw:style-name="gr61" draw:text-style-name="P22" draw:layer="layout" svg:width="0.046cm" svg:height="0.005cm" svg:x="12.869cm" svg:y="4.055cm" svg:viewBox="0 0 47 6" draw:points="47,0 43,1 37,2 31,4 25,5 19,6 13,6 7,6 0,6 0,1 7,1 13,1 18,0 21,0">
          <text:p/>
        </draw:polygon>
        <draw:polygon draw:style-name="gr62" draw:text-style-name="P23" draw:layer="layout" svg:width="0.06cm" svg:height="0.01cm" svg:x="12.869cm" svg:y="4.055cm" svg:viewBox="0 0 61 11" draw:points="61,0 55,2 50,4 44,5 38,6 31,7 25,8 19,10 13,10 7,11 0,11 0,5 7,5 13,5 19,5 25,4 31,3 37,2 43,1 46,0">
          <text:p/>
        </draw:polygon>
        <draw:polygon draw:style-name="gr63" draw:text-style-name="P24" draw:layer="layout" svg:width="0.073cm" svg:height="0.014cm" svg:x="12.869cm" svg:y="4.055cm" svg:viewBox="0 0 74 15" draw:points="74,0 69,2 63,4 57,6 51,9 44,10 38,11 32,12 26,13 20,14 12,15 6,15 0,15 0,11 6,11 12,10 19,10 25,9 31,7 38,6 44,5 50,4 55,2 61,0">
          <text:p/>
        </draw:polygon>
        <draw:polygon draw:style-name="gr63" draw:text-style-name="P24" draw:layer="layout" svg:width="0.084cm" svg:height="0.018cm" svg:x="12.869cm" svg:y="4.055cm" svg:viewBox="0 0 85 19" draw:points="85,0 82,1 76,5 70,7 64,9 58,11 52,13 45,14 39,16 33,17 26,18 19,18 13,19 6,19 0,19 0,15 6,15 12,15 19,14 26,13 32,12 38,11 44,10 51,9 57,7 63,5 69,2 74,0">
          <text:p/>
        </draw:polygon>
        <draw:polygon draw:style-name="gr63" draw:text-style-name="P24" draw:layer="layout" svg:width="0.094cm" svg:height="0.022cm" svg:x="12.869cm" svg:y="4.055cm" svg:viewBox="0 0 95 23" draw:points="95,0 90,3 84,6 78,9 72,11 65,13 59,15 52,17 45,18 39,20 32,21 26,22 19,23 13,23 6,23 0,23 0,19 6,19 13,19 19,18 25,18 32,17 38,16 44,14 51,13 58,11 64,9 70,7 76,5 82,1 85,0">
          <text:p/>
        </draw:polygon>
        <draw:polygon draw:style-name="gr64" draw:text-style-name="P25" draw:layer="layout" svg:width="0.103cm" svg:height="0.027cm" svg:x="12.869cm" svg:y="4.055cm" svg:viewBox="0 0 104 28" draw:points="104,0 103,0 98,3 91,6 85,9 79,12 73,15 67,17 60,19 53,21 46,23 40,24 33,25 27,26 20,27 13,27 7,28 0,28 0,23 6,23 13,23 19,23 26,22 32,21 39,20 45,18 52,17 59,15 65,12 72,10 78,8 84,5 90,3 95,0">
          <text:p/>
        </draw:polygon>
        <draw:polygon draw:style-name="gr64" draw:text-style-name="P25" draw:layer="layout" svg:width="0.111cm" svg:height="0.031cm" svg:x="12.869cm" svg:y="4.055cm" svg:viewBox="0 0 112 32" draw:points="112,0 111,1 105,4 99,7 93,11 87,14 81,17 74,19 68,21 60,23 54,25 47,27 41,28 34,29 27,30 20,31 13,32 7,32 0,32 0,28 7,28 13,27 20,27 27,26 33,25 40,24 46,23 53,21 59,19 67,17 73,15 79,13 85,9 91,6 98,3 103,0 104,0">
          <text:p/>
        </draw:polygon>
        <draw:polygon draw:style-name="gr64" draw:text-style-name="P25" draw:layer="layout" svg:width="0.12cm" svg:height="0.035cm" svg:x="12.869cm" svg:y="4.055cm" svg:viewBox="0 0 121 36" draw:points="121,0 119,1 114,4 108,8 101,11 95,14 89,17 82,20 76,22 69,25 63,27 56,29 49,31 41,32 34,33 28,34 21,35 14,36 7,36 0,36 0,32 7,32 13,32 20,31 27,30 34,29 41,28 48,27 55,25 61,22 68,20 74,18 81,16 87,13 93,10 99,7 105,4 111,1 112,0">
          <text:p/>
        </draw:polygon>
        <draw:polygon draw:style-name="gr65" draw:text-style-name="P26" draw:layer="layout" svg:width="0.127cm" svg:height="0.039cm" svg:x="12.869cm" svg:y="4.055cm" svg:viewBox="0 0 128 40" draw:points="128,0 122,4 116,8 110,12 103,15 97,18 90,22 84,25 77,27 71,29 64,32 57,33 50,35 43,36 36,38 29,39 21,39 14,40 7,40 0,40 0,36 7,36 14,36 21,35 29,34 35,33 42,32 49,31 56,29 63,27 69,25 76,23 82,20 89,17 95,14 101,11 108,8 114,4 119,1 121,0">
          <text:p/>
        </draw:polygon>
        <draw:polygon draw:style-name="gr66" draw:text-style-name="P27" draw:layer="layout" svg:width="0.135cm" svg:height="0.044cm" svg:x="12.869cm" svg:y="4.055cm" svg:viewBox="0 0 136 45" draw:points="136,0 130,4 124,8 118,13 112,16 105,20 99,23 92,26 85,29 79,31 72,33 65,36 57,38 50,39 43,41 36,42 29,43 21,44 14,44 7,45 0,45 0,40 7,40 14,40 21,39 28,39 35,38 42,36 49,35 56,33 64,32 71,29 77,27 84,25 90,22 97,19 103,16 110,13 116,8 122,4 128,0">
          <text:p/>
        </draw:polygon>
        <draw:polygon draw:style-name="gr66" draw:text-style-name="P27" draw:layer="layout" svg:width="0.142cm" svg:height="0.048cm" svg:x="12.869cm" svg:y="4.055cm" svg:viewBox="0 0 143 49" draw:points="143,0 139,3 132,7 126,13 120,16 114,20 107,23 101,27 94,30 87,33 80,35 73,38 66,40 59,42 52,43 45,45 37,46 29,47 22,48 15,49 7,49 0,49 0,45 7,45 14,44 21,44 29,43 37,42 44,41 51,39 58,38 65,36 72,33 79,31 85,29 92,26 99,23 105,20 112,16 118,13 124,8 130,4 136,0">
          <text:p/>
        </draw:polygon>
        <draw:polygon draw:style-name="gr67" draw:text-style-name="P28" draw:layer="layout" svg:width="0.149cm" svg:height="0.052cm" svg:x="12.869cm" svg:y="4.055cm" svg:viewBox="0 0 150 53" draw:points="150,0 147,2 141,7 135,11 129,15 122,19 116,23 109,26 102,31 96,34 89,36 82,39 74,42 66,44 59,46 52,48 45,49 37,50 30,51 22,52 15,53 7,53 0,53 0,49 7,49 15,49 22,48 29,47 36,46 44,45 51,43 58,42 65,40 72,38 79,35 87,33 94,30 101,26 107,22 114,19 120,15 126,12 132,7 139,3 143,0">
          <text:p/>
        </draw:polygon>
        <draw:polygon draw:style-name="gr68" draw:text-style-name="P29" draw:layer="layout" svg:width="0.155cm" svg:height="0.057cm" svg:x="12.869cm" svg:y="4.055cm" svg:viewBox="0 0 156 58" draw:points="156,0 156,1 150,7 144,11 137,16 131,20 124,24 118,27 111,31 104,34 97,38 90,40 83,43 76,46 68,48 60,50 53,52 45,53 38,55 30,56 23,56 15,57 7,57 0,58 0,53 7,53 15,53 22,52 30,51 37,50 45,49 52,48 59,46 66,44 75,42 82,39 89,36 96,34 102,31 109,27 116,24 122,20 129,16 135,12 141,8 147,2 150,0">
          <text:p/>
        </draw:polygon>
        <draw:polygon draw:style-name="gr68" draw:text-style-name="P29" draw:layer="layout" svg:width="0.162cm" svg:height="0.061cm" svg:x="12.869cm" svg:y="4.055cm" svg:viewBox="0 0 163 62" draw:points="163,0 158,4 152,9 146,14 140,18 133,22 127,26 120,30 113,34 106,37 99,40 92,43 84,46 77,49 70,51 62,53 55,56 47,57 39,59 32,60 24,61 16,61 8,62 0,62 0,58 7,57 16,57 24,56 31,56 39,54 46,52 54,51 61,49 69,47 76,45 83,42 90,39 97,37 104,33 111,30 118,26 124,23 131,19 137,15 144,10 150,6 156,1 156,0">
          <text:p/>
        </draw:polygon>
        <draw:polygon draw:style-name="gr69" draw:text-style-name="P30" draw:layer="layout" svg:width="0.168cm" svg:height="0.065cm" svg:x="12.869cm" svg:y="4.055cm" svg:viewBox="0 0 169 66" draw:points="169,0 167,2 161,7 155,13 148,18 141,23 134,27 128,31 121,35 114,39 107,42 100,45 92,48 85,51 77,54 70,56 62,58 55,60 47,62 39,63 31,64 23,65 16,66 8,66 0,66 0,62 8,62 15,61 23,61 31,60 38,59 46,57 54,56 61,54 69,52 76,50 83,47 91,44 98,41 105,38 112,35 119,31 126,27 132,23 139,19 145,15 152,10 158,4 163,0">
          <text:p/>
        </draw:polygon>
        <draw:polygon draw:style-name="gr70" draw:text-style-name="P31" draw:layer="layout" svg:width="0.175cm" svg:height="0.069cm" svg:x="12.869cm" svg:y="4.055cm" svg:viewBox="0 0 176 70" draw:points="176,0 170,5 164,11 157,16 151,20 144,25 138,30 131,34 124,38 117,41 110,45 102,48 95,52 86,55 79,58 71,60 63,62 56,64 48,66 40,67 32,68 24,69 16,70 8,70 0,70 0,66 8,66 16,66 23,65 31,64 39,63 47,62 55,60 62,58 70,56 77,54 85,50 92,47 101,44 108,41 115,38 122,34 129,30 135,26 142,22 149,17 155,12 161,7 167,2 169,0">
          <text:p/>
        </draw:polygon>
        <draw:polygon draw:style-name="gr71" draw:text-style-name="P32" draw:layer="layout" svg:width="0.181cm" svg:height="0.074cm" svg:x="12.869cm" svg:y="4.055cm" svg:viewBox="0 0 182 75" draw:points="182,0 179,3 173,9 166,14 160,19 154,24 147,29 140,33 133,37 126,41 119,45 111,49 104,52 96,55 89,58 81,61 72,63 64,65 57,67 49,69 40,71 32,72 24,73 16,74 8,74 0,75 0,69 8,69 16,69 24,68 32,67 40,66 48,65 56,63 63,61 71,59 80,57 87,54 95,51 102,48 110,45 117,41 124,38 131,34 138,30 144,25 151,20 157,16 164,11 170,5 176,0">
          <text:p/>
        </draw:polygon>
        <draw:polygon draw:style-name="gr72" draw:text-style-name="P33" draw:layer="layout" svg:width="0.187cm" svg:height="0.078cm" svg:x="12.869cm" svg:y="4.055cm" svg:viewBox="0 0 188 79" draw:points="188,0 182,6 175,12 169,17 163,22 156,27 149,32 142,37 135,41 127,45 120,49 112,53 105,56 97,59 89,62 81,66 73,68 65,71 57,72 49,74 41,76 33,77 25,78 16,78 8,79 0,79 0,75 8,74 16,74 24,73 32,72 40,71 49,70 57,68 64,66 72,63 80,61 88,58 95,55 103,52 110,49 118,45 125,41 133,37 140,33 147,29 154,24 160,19 166,14 173,9 179,3 182,0">
          <text:p/>
        </draw:polygon>
        <draw:polygon draw:style-name="gr73" draw:text-style-name="P34" draw:layer="layout" svg:width="0.193cm" svg:height="0.082cm" svg:x="12.869cm" svg:y="4.055cm" svg:viewBox="0 0 194 83" draw:points="194,0 191,3 184,10 178,16 172,21 165,27 158,32 151,37 144,41 136,46 129,50 122,54 114,58 106,61 99,64 91,67 83,70 75,72 67,75 58,77 50,78 42,80 33,81 25,82 17,83 8,83 0,83 0,79 8,79 16,78 25,78 33,77 41,76 49,74 57,72 65,71 73,68 81,66 89,63 97,60 105,57 112,54 120,50 127,46 134,42 141,38 148,33 155,28 163,23 169,18 175,13 182,7 188,0">
          <text:p/>
        </draw:polygon>
        <draw:polygon draw:style-name="gr73" draw:text-style-name="P34" draw:layer="layout" svg:width="0.199cm" svg:height="0.086cm" svg:x="12.869cm" svg:y="4.055cm" svg:viewBox="0 0 200 87" draw:points="200,0 194,6 187,12 181,18 175,24 168,29 161,35 154,40 147,45 140,49 132,54 125,58 117,61 109,65 100,68 92,71 84,74 76,76 68,79 59,81 51,82 42,84 34,85 25,86 17,87 8,87 0,87 0,83 8,83 17,83 25,82 33,81 42,80 50,78 58,77 67,75 75,72 83,70 91,67 99,64 107,61 115,58 123,54 130,50 137,46 145,41 152,37 159,32 165,26 172,20 178,15 184,9 191,3 194,0">
          <text:p/>
        </draw:polygon>
        <draw:polygon draw:style-name="gr74" draw:text-style-name="P35" draw:layer="layout" svg:width="0.205cm" svg:height="0.091cm" svg:x="12.869cm" svg:y="4.055cm" svg:viewBox="0 0 206 92" draw:points="206,0 203,3 197,9 190,16 184,21 177,27 170,32 164,38 156,44 149,48 142,53 134,57 127,61 119,65 111,69 103,72 95,75 86,78 77,81 69,83 60,85 52,87 43,88 35,89 26,90 17,91 9,91 0,92 0,87 8,87 17,87 25,86 34,85 42,84 51,82 59,81 68,79 76,76 84,74 93,71 101,68 109,65 117,61 125,58 132,54 140,49 147,45 154,39 161,34 168,29 175,24 181,18 187,12 194,6 200,0">
          <text:p/>
        </draw:polygon>
        <draw:polygon draw:style-name="gr75" draw:text-style-name="P36" draw:layer="layout" svg:width="0.216cm" svg:height="0.099cm" svg:x="12.869cm" svg:y="4.055cm" svg:viewBox="0 0 217 100" draw:points="217,0 215,2 209,9 203,16 195,22 189,28 182,34 175,39 168,45 160,50 153,56 145,60 137,65 129,69 121,73 113,77 105,80 96,83 88,86 79,89 71,91 62,93 53,95 44,97 36,98 27,99 18,100 9,100 0,100 0,92 9,91 17,91 26,90 35,89 43,88 52,87 60,85 69,83 77,81 85,78 94,75 102,72 110,69 118,65 126,61 133,57 141,52 148,47 155,43 163,38 169,32 176,27 183,21 189,16 196,9 203,3 206,0">
          <text:p/>
        </draw:polygon>
        <draw:polygon draw:style-name="gr76" draw:text-style-name="P37" draw:layer="layout" svg:width="0.227cm" svg:height="0.108cm" svg:x="12.869cm" svg:y="4.055cm" svg:viewBox="0 0 228 109" draw:points="228,0 227,1 221,8 215,15 209,22 202,28 195,34 188,40 180,46 173,51 165,57 157,62 149,68 141,72 133,77 125,81 117,84 108,88 99,91 91,94 82,97 73,99 64,102 55,103 46,105 37,106 27,107 18,108 9,108 0,109 0,100 9,100 18,100 27,99 36,98 44,97 53,95 62,93 71,91 79,89 88,86 96,83 105,80 113,77 121,73 129,69 137,64 145,59 153,55 160,50 168,45 175,39 182,34 190,28 196,22 203,16 209,9 215,2 217,0">
          <text:p/>
        </draw:polygon>
        <draw:polygon draw:style-name="gr77" draw:text-style-name="P38" draw:layer="layout" svg:width="0.238cm" svg:height="0.116cm" svg:x="12.869cm" svg:y="4.055cm" svg:viewBox="0 0 239 117" draw:points="239,0 234,6 228,14 221,21 215,28 208,34 201,41 194,47 186,53 179,58 171,65 163,70 155,75 146,80 138,84 130,88 121,92 112,96 103,99 93,102 84,105 75,108 66,110 56,112 47,113 38,115 28,116 19,117 9,117 0,117 0,109 9,108 18,108 27,107 37,106 46,105 55,103 64,102 73,99 82,97 91,94 99,91 109,88 118,84 126,81 134,77 142,72 150,68 158,62 166,57 174,51 181,46 188,40 195,34 202,28 209,22 215,15 221,8 227,1 228,0">
          <text:p/>
        </draw:polygon>
        <draw:polygon draw:style-name="gr77" draw:text-style-name="P38" draw:layer="layout" svg:width="0.249cm" svg:height="0.125cm" svg:x="12.869cm" svg:y="4.055cm" svg:viewBox="0 0 250 126" draw:points="250,0 246,4 240,12 234,19 227,27 221,34 214,40 206,47 199,53 191,59 184,65 176,71 167,76 159,81 150,86 141,91 132,95 123,100 114,104 105,107 96,110 87,113 77,116 68,118 58,120 48,122 39,123 29,124 19,125 10,125 0,126 0,117 9,117 19,117 28,116 38,115 47,113 56,112 66,110 75,108 84,105 93,102 102,98 111,95 120,91 129,87 137,83 145,79 155,74 163,69 171,64 179,58 186,53 194,47 201,41 208,34 215,28 221,21 228,14 234,6 239,0">
          <text:p/>
        </draw:polygon>
        <draw:polygon draw:style-name="gr78" draw:text-style-name="P39" draw:layer="layout" svg:width="0.259cm" svg:height="0.133cm" svg:x="12.869cm" svg:y="4.055cm" svg:viewBox="0 0 260 134" draw:points="260,0 259,3 253,11 247,18 240,26 234,33 227,41 219,48 212,54 203,61 196,67 188,73 179,79 171,84 162,90 154,95 145,99 136,104 127,108 117,112 108,115 99,119 89,121 79,124 70,126 60,129 50,130 40,132 30,133 20,134 10,134 0,134 0,126 10,125 19,125 29,124 39,123 48,122 58,120 68,118 77,116 87,113 96,110 105,107 114,104 123,100 132,96 141,92 150,87 158,82 166,77 175,72 183,66 190,60 198,54 205,48 214,41 221,35 227,28 234,20 240,13 246,5 250,0">
          <text:p/>
        </draw:polygon>
        <draw:polygon draw:style-name="gr79" draw:text-style-name="P40" draw:layer="layout" svg:width="0.27cm" svg:height="0.142cm" svg:x="12.869cm" svg:y="4.055cm" svg:viewBox="0 0 271 143" draw:points="271,0 266,7 260,15 253,23 247,31 240,38 233,46 225,53 218,60 210,66 202,73 194,79 185,85 176,91 167,96 158,101 149,107 139,111 130,116 121,120 111,123 101,127 91,130 81,132 71,135 61,137 51,139 41,140 31,141 20,142 10,143 0,143 0,134 10,134 20,134 30,133 40,132 50,130 60,129 70,126 79,124 89,121 99,119 108,115 117,112 127,108 136,103 145,98 154,94 162,89 171,83 180,78 189,72 197,66 204,60 212,53 219,47 227,40 234,32 240,25 247,17 253,10 259,2 260,0">
          <text:p/>
        </draw:polygon>
        <draw:polygon draw:style-name="gr79" draw:text-style-name="P40" draw:layer="layout" svg:width="0.28cm" svg:height="0.15cm" svg:x="12.869cm" svg:y="4.055cm" svg:viewBox="0 0 281 151" draw:points="281,0 279,3 273,12 267,20 260,28 253,36 246,44 239,52 231,59 223,66 215,74 207,81 199,87 190,93 181,99 172,104 163,110 154,115 143,119 133,124 124,128 114,131 104,135 94,138 83,141 73,143 63,145 52,147 42,149 31,150 21,151 10,151 0,151 0,143 10,143 20,142 31,141 41,140 51,139 61,137 71,135 81,132 91,130 101,127 111,123 121,120 130,116 139,111 149,107 159,102 168,97 177,92 185,86 194,80 202,74 210,66 218,60 225,53 233,46 240,38 247,31 253,23 260,15 266,7 271,0">
          <text:p/>
        </draw:polygon>
        <draw:polygon draw:style-name="gr80" draw:text-style-name="P41" draw:layer="layout" svg:width="0.29cm" svg:height="0.159cm" svg:x="12.869cm" svg:y="4.055cm" svg:viewBox="0 0 291 160" draw:points="291,0 286,8 280,17 273,25 267,34 260,42 252,50 245,58 237,65 229,73 221,80 212,86 204,93 195,99 186,105 176,111 167,116 157,121 148,126 138,130 128,135 118,139 107,143 97,146 87,149 76,151 65,154 55,155 44,157 32,158 21,159 11,160 0,160 0,151 10,151 21,151 31,150 43,149 53,147 64,145 74,143 84,141 95,138 105,135 115,130 125,127 134,123 144,118 154,114 163,109 172,103 181,98 190,92 199,86 207,80 215,73 223,66 231,59 239,52 246,44 253,36 260,28 267,20 273,12 279,3 281,0">
          <text:p/>
        </draw:polygon>
        <draw:polygon draw:style-name="gr81" draw:text-style-name="P42" draw:layer="layout" svg:width="0.3cm" svg:height="0.167cm" svg:x="12.869cm" svg:y="4.055cm" svg:viewBox="0 0 301 168" draw:points="301,0 299,3 293,12 287,22 280,30 273,40 266,49 258,57 251,65 243,72 235,80 226,87 217,94 209,101 200,107 190,113 180,119 170,125 160,130 150,135 140,139 130,143 120,147 109,151 98,154 88,157 77,160 66,162 55,164 44,165 33,167 22,168 11,168 0,168 0,160 11,160 21,159 32,158 43,157 54,155 64,154 75,151 86,149 96,146 106,143 117,139 127,135 137,131 147,127 156,122 166,117 175,112 186,106 195,100 204,94 212,87 221,81 229,74 237,66 245,59 252,51 260,43 267,34 273,25 280,17 286,8 291,0">
          <text:p/>
        </draw:polygon>
        <draw:polygon draw:style-name="gr82" draw:text-style-name="P43" draw:layer="layout" svg:width="0.31cm" svg:height="0.176cm" svg:x="12.869cm" svg:y="4.055cm" svg:viewBox="0 0 311 177" draw:points="311,0 305,8 299,17 293,27 286,36 279,44 271,53 264,63 256,71 248,79 239,86 231,94 222,101 213,108 203,114 194,120 184,126 174,132 164,137 154,142 144,147 133,151 122,155 112,159 101,162 90,165 79,168 68,170 56,172 45,174 34,175 23,176 11,177 0,177 0,168 11,168 22,168 33,167 44,165 55,164 66,162 77,160 88,157 98,154 109,151 120,147 130,143 140,139 150,135 160,130 170,125 180,119 189,113 199,107 208,101 216,94 225,87 234,80 242,72 250,65 257,56 265,48 272,39 279,30 286,22 292,12 298,3 300,0">
          <text:p/>
        </draw:polygon>
        <draw:polygon draw:style-name="gr83" draw:text-style-name="P44" draw:layer="layout" svg:width="0.32cm" svg:height="0.184cm" svg:x="12.869cm" svg:y="4.055cm" svg:viewBox="0 0 321 185" draw:points="321,0 320,2 314,12 307,22 301,32 294,41 286,50 279,59 271,67 263,76 254,84 246,93 237,100 228,108 219,115 209,121 199,128 189,134 179,139 169,145 159,150 148,155 137,159 126,163 115,167 104,171 93,174 81,176 69,179 58,181 46,182 35,184 23,185 11,185 0,185 0,177 11,177 23,176 34,175 45,174 56,172 68,170 79,168 90,165 102,162 113,159 123,155 134,151 145,147 155,142 165,137 175,132 185,126 195,120 204,114 214,108 223,101 232,94 240,86 249,78 257,70 265,62 272,53 280,44 287,36 294,27 300,17 306,8 311,0">
          <text:p/>
        </draw:polygon>
        <draw:polygon draw:style-name="gr84" draw:text-style-name="P45" draw:layer="layout" svg:width="0.33cm" svg:height="0.193cm" svg:x="12.869cm" svg:y="4.055cm" svg:viewBox="0 0 331 194" draw:points="331,0 327,7 321,17 314,27 307,37 300,46 293,55 285,64 277,74 269,83 260,91 251,99 242,107 233,114 224,121 214,128 204,135 194,141 183,147 173,152 161,158 150,163 139,167 128,171 117,175 106,179 94,182 83,185 71,187 59,189 47,191 36,192 24,193 12,194 0,194 0,185 11,185 23,185 35,184 46,182 58,181 69,179 81,176 92,174 103,171 114,167 125,163 136,159 147,155 158,150 169,145 179,139 189,134 199,128 209,121 219,115 228,108 237,100 246,93 254,85 263,77 271,67 279,59 286,50 294,41 301,32 307,22 314,12 320,2 321,0">
          <text:p/>
        </draw:polygon>
        <draw:polygon draw:style-name="gr85" draw:text-style-name="P46" draw:layer="layout" svg:width="0.34cm" svg:height="0.201cm" svg:x="12.869cm" svg:y="4.055cm" svg:viewBox="0 0 341 202" draw:points="341,0 340,0 334,11 328,21 321,32 314,42 307,51 299,61 292,71 283,80 275,89 266,97 257,105 248,113 238,121 229,128 219,135 208,142 198,148 188,154 176,160 165,165 154,170 142,175 131,179 120,183 108,187 96,190 84,193 72,195 60,198 48,199 36,201 24,202 12,202 0,202 0,194 12,194 24,193 36,192 47,191 59,189 71,187 83,185 94,182 106,179 117,175 128,171 139,167 150,163 161,158 172,152 182,147 194,141 204,135 214,128 224,121 233,114 242,107 251,99 260,91 269,83 277,74 285,64 293,55 300,46 307,37 314,27 321,17 327,7 331,0">
          <text:p/>
        </draw:polygon>
        <draw:polygon draw:style-name="gr86" draw:text-style-name="P47" draw:layer="layout" svg:width="0.349cm" svg:height="0.21cm" svg:x="12.869cm" svg:y="4.055cm" svg:viewBox="0 0 350 211" draw:points="350,0 348,5 342,15 335,27 328,37 321,48 314,58 306,67 298,77 290,86 281,95 272,103 263,112 253,120 244,128 234,135 223,142 212,149 201,156 191,162 180,168 168,173 157,178 146,183 134,187 122,191 110,195 98,198 86,201 74,204 62,206 49,208 37,209 25,210 12,211 0,211 0,202 12,202 24,202 36,201 48,199 60,198 72,195 84,193 96,190 108,187 120,183 131,179 142,175 154,170 165,165 176,160 187,154 197,148 207,142 218,135 229,128 238,121 248,113 257,105 266,97 275,89 283,80 292,71 299,62 307,52 314,43 321,33 328,22 334,11 340,0 341,0">
          <text:p/>
        </draw:polygon>
        <draw:polygon draw:style-name="gr87" draw:text-style-name="P48" draw:layer="layout" svg:width="0.359cm" svg:height="0.218cm" svg:x="12.869cm" svg:y="4.055cm" svg:viewBox="0 0 360 219" draw:points="360,0 355,9 349,20 342,31 335,41 328,52 321,62 313,72 304,81 296,91 287,100 278,109 268,117 259,125 249,133 239,141 227,148 217,155 206,162 195,168 184,174 172,180 161,185 149,190 137,194 125,200 113,203 100,207 88,210 76,212 63,214 51,216 38,218 25,219 13,219 0,219 0,211 12,211 25,210 37,209 49,208 62,206 74,204 86,201 98,198 110,194 122,190 134,186 146,182 157,177 168,172 180,167 191,161 201,155 212,148 222,141 233,134 244,127 253,119 263,111 272,102 281,94 290,85 298,76 306,66 314,57 321,47 328,36 335,26 342,15 348,5 350,0">
          <text:p/>
        </draw:polygon>
        <draw:polygon draw:style-name="gr87" draw:text-style-name="P48" draw:layer="layout" svg:width="0.369cm" svg:height="0.227cm" svg:x="12.869cm" svg:y="4.055cm" svg:viewBox="0 0 370 228" draw:points="370,0 369,1 363,13 356,24 350,35 342,46 335,57 327,67 319,77 311,87 302,97 293,106 284,115 274,124 264,133 254,141 244,149 233,156 222,164 211,170 200,177 187,183 176,189 164,194 152,199 140,203 127,208 115,211 103,215 90,218 77,221 64,223 52,225 39,226 26,227 13,228 0,228 0,219 13,219 25,219 38,218 51,216 63,214 76,212 88,210 100,207 113,203 125,200 137,195 149,191 161,186 172,181 184,175 196,169 207,163 218,156 228,149 239,142 249,134 259,125 268,117 278,109 287,100 296,91 304,81 313,72 321,62 328,52 335,41 342,31 349,20 355,9 360,0">
          <text:p/>
        </draw:polygon>
        <draw:polygon draw:style-name="gr88" draw:text-style-name="P49" draw:layer="layout" svg:width="0.378cm" svg:height="0.235cm" svg:x="12.869cm" svg:y="4.055cm" svg:viewBox="0 0 379 236" draw:points="379,0 376,5 370,17 364,28 357,40 350,51 342,63 334,73 326,84 317,94 308,103 299,113 289,122 280,131 270,140 259,148 249,156 238,163 227,171 215,178 204,184 192,190 180,196 167,202 155,207 143,211 130,216 117,220 105,223 92,226 79,229 66,231 53,233 40,234 26,236 13,236 0,236 0,228 13,228 26,227 39,226 52,225 64,223 77,221 90,218 103,215 115,211 127,208 140,203 152,199 164,194 177,189 188,183 200,177 211,170 222,164 233,156 244,149 254,141 264,133 274,125 284,116 293,107 302,98 311,88 319,78 327,68 335,57 342,46 350,35 356,24 363,13 369,1 370,0">
          <text:p/>
        </draw:polygon>
        <draw:path draw:style-name="gr89" draw:text-style-name="P50" draw:layer="layout" svg:width="0.43cm" svg:height="0.43cm" svg:x="12.869cm" svg:y="3.869cm" svg:viewBox="0 0 431 431" svg:d="M388 186l-4 9-6 12-7 13-7 11-7 12-8 11-8 10-9 11-9 10-9 10-9 10-10 9-10 9-10 9-11 9-10 8-12 8-12 7-11 7-12 7-12 6-12 6-12 6-13 5-12 4-13 5-13 4-13 3-13 4-14 2-13 3-13 1-14 2-13 1-14 1h-13v-9h13 13l14-2 13-1 13-2 13-2 13-3 13-3 12-3 13-4 13-5 12-4 12-5 12-6 12-6 12-6 11-6 12-7 11-8 12-7 10-8 11-8 10-9 9-9 10-9 9-10 9-9 9-10 8-11 8-10 8-11 7-11 7-13 6-11 6-12 3-5zM424 0l7 6v7l-1 14-1 13-1 14-2 13-2 9z">
          <text:p/>
        </draw:path>
        <draw:path draw:style-name="gr89" draw:text-style-name="P50" draw:layer="layout" svg:width="0.438cm" svg:height="0.432cm" svg:x="12.869cm" svg:y="3.875cm" svg:viewBox="0 0 439 433" svg:d="M398 180v1l-6 12-7 12-7 12-7 13-7 11-8 12-9 11-8 10-9 11-9 10-10 10-10 10-10 9-11 9-10 8-11 9-12 8-11 7-12 7-12 7-12 7-12 6-13 5-13 6-13 4-13 5-13 4-13 4-13 3-14 3-14 2-13 2-15 1-14 2h-13-14v-8h13l14-1 13-1 15-2 13-1 13-3 14-2 13-4 13-3 13-4 13-5 12-4 13-5 12-6 12-6 12-6 12-7 11-7 12-7 11-8 10-8 11-9 10-9 10-9 10-9 9-10 9-10 9-10 9-11 8-10 8-11 7-12 7-12 7-12 6-12 4-9zM424 70l2-9 2-13 1-14 1-13 1-14v-7l8 9v12l-1 14-2 14-2 13-2 14-3 13-3 14-2 5z">
          <text:p/>
        </draw:path>
        <draw:path draw:style-name="gr90" draw:text-style-name="P51" draw:layer="layout" svg:width="0.446cm" svg:height="0.432cm" svg:x="12.869cm" svg:y="3.884cm" svg:viewBox="0 0 447 433" svg:d="M407 171l-2 4-6 13-6 12-7 12-8 13-7 12-8 12-9 11-9 11-9 10-9 11-10 10-10 10-10 9-12 9-11 9-11 9-12 8-12 7-12 8-12 7-12 6-13 6-13 6-13 6-13 4-13 5-13 4-14 4-14 3-13 3-14 2-14 2-14 2-14 1-14 1h-14v-9h14 13l14-2 14-1 13-2 14-2 14-3 13-3 13-4 13-4 13-5 13-4 13-6 13-5 12-6 12-7 12-7 12-7 11-7 12-8 11-9 10-8 12-9 10-9 10-10 10-10 9-10 9-11 8-10 9-11 8-12 7-11 7-13 7-12 7-12 6-12v-1zM424 99l2-5 3-14 3-13 2-14 2-13 2-14 1-14v-12l8 8v5l-1 14-2 14-2 14-2 14-3 13-3 14-4 14-4 13-2 6z">
          <text:p/>
        </draw:path>
        <draw:path draw:style-name="gr91" draw:text-style-name="P52" draw:layer="layout" svg:width="0.454cm" svg:height="0.432cm" svg:x="12.869cm" svg:y="3.892cm" svg:viewBox="0 0 455 433" svg:d="M417 163l-4 8-6 13-7 12-7 13-7 13-8 12-9 12-8 11-9 11-9 11-10 11-10 10-10 10-11 10-11 9-11 9-11 8-12 9-12 7-12 8-13 7-12 7-13 6-13 6-13 5-14 5-13 5-14 4-14 4-14 3-14 3-14 3-15 2-14 1-15 2h-14-14v-8h14l14-1 14-1 14-2 14-2 15-2 13-3 14-3 14-4 13-4 13-5 13-4 13-6 13-6 13-6 12-6 12-7 12-8 12-7 12-8 11-9 11-9 11-9 10-9 10-10 10-10 9-11 9-10 9-11 9-11 8-12 7-12 8-13 7-12 6-12 6-13 2-4zM424 121l2-6 4-13 4-14 3-14 3-13 2-14 2-14 2-14 1-14v-5l8 8-1 12-1 14-2 14-3 14-2 14-4 14-4 14-4 14-4 13-5 14h-1z">
          <text:p/>
        </draw:path>
        <draw:polygon draw:style-name="gr92" draw:text-style-name="P53" draw:layer="layout" svg:width="0.462cm" svg:height="0.433cm" svg:x="12.869cm" svg:y="3.9cm" svg:viewBox="0 0 463 434" draw:points="424,155 424,137 425,137 430,123 434,110 438,96 442,82 446,68 448,54 451,40 453,26 454,12 455,0 463,8 463,12 461,27 459,41 457,56 454,70 450,84 447,98 442,112 438,126 432,140 427,153 421,166 414,180 408,192 400,206 393,218 385,231 376,243 368,254 358,266 349,277 339,288 329,298 319,308 308,318 296,327 284,337 273,345 261,354 249,362 236,369 223,377 211,383 197,390 184,396 171,401 157,407 143,411 129,416 115,419 101,423 87,426 72,428 58,430 44,432 29,433 14,434 0,434 0,425 14,425 28,425 43,423 57,422 71,420 85,417 99,414 113,411 127,407 141,403 154,398 168,393 181,388 194,382 207,376 219,369 232,362 244,354 256,347 268,338 279,330 290,321 302,312 313,302 323,292 333,282 343,271 352,260 361,249 369,238 378,226 386,214 393,201 400,188 407,176 413,163 417,155">
          <text:p/>
        </draw:polygon>
        <draw:polygon draw:style-name="gr93" draw:text-style-name="P54" draw:layer="layout" svg:width="0.47cm" svg:height="0.433cm" svg:x="12.869cm" svg:y="3.908cm" svg:viewBox="0 0 471 434" draw:points="471,8 470,20 468,35 465,49 462,64 459,78 455,93 450,107 446,121 440,135 435,148 429,162 422,175 415,188 408,201 400,215 392,227 383,240 374,251 365,263 355,274 345,285 335,296 324,306 313,316 302,326 291,335 279,344 267,353 254,361 241,369 229,376 215,383 202,389 189,396 175,401 161,407 147,411 133,416 118,420 104,423 89,426 75,429 60,431 44,432 30,434 15,434 0,434 0,426 14,426 29,425 44,424 59,422 73,420 88,418 102,415 116,411 130,408 144,403 158,399 172,393 185,388 198,382 212,375 224,369 237,361 250,354 262,346 274,337 285,329 297,319 308,310 319,300 329,290 339,280 349,269 358,258 368,246 376,235 385,223 393,210 400,197 408,184 414,172 421,158 427,145 432,132 438,118 442,104 447,90 450,76 454,62 457,48 459,33 461,19 463,4 463,0">
          <text:p/>
        </draw:polygon>
        <draw:polygon draw:style-name="gr94" draw:text-style-name="P55" draw:layer="layout" svg:width="0.478cm" svg:height="0.434cm" svg:x="12.869cm" svg:y="3.916cm" svg:viewBox="0 0 479 435" draw:points="479,7 478,13 476,28 474,43 470,58 467,72 463,87 458,101 454,116 448,130 442,144 436,158 430,171 423,185 415,198 407,212 399,224 390,237 381,249 372,261 362,272 352,283 341,294 330,305 319,315 308,325 296,334 284,343 270,352 258,360 245,368 232,375 218,383 205,389 191,395 177,401 163,407 149,411 134,416 120,420 105,423 90,426 75,429 60,431 45,433 30,434 15,435 0,435 0,426 15,426 30,426 44,424 59,423 74,421 88,418 103,415 117,412 132,408 146,403 160,399 174,393 188,388 201,381 214,375 228,368 240,361 253,353 266,345 279,336 291,327 302,318 313,308 324,298 335,288 345,277 355,266 365,255 374,243 383,232 392,219 400,206 408,193 415,180 422,167 429,154 435,140 440,127 446,113 450,99 455,85 459,70 462,56 465,41 468,27 470,12 471,0">
          <text:p/>
        </draw:polygon>
        <draw:polygon draw:style-name="gr95" draw:text-style-name="P56" draw:layer="layout" svg:width="0.486cm" svg:height="0.436cm" svg:x="12.869cm" svg:y="3.923cm" svg:viewBox="0 0 487 437" draw:points="487,8 485,22 482,38 479,53 475,68 471,82 466,97 461,112 455,126 449,140 443,154 436,168 429,182 421,195 413,208 405,222 396,235 387,247 377,259 367,271 357,282 346,293 335,304 324,314 312,324 300,334 288,343 275,352 262,360 249,368 236,376 222,383 208,390 194,396 180,402 166,408 151,413 136,417 122,421 107,425 92,428 76,430 61,433 46,434 31,436 15,436 0,437 0,428 15,428 30,427 45,426 60,424 75,422 90,419 105,416 120,413 134,409 149,404 163,400 177,394 191,388 205,382 218,376 232,368 245,361 258,353 270,345 283,336 295,327 307,318 318,308 329,298 340,287 351,276 361,265 371,254 380,242 389,230 398,217 406,204 414,191 422,178 429,164 435,151 441,137 447,123 453,109 457,94 462,80 466,65 470,51 474,36 476,21 478,6 479,0">
          <text:p/>
        </draw:polygon>
        <draw:polygon draw:style-name="gr96" draw:text-style-name="P57" draw:layer="layout" svg:width="0.493cm" svg:height="0.436cm" svg:x="12.869cm" svg:y="3.931cm" svg:viewBox="0 0 494 437" draw:points="494,8 493,16 490,31 487,46 483,62 479,77 475,92 470,107 464,121 458,136 452,150 445,164 437,178 430,191 422,206 413,219 404,232 395,244 385,256 375,268 364,280 353,291 342,302 330,313 318,323 306,332 294,342 281,351 268,359 254,368 241,375 227,383 213,390 199,396 183,402 169,408 154,413 139,417 124,421 109,425 93,428 78,431 62,433 47,435 31,436 15,437 0,437 0,429 15,428 31,428 46,426 61,425 76,422 92,420 107,417 122,413 136,409 151,405 166,400 180,394 194,388 209,382 223,375 237,368 250,360 263,352 276,344 289,335 301,326 313,316 325,306 336,296 347,285 358,274 368,263 378,251 388,239 397,227 406,214 414,200 422,187 430,174 437,160 444,146 450,132 456,118 462,104 467,89 471,74 475,60 479,45 482,30 485,14 487,0">
          <text:p/>
        </draw:polygon>
        <draw:polygon draw:style-name="gr97" draw:text-style-name="P58" draw:layer="layout" svg:width="0.501cm" svg:height="0.437cm" svg:x="12.869cm" svg:y="3.939cm" svg:viewBox="0 0 502 438" draw:points="502,7 501,9 499,25 495,40 492,56 487,71 483,86 478,101 472,116 466,131 459,146 452,160 445,174 437,188 429,201 420,216 411,229 401,241 391,254 380,266 369,278 358,289 347,300 335,311 323,321 310,331 298,341 285,350 271,359 258,367 244,375 230,382 216,389 201,396 186,402 171,408 156,413 141,417 126,422 110,425 95,429 79,431 63,434 48,435 32,437 16,437 0,438 0,429 15,429 31,428 47,427 62,425 78,423 93,420 109,417 124,413 139,409 154,405 169,400 183,394 198,388 212,382 226,375 240,367 253,360 267,351 280,343 293,334 305,324 317,315 329,305 341,294 352,283 363,272 374,260 385,248 395,236 404,224 413,211 422,197 430,183 437,170 445,156 452,142 458,128 464,113 470,99 475,84 479,69 483,54 487,38 490,23 493,8 494,0">
          <text:p/>
        </draw:polygon>
        <draw:polygon draw:style-name="gr98" draw:text-style-name="P59" draw:layer="layout" svg:width="0.508cm" svg:height="0.438cm" svg:x="12.869cm" svg:y="3.946cm" svg:viewBox="0 0 509 439" draw:points="509,8 507,19 504,35 500,51 496,67 491,82 486,97 480,112 474,127 467,142 460,157 452,171 444,185 436,199 427,213 418,227 408,240 398,252 387,265 376,277 365,288 354,299 342,310 329,321 317,331 304,341 290,350 277,359 263,367 249,375 235,383 220,390 205,397 191,403 175,409 160,414 145,419 129,423 113,427 97,430 80,433 64,435 48,437 32,438 16,439 0,439 0,431 16,430 32,430 48,428 63,427 79,424 96,422 111,418 127,415 142,410 157,406 172,401 187,395 202,389 217,382 231,375 245,368 259,360 272,352 286,343 299,334 311,324 324,314 336,304 348,293 359,282 370,271 381,259 391,247 401,234 411,222 420,209 429,194 437,181 445,167 452,153 459,139 466,124 472,109 478,94 483,79 487,64 492,49 495,33 499,18 501,2 502,0">
          <text:p/>
        </draw:polygon>
        <draw:polygon draw:style-name="gr99" draw:text-style-name="P60" draw:layer="layout" svg:width="0.515cm" svg:height="0.439cm" svg:x="12.869cm" svg:y="3.954cm" svg:viewBox="0 0 516 440" draw:points="516,7 515,13 512,29 508,45 504,61 499,77 494,92 488,108 482,123 475,138 468,153 460,167 452,181 443,195 434,210 425,224 415,237 404,250 394,262 383,274 371,286 359,298 347,309 335,319 322,330 309,340 295,349 282,358 267,367 252,375 238,382 223,390 208,396 193,403 177,409 162,414 146,419 130,423 114,427 98,430 82,433 65,435 49,437 33,439 16,439 0,440 0,431 16,431 32,430 48,429 64,427 80,425 96,422 112,419 128,415 144,411 159,406 174,401 190,395 204,389 219,382 234,375 248,367 262,359 277,351 290,342 304,333 317,323 329,313 342,302 354,291 365,280 376,269 387,257 398,244 408,232 418,219 427,204 436,191 444,177 452,163 460,149 467,134 474,119 480,104 486,89 491,74 496,59 500,43 504,27 507,11 509,0">
          <text:p/>
        </draw:polygon>
        <draw:polygon draw:style-name="gr100" draw:text-style-name="P61" draw:layer="layout" svg:width="0.523cm" svg:height="0.44cm" svg:x="12.869cm" svg:y="3.961cm" svg:viewBox="0 0 524 441" draw:points="524,7 524,8 520,24 516,40 512,56 507,72 502,88 496,104 489,119 482,134 475,149 467,164 459,179 450,193 440,207 430,222 420,235 410,248 399,261 388,273 376,285 364,297 352,308 339,319 326,329 313,339 299,349 285,358 271,367 256,375 242,383 226,390 211,397 196,404 180,410 164,415 148,420 132,424 116,428 100,432 83,435 67,437 50,439 33,440 17,441 0,441 0,433 16,432 33,432 49,430 65,428 82,426 98,423 114,420 130,416 146,412 162,407 177,402 193,396 208,389 223,383 238,375 252,368 266,360 281,351 294,342 308,333 321,323 334,312 346,302 358,291 370,279 382,267 393,255 403,243 414,230 424,216 433,202 443,188 452,174 460,160 468,146 475,131 482,116 488,101 494,85 499,70 504,54 508,38 512,22 515,6 516,0">
          <text:p/>
        </draw:polygon>
        <draw:polygon draw:style-name="gr101" draw:text-style-name="P62" draw:layer="layout" svg:width="0.53cm" svg:height="0.442cm" svg:x="12.869cm" svg:y="3.968cm" svg:viewBox="0 0 531 443" draw:points="531,8 529,19 525,35 520,52 515,68 510,84 504,100 497,116 490,131 483,146 475,161 466,176 457,191 448,205 438,219 428,233 418,247 407,259 395,272 383,284 371,296 358,307 346,318 332,329 319,339 305,349 291,358 276,367 261,376 246,384 231,391 216,398 200,405 184,411 168,416 152,421 135,426 119,430 101,433 84,436 68,438 51,440 34,442 17,442 0,443 0,434 17,434 33,433 50,432 67,430 83,428 100,425 117,421 133,417 149,413 165,408 181,403 197,397 212,390 227,383 243,376 257,368 272,360 286,351 300,342 314,332 327,322 340,312 353,301 365,290 377,278 389,266 400,254 411,241 421,228 431,214 441,200 450,186 459,172 467,157 475,142 482,127 489,112 496,97 502,81 507,65 512,49 516,33 520,17 524,1 524,0">
          <text:p/>
        </draw:polygon>
        <draw:polygon draw:style-name="gr102" draw:text-style-name="P63" draw:layer="layout" svg:width="0.537cm" svg:height="0.442cm" svg:x="12.869cm" svg:y="3.976cm" svg:viewBox="0 0 538 443" draw:points="538,7 537,13 533,29 528,46 523,63 518,79 512,95 505,111 498,127 490,142 482,157 474,172 465,187 455,202 445,216 435,230 424,244 413,257 401,270 389,282 377,294 364,306 351,317 338,328 324,338 310,348 295,358 279,367 264,375 249,383 234,391 218,398 202,405 186,411 170,416 153,421 136,426 120,430 103,433 86,436 69,439 52,441 34,442 17,443 0,443 0,435 17,434 34,434 51,432 68,430 84,428 101,425 118,422 134,418 151,413 167,408 183,403 199,397 215,390 230,383 245,376 260,368 275,359 291,350 305,341 319,331 332,321 346,310 358,299 371,288 383,276 395,264 407,251 418,239 428,225 438,211 448,197 457,183 466,168 475,153 483,138 490,123 497,108 504,92 510,76 515,60 520,44 525,27 529,11 531,0">
          <text:p/>
        </draw:polygon>
        <draw:polygon draw:style-name="gr103" draw:text-style-name="P64" draw:layer="layout" svg:width="0.548cm" svg:height="0.445cm" svg:x="12.869cm" svg:y="3.983cm" svg:viewBox="0 0 549 446" draw:points="549,11 545,26 541,43 535,59 530,76 523,93 517,109 509,125 502,141 493,157 485,172 475,187 466,202 456,216 445,230 434,245 422,259 411,272 398,284 386,297 373,308 359,320 345,331 331,342 317,352 302,361 287,371 272,379 256,388 240,395 224,403 208,409 191,416 175,421 158,427 141,431 123,435 106,439 89,442 71,444 61,446 0,446 0,436 18,436 35,435 53,434 70,432 87,429 104,426 121,423 137,419 154,414 171,409 187,404 203,398 219,391 235,384 250,376 265,368 280,360 295,351 310,341 324,331 338,321 351,310 364,299 377,287 389,275 401,263 413,250 424,237 435,222 445,209 455,195 465,180 474,165 482,150 490,135 498,120 505,104 512,88 518,72 523,56 528,39 533,22 537,6 538,0">
          <text:p/>
        </draw:polygon>
        <draw:polygon draw:style-name="gr104" draw:text-style-name="P65" draw:layer="layout" svg:width="0.499cm" svg:height="0.434cm" svg:x="12.929cm" svg:y="3.994cm" svg:viewBox="0 0 500 435" draw:points="500,10 498,18 493,35 488,52 482,70 475,86 468,103 461,120 453,137 445,153 436,168 426,184 416,199 406,214 395,228 384,242 372,256 360,269 347,282 334,295 321,307 307,319 293,330 279,341 263,351 248,361 232,371 217,380 201,388 185,396 168,403 151,410 135,417 117,423 100,428 83,433 75,435 0,435 10,433 28,431 45,428 62,424 80,420 97,416 114,410 130,405 147,398 163,392 179,384 195,377 211,368 226,360 241,350 256,341 271,331 285,320 299,309 313,297 326,286 338,273 351,261 362,248 374,234 385,220 396,206 406,192 415,177 425,162 433,147 442,131 449,114 457,98 463,82 470,65 475,48 481,32 485,15 489,0">
          <text:p/>
        </draw:polygon>
        <draw:polygon draw:style-name="gr105" draw:text-style-name="P66" draw:layer="layout" svg:width="0.434cm" svg:height="0.424cm" svg:x="13.004cm" svg:y="4.004cm" svg:viewBox="0 0 435 425" draw:points="435,11 430,30 425,47 419,65 412,82 405,99 398,116 389,133 381,149 372,165 362,181 352,196 341,211 330,226 319,240 307,254 294,268 281,281 268,294 254,307 240,319 225,330 210,341 195,352 180,362 164,372 148,381 132,389 115,398 98,405 81,412 64,419 47,425 0,425 8,423 25,418 42,413 60,407 76,400 93,393 110,386 126,378 142,370 157,361 173,351 188,341 203,331 217,320 231,309 246,297 259,285 272,272 285,259 297,246 309,232 320,218 331,204 341,189 351,174 361,158 370,143 378,127 386,111 393,94 400,77 407,61 413,43 418,26 423,8 425,0">
          <text:p/>
        </draw:polygon>
        <draw:polygon draw:style-name="gr106" draw:text-style-name="P67" draw:layer="layout" svg:width="0.398cm" svg:height="0.413cm" svg:x="13.051cm" svg:y="4.015cm" svg:viewBox="0 0 399 414" draw:points="399,10 395,21 390,39 384,57 377,75 370,92 362,109 354,126 345,143 336,159 326,176 315,191 305,207 293,222 281,237 269,251 257,265 242,278 229,291 215,304 201,317 186,329 171,341 155,351 140,362 123,372 107,381 90,390 73,398 56,406 39,413 38,414 0,414 17,408 34,401 51,394 68,387 85,378 101,370 117,361 133,351 148,341 163,330 178,319 192,307 206,295 220,282 233,269 246,256 260,242 272,228 283,214 294,199 305,184 315,169 325,153 334,137 342,121 351,104 358,87 365,70 372,53 378,35 383,18 388,0">
          <text:p/>
        </draw:polygon>
        <draw:polygon draw:style-name="gr107" draw:text-style-name="P68" draw:layer="layout" svg:width="0.37cm" svg:height="0.403cm" svg:x="13.089cm" svg:y="4.025cm" svg:viewBox="0 0 371 404" draw:points="371,11 370,15 364,33 358,51 351,70 344,87 336,105 327,122 318,139 309,156 299,172 288,188 277,205 265,221 253,236 241,250 228,265 214,278 201,292 186,305 172,317 157,329 141,341 126,352 109,363 93,373 76,382 59,391 41,400 32,404 0,404 1,403 18,396 35,388 53,380 70,371 86,362 103,352 118,341 134,331 149,319 164,307 178,295 192,282 205,269 219,256 231,242 243,228 255,213 267,198 277,181 288,166 298,149 307,133 316,116 324,99 332,82 339,65 346,47 352,29 357,11 361,0">
          <text:p/>
        </draw:polygon>
        <draw:polygon draw:style-name="gr108" draw:text-style-name="P69" draw:layer="layout" svg:width="0.348cm" svg:height="0.392cm" svg:x="13.121cm" svg:y="4.036cm" svg:viewBox="0 0 349 393" draw:points="349,10 344,26 338,45 331,63 323,82 315,100 307,118 297,135 288,152 276,169 266,186 254,202 242,217 230,233 217,248 204,262 190,276 176,290 162,303 147,316 132,328 116,340 100,352 83,362 66,373 49,382 32,392 30,393 0,393 9,389 26,380 43,371 60,362 76,352 93,341 108,330 124,318 139,306 153,294 168,281 181,267 195,254 208,239 220,225 232,210 244,194 255,178 266,162 276,146 286,129 295,112 304,95 312,76 319,59 326,40 332,22 338,4 339,0">
          <text:p/>
        </draw:polygon>
        <draw:polygon draw:style-name="gr109" draw:text-style-name="P70" draw:layer="layout" svg:width="0.328cm" svg:height="0.382cm" svg:x="13.151cm" svg:y="4.046cm" svg:viewBox="0 0 329 383" draw:points="329,10 326,20 320,39 313,58 305,76 297,95 288,113 279,131 269,148 258,165 247,182 236,198 224,214 211,230 198,245 184,260 171,274 156,288 141,302 125,315 109,328 93,341 77,352 60,363 43,374 27,383 0,383 2,382 19,372 36,363 53,352 70,342 86,329 102,317 117,305 132,292 147,279 161,265 175,251 188,237 201,222 213,206 225,191 237,175 247,158 258,141 267,124 277,107 285,89 293,71 301,53 308,35 314,16 319,0">
          <text:p/>
        </draw:polygon>
        <draw:polygon draw:style-name="gr110" draw:text-style-name="P71" draw:layer="layout" svg:width="0.312cm" svg:height="0.372cm" svg:x="13.178cm" svg:y="4.056cm" svg:viewBox="0 0 313 373" draw:points="313,10 312,14 305,33 298,53 290,72 281,90 272,109 263,127 253,144 242,162 231,179 219,196 207,213 194,229 181,245 167,260 153,274 138,289 123,303 107,316 91,329 75,341 58,353 41,364 26,373 0,373 16,364 33,353 51,342 67,331 83,319 99,306 114,293 129,279 144,265 157,251 171,236 184,221 197,204 209,188 220,172 231,155 242,138 252,121 261,103 270,85 278,66 286,48 293,29 299,10 302,0">
          <text:p/>
        </draw:polygon>
        <draw:polygon draw:style-name="gr111" draw:text-style-name="P72" draw:layer="layout" svg:width="0.296cm" svg:height="0.362cm" svg:x="13.204cm" svg:y="4.066cm" svg:viewBox="0 0 297 363" draw:points="297,10 291,28 284,47 276,67 267,87 257,105 247,124 237,142 226,160 214,177 202,194 190,211 177,227 163,243 149,259 135,274 120,288 104,302 88,316 72,329 55,341 38,353 24,363 0,363 14,354 31,343 48,331 64,319 80,306 96,293 111,279 126,264 140,250 154,235 167,219 180,203 192,187 204,170 215,153 226,135 236,118 245,100 254,80 263,62 272,43 279,23 286,4 287,0">
          <text:p/>
        </draw:polygon>
        <draw:polygon draw:style-name="gr112" draw:text-style-name="P73" draw:layer="layout" svg:width="0.282cm" svg:height="0.352cm" svg:x="13.228cm" svg:y="4.076cm" svg:viewBox="0 0 283 353" draw:points="283,10 279,22 271,42 263,62 255,81 245,100 235,119 225,137 214,156 202,173 190,191 177,208 164,224 150,241 135,256 121,272 104,286 89,301 72,315 56,329 39,342 23,353 0,353 14,343 31,331 48,319 64,305 80,291 96,277 111,263 126,248 140,232 154,216 167,200 179,183 191,166 203,149 214,131 224,113 234,94 243,76 252,57 260,37 267,18 273,0">
          <text:p/>
        </draw:polygon>
        <draw:polygon draw:style-name="gr113" draw:text-style-name="P74" draw:layer="layout" svg:width="0.269cm" svg:height="0.342cm" svg:x="13.251cm" svg:y="4.086cm" svg:viewBox="0 0 270 343" draw:points="270,11 268,16 260,37 252,57 243,77 234,96 223,115 213,134 201,152 189,171 177,189 164,207 150,224 136,240 122,256 107,272 91,287 75,301 59,315 42,329 24,342 23,343 0,343 17,332 34,319 50,305 67,292 82,277 98,263 112,247 127,232 141,215 154,199 167,182 179,163 191,146 202,127 212,109 222,90 232,71 240,52 248,32 256,12 260,0">
          <text:p/>
        </draw:polygon>
        <draw:polygon draw:style-name="gr114" draw:text-style-name="P75" draw:layer="layout" svg:width="0.254cm" svg:height="0.331cm" svg:x="13.273cm" svg:y="4.097cm" svg:viewBox="0 0 255 332" draw:points="255,6 254,8 246,29 238,50 229,70 219,90 209,109 198,128 187,147 174,165 162,183 149,201 135,218 121,235 106,251 91,267 75,282 59,297 42,311 25,325 16,332 0,332 1,331 20,318 37,304 53,290 69,276 85,261 100,245 114,229 128,213 142,196 155,178 167,161 179,142 191,124 201,105 212,86 221,67 230,47 238,26 246,5 248,0">
          <text:p/>
        </draw:polygon>
        <draw:polygon draw:style-name="gr115" draw:text-style-name="P76" draw:layer="layout" svg:width="0.245cm" svg:height="0.332cm" svg:x="13.288cm" svg:y="4.103cm" svg:viewBox="0 0 246 333" draw:points="246,7 239,26 231,48 221,68 212,88 201,107 190,127 179,146 167,164 154,182 140,200 127,217 112,234 97,251 82,267 66,282 48,297 31,311 14,325 4,333 4,326 0,326 9,319 26,305 43,291 59,276 76,261 91,245 106,229 120,212 134,195 147,177 159,159 172,141 183,122 194,103 204,84 214,64 223,44 231,23 239,2 240,0">
          <text:p/>
        </draw:polygon>
        <draw:polygon draw:style-name="gr116" draw:text-style-name="P77" draw:layer="layout" svg:width="0.248cm" svg:height="0.335cm" svg:x="13.292cm" svg:y="4.11cm" svg:viewBox="0 0 249 336" draw:points="249,7 243,22 234,43 225,63 215,85 205,104 194,124 182,143 169,162 156,180 142,198 128,216 113,233 98,250 83,266 67,281 50,296 33,311 15,325 0,336 0,326 10,318 27,304 44,290 61,275 77,260 92,244 107,227 122,210 135,193 149,175 162,157 175,139 186,120 197,100 208,81 217,60 227,40 235,19 242,0">
          <text:p/>
        </draw:polygon>
        <draw:polygon draw:style-name="gr117" draw:text-style-name="P78" draw:layer="layout" svg:width="0.255cm" svg:height="0.339cm" svg:x="13.292cm" svg:y="4.117cm" svg:viewBox="0 0 256 340" draw:points="256,6 251,18 242,39 233,60 223,80 212,101 201,120 189,141 177,160 164,178 150,196 136,214 121,232 106,248 90,265 73,281 57,296 38,311 21,325 2,338 0,340 0,329 15,318 33,304 51,289 68,274 84,259 99,243 114,226 129,209 143,191 157,173 170,155 182,136 194,116 205,96 215,77 225,56 234,36 243,15 249,0">
          <text:p/>
        </draw:polygon>
        <draw:polygon draw:style-name="gr118" draw:text-style-name="P79" draw:layer="layout" svg:width="0.261cm" svg:height="0.343cm" svg:x="13.292cm" svg:y="4.123cm" svg:viewBox="0 0 262 344" draw:points="262,7 259,15 250,37 241,58 230,78 220,99 208,119 196,138 184,157 170,177 157,196 142,214 127,231 112,248 95,265 78,281 61,296 44,311 26,326 7,339 0,344 0,334 2,332 21,319 38,305 56,290 72,275 89,259 106,242 121,226 136,208 150,190 164,172 177,153 189,134 201,114 212,95 223,74 233,54 242,33 251,12 256,0">
          <text:p/>
        </draw:polygon>
        <draw:polygon draw:style-name="gr119" draw:text-style-name="P80" draw:layer="layout" svg:width="0.268cm" svg:height="0.347cm" svg:x="13.292cm" svg:y="4.13cm" svg:viewBox="0 0 269 348" draw:points="269,6 267,12 258,33 248,54 238,75 227,96 216,116 203,136 190,155 176,174 162,193 148,212 133,230 117,247 101,264 84,280 67,296 49,311 31,325 12,339 0,348 0,337 7,332 26,319 44,304 61,289 78,274 95,258 111,241 126,224 141,206 156,188 169,169 183,150 196,131 208,112 220,92 230,71 241,51 250,30 259,8 262,0">
          <text:p/>
        </draw:polygon>
        <draw:polygon draw:style-name="gr120" draw:text-style-name="P81" draw:layer="layout" svg:width="0.274cm" svg:height="0.351cm" svg:x="13.292cm" svg:y="4.136cm" svg:viewBox="0 0 275 352" draw:points="275,7 275,9 265,30 255,52 245,73 234,94 222,114 210,134 197,154 183,173 169,192 154,211 139,228 123,247 107,264 90,280 72,296 55,311 36,326 17,340 0,352 0,342 12,333 31,319 49,305 67,290 84,274 101,258 117,241 133,223 148,205 162,187 176,168 190,149 202,130 215,110 226,90 237,69 247,48 257,27 266,6 268,0">
          <text:p/>
        </draw:polygon>
        <draw:polygon draw:style-name="gr121" draw:text-style-name="P82" draw:layer="layout" svg:width="0.281cm" svg:height="0.355cm" svg:x="13.292cm" svg:y="4.143cm" svg:viewBox="0 0 282 356" draw:points="282,7 274,27 264,49 253,70 242,91 230,112 218,132 205,152 191,171 177,190 162,209 146,227 130,245 114,262 97,278 79,295 61,311 42,326 23,340 3,354 0,356 0,345 18,333 37,319 56,304 73,289 91,272 108,256 124,239 140,221 155,204 170,185 184,166 198,147 211,127 223,107 235,87 246,66 256,45 266,23 275,2 275,0">
          <text:p/>
        </draw:polygon>
        <draw:polygon draw:style-name="gr122" draw:text-style-name="P83" draw:layer="layout" svg:width="0.287cm" svg:height="0.358cm" svg:x="13.292cm" svg:y="4.15cm" svg:viewBox="0 0 288 359" draw:points="288,6 281,23 271,45 261,67 250,88 238,109 225,129 212,150 198,169 184,189 168,207 153,226 137,243 120,261 103,278 85,294 66,309 47,324 27,340 8,354 0,359 0,349 3,347 22,333 41,318 61,303 79,287 97,271 114,255 130,238 146,220 162,202 177,183 191,164 205,145 218,125 230,105 242,84 253,63 264,42 274,20 282,0">
          <text:p/>
        </draw:polygon>
        <draw:polygon draw:style-name="gr122" draw:text-style-name="P83" draw:layer="layout" svg:width="0.294cm" svg:height="0.362cm" svg:x="13.292cm" svg:y="4.156cm" svg:viewBox="0 0 295 363" draw:points="295,7 289,21 279,43 268,65 257,86 245,107 232,128 219,148 205,168 190,188 175,207 159,225 143,243 126,261 108,278 90,294 72,310 53,325 32,340 12,354 0,363 0,352 8,347 27,333 48,318 66,303 85,288 103,272 120,255 137,237 153,220 168,201 184,183 198,163 212,144 225,123 238,103 250,82 261,61 271,39 281,17 288,0">
          <text:p/>
        </draw:polygon>
        <draw:polygon draw:style-name="gr123" draw:text-style-name="P84" draw:layer="layout" svg:width="0.3cm" svg:height="0.365cm" svg:x="13.292cm" svg:y="4.163cm" svg:viewBox="0 0 301 366" draw:points="301,6 297,17 287,40 276,63 264,84 252,106 239,127 226,147 212,167 197,187 182,206 166,225 149,243 132,261 114,278 96,295 77,311 57,326 37,341 17,355 0,366 0,356 12,348 32,334 52,319 72,304 90,288 108,272 126,255 143,237 159,219 175,201 190,182 205,162 219,142 232,122 245,101 257,80 268,59 279,37 289,14 295,0">
          <text:p/>
        </draw:polygon>
        <draw:polygon draw:style-name="gr124" draw:text-style-name="P85" draw:layer="layout" svg:width="0.307cm" svg:height="0.369cm" svg:x="13.292cm" svg:y="4.169cm" svg:viewBox="0 0 308 370" draw:points="308,7 305,14 295,37 284,59 272,82 260,104 247,125 233,146 219,166 204,186 188,206 172,225 155,243 138,261 120,278 102,295 83,311 63,327 43,342 23,356 1,370 0,370 0,360 17,349 38,335 58,320 77,305 96,289 114,272 132,255 149,237 166,219 182,200 197,181 212,161 226,141 239,121 252,100 264,78 276,56 287,33 297,11 301,0">
          <text:p/>
        </draw:polygon>
        <draw:polygon draw:style-name="gr125" draw:text-style-name="P86" draw:layer="layout" svg:width="0.314cm" svg:height="0.372cm" svg:x="13.292cm" svg:y="4.176cm" svg:viewBox="0 0 315 373" draw:points="315,6 313,11 302,34 291,56 279,78 267,100 254,123 240,144 226,164 210,184 195,204 178,223 161,242 144,260 126,277 107,294 88,311 69,326 48,341 28,356 6,370 0,373 0,363 1,363 23,349 43,335 63,320 83,304 102,288 120,271 138,254 155,236 172,218 188,199 204,179 219,159 233,139 247,118 260,96 272,74 284,52 295,30 305,7 308,0">
          <text:p/>
        </draw:polygon>
        <draw:polygon draw:style-name="gr125" draw:text-style-name="P86" draw:layer="layout" svg:width="0.32cm" svg:height="0.376cm" svg:x="13.292cm" svg:y="4.182cm" svg:viewBox="0 0 321 377" draw:points="321,7 320,8 310,31 299,54 287,77 274,99 260,120 246,143 231,163 216,184 200,204 184,223 167,242 149,260 131,278 112,295 93,311 73,327 52,342 32,357 10,371 0,377 0,367 6,364 27,350 47,335 68,320 87,305 106,288 125,271 143,254 160,236 177,217 194,198 209,178 225,158 239,137 253,116 267,94 279,72 291,50 302,28 313,5 315,0">
          <text:p/>
        </draw:polygon>
        <draw:polygon draw:style-name="gr126" draw:text-style-name="P87" draw:layer="layout" svg:width="0.327cm" svg:height="0.379cm" svg:x="13.292cm" svg:y="4.189cm" svg:viewBox="0 0 328 380" draw:points="328,6 318,28 306,51 294,74 282,96 268,118 254,139 239,160 223,182 207,202 190,221 173,240 155,259 137,277 118,294 98,311 78,327 57,342 36,357 15,371 0,380 0,370 10,364 32,350 52,335 73,320 93,304 112,288 131,271 149,253 167,235 184,216 200,197 216,177 231,155 247,135 261,113 274,92 287,70 299,47 310,24 320,1 321,0">
          <text:p/>
        </draw:polygon>
        <draw:polygon draw:style-name="gr127" draw:text-style-name="P88" draw:layer="layout" svg:width="0.333cm" svg:height="0.383cm" svg:x="13.292cm" svg:y="4.195cm" svg:viewBox="0 0 334 384" draw:points="334,7 325,26 314,49 302,72 289,94 275,116 261,138 246,159 231,180 214,200 198,221 180,240 162,259 142,277 123,294 103,311 83,328 62,343 41,358 20,372 0,384 0,374 15,365 36,351 57,336 78,321 98,305 118,288 137,271 156,253 174,234 191,215 208,195 224,175 239,154 254,133 268,112 282,90 294,68 306,45 318,22 328,0">
          <text:p/>
        </draw:polygon>
        <draw:polygon draw:style-name="gr128" draw:text-style-name="P89" draw:layer="layout" svg:width="0.343cm" svg:height="0.391cm" svg:x="13.292cm" svg:y="4.202cm" svg:viewBox="0 0 344 392" draw:points="344,9 337,24 325,48 313,71 300,94 286,116 272,138 265,148 58,355 48,362 26,376 4,390 0,392 0,377 20,365 41,351 62,336 83,321 103,304 123,286 142,269 161,251 179,232 197,213 213,193 231,173 246,152 261,131 275,109 289,87 302,65 314,42 325,19 334,0">
          <text:p/>
        </draw:polygon>
        <draw:path draw:style-name="gr129" draw:text-style-name="P90" draw:layer="layout" svg:width="0.352cm" svg:height="0.397cm" svg:x="13.292cm" svg:y="4.211cm" svg:viewBox="0 0 353 398" svg:d="M353 10l-5 10-11 24-13 24-13 23-3 5-43 43 7-10 14-22 14-22 13-23 12-23 12-24 7-15zM15 389l-5 3-10 6v-15l4-2 22-14 22-14 10-7z">
          <text:p/>
        </draw:path>
        <draw:path draw:style-name="gr130" draw:text-style-name="P91" draw:layer="layout" svg:width="0.362cm" svg:height="0.393cm" svg:x="13.292cm" svg:y="4.221cm" svg:viewBox="0 0 363 394" svg:d="M363 10l-3 6-12 24-6 12-34 34 3-5 13-23 13-24 11-24 5-10zM0 394v-6l10-6 5-3z">
          <text:p/>
        </draw:path>
        <draw:polygon draw:style-name="gr131" draw:text-style-name="P92" draw:layer="layout" svg:width="0.031cm" svg:height="0.042cm" svg:x="13.633cm" svg:y="4.231cm" svg:viewBox="0 0 32 43" draw:points="32,9 31,11 30,13 0,43 7,30 19,6 22,0">
          <text:p/>
        </draw:polygon>
        <draw:polygon draw:style-name="gr132" draw:text-style-name="P93" draw:layer="layout" svg:width="0.003cm" svg:height="0.004cm" svg:x="13.662cm" svg:y="4.24cm" svg:viewBox="0 0 4 5" draw:points="4,1 0,5 1,3 3,0">
          <text:p/>
        </draw:polygon>
        <draw:polygon draw:style-name="gr138" draw:text-style-name="P98" draw:layer="layout" svg:width="0cm" svg:height="0.372cm" svg:x="12.869cm" svg:y="4.055cm" svg:viewBox="0 0 0 373" draw:points="0,0 0,373">
          <text:p/>
        </draw:polygon>
        <draw:polygon draw:style-name="gr220" draw:text-style-name="P2" draw:layer="layout" svg:width="0.796cm" svg:height="0.745cm" svg:x="12.869cm" svg:y="3.869cm" svg:viewBox="0 0 797 746" draw:points="0,186 424,186 424,0 797,373 424,746 424,560 0,560">
          <text:p/>
        </draw:polygon>
        <draw:polygon draw:style-name="gr61" draw:text-style-name="P22" draw:layer="layout" svg:width="0.028cm" svg:height="0.002cm" svg:x="19.126cm" svg:y="4.055cm" svg:viewBox="0 0 29 3" draw:points="0,0 29,0 24,1 18,1 13,3 6,3 0,3">
          <text:p/>
        </draw:polygon>
        <draw:polygon draw:style-name="gr61" draw:text-style-name="P22" draw:layer="layout" svg:width="0.049cm" svg:height="0.006cm" svg:x="19.126cm" svg:y="4.055cm" svg:viewBox="0 0 50 7" draw:points="50,0 49,0 43,2 37,3 31,5 25,6 19,7 13,7 6,7 0,7 0,2 6,2 13,2 18,1 24,1 29,0">
          <text:p/>
        </draw:polygon>
        <draw:polygon draw:style-name="gr62" draw:text-style-name="P23" draw:layer="layout" svg:width="0.064cm" svg:height="0.011cm" svg:x="19.126cm" svg:y="4.055cm" svg:viewBox="0 0 65 12" draw:points="65,0 62,1 56,3 50,5 44,6 37,7 31,8 24,9 18,11 12,11 6,12 0,12 0,6 6,6 12,6 18,6 24,5 30,4 36,3 43,2 49,0 50,0">
          <text:p/>
        </draw:polygon>
        <draw:polygon draw:style-name="gr63" draw:text-style-name="P24" draw:layer="layout" svg:width="0.076cm" svg:height="0.015cm" svg:x="19.126cm" svg:y="4.055cm" svg:viewBox="0 0 77 16" draw:points="77,0 75,1 69,4 62,6 56,8 50,10 44,11 37,12 31,14 25,14 19,15 12,16 6,16 0,16 0,12 6,12 12,11 18,11 24,10 31,9 37,8 43,7 49,6 55,4 61,1 65,0">
          <text:p/>
        </draw:polygon>
        <draw:polygon draw:style-name="gr63" draw:text-style-name="P24" draw:layer="layout" svg:width="0.087cm" svg:height="0.019cm" svg:x="19.126cm" svg:y="4.055cm" svg:viewBox="0 0 88 20" draw:points="88,0 82,3 76,6 70,8 64,10 58,12 52,14 46,15 39,17 33,18 26,19 20,19 14,20 6,20 0,20 0,16 6,16 13,16 20,15 26,14 32,14 38,12 45,11 51,10 57,8 63,6 69,4 75,1 77,0">
          <text:p/>
        </draw:polygon>
        <draw:polygon draw:style-name="gr63" draw:text-style-name="P24" draw:layer="layout" svg:width="0.096cm" svg:height="0.024cm" svg:x="19.126cm" svg:y="4.055cm" svg:viewBox="0 0 97 25" draw:points="97,0 96,1 90,4 84,7 78,10 72,12 66,14 59,16 53,18 46,20 40,21 34,22 27,23 19,24 13,24 6,25 0,25 0,20 6,20 13,20 19,19 25,19 33,18 39,17 46,15 52,14 58,12 64,10 70,8 76,6 82,2 88,0">
          <text:p/>
        </draw:polygon>
        <draw:polygon draw:style-name="gr64" draw:text-style-name="P25" draw:layer="layout" svg:width="0.105cm" svg:height="0.028cm" svg:x="19.126cm" svg:y="4.055cm" svg:viewBox="0 0 106 29" draw:points="106,0 104,1 98,5 92,8 86,11 80,14 73,16 67,18 60,20 54,22 47,24 41,25 33,26 27,27 20,28 13,28 6,29 0,29 0,25 6,25 13,24 19,24 26,23 33,22 40,21 46,20 53,18 59,16 66,14 72,12 78,10 84,6 90,4 96,1 97,0">
          <text:p/>
        </draw:polygon>
        <draw:polygon draw:style-name="gr64" draw:text-style-name="P25" draw:layer="layout" svg:width="0.114cm" svg:height="0.032cm" svg:x="19.126cm" svg:y="4.055cm" svg:viewBox="0 0 115 33" draw:points="115,0 112,2 106,5 100,8 94,11 87,14 80,17 74,19 67,21 61,24 54,26 47,28 41,29 34,31 27,31 20,32 13,33 7,33 0,33 0,29 6,29 13,28 20,28 27,27 33,26 40,24 46,23 53,21 59,19 66,17 72,15 79,13 86,10 92,8 98,5 104,1 106,0">
          <text:p/>
        </draw:polygon>
        <draw:polygon draw:style-name="gr64" draw:text-style-name="P25" draw:layer="layout" svg:width="0.122cm" svg:height="0.036cm" svg:x="19.126cm" svg:y="4.055cm" svg:viewBox="0 0 123 37" draw:points="123,0 120,2 114,5 108,9 102,12 96,15 88,18 82,21 75,23 69,26 62,28 55,29 48,32 41,34 35,35 28,36 21,36 14,37 7,37 0,37 0,33 7,33 13,33 20,32 27,30 34,30 41,28 47,27 54,25 61,24 67,21 74,19 80,17 86,14 94,11 100,8 106,5 112,2 115,0">
          <text:p/>
        </draw:polygon>
        <draw:polygon draw:style-name="gr65" draw:text-style-name="P26" draw:layer="layout" svg:width="0.129cm" svg:height="0.041cm" svg:x="19.126cm" svg:y="4.055cm" svg:viewBox="0 0 130 42" draw:points="130,0 128,2 122,6 116,10 110,14 104,17 97,20 91,23 84,26 78,28 71,31 64,33 57,35 50,36 43,38 36,39 28,40 21,41 14,41 7,42 0,42 0,37 7,37 14,37 21,36 28,36 36,35 42,34 49,32 56,30 63,29 70,27 76,24 83,22 89,19 96,16 102,13 108,10 114,6 120,2 123,0">
          <text:p/>
        </draw:polygon>
        <draw:polygon draw:style-name="gr66" draw:text-style-name="P27" draw:layer="layout" svg:width="0.137cm" svg:height="0.045cm" svg:x="19.126cm" svg:y="4.055cm" svg:viewBox="0 0 138 46" draw:points="138,0 137,1 131,5 125,9 117,13 111,16 105,21 98,24 92,27 85,30 78,32 71,35 64,37 57,39 50,40 43,42 36,43 29,44 21,45 14,46 7,46 0,46 0,42 7,42 14,41 21,41 28,40 35,39 42,38 49,36 56,35 63,33 70,31 77,28 83,26 90,23 96,20 103,16 109,13 115,9 121,5 128,2 130,0">
          <text:p/>
        </draw:polygon>
        <draw:polygon draw:style-name="gr66" draw:text-style-name="P27" draw:layer="layout" svg:width="0.144cm" svg:height="0.049cm" svg:x="19.126cm" svg:y="4.055cm" svg:viewBox="0 0 145 50" draw:points="145,0 139,4 133,9 127,13 121,17 114,20 108,24 101,27 93,30 86,33 79,35 72,39 65,41 58,43 51,45 44,46 37,47 29,48 22,49 14,50 7,50 0,50 0,46 7,46 14,46 21,45 29,44 36,43 43,42 50,40 57,39 64,36 71,34 78,31 85,29 92,26 99,23 106,20 112,16 118,13 125,9 131,5 137,1 138,0">
          <text:p/>
        </draw:polygon>
        <draw:polygon draw:style-name="gr67" draw:text-style-name="P28" draw:layer="layout" svg:width="0.151cm" svg:height="0.054cm" svg:x="19.126cm" svg:y="4.055cm" svg:viewBox="0 0 152 55" draw:points="152,0 148,3 142,8 136,12 129,16 122,20 115,24 109,27 102,31 95,34 88,37 81,39 74,42 67,44 59,46 52,48 45,49 37,51 30,52 22,54 15,54 7,54 0,55 0,49 7,49 14,49 22,48 29,47 37,46 44,45 51,44 58,42 65,40 72,38 79,35 86,33 93,30 100,27 107,24 113,20 120,17 126,13 133,9 139,4 145,0">
          <text:p/>
        </draw:polygon>
        <draw:polygon draw:style-name="gr68" draw:text-style-name="P29" draw:layer="layout" svg:width="0.157cm" svg:height="0.058cm" svg:x="19.126cm" svg:y="4.055cm" svg:viewBox="0 0 158 59" draw:points="158,0 156,2 150,7 144,11 138,16 132,20 125,25 118,29 112,32 104,36 97,39 90,42 82,44 75,47 68,49 60,51 53,53 45,55 38,56 30,57 23,58 15,58 7,59 0,59 0,55 7,54 15,54 22,54 30,53 37,52 45,50 52,49 59,47 67,45 74,43 81,40 88,38 95,35 102,32 110,28 116,25 123,20 129,16 136,12 142,8 148,3 152,0">
          <text:p/>
        </draw:polygon>
        <draw:polygon draw:style-name="gr68" draw:text-style-name="P29" draw:layer="layout" svg:width="0.164cm" svg:height="0.062cm" svg:x="19.126cm" svg:y="4.055cm" svg:viewBox="0 0 165 63" draw:points="165,0 159,5 153,11 147,16 139,20 133,24 126,29 119,32 112,36 105,40 98,43 91,46 84,48 76,51 69,53 61,55 54,57 46,59 39,60 31,61 23,62 15,63 8,63 0,63 0,59 7,59 15,58 23,58 30,57 38,56 45,55 53,53 60,51 68,49 75,47 82,44 90,42 97,39 104,36 111,32 117,29 124,25 131,21 137,17 143,12 150,8 156,2 158,0">
          <text:p/>
        </draw:polygon>
        <draw:polygon draw:style-name="gr69" draw:text-style-name="P30" draw:layer="layout" svg:width="0.17cm" svg:height="0.066cm" svg:x="19.126cm" svg:y="4.055cm" svg:viewBox="0 0 171 67" draw:points="171,0 167,3 161,9 155,14 148,19 142,24 135,28 128,32 121,36 114,40 107,43 100,47 93,50 85,53 78,55 70,57 63,60 55,61 47,63 39,64 31,65 23,66 16,67 8,67 0,67 0,63 8,63 15,63 23,62 31,61 39,60 46,59 54,57 61,55 69,53 76,51 84,48 91,46 98,43 105,40 112,36 119,32 126,29 133,24 139,20 146,16 152,11 158,6 164,0">
          <text:p/>
        </draw:polygon>
        <draw:polygon draw:style-name="gr70" draw:text-style-name="P31" draw:layer="layout" svg:width="0.177cm" svg:height="0.071cm" svg:x="19.126cm" svg:y="4.055cm" svg:viewBox="0 0 178 72" draw:points="178,0 177,1 171,7 164,12 158,17 152,22 144,26 137,31 131,35 123,39 116,44 109,47 102,51 94,54 87,57 79,59 71,62 64,64 56,66 48,67 40,69 32,70 24,71 16,71 8,72 0,72 0,67 8,67 16,67 23,66 31,65 39,64 47,63 55,61 63,60 70,57 78,55 85,53 93,50 100,47 107,43 114,39 121,35 128,31 135,27 142,23 149,18 156,13 162,8 168,3 171,0">
          <text:p/>
        </draw:polygon>
        <draw:polygon draw:style-name="gr71" draw:text-style-name="P32" draw:layer="layout" svg:width="0.183cm" svg:height="0.075cm" svg:x="19.126cm" svg:y="4.055cm" svg:viewBox="0 0 184 76" draw:points="184,0 179,4 172,10 166,15 160,20 153,25 147,30 140,34 133,39 126,43 118,47 111,50 103,55 96,58 88,61 80,63 73,66 65,68 57,70 49,71 41,73 32,74 24,75 16,76 8,76 0,76 0,72 8,72 16,71 24,71 32,70 40,69 48,67 56,66 64,64 71,62 79,59 87,57 94,54 102,50 109,46 116,43 123,39 131,35 137,31 144,26 151,22 157,17 163,12 170,7 176,1 177,0">
          <text:p/>
        </draw:polygon>
        <draw:polygon draw:style-name="gr72" draw:text-style-name="P33" draw:layer="layout" svg:width="0.189cm" svg:height="0.079cm" svg:x="19.126cm" svg:y="4.055cm" svg:viewBox="0 0 190 80" draw:points="190,0 188,2 182,7 176,13 170,19 163,25 157,30 150,34 143,39 136,43 129,47 121,51 114,55 106,58 98,62 91,65 83,67 75,70 67,72 59,74 49,76 41,77 33,78 25,79 16,80 8,80 0,80 0,76 8,76 16,76 24,75 32,74 41,73 49,71 57,70 66,68 74,66 81,63 89,61 97,58 104,55 112,51 119,48 127,44 134,40 141,35 148,31 154,26 161,21 167,16 173,10 180,4 184,0">
          <text:p/>
        </draw:polygon>
        <draw:polygon draw:style-name="gr73" draw:text-style-name="P34" draw:layer="layout" svg:width="0.195cm" svg:height="0.084cm" svg:x="19.126cm" svg:y="4.055cm" svg:viewBox="0 0 196 85" draw:points="196,0 191,5 185,10 179,16 173,22 166,27 159,32 152,37 145,42 138,46 131,50 123,55 116,59 108,62 100,66 92,69 84,71 75,74 67,76 59,78 50,80 42,81 34,82 25,83 17,84 8,84 0,85 0,80 8,80 16,80 25,79 33,78 41,77 49,76 58,74 66,72 74,70 83,67 91,65 98,62 106,58 114,55 121,50 129,46 136,42 143,38 150,33 157,29 163,24 170,18 176,13 182,7 188,2 190,0">
          <text:p/>
        </draw:polygon>
        <draw:polygon draw:style-name="gr73" draw:text-style-name="P34" draw:layer="layout" svg:width="0.201cm" svg:height="0.088cm" svg:x="19.126cm" svg:y="4.055cm" svg:viewBox="0 0 202 89" draw:points="202,0 201,1 195,8 188,14 182,19 175,25 169,30 162,36 155,40 148,45 140,50 133,54 125,58 117,62 110,65 102,69 94,72 85,74 77,77 68,80 59,82 51,84 43,85 34,87 25,88 17,88 8,89 0,89 0,85 8,84 17,84 25,83 34,82 42,81 50,80 59,77 67,75 76,73 84,70 92,68 100,65 108,61 116,58 123,54 131,50 138,46 145,42 152,37 159,32 166,27 173,22 179,16 185,10 191,5 196,0">
          <text:p/>
        </draw:polygon>
        <draw:polygon draw:style-name="gr74" draw:text-style-name="P35" draw:layer="layout" svg:width="0.207cm" svg:height="0.092cm" svg:x="19.126cm" svg:y="4.055cm" svg:viewBox="0 0 208 93" draw:points="208,0 204,4 198,11 191,17 185,23 178,28 171,34 164,40 157,45 150,50 142,54 134,59 126,63 118,67 110,70 102,74 94,77 86,80 77,82 69,84 60,86 52,88 43,90 35,91 26,92 17,93 8,93 0,93 0,89 8,89 17,88 25,88 34,87 43,85 51,84 59,82 68,80 76,78 84,75 93,73 101,70 109,66 116,63 124,59 132,55 140,51 148,46 155,41 162,36 169,30 175,25 182,19 188,14 195,8 201,1 202,0">
          <text:p/>
        </draw:polygon>
        <draw:polygon draw:style-name="gr75" draw:text-style-name="P36" draw:layer="layout" svg:width="0.218cm" svg:height="0.101cm" svg:x="19.126cm" svg:y="4.055cm" svg:viewBox="0 0 219 102" draw:points="219,0 216,4 210,10 204,17 197,23 190,29 184,35 177,40 169,46 161,51 153,56 146,61 138,65 130,69 122,73 114,77 105,81 97,84 88,87 80,89 71,92 62,94 53,97 45,98 36,99 27,100 18,101 9,102 0,102 0,92 8,92 17,92 26,91 35,90 43,89 52,87 60,85 69,83 77,81 86,79 94,76 102,73 110,69 118,66 126,62 134,58 141,53 149,49 156,44 163,39 171,34 178,28 185,23 191,17 198,11 204,4 208,0">
          <text:p/>
        </draw:polygon>
        <draw:polygon draw:style-name="gr76" draw:text-style-name="P37" draw:layer="layout" svg:width="0.229cm" svg:height="0.109cm" svg:x="19.126cm" svg:y="4.055cm" svg:viewBox="0 0 230 110" draw:points="230,0 228,2 221,9 215,16 209,23 202,29 195,36 188,42 181,48 173,54 166,59 158,64 150,69 142,74 134,78 126,82 117,86 108,90 100,93 91,96 82,99 73,101 64,103 55,105 46,107 37,108 28,109 18,110 9,110 0,110 0,102 9,102 18,101 27,100 36,99 45,98 53,97 62,95 71,93 80,90 88,88 97,85 105,82 114,78 122,74 130,70 138,66 146,62 153,57 161,52 168,47 176,41 183,36 189,29 196,23 203,17 209,10 215,4 218,0">
          <text:p/>
        </draw:polygon>
        <draw:polygon draw:style-name="gr77" draw:text-style-name="P38" draw:layer="layout" svg:width="0.24cm" svg:height="0.118cm" svg:x="19.126cm" svg:y="4.055cm" svg:viewBox="0 0 241 119" draw:points="241,0 235,8 229,15 222,22 216,29 209,35 202,42 195,48 186,54 178,60 171,65 163,71 154,75 146,80 138,85 129,89 120,93 112,96 103,101 94,104 85,107 75,109 66,112 57,113 47,115 38,116 28,117 19,118 9,119 0,119 0,110 9,110 18,110 28,109 37,108 46,107 55,105 64,103 73,101 82,98 91,95 100,92 108,89 117,85 126,81 134,77 142,73 150,68 158,63 166,58 173,53 181,47 188,41 196,35 203,29 210,23 216,16 222,9 228,2 230,0">
          <text:p/>
        </draw:polygon>
        <draw:polygon draw:style-name="gr77" draw:text-style-name="P38" draw:layer="layout" svg:width="0.251cm" svg:height="0.126cm" svg:x="19.126cm" svg:y="4.055cm" svg:viewBox="0 0 252 127" draw:points="252,0 248,5 242,13 235,21 229,28 222,35 215,43 207,49 200,56 192,62 184,68 176,73 168,79 160,84 151,89 143,93 134,98 125,102 116,105 107,109 97,112 88,115 78,118 68,120 58,122 49,124 39,125 29,126 19,127 10,127 0,127 0,119 9,119 19,118 28,117 38,116 47,115 57,113 66,112 75,109 86,107 95,104 104,101 113,97 121,94 130,90 139,86 147,81 155,76 164,72 172,66 179,61 187,55 195,49 202,43 209,35 216,29 222,22 229,15 235,8 241,0">
          <text:p/>
        </draw:polygon>
        <draw:polygon draw:style-name="gr78" draw:text-style-name="P39" draw:layer="layout" svg:width="0.261cm" svg:height="0.135cm" svg:x="19.126cm" svg:y="4.055cm" svg:viewBox="0 0 262 136" draw:points="262,0 261,3 255,11 248,19 242,26 235,35 228,42 221,49 213,56 205,62 198,69 190,75 181,80 173,86 164,91 155,96 147,101 137,105 128,110 119,113 110,117 100,120 90,123 81,126 71,128 61,130 50,132 40,133 30,135 20,135 10,136 0,136 0,127 10,127 19,127 29,126 39,125 49,124 59,122 69,120 78,118 88,115 97,112 107,109 116,105 125,102 134,98 143,93 151,89 160,84 168,79 176,73 184,68 192,62 200,56 207,49 215,43 222,36 229,28 235,21 242,13 248,5 252,0">
          <text:p/>
        </draw:polygon>
        <draw:polygon draw:style-name="gr79" draw:text-style-name="P40" draw:layer="layout" svg:width="0.272cm" svg:height="0.144cm" svg:x="19.126cm" svg:y="4.055cm" svg:viewBox="0 0 273 145" draw:points="273,0 267,8 261,16 255,25 248,33 241,41 234,48 226,55 219,62 211,69 203,75 195,82 186,88 177,93 169,99 160,104 150,109 141,113 132,117 122,121 112,125 103,128 93,131 83,134 73,137 62,139 52,140 41,142 31,143 20,144 10,144 0,145 0,136 10,136 20,135 30,135 40,133 51,132 61,130 71,128 81,126 90,123 100,120 110,117 119,113 128,110 137,105 147,101 155,96 164,91 173,86 181,80 190,75 198,69 205,62 213,56 221,49 228,42 235,35 242,27 248,19 255,11 261,3 262,0">
          <text:p/>
        </draw:polygon>
        <draw:polygon draw:style-name="gr79" draw:text-style-name="P40" draw:layer="layout" svg:width="0.282cm" svg:height="0.152cm" svg:x="19.126cm" svg:y="4.055cm" svg:viewBox="0 0 283 153" draw:points="283,0 281,4 274,13 268,21 261,29 254,38 247,45 240,53 232,60 224,68 216,74 208,81 200,87 190,94 181,99 172,105 163,110 153,115 144,120 134,124 124,129 114,133 104,137 94,140 84,142 74,145 63,147 53,149 42,150 32,152 21,152 10,153 0,153 0,145 10,144 20,144 31,143 41,142 51,140 61,139 72,137 82,134 92,131 102,128 111,124 121,120 131,116 140,112 149,108 159,103 168,98 176,92 185,87 195,81 203,74 211,68 219,61 226,54 234,47 241,40 248,32 255,24 261,16 267,8 273,0">
          <text:p/>
        </draw:polygon>
        <draw:polygon draw:style-name="gr80" draw:text-style-name="P41" draw:layer="layout" svg:width="0.292cm" svg:height="0.161cm" svg:x="19.126cm" svg:y="4.055cm" svg:viewBox="0 0 293 162" draw:points="293,0 288,9 281,18 275,27 268,36 261,44 254,52 246,60 238,68 230,75 222,82 213,89 205,95 196,102 187,108 177,113 168,119 158,124 148,129 138,133 128,137 118,141 108,145 97,148 87,151 76,153 66,156 55,157 44,159 33,160 22,161 12,162 0,162 0,153 11,153 22,152 33,152 43,150 54,149 64,147 75,145 85,142 95,140 105,137 115,133 125,129 135,125 145,121 154,116 164,111 173,106 182,100 191,95 200,88 208,82 216,75 224,69 232,61 240,54 247,46 254,39 261,30 268,21 274,13 281,4 283,0">
          <text:p/>
        </draw:polygon>
        <draw:polygon draw:style-name="gr81" draw:text-style-name="P42" draw:layer="layout" svg:width="0.302cm" svg:height="0.169cm" svg:x="19.126cm" svg:y="4.055cm" svg:viewBox="0 0 303 170" draw:points="303,0 301,4 295,14 288,23 282,32 275,40 267,49 260,57 252,65 244,73 236,80 227,89 219,96 210,102 201,109 191,115 182,121 172,126 162,131 152,136 142,141 132,145 121,149 111,153 100,156 89,159 78,162 67,164 56,166 44,167 33,169 22,170 11,170 0,170 0,162 11,162 21,161 32,160 43,159 55,157 66,156 76,153 87,151 97,148 108,145 118,141 128,137 138,133 148,129 158,124 168,119 177,113 187,108 196,102 205,95 213,89 222,81 230,74 238,67 246,59 254,51 261,43 268,35 275,26 281,18 288,9 293,0">
          <text:p/>
        </draw:polygon>
        <draw:polygon draw:style-name="gr82" draw:text-style-name="P43" draw:layer="layout" svg:width="0.312cm" svg:height="0.178cm" svg:x="19.126cm" svg:y="4.055cm" svg:viewBox="0 0 313 179" draw:points="313,0 308,9 302,18 295,28 288,37 281,46 274,55 266,63 258,71 250,79 241,87 233,94 224,101 215,109 205,116 196,122 186,128 176,134 166,139 156,144 145,149 135,153 124,157 113,161 102,164 91,167 80,170 69,172 57,174 45,176 34,177 23,178 11,179 0,179 0,170 11,170 22,170 33,169 44,167 55,166 67,164 78,162 89,159 100,156 111,153 121,149 132,145 142,141 152,136 162,131 172,126 182,121 191,115 201,109 210,101 219,95 227,88 236,80 244,73 252,65 260,57 267,49 275,40 282,32 288,23 295,14 301,4 303,0">
          <text:p/>
        </draw:polygon>
        <draw:polygon draw:style-name="gr83" draw:text-style-name="P44" draw:layer="layout" svg:width="0.322cm" svg:height="0.186cm" svg:x="19.126cm" svg:y="4.055cm" svg:viewBox="0 0 323 187" draw:points="323,0 321,3 315,13 309,23 302,33 295,42 288,51 280,60 272,69 264,77 256,85 247,93 238,101 229,108 220,115 210,122 200,128 190,135 180,141 170,147 159,152 149,157 138,161 127,165 116,169 105,173 93,176 82,178 71,181 59,183 47,184 36,186 23,187 11,187 0,187 0,179 11,179 23,178 35,177 46,176 58,174 69,172 80,170 91,167 102,164 113,161 124,157 135,153 145,149 156,144 166,139 176,134 186,127 196,121 205,115 215,108 224,101 233,94 241,87 250,79 258,71 266,63 274,55 281,46 288,37 295,28 302,18 308,9 313,0">
          <text:p/>
        </draw:polygon>
        <draw:polygon draw:style-name="gr84" draw:text-style-name="P45" draw:layer="layout" svg:width="0.332cm" svg:height="0.195cm" svg:x="19.126cm" svg:y="4.055cm" svg:viewBox="0 0 333 196" draw:points="333,0 329,8 323,18 316,28 309,38 302,47 293,57 286,66 278,75 269,83 261,92 252,100 243,107 233,115 224,123 214,130 204,137 194,143 183,149 173,154 162,160 151,165 140,169 129,173 117,177 106,181 94,184 83,187 71,189 59,191 47,193 36,194 24,195 12,196 0,196 0,187 11,187 23,187 35,186 46,184 58,183 70,181 81,178 92,176 104,173 115,169 126,165 137,161 148,157 158,152 169,147 179,141 189,135 199,129 209,123 219,115 228,108 237,101 246,93 255,85 263,77 271,69 279,60 287,51 294,42 302,33 309,23 315,13 321,3 323,0">
          <text:p/>
        </draw:polygon>
        <draw:polygon draw:style-name="gr85" draw:text-style-name="P46" draw:layer="layout" svg:width="0.342cm" svg:height="0.204cm" svg:x="19.126cm" svg:y="4.055cm" svg:viewBox="0 0 343 205" draw:points="343,0 342,2 336,12 330,23 323,33 316,43 309,53 301,62 293,72 285,81 276,89 267,98 258,106 249,115 240,123 230,130 220,137 210,144 199,150 187,156 177,162 166,167 154,172 143,177 132,181 120,185 108,189 97,192 85,195 73,198 61,200 49,201 36,203 24,204 12,204 0,205 0,196 12,196 24,195 36,194 47,193 59,191 71,189 83,187 94,184 106,181 117,177 129,173 140,169 151,165 162,160 173,154 183,149 194,143 205,137 215,130 225,123 234,116 244,108 253,100 262,92 270,83 279,75 287,66 294,57 302,47 309,38 316,28 323,18 329,8 333,0">
          <text:p/>
        </draw:polygon>
        <draw:polygon draw:style-name="gr86" draw:text-style-name="P47" draw:layer="layout" svg:width="0.352cm" svg:height="0.212cm" svg:x="19.126cm" svg:y="4.055cm" svg:viewBox="0 0 353 213" draw:points="353,0 350,6 344,17 337,27 330,38 323,48 315,58 308,68 299,77 291,87 282,96 273,105 264,114 255,122 245,129 235,137 225,144 214,151 203,158 193,164 182,170 170,175 159,180 147,185 136,190 124,194 112,197 100,201 88,203 75,206 63,208 50,210 37,211 25,212 12,213 0,213 0,205 12,204 24,204 36,203 49,201 62,200 74,198 86,195 98,192 109,189 121,185 133,181 144,177 155,172 167,167 178,162 188,156 199,150 210,144 220,137 230,130 240,123 249,115 258,107 267,99 276,90 285,82 293,72 301,62 309,53 316,43 323,33 330,23 336,12 342,2 343,0">
          <text:p/>
        </draw:polygon>
        <draw:polygon draw:style-name="gr87" draw:text-style-name="P48" draw:layer="layout" svg:width="0.361cm" svg:height="0.221cm" svg:x="19.126cm" svg:y="4.055cm" svg:viewBox="0 0 362 222" draw:points="362,0 357,10 351,22 344,33 337,43 330,54 322,64 314,74 306,84 297,93 288,102 279,111 270,120 260,128 250,136 240,144 229,151 219,158 208,165 197,171 184,177 173,183 161,188 149,193 138,198 125,202 113,205 101,209 88,212 76,214 63,217 51,218 38,220 25,221 12,221 0,222 0,213 12,213 25,212 37,211 50,210 62,208 74,206 87,203 99,201 111,197 123,194 135,190 146,185 158,180 169,175 181,170 193,164 203,158 214,151 225,144 235,137 245,129 255,122 264,114 273,105 282,96 291,87 299,78 308,69 315,59 323,49 330,39 337,28 344,18 350,6 353,0">
          <text:p/>
        </draw:polygon>
        <draw:polygon draw:style-name="gr87" draw:text-style-name="P48" draw:layer="layout" svg:width="0.371cm" svg:height="0.229cm" svg:x="19.126cm" svg:y="4.055cm" svg:viewBox="0 0 372 230" draw:points="372,0 371,2 365,14 358,25 350,36 343,47 336,58 328,68 320,79 311,88 303,98 293,108 284,117 274,125 265,134 254,142 244,150 233,157 222,165 211,171 200,178 188,185 177,191 165,196 153,201 140,206 128,210 116,214 103,217 90,220 78,223 65,225 52,227 39,228 26,229 13,230 0,230 0,222 12,221 25,221 38,220 51,218 63,217 76,214 88,212 101,209 113,205 125,202 138,198 149,193 161,188 173,183 184,176 196,170 207,164 218,157 228,150 239,143 249,135 259,127 269,119 278,110 287,101 296,92 305,83 313,73 321,63 329,53 336,42 343,32 350,21 357,10 362,0">
          <text:p/>
        </draw:polygon>
        <draw:polygon draw:style-name="gr88" draw:text-style-name="P49" draw:layer="layout" svg:width="0.381cm" svg:height="0.238cm" svg:x="19.126cm" svg:y="4.055cm" svg:viewBox="0 0 382 239" draw:points="382,0 378,6 372,18 366,30 359,41 351,52 344,63 336,74 327,84 319,95 310,105 301,115 291,124 281,133 271,141 261,150 250,158 239,165 228,173 217,180 205,186 193,193 181,198 169,204 157,209 144,214 132,218 119,222 106,225 93,229 80,231 67,234 53,235 40,237 26,238 13,239 0,239 0,230 13,230 26,229 39,228 52,227 66,225 79,223 91,220 104,217 117,214 129,210 141,206 154,201 166,196 178,191 189,185 201,179 212,172 223,166 234,158 245,151 255,143 266,135 275,126 285,118 294,109 304,99 312,88 321,79 329,68 337,58 344,47 351,36 358,25 365,14 371,2 372,0">
          <text:p/>
        </draw:polygon>
        <draw:path draw:style-name="gr89" draw:text-style-name="P50" draw:layer="layout" svg:width="0.432cm" svg:height="0.432cm" svg:x="19.126cm" svg:y="3.869cm" svg:viewBox="0 0 433 433" svg:d="M391 186l-5 10-6 12-7 12-7 12-8 12-7 11-9 11-8 10-9 11-9 10-9 10-10 9-10 9-11 9-10 9-11 8-11 8-12 7-11 7-12 7-12 6-12 6-13 6-12 5-13 5-13 4-13 4-13 4-14 3-13 3-14 2-13 2-14 1-13 1-14 1h-13v-8h13l13-1 14-1 13-2 13-1 13-3 13-2 14-4 13-3 13-4 12-4 13-5 12-5 12-6 12-5 12-7 12-6 11-7 11-8 11-7 11-8 10-9 10-8 10-9 10-9 9-10 9-10 8-10 9-10 8-11 7-11 8-12 7-11 6-12 6-12 4-6zM433 0v1 12 12z">
          <text:p/>
        </draw:path>
        <draw:path draw:style-name="gr89" draw:text-style-name="P50" draw:layer="layout" svg:width="0.441cm" svg:height="0.44cm" svg:x="19.126cm" svg:y="3.87cm" svg:viewBox="0 0 442 441" svg:d="M401 185l-1 2-6 12-7 12-7 12-7 12-7 12-8 11-9 11-8 11-9 10-10 11-9 11-10 9-11 10-10 9-11 8-11 9-11 8-12 7-12 7-12 7-12 7-12 6-13 6-13 5-13 5-13 4-13 4-14 4-13 3-14 3-13 2-14 2-14 2-14 1-13 1h-15v-9h13l15-1 13-1 14-1 13-2 14-2 13-3 13-3 13-4 13-4 13-4 13-5 12-5 13-6 12-6 12-6 12-7 11-7 12-7 11-8 11-8 10-9 11-9 10-9 10-10 9-10 9-10 9-11 8-10 9-11 7-11 8-11 7-12 7-12 6-12 5-10zM433 24v-12-12l9 8v5l-1 13-1 14-2 14-2 14-2 13-1 8z">
          <text:p/>
        </draw:path>
        <draw:path draw:style-name="gr90" draw:text-style-name="P51" draw:layer="layout" svg:width="0.449cm" svg:height="0.44cm" svg:x="19.126cm" svg:y="3.878cm" svg:viewBox="0 0 450 441" svg:d="M410 177l-2 5-8 13-6 12-7 13-8 12-7 12-8 11-9 11-9 11-9 11-9 11-10 11-10 10-11 9-11 9-11 9-11 9-12 8-11 7-12 8-13 7-12 6-13 7-13 5-13 6-13 5-13 4-14 5-13 3-14 4-14 2-14 3-14 2-14 1-14 2h-14-14v-8h14l13-1 14-1 14-2 14-2 13-2 14-3 13-3 14-4 13-4 13-4 13-5 13-5 13-6 12-6 12-7 12-7 12-7 12-7 11-8 11-9 11-8 10-9 11-10 10-9 9-11 10-11 9-10 8-11 9-11 8-11 7-12 7-12 7-12 7-12 6-12 1-2zM433 81l1-8 2-13 2-14 2-14 1-14 1-13v-5l8 8v11l-2 14-1 14-2 14-3 14-2 14-4 14-3 13z">
          <text:p/>
        </draw:path>
        <draw:path draw:style-name="gr91" draw:text-style-name="P52" draw:layer="layout" svg:width="0.457cm" svg:height="0.441cm" svg:x="19.126cm" svg:y="3.886cm" svg:viewBox="0 0 458 442" svg:d="M419 169l-4 9-6 13-7 13-7 12-7 12-8 12-9 12-8 12-9 11-10 11-9 11-10 11-11 10-10 10-12 9-11 9-12 9-12 8-12 8-12 7-13 7-12 7-13 6-13 6-14 6-13 5-14 5-13 4-14 4-14 3-14 3-15 2-14 2-14 2-15 1-14 1h-14v-9h14 14l14-2 14-1 14-2 14-3 14-2 14-4 13-3 14-5 13-4 13-5 13-6 13-5 13-7 12-6 13-7 12-8 11-7 12-8 11-9 11-9 12-9 11-9 10-10 10-11 9-11 9-11 9-11 9-11 8-11 7-12 8-12 7-13 6-12 7-13 2-5zM433 108l3-13 4-14 2-14 3-14 2-14 1-14 2-14v-11l8 8v4l-1 14-2 14-2 14-2 15-3 14-3 14-4 14-4 13-4 12z">
          <text:p/>
        </draw:path>
        <draw:path draw:style-name="gr92" draw:text-style-name="P53" draw:layer="layout" svg:width="0.465cm" svg:height="0.442cm" svg:x="19.126cm" svg:y="3.894cm" svg:viewBox="0 0 466 443" svg:d="M429 161l-6 13-6 13-7 13-7 12-8 13-8 12-9 12-8 12-10 11-9 11-10 11-10 12-11 10-11 10-11 9-11 10-12 8-12 9-12 8-13 8-12 7-13 7-14 6-13 6-13 6-15 5-14 5-14 4-14 4-14 3-15 3-14 3-15 2-14 2-15 1h-15l-14 1v-9h14l14-1 15-1 14-2 14-2 15-2 14-3 14-3 14-4 13-4 14-5 13-5 15-6 13-6 13-6 12-7 13-7 12-7 12-8 12-8 12-9 11-9 11-9 10-10 11-10 10-12 9-10 10-11 9-11 8-12 9-12 8-12 7-12 7-12 7-13 6-13 4-9zM433 128l4-12 4-13 4-14 3-14 3-14 2-15 2-14 2-14 1-14v-4l8 9-1 10-1 14-2 15-3 14-3 15-3 14-4 14-4 14-5 14-5 14-2 5z">
          <text:p/>
        </draw:path>
        <draw:polygon draw:style-name="gr93" draw:text-style-name="P54" draw:layer="layout" svg:width="0.473cm" svg:height="0.441cm" svg:x="19.126cm" svg:y="3.903cm" svg:viewBox="0 0 474 442" draw:points="433,152 433,143 435,138 440,124 445,110 449,96 453,82 456,68 459,53 462,39 464,24 465,10 466,0 474,7 474,11 472,25 470,40 468,55 465,69 461,84 457,98 453,113 448,127 443,141 437,155 431,168 424,182 417,195 410,208 402,220 394,233 385,245 376,257 367,269 357,280 347,292 337,303 326,313 315,323 304,333 292,342 280,351 268,360 255,368 243,376 230,383 217,390 203,397 190,403 176,409 162,414 148,419 133,423 119,427 104,431 90,434 75,436 60,438 45,440 30,441 15,442 0,442 0,434 14,433 29,433 45,432 59,430 74,428 88,425 103,422 117,419 131,415 145,411 159,406 173,401 186,395 199,389 213,383 226,376 238,369 251,361 263,353 275,344 287,336 298,326 309,317 320,307 331,297 341,285 351,274 360,263 370,252 378,240 387,228 395,216 403,203 410,191 417,178 423,165 429,152">
          <text:p/>
        </draw:polygon>
        <draw:polygon draw:style-name="gr94" draw:text-style-name="P55" draw:layer="layout" svg:width="0.481cm" svg:height="0.443cm" svg:x="19.126cm" svg:y="3.91cm" svg:viewBox="0 0 482 444" draw:points="482,8 481,19 479,34 476,49 473,64 469,79 465,94 461,108 456,123 451,137 445,151 439,165 432,178 425,192 417,205 409,218 401,231 392,243 383,255 374,267 364,279 352,291 342,302 331,313 320,323 308,333 296,342 284,351 272,360 259,368 246,376 233,384 219,391 206,398 192,404 178,410 164,415 149,420 135,425 120,429 105,432 90,435 75,438 60,440 45,442 30,443 15,443 0,444 0,435 15,435 30,434 44,433 59,431 74,429 89,427 103,424 118,420 132,416 147,412 161,407 175,402 189,396 202,390 216,383 229,376 242,369 254,361 267,353 279,344 291,335 303,326 314,316 325,306 336,296 346,284 357,273 367,262 376,250 385,238 394,226 402,213 410,201 417,188 424,175 431,161 437,148 443,134 448,120 453,106 457,91 461,77 465,62 468,48 470,33 472,18 474,4 474,0">
          <text:p/>
        </draw:polygon>
        <draw:polygon draw:style-name="gr95" draw:text-style-name="P56" draw:layer="layout" svg:width="0.489cm" svg:height="0.443cm" svg:x="19.126cm" svg:y="3.918cm" svg:viewBox="0 0 490 444" draw:points="490,8 489,12 487,28 484,43 481,58 478,73 474,88 469,103 464,118 459,132 453,146 446,160 440,174 432,188 425,201 417,215 408,228 399,240 390,253 380,265 370,276 360,289 349,300 338,311 326,321 315,331 303,341 290,350 278,359 265,368 251,376 238,383 224,391 210,397 196,404 181,410 167,415 152,420 137,425 122,429 107,432 92,436 77,438 61,440 46,442 31,443 15,444 0,444 0,436 15,435 30,435 45,434 60,432 75,430 90,427 105,424 120,421 135,417 149,412 164,407 178,402 193,396 207,390 220,383 234,376 247,368 260,360 273,352 285,343 297,334 309,325 321,315 332,305 343,294 353,283 364,271 374,259 383,247 392,235 401,223 409,210 417,197 425,184 432,170 439,157 445,143 451,129 456,115 461,100 465,86 469,71 473,56 476,41 479,26 481,11 482,0">
          <text:p/>
        </draw:polygon>
        <draw:polygon draw:style-name="gr96" draw:text-style-name="P57" draw:layer="layout" svg:width="0.497cm" svg:height="0.444cm" svg:x="19.126cm" svg:y="3.926cm" svg:viewBox="0 0 498 445" draw:points="498,8 496,21 493,37 490,52 486,67 482,83 477,98 472,113 467,127 460,142 453,156 446,170 439,184 431,198 423,211 414,224 405,237 396,250 386,262 376,274 365,287 354,298 343,309 331,320 319,330 307,340 294,349 281,358 268,367 255,375 241,383 227,390 213,397 199,404 184,410 169,415 155,420 139,425 124,429 109,433 94,436 78,439 63,441 47,443 31,444 15,445 0,445 0,436 15,436 31,435 46,434 61,432 77,430 92,428 107,424 122,421 137,417 152,412 167,407 181,402 195,396 209,389 223,383 237,375 250,368 264,360 277,351 289,342 302,333 314,323 325,313 337,303 348,292 359,280 369,268 379,257 389,245 398,232 407,220 416,207 424,193 431,180 439,166 445,152 452,138 458,124 463,110 469,95 474,80 478,65 481,50 484,35 487,20 489,4 490,0">
          <text:p/>
        </draw:polygon>
        <draw:polygon draw:style-name="gr97" draw:text-style-name="P58" draw:layer="layout" svg:width="0.504cm" svg:height="0.444cm" svg:x="19.126cm" svg:y="3.934cm" svg:viewBox="0 0 505 445" draw:points="505,7 504,14 501,30 498,46 494,62 490,77 485,92 480,107 475,122 468,137 462,152 455,166 447,180 439,194 431,208 422,221 413,234 403,247 393,260 383,272 372,285 361,296 350,307 338,318 326,328 313,338 300,348 287,357 273,366 259,374 245,382 231,390 217,397 202,404 187,410 172,415 157,420 142,425 126,429 111,433 95,436 79,439 64,441 48,443 32,444 16,445 0,445 0,437 15,437 31,436 47,435 63,433 78,431 94,428 109,425 124,421 139,417 155,412 169,407 184,402 199,396 213,389 227,382 241,375 255,367 268,359 282,350 295,341 308,332 320,322 332,312 344,301 355,290 366,278 377,266 387,254 397,242 406,229 415,216 424,203 432,190 440,176 447,162 454,148 461,134 467,119 472,105 477,90 482,75 486,59 490,44 493,29 496,13 498,0">
          <text:p/>
        </draw:polygon>
        <draw:polygon draw:style-name="gr98" draw:text-style-name="P59" draw:layer="layout" svg:width="0.512cm" svg:height="0.446cm" svg:x="19.126cm" svg:y="3.941cm" svg:viewBox="0 0 513 447" draw:points="513,8 513,9 510,25 506,41 503,57 498,72 494,88 488,103 483,119 476,134 470,148 462,163 455,177 447,192 438,205 429,219 420,232 410,245 400,258 389,270 378,283 367,295 355,307 343,317 331,328 318,338 305,348 292,357 278,366 264,375 250,383 236,391 221,398 207,404 191,411 176,416 161,422 145,426 130,431 114,435 98,438 82,441 66,443 49,445 32,446 16,447 0,447 0,438 16,438 32,437 49,436 65,434 80,432 96,429 112,426 127,422 143,418 158,413 173,408 188,403 203,397 218,390 232,383 246,375 260,367 274,359 287,350 300,341 313,331 326,321 338,311 350,300 361,289 372,277 383,265 393,253 403,240 413,227 422,214 431,201 439,187 447,173 455,159 462,145 468,130 475,115 480,100 485,85 490,70 494,55 498,39 501,23 504,7 505,0">
          <text:p/>
        </draw:polygon>
        <draw:polygon draw:style-name="gr99" draw:text-style-name="P60" draw:layer="layout" svg:width="0.519cm" svg:height="0.447cm" svg:x="19.126cm" svg:y="3.949cm" svg:viewBox="0 0 520 448" draw:points="520,7 518,18 515,35 511,51 507,67 502,83 496,98 490,114 484,129 477,144 470,159 462,174 454,188 445,202 436,216 427,229 417,243 407,256 396,268 385,280 373,293 361,305 349,316 335,327 323,337 309,347 296,356 282,366 268,374 253,382 239,390 224,397 209,404 194,411 178,416 162,422 147,427 131,431 115,435 98,438 82,441 66,443 49,445 33,447 16,447 0,448 0,439 16,439 32,438 48,437 65,435 81,433 97,430 113,427 129,423 144,418 160,414 175,408 190,403 206,396 220,390 235,383 249,375 263,367 277,358 291,349 304,340 317,330 330,320 343,309 355,299 367,286 378,275 389,262 400,250 410,237 420,224 429,211 438,197 447,184 455,169 462,155 470,140 476,126 483,111 488,95 494,80 498,64 503,49 506,33 510,17 513,1 513,0">
          <text:p/>
        </draw:polygon>
        <draw:polygon draw:style-name="gr100" draw:text-style-name="P61" draw:layer="layout" svg:width="0.526cm" svg:height="0.448cm" svg:x="19.126cm" svg:y="3.956cm" svg:viewBox="0 0 527 449" draw:points="527,8 527,13 523,30 519,46 515,62 510,78 504,94 498,110 492,125 485,141 478,156 470,171 461,185 453,200 443,214 434,227 424,241 413,254 402,267 391,279 379,292 367,304 355,315 342,326 329,337 315,347 302,357 288,366 273,375 259,383 244,391 229,398 213,405 198,412 182,417 166,423 150,428 134,432 117,436 101,440 84,443 67,445 50,447 33,448 17,449 0,449 0,441 16,440 33,440 49,438 66,436 83,434 99,431 116,428 132,424 148,420 163,415 179,409 195,404 210,397 225,390 240,383 254,375 269,367 283,359 297,349 310,340 324,330 336,320 349,309 361,298 373,285 385,273 396,261 407,249 417,236 427,222 436,209 445,195 454,181 462,167 470,152 477,137 484,122 490,107 496,91 502,76 507,60 511,44 515,28 518,11 520,0">
          <text:p/>
        </draw:polygon>
        <draw:polygon draw:style-name="gr101" draw:text-style-name="P62" draw:layer="layout" svg:width="0.534cm" svg:height="0.449cm" svg:x="19.126cm" svg:y="3.964cm" svg:viewBox="0 0 535 450" draw:points="535,7 532,23 528,40 523,57 518,73 512,89 506,105 500,121 493,136 485,152 477,167 469,182 460,196 451,210 441,224 430,238 420,251 409,264 397,277 385,289 373,302 359,314 346,325 333,336 319,346 305,356 291,365 277,374 262,382 247,390 231,398 216,405 200,411 184,418 168,423 151,428 135,433 118,437 102,440 85,443 68,445 51,447 34,449 17,449 0,450 0,441 17,441 33,440 50,439 67,437 83,435 100,432 116,428 133,424 149,420 165,415 181,409 197,404 212,397 228,390 243,383 258,375 272,367 287,358 301,349 314,339 328,329 341,318 354,307 367,296 379,283 391,271 402,259 413,246 424,233 434,219 443,206 453,192 461,177 470,163 478,148 485,133 492,117 498,102 504,86 510,70 515,54 519,38 523,22 527,5 527,0">
          <text:p/>
        </draw:polygon>
        <draw:polygon draw:style-name="gr102" draw:text-style-name="P63" draw:layer="layout" svg:width="0.541cm" svg:height="0.45cm" svg:x="19.126cm" svg:y="3.971cm" svg:viewBox="0 0 542 451" draw:points="542,7 540,18 536,35 531,52 526,68 521,85 514,101 508,117 501,133 493,149 485,164 476,179 467,194 458,208 448,223 437,236 426,250 415,263 403,276 391,288 379,301 366,313 353,324 339,335 325,346 311,356 297,365 282,374 267,383 252,391 236,399 220,406 204,412 188,419 171,424 155,429 138,434 121,438 104,441 87,444 69,447 52,449 34,450 17,451 0,451 0,443 17,442 34,442 51,440 68,438 86,436 103,433 119,430 136,426 152,421 169,416 185,411 201,404 217,398 232,391 248,383 263,375 278,367 292,358 306,349 320,339 334,329 347,318 360,307 373,294 385,282 397,270 409,257 420,244 430,231 441,217 451,203 460,189 469,175 477,160 485,145 493,129 500,114 506,98 512,82 518,66 523,50 528,33 532,16 535,0">
          <text:p/>
        </draw:polygon>
        <draw:polygon draw:style-name="gr103" draw:text-style-name="P64" draw:layer="layout" svg:width="0.552cm" svg:height="0.45cm" svg:x="19.126cm" svg:y="3.978cm" svg:viewBox="0 0 553 451" draw:points="553,11 552,14 548,31 544,48 538,65 533,82 526,99 520,115 512,131 504,147 496,163 487,179 478,194 467,209 457,223 446,237 435,251 424,265 412,278 399,292 387,304 374,316 360,327 346,338 332,349 317,359 303,369 287,378 272,387 256,395 240,403 224,411 208,417 191,424 174,429 157,435 140,439 123,443 106,447 88,450 85,451 0,451 0,444 17,444 34,443 52,442 69,440 86,437 103,434 120,431 137,427 154,422 170,417 187,412 203,405 219,399 235,392 251,384 266,376 281,367 296,358 310,349 324,339 338,328 352,317 365,306 378,295 390,281 402,269 414,256 425,243 436,229 447,216 457,201 466,187 476,172 485,157 493,142 501,126 508,110 514,94 521,78 526,61 531,45 536,28 540,11 542,0">
          <text:p/>
        </draw:polygon>
        <draw:polygon draw:style-name="gr104" draw:text-style-name="P65" draw:layer="layout" svg:width="0.478cm" svg:height="0.439cm" svg:x="19.211cm" svg:y="3.989cm" svg:viewBox="0 0 479 440" draw:points="479,11 476,24 471,41 466,58 460,76 453,93 446,109 439,126 431,142 422,158 413,175 404,191 394,206 383,221 373,235 361,249 349,263 337,277 325,290 311,302 298,314 284,326 270,338 256,349 241,359 226,369 210,378 194,387 178,396 162,404 145,411 129,418 112,425 93,431 76,436 63,440 0,440 3,439 21,436 38,432 55,428 72,424 89,418 106,413 124,406 140,400 156,392 172,384 188,376 203,367 219,358 233,348 248,338 262,327 276,316 290,305 303,293 315,281 328,268 340,255 351,241 362,227 373,213 383,199 393,184 402,168 411,152 419,136 427,120 435,104 441,88 448,71 453,54 459,37 463,20 467,3 468,0">
          <text:p/>
        </draw:polygon>
        <draw:polygon draw:style-name="gr105" draw:text-style-name="P66" draw:layer="layout" svg:width="0.425cm" svg:height="0.428cm" svg:x="19.274cm" svg:y="4cm" svg:viewBox="0 0 426 429" draw:points="426,11 425,16 420,34 415,51 409,70 402,87 395,104 387,121 379,138 371,154 361,171 352,186 342,202 331,217 320,232 308,247 296,261 284,274 271,288 257,301 244,313 229,325 215,337 200,348 185,359 169,369 154,378 137,388 121,396 104,405 87,412 70,419 52,426 44,429 0,429 13,425 30,420 48,414 66,407 82,400 99,393 115,385 131,376 147,367 163,358 178,348 193,338 207,327 221,315 235,303 248,291 262,279 274,266 286,252 298,238 310,224 320,210 331,195 341,180 350,164 359,148 368,132 376,116 383,99 390,83 397,66 403,47 408,30 413,13 416,0">
          <text:p/>
        </draw:polygon>
        <draw:polygon draw:style-name="gr106" draw:text-style-name="P67" draw:layer="layout" svg:width="0.392cm" svg:height="0.417cm" svg:x="19.318cm" svg:y="4.011cm" svg:viewBox="0 0 393 418" draw:points="393,10 389,26 383,44 377,62 370,80 363,98 355,115 347,132 338,149 328,165 319,181 308,197 297,213 286,228 274,243 262,257 249,271 236,285 222,298 208,311 194,323 179,335 164,346 148,358 132,369 116,379 100,388 83,397 66,405 49,413 36,418 0,418 8,415 25,408 43,401 60,394 77,385 93,377 110,367 125,358 141,347 156,336 171,325 185,313 200,301 213,289 227,276 240,262 252,249 264,235 276,220 287,205 298,190 308,174 317,159 327,142 335,126 343,109 351,92 358,75 365,58 371,40 376,23 381,5 382,0">
          <text:p/>
        </draw:polygon>
        <draw:polygon draw:style-name="gr107" draw:text-style-name="P68" draw:layer="layout" svg:width="0.366cm" svg:height="0.407cm" svg:x="19.354cm" svg:y="4.021cm" svg:viewBox="0 0 367 408" draw:points="367,11 365,20 359,38 353,57 346,75 339,93 331,110 322,128 313,145 304,162 293,178 283,194 272,210 260,226 248,241 235,257 222,271 209,285 195,298 181,311 165,324 150,336 134,348 118,359 102,369 86,380 69,389 52,398 34,407 33,408 0,408 12,403 29,395 46,387 63,378 79,369 95,359 111,348 127,337 142,326 157,314 171,302 186,289 200,276 213,262 226,248 238,233 250,218 261,203 272,187 283,171 292,155 302,139 311,122 319,105 327,88 334,70 341,52 347,34 353,16 357,0">
          <text:p/>
        </draw:polygon>
        <draw:polygon draw:style-name="gr108" draw:text-style-name="P69" draw:layer="layout" svg:width="0.344cm" svg:height="0.396cm" svg:x="19.387cm" svg:y="4.032cm" svg:viewBox="0 0 345 397" draw:points="345,10 344,12 338,31 332,50 325,69 317,87 309,105 301,124 291,141 282,158 271,175 260,192 249,208 237,224 225,239 212,254 199,269 185,283 171,297 156,310 141,323 126,335 110,347 94,358 77,369 60,380 42,389 29,397 0,397 1,396 19,387 36,378 54,369 70,358 86,348 102,337 118,325 133,313 148,300 162,287 176,274 189,260 202,246 215,231 227,216 239,200 250,184 260,168 271,152 280,135 289,118 298,99 306,82 313,64 320,46 326,27 332,9 334,0">
          <text:p/>
        </draw:polygon>
        <draw:polygon draw:style-name="gr109" draw:text-style-name="P70" draw:layer="layout" svg:width="0.325cm" svg:height="0.387cm" svg:x="19.416cm" svg:y="4.042cm" svg:viewBox="0 0 326 388" draw:points="326,11 322,26 315,45 308,64 300,83 292,101 283,119 274,137 264,155 253,172 241,189 229,205 217,222 205,237 192,253 178,268 164,282 149,296 135,310 119,323 103,335 87,347 71,359 54,370 37,381 26,388 0,388 13,379 30,370 47,359 64,348 80,337 96,325 111,313 126,300 141,287 155,273 169,259 182,244 195,229 207,214 219,198 230,182 241,165 253,148 262,131 272,114 280,96 288,78 296,60 303,41 309,22 315,3 316,0">
          <text:p/>
        </draw:polygon>
        <draw:polygon draw:style-name="gr110" draw:text-style-name="P71" draw:layer="layout" svg:width="0.31cm" svg:height="0.376cm" svg:x="19.442cm" svg:y="4.052cm" svg:viewBox="0 0 311 377" draw:points="311,11 308,19 301,39 294,58 286,77 278,96 269,114 259,132 249,150 238,168 227,185 215,202 202,218 190,234 175,250 161,266 147,281 132,295 117,309 101,323 85,336 69,348 52,360 35,371 26,377 0,377 11,371 28,360 45,349 61,337 77,325 93,313 109,300 123,286 138,272 152,257 166,242 179,226 192,211 204,194 216,178 227,161 238,144 248,126 257,108 266,90 274,72 282,53 289,34 296,15 300,0">
          <text:p/>
        </draw:polygon>
        <draw:polygon draw:style-name="gr111" draw:text-style-name="P72" draw:layer="layout" svg:width="0.294cm" svg:height="0.365cm" svg:x="19.468cm" svg:y="4.063cm" svg:viewBox="0 0 295 366" draw:points="295,10 294,12 287,32 280,52 272,71 263,90 254,109 244,129 234,147 223,165 211,182 199,199 187,216 173,233 160,249 146,264 131,279 116,294 101,308 85,322 67,335 50,347 33,359 24,366 0,366 9,360 26,349 43,337 59,325 75,312 92,298 107,284 122,270 136,255 150,240 164,224 176,208 189,192 201,175 212,158 223,140 233,121 243,103 252,85 260,66 268,47 275,28 282,8 285,0">
          <text:p/>
        </draw:polygon>
        <draw:polygon draw:style-name="gr112" draw:text-style-name="P73" draw:layer="layout" svg:width="0.28cm" svg:height="0.355cm" svg:x="19.492cm" svg:y="4.073cm" svg:viewBox="0 0 281 356" draw:points="281,10 275,26 268,46 260,66 251,86 240,105 230,124 220,142 209,161 197,179 185,196 172,213 158,230 144,246 130,262 115,277 100,292 84,307 68,320 51,334 34,347 23,356 0,356 9,348 26,336 43,324 60,311 76,297 91,283 106,268 121,253 135,238 148,222 162,205 174,188 186,171 198,154 209,136 219,118 229,99 238,80 247,61 256,42 263,22 270,2 271,0">
          <text:p/>
        </draw:polygon>
        <draw:polygon draw:style-name="gr113" draw:text-style-name="P74" draw:layer="layout" svg:width="0.267cm" svg:height="0.345cm" svg:x="19.515cm" svg:y="4.083cm" svg:viewBox="0 0 268 346" draw:points="268,10 264,21 257,41 248,61 239,81 230,101 220,120 209,139 198,158 186,176 173,194 160,211 146,229 132,246 117,262 101,277 86,293 70,307 53,321 36,335 22,346 0,346 11,338 28,325 45,311 61,298 77,283 92,268 107,253 122,237 136,221 150,203 163,186 175,169 187,151 198,132 208,114 218,95 228,76 237,56 245,36 252,16 258,0">
          <text:p/>
        </draw:polygon>
        <draw:polygon draw:style-name="gr114" draw:text-style-name="P75" draw:layer="layout" svg:width="0.252cm" svg:height="0.335cm" svg:x="19.537cm" svg:y="4.093cm" svg:viewBox="0 0 253 336" draw:points="253,7 251,14 243,34 234,55 225,75 216,96 205,115 194,134 183,153 171,172 157,190 144,207 130,224 116,241 101,258 85,273 70,289 53,304 36,318 19,332 14,336 0,336 14,325 31,311 48,297 64,283 79,267 94,252 109,236 123,219 137,202 150,185 163,167 176,149 187,130 198,111 208,92 217,71 226,51 235,31 242,11 246,0">
          <text:p/>
        </draw:polygon>
        <draw:polygon draw:style-name="gr115" draw:text-style-name="P76" draw:layer="layout" svg:width="0.245cm" svg:height="0.333cm" svg:x="19.551cm" svg:y="4.1cm" svg:viewBox="0 0 246 334" draw:points="246,7 245,10 237,30 228,51 219,72 209,93 199,112 188,132 176,151 164,169 151,188 137,206 123,223 109,240 94,256 77,272 61,288 45,303 28,318 10,332 7,334 7,329 0,329 5,325 22,311 39,297 56,282 71,266 87,251 103,234 117,217 131,200 144,183 157,165 169,146 180,127 191,108 202,89 211,69 220,48 229,27 237,7 239,0">
          <text:p/>
        </draw:polygon>
        <draw:polygon draw:style-name="gr116" draw:text-style-name="P77" draw:layer="layout" svg:width="0.244cm" svg:height="0.337cm" svg:x="19.558cm" svg:y="4.107cm" svg:viewBox="0 0 245 338" draw:points="245,7 238,27 229,48 220,68 210,88 199,109 188,129 176,148 164,167 151,186 137,204 123,221 108,239 93,255 76,272 60,287 44,302 26,317 9,331 0,338 0,327 3,325 21,311 38,296 54,281 70,265 87,249 102,233 116,216 130,199 144,181 157,162 169,144 181,125 192,104 202,85 212,64 221,44 230,23 238,3 239,0">
          <text:p/>
        </draw:polygon>
        <draw:polygon draw:style-name="gr117" draw:text-style-name="P78" draw:layer="layout" svg:width="0.251cm" svg:height="0.341cm" svg:x="19.558cm" svg:y="4.114cm" svg:viewBox="0 0 252 342" draw:points="252,6 246,23 237,44 227,65 217,85 207,106 195,125 183,145 171,165 158,184 143,202 129,220 114,237 98,254 83,271 66,287 49,302 32,317 14,331 0,342 0,331 9,324 26,310 44,295 60,280 76,265 92,248 107,232 122,214 136,197 151,179 164,160 176,140 188,121 199,101 210,81 220,61 229,41 238,20 245,0">
          <text:p/>
        </draw:polygon>
        <draw:polygon draw:style-name="gr118" draw:text-style-name="P79" draw:layer="layout" svg:width="0.258cm" svg:height="0.346cm" svg:x="19.558cm" svg:y="4.12cm" svg:viewBox="0 0 259 347" draw:points="259,7 254,20 245,41 235,62 225,83 214,104 203,124 191,143 177,163 164,182 150,201 135,219 120,237 105,254 89,271 72,287 55,302 37,317 19,332 1,346 0,347 0,336 14,325 32,311 49,296 66,281 83,265 98,248 114,231 129,214 143,196 157,177 170,158 183,139 195,119 207,100 217,79 227,59 237,38 246,17 252,0">
          <text:p/>
        </draw:polygon>
        <draw:polygon draw:style-name="gr119" draw:text-style-name="P80" draw:layer="layout" svg:width="0.264cm" svg:height="0.349cm" svg:x="19.558cm" svg:y="4.127cm" svg:viewBox="0 0 265 350" draw:points="265,6 262,16 253,38 243,59 233,80 222,101 210,121 198,141 185,161 172,180 158,199 143,217 128,235 112,253 95,270 78,286 61,302 43,317 24,332 6,346 0,350 0,340 1,339 19,325 37,310 55,295 72,280 89,264 105,247 121,229 136,211 151,193 165,175 178,156 191,136 203,117 214,97 225,76 235,55 245,34 254,13 259,0">
          <text:p/>
        </draw:polygon>
        <draw:polygon draw:style-name="gr120" draw:text-style-name="P81" draw:layer="layout" svg:width="0.271cm" svg:height="0.353cm" svg:x="19.558cm" svg:y="4.133cm" svg:viewBox="0 0 272 354" draw:points="272,7 270,13 260,35 251,57 240,78 229,99 218,119 205,140 192,159 179,179 164,198 149,216 134,234 118,252 102,269 84,286 66,302 48,318 30,332 11,347 0,354 0,344 6,340 24,326 43,311 61,296 78,279 96,263 112,246 128,229 143,211 158,193 172,174 185,155 198,135 210,115 222,95 233,74 243,53 253,32 262,10 265,0">
          <text:p/>
        </draw:polygon>
        <draw:polygon draw:style-name="gr121" draw:text-style-name="P82" draw:layer="layout" svg:width="0.278cm" svg:height="0.357cm" svg:x="19.558cm" svg:y="4.14cm" svg:viewBox="0 0 279 358" draw:points="279,7 278,9 268,32 258,53 248,75 237,96 225,117 212,137 199,157 185,177 171,196 156,215 141,233 124,251 108,268 91,284 73,301 55,317 35,332 16,347 0,358 0,347 11,340 30,325 49,311 67,294 85,278 102,262 118,245 134,227 149,209 164,191 179,172 192,152 205,133 218,112 229,92 240,71 251,50 260,28 270,6 272,0">
          <text:p/>
        </draw:polygon>
        <draw:polygon draw:style-name="gr122" draw:text-style-name="P83" draw:layer="layout" svg:width="0.284cm" svg:height="0.36cm" svg:x="19.558cm" svg:y="4.147cm" svg:viewBox="0 0 285 361" draw:points="285,6 276,28 266,50 256,72 244,93 232,114 220,135 206,155 192,175 177,194 162,213 146,232 130,249 113,267 95,284 78,300 59,316 40,331 21,345 1,360 0,361 0,350 16,339 35,324 54,309 72,294 90,277 107,261 123,244 140,226 155,208 170,189 185,170 199,150 212,130 225,110 237,89 248,68 258,46 268,25 278,2 279,0">
          <text:p/>
        </draw:polygon>
        <draw:polygon draw:style-name="gr122" draw:text-style-name="P83" draw:layer="layout" svg:width="0.291cm" svg:height="0.365cm" svg:x="19.558cm" svg:y="4.153cm" svg:viewBox="0 0 292 366" draw:points="292,7 284,25 274,49 263,71 252,92 240,114 227,134 213,155 199,175 185,195 169,214 153,232 137,250 120,268 102,285 83,301 65,317 45,333 26,347 6,361 0,366 0,355 1,354 21,340 40,326 59,311 78,295 96,279 114,262 131,244 147,227 163,208 178,189 192,170 206,150 220,130 232,109 244,88 256,67 266,45 276,22 285,0">
          <text:p/>
        </draw:polygon>
        <draw:polygon draw:style-name="gr123" draw:text-style-name="P84" draw:layer="layout" svg:width="0.297cm" svg:height="0.368cm" svg:x="19.558cm" svg:y="4.16cm" svg:viewBox="0 0 298 369" draw:points="298,7 292,22 282,44 271,68 259,89 247,111 234,132 220,153 206,173 190,193 175,212 159,231 142,249 125,267 107,284 89,301 70,317 51,332 31,347 11,362 0,369 0,359 6,354 26,340 45,326 65,310 83,294 101,278 119,261 136,243 152,225 168,207 184,188 199,168 213,148 227,127 240,107 252,85 263,64 274,41 284,18 292,0">
          <text:p/>
        </draw:polygon>
        <draw:polygon draw:style-name="gr124" draw:text-style-name="P85" draw:layer="layout" svg:width="0.304cm" svg:height="0.371cm" svg:x="19.558cm" svg:y="4.167cm" svg:viewBox="0 0 305 372" draw:points="305,6 300,18 289,41 278,63 267,86 254,108 241,130 228,151 213,171 198,191 182,211 166,230 149,248 132,266 114,283 96,300 76,317 57,332 36,347 15,362 0,372 0,362 11,355 31,340 52,325 71,310 90,294 108,277 126,260 143,242 160,224 176,205 191,186 206,166 220,146 234,125 247,104 259,81 271,60 282,37 292,15 298,0">
          <text:p/>
        </draw:polygon>
        <draw:polygon draw:style-name="gr125" draw:text-style-name="P86" draw:layer="layout" svg:width="0.31cm" svg:height="0.375cm" svg:x="19.558cm" svg:y="4.173cm" svg:viewBox="0 0 311 376" draw:points="311,7 308,16 297,39 286,61 274,84 262,106 249,127 235,149 220,170 205,190 189,210 173,229 156,248 138,266 119,284 100,301 81,317 61,333 41,348 20,363 0,376 0,366 15,356 36,341 56,326 75,311 95,294 113,277 132,260 149,242 166,224 182,205 198,185 213,165 228,145 241,123 254,101 267,80 278,57 289,35 300,12 305,0">
          <text:p/>
        </draw:polygon>
        <draw:polygon draw:style-name="gr125" draw:text-style-name="P86" draw:layer="layout" svg:width="0.317cm" svg:height="0.378cm" svg:x="19.558cm" svg:y="4.18cm" svg:viewBox="0 0 318 379" draw:points="318,6 316,12 305,35 294,58 282,81 269,103 256,125 241,146 226,168 211,189 195,208 178,228 161,247 143,265 125,283 106,300 86,317 66,333 46,348 25,363 4,377 0,379 0,369 20,356 41,341 61,326 81,310 100,294 119,277 137,259 155,241 172,222 188,203 204,183 219,162 234,141 248,120 262,99 274,77 286,54 297,32 308,9 311,0">
          <text:p/>
        </draw:polygon>
        <draw:polygon draw:style-name="gr126" draw:text-style-name="P87" draw:layer="layout" svg:width="0.323cm" svg:height="0.382cm" svg:x="19.558cm" svg:y="4.186cm" svg:viewBox="0 0 324 383" draw:points="324,7 323,9 313,33 300,56 288,79 275,101 262,123 248,145 233,166 217,187 201,208 185,228 167,247 149,265 131,283 111,301 92,317 72,334 51,349 30,364 8,378 0,383 0,373 4,371 25,357 46,342 66,327 86,311 106,294 125,277 143,259 161,241 178,222 195,201 211,182 226,161 241,140 255,119 268,97 281,75 293,52 304,29 316,6 318,0">
          <text:p/>
        </draw:polygon>
        <draw:polygon draw:style-name="gr127" draw:text-style-name="P88" draw:layer="layout" svg:width="0.33cm" svg:height="0.385cm" svg:x="19.558cm" svg:y="4.193cm" svg:viewBox="0 0 331 386" draw:points="331,6 320,30 309,53 297,76 284,99 270,121 256,143 241,164 225,185 209,205 192,225 174,246 156,264 137,282 118,300 98,317 78,333 56,349 35,364 13,378 0,386 0,376 8,371 30,357 51,342 72,327 93,310 112,294 132,276 150,258 168,240 186,220 202,200 218,180 234,159 249,138 263,116 276,94 289,72 301,49 313,26 323,2 324,0">
          <text:p/>
        </draw:polygon>
        <draw:polygon draw:style-name="gr128" draw:text-style-name="P89" draw:layer="layout" svg:width="0.34cm" svg:height="0.395cm" svg:x="19.558cm" svg:y="4.199cm" svg:viewBox="0 0 341 396" draw:points="341,10 331,29 319,53 307,76 294,99 280,122 266,144 254,160 58,357 42,369 20,383 0,396 0,380 13,372 35,358 56,343 77,326 97,310 117,293 136,275 155,257 173,239 191,219 208,199 224,179 240,158 255,137 269,115 283,93 296,70 308,47 319,24 330,0">
          <text:p/>
        </draw:polygon>
        <draw:path draw:style-name="gr129" draw:text-style-name="P90" draw:layer="layout" svg:width="0.349cm" svg:height="0.399cm" svg:x="19.558cm" svg:y="4.209cm" svg:viewBox="0 0 350 400" svg:d="M350 10l-6 14-12 25-13 23-13 24-6 9-45 45 12-16 14-22 14-23 13-23 12-23 12-24 9-19zM13 392l-9 6-4 2v-14l20-14 22-14 16-12z">
          <text:p/>
        </draw:path>
        <draw:path draw:style-name="gr130" draw:text-style-name="P91" draw:layer="layout" svg:width="0.359cm" svg:height="0.395cm" svg:x="19.558cm" svg:y="4.219cm" svg:viewBox="0 0 360 396" svg:d="M360 9l-5 11-12 24-8 16-35 35 6-9 13-24 13-23 12-25 6-14zM0 396v-6l4-2 10-6z">
          <text:p/>
        </draw:path>
        <draw:polygon draw:style-name="gr131" draw:text-style-name="P92" draw:layer="layout" svg:width="0.035cm" svg:height="0.051cm" svg:x="19.892cm" svg:y="4.228cm" svg:viewBox="0 0 36 52" draw:points="36,10 33,16 30,22 0,52 8,36 21,11 26,0">
          <text:p/>
        </draw:polygon>
        <draw:polygon draw:style-name="gr132" draw:text-style-name="P93" draw:layer="layout" svg:width="0.009cm" svg:height="0.012cm" svg:x="19.921cm" svg:y="4.238cm" svg:viewBox="0 0 10 13" draw:points="10,3 0,13 4,7 7,0">
          <text:p/>
        </draw:polygon>
        <draw:polygon draw:style-name="gr220" draw:text-style-name="P2" draw:layer="layout" svg:width="0.804cm" svg:height="0.745cm" svg:x="19.126cm" svg:y="3.869cm" svg:viewBox="0 0 805 746" draw:points="0,186 432,186 432,0 805,373 432,746 432,560 0,560">
          <text:p/>
        </draw:polygon>
        <draw:polygon draw:style-name="gr61" draw:text-style-name="P22" draw:layer="layout" svg:width="0.028cm" svg:height="0.002cm" svg:x="25.383cm" svg:y="4.055cm" svg:viewBox="0 0 29 3" draw:points="0,0 29,0 23,1 17,1 11,3 5,3 0,3">
          <text:p/>
        </draw:polygon>
        <draw:polygon draw:style-name="gr61" draw:text-style-name="P22" draw:layer="layout" svg:width="0.049cm" svg:height="0.006cm" svg:x="25.383cm" svg:y="4.055cm" svg:viewBox="0 0 50 7" draw:points="50,0 48,0 43,2 37,3 31,5 25,6 18,7 12,7 6,7 0,7 0,2 5,2 11,2 17,1 23,1 29,0">
          <text:p/>
        </draw:polygon>
        <draw:polygon draw:style-name="gr62" draw:text-style-name="P23" draw:layer="layout" svg:width="0.064cm" svg:height="0.011cm" svg:x="25.383cm" svg:y="4.055cm" svg:viewBox="0 0 65 12" draw:points="65,0 61,1 55,3 49,5 43,6 36,7 30,8 24,9 18,11 12,11 6,12 0,12 0,6 6,6 12,6 18,6 24,5 30,4 36,3 42,2 47,0 49,0">
          <text:p/>
        </draw:polygon>
        <draw:polygon draw:style-name="gr63" draw:text-style-name="P24" draw:layer="layout" svg:width="0.076cm" svg:height="0.015cm" svg:x="25.383cm" svg:y="4.055cm" svg:viewBox="0 0 77 16" draw:points="77,0 75,1 69,4 63,6 57,8 51,10 44,11 37,12 31,14 25,14 19,15 12,16 6,16 0,16 0,12 6,12 12,11 18,11 24,10 30,9 36,8 44,7 50,6 56,4 61,1 65,0">
          <text:p/>
        </draw:polygon>
        <draw:polygon draw:style-name="gr63" draw:text-style-name="P24" draw:layer="layout" svg:width="0.087cm" svg:height="0.019cm" svg:x="25.383cm" svg:y="4.055cm" svg:viewBox="0 0 88 20" draw:points="88,0 82,3 76,6 70,8 64,10 58,12 52,14 45,15 39,17 33,18 25,19 19,19 12,20 6,20 0,20 0,16 6,16 12,16 19,15 25,14 32,14 38,12 44,11 51,10 57,8 63,6 69,4 75,1 77,0">
          <text:p/>
        </draw:polygon>
        <draw:polygon draw:style-name="gr63" draw:text-style-name="P24" draw:layer="layout" svg:width="0.096cm" svg:height="0.024cm" svg:x="25.383cm" svg:y="4.055cm" svg:viewBox="0 0 97 25" draw:points="97,0 96,1 90,4 84,7 78,10 72,12 65,14 59,16 53,18 46,20 40,21 33,22 27,23 20,24 14,24 6,25 0,25 0,20 6,20 13,20 20,19 26,19 33,18 39,17 45,15 52,14 58,12 64,10 70,8 76,6 82,2 88,0">
          <text:p/>
        </draw:polygon>
        <draw:polygon draw:style-name="gr64" draw:text-style-name="P25" draw:layer="layout" svg:width="0.105cm" svg:height="0.028cm" svg:x="25.383cm" svg:y="4.055cm" svg:viewBox="0 0 106 29" draw:points="106,0 104,1 98,5 92,8 86,11 78,14 72,16 66,18 59,20 53,22 46,24 40,25 33,26 26,27 20,28 13,28 6,29 0,29 0,25 6,25 13,24 19,24 26,23 32,22 39,21 45,20 52,18 58,16 64,14 71,12 77,10 84,6 90,4 96,1 97,0">
          <text:p/>
        </draw:polygon>
        <draw:polygon draw:style-name="gr64" draw:text-style-name="P25" draw:layer="layout" svg:width="0.114cm" svg:height="0.032cm" svg:x="25.383cm" svg:y="4.055cm" svg:viewBox="0 0 115 33" draw:points="115,0 112,2 106,5 100,8 93,11 86,14 80,17 74,19 67,21 61,24 54,26 47,28 40,29 34,31 27,31 20,32 13,33 6,33 0,33 0,29 6,29 13,28 20,28 26,27 33,26 40,24 46,23 53,21 59,19 66,17 72,15 78,13 85,10 91,8 98,5 104,1 106,0">
          <text:p/>
        </draw:polygon>
        <draw:polygon draw:style-name="gr64" draw:text-style-name="P25" draw:layer="layout" svg:width="0.122cm" svg:height="0.036cm" svg:x="25.383cm" svg:y="4.055cm" svg:viewBox="0 0 123 37" draw:points="123,0 120,2 114,5 108,9 102,12 95,15 89,18 83,21 76,23 69,26 63,28 56,29 48,32 41,34 34,35 27,36 21,36 14,37 7,37 0,37 0,33 6,33 13,33 20,32 27,30 34,30 40,28 47,27 54,25 62,24 68,21 75,19 81,17 87,14 94,11 100,8 106,5 112,2 115,0">
          <text:p/>
        </draw:polygon>
        <draw:polygon draw:style-name="gr65" draw:text-style-name="P26" draw:layer="layout" svg:width="0.129cm" svg:height="0.041cm" svg:x="25.383cm" svg:y="4.055cm" svg:viewBox="0 0 130 42" draw:points="130,0 128,2 122,6 116,10 110,14 104,17 97,20 90,23 83,26 76,28 70,31 63,33 56,35 49,36 42,38 35,39 28,40 21,41 14,41 7,42 0,42 0,37 7,37 14,37 21,36 27,36 34,35 41,34 48,32 55,30 62,29 68,27 75,24 82,22 88,19 94,16 102,13 108,10 114,6 120,2 123,0">
          <text:p/>
        </draw:polygon>
        <draw:polygon draw:style-name="gr66" draw:text-style-name="P27" draw:layer="layout" svg:width="0.137cm" svg:height="0.045cm" svg:x="25.383cm" svg:y="4.055cm" svg:viewBox="0 0 138 46" draw:points="138,0 137,1 131,5 124,9 118,13 112,16 106,21 99,24 92,27 86,30 79,32 72,35 65,37 58,39 51,40 44,42 37,43 29,44 21,45 14,46 7,46 0,46 0,42 7,42 14,41 21,41 28,40 36,39 43,38 50,36 57,35 64,33 71,31 77,28 84,26 91,23 97,20 104,16 110,13 116,9 122,5 128,2 130,0">
          <text:p/>
        </draw:polygon>
        <draw:polygon draw:style-name="gr66" draw:text-style-name="P27" draw:layer="layout" svg:width="0.144cm" svg:height="0.049cm" svg:x="25.383cm" svg:y="4.055cm" svg:viewBox="0 0 145 50" draw:points="145,0 139,4 133,9 127,13 120,17 114,20 108,24 101,27 94,30 87,33 80,35 73,39 66,41 59,43 52,45 45,46 37,47 29,48 22,49 14,50 7,50 0,50 0,46 7,46 14,46 21,45 29,44 37,43 44,42 51,40 58,39 65,36 72,34 79,31 86,29 92,26 99,23 106,20 112,16 118,13 124,9 131,5 137,1 138,0">
          <text:p/>
        </draw:polygon>
        <draw:polygon draw:style-name="gr67" draw:text-style-name="P28" draw:layer="layout" svg:width="0.151cm" svg:height="0.054cm" svg:x="25.383cm" svg:y="4.055cm" svg:viewBox="0 0 152 55" draw:points="152,0 148,3 142,8 135,12 129,16 123,20 116,24 109,27 103,31 96,34 89,37 82,39 75,42 67,44 59,46 52,48 45,49 37,51 30,52 22,54 15,54 7,54 0,55 0,49 7,49 14,49 22,48 29,47 36,46 44,45 51,44 58,42 66,40 73,38 80,35 87,33 94,30 101,27 108,24 114,20 120,17 127,13 133,9 139,4 145,0">
          <text:p/>
        </draw:polygon>
        <draw:polygon draw:style-name="gr68" draw:text-style-name="P29" draw:layer="layout" svg:width="0.157cm" svg:height="0.058cm" svg:x="25.383cm" svg:y="4.055cm" svg:viewBox="0 0 158 59" draw:points="158,0 156,2 150,7 144,11 138,16 131,20 124,25 117,29 110,32 104,36 97,39 89,42 82,44 75,47 68,49 60,51 53,53 45,55 38,56 30,57 23,58 15,58 7,59 0,59 0,55 7,54 15,54 22,54 30,53 37,52 45,50 52,49 59,47 66,45 74,43 81,40 88,38 95,35 102,32 108,28 115,25 122,20 128,16 135,12 142,8 148,3 152,0">
          <text:p/>
        </draw:polygon>
        <draw:polygon draw:style-name="gr68" draw:text-style-name="P29" draw:layer="layout" svg:width="0.164cm" svg:height="0.062cm" svg:x="25.383cm" svg:y="4.055cm" svg:viewBox="0 0 165 63" draw:points="165,0 159,5 153,11 147,16 140,20 134,24 127,29 120,32 112,36 105,40 98,43 91,46 84,48 76,51 69,53 61,55 54,57 46,59 38,60 31,61 23,62 15,63 7,63 0,63 0,59 7,59 15,58 23,58 30,57 38,56 45,55 53,53 60,51 68,49 75,47 82,44 89,42 97,39 104,36 110,32 117,29 125,25 131,21 138,17 144,12 150,8 156,2 158,0">
          <text:p/>
        </draw:polygon>
        <draw:polygon draw:style-name="gr69" draw:text-style-name="P30" draw:layer="layout" svg:width="0.17cm" svg:height="0.066cm" svg:x="25.383cm" svg:y="4.055cm" svg:viewBox="0 0 171 67" draw:points="171,0 168,3 162,9 155,14 149,19 143,24 136,28 129,32 122,36 115,40 108,43 101,47 94,50 86,53 79,55 71,57 63,60 56,61 48,63 40,64 31,65 23,66 15,67 8,67 0,67 0,63 7,63 15,63 23,62 31,61 39,60 47,59 55,57 62,55 70,53 77,51 85,48 92,46 99,43 106,40 113,36 120,32 127,29 134,24 140,20 147,16 153,11 159,6 165,0">
          <text:p/>
        </draw:polygon>
        <draw:polygon draw:style-name="gr70" draw:text-style-name="P31" draw:layer="layout" svg:width="0.177cm" svg:height="0.071cm" svg:x="25.383cm" svg:y="4.055cm" svg:viewBox="0 0 178 72" draw:points="178,0 176,1 171,7 164,12 158,17 152,22 145,26 138,31 131,35 124,39 117,44 110,47 103,51 95,54 88,57 80,59 72,62 64,64 57,66 48,67 40,69 32,70 24,71 16,71 8,72 0,72 0,67 8,67 15,67 23,66 31,65 39,64 47,63 56,61 63,60 71,57 79,55 86,53 94,50 101,47 108,43 115,39 122,35 129,31 136,27 143,23 149,18 155,13 162,8 168,3 171,0">
          <text:p/>
        </draw:polygon>
        <draw:polygon draw:style-name="gr71" draw:text-style-name="P32" draw:layer="layout" svg:width="0.183cm" svg:height="0.075cm" svg:x="25.383cm" svg:y="4.055cm" svg:viewBox="0 0 184 76" draw:points="184,0 179,4 173,10 167,15 161,20 154,25 147,30 140,34 133,39 125,43 118,47 111,50 103,55 96,58 88,61 80,63 72,66 65,68 57,70 49,71 40,73 32,74 24,75 16,76 8,76 0,76 0,72 8,72 16,71 24,71 32,70 40,69 48,67 56,66 63,64 71,62 79,59 87,57 94,54 102,50 109,46 116,43 123,39 130,35 137,31 144,26 152,22 158,17 164,12 171,7 176,1 178,0">
          <text:p/>
        </draw:polygon>
        <draw:polygon draw:style-name="gr72" draw:text-style-name="P33" draw:layer="layout" svg:width="0.189cm" svg:height="0.079cm" svg:x="25.383cm" svg:y="4.055cm" svg:viewBox="0 0 190 80" draw:points="190,0 188,2 182,7 176,13 170,19 163,25 157,30 150,34 143,39 136,43 128,47 121,51 114,55 106,58 98,62 91,65 83,67 75,70 67,72 58,74 50,76 42,77 33,78 25,79 16,80 8,80 0,80 0,76 8,76 16,76 24,75 32,74 41,73 50,71 58,70 66,68 73,66 81,63 89,61 97,58 104,55 112,51 119,48 126,44 134,40 141,35 147,31 154,26 161,21 167,16 173,10 179,4 184,0">
          <text:p/>
        </draw:polygon>
        <draw:polygon draw:style-name="gr73" draw:text-style-name="P34" draw:layer="layout" svg:width="0.195cm" svg:height="0.084cm" svg:x="25.383cm" svg:y="4.055cm" svg:viewBox="0 0 196 85" draw:points="196,0 191,5 185,10 179,16 173,22 166,27 159,32 152,37 145,42 138,46 131,50 123,55 115,59 108,62 100,66 92,69 84,71 76,74 68,76 58,78 50,80 42,81 33,82 25,83 17,84 8,84 0,85 0,80 8,80 16,80 25,79 33,78 41,77 49,76 57,74 67,72 75,70 83,67 91,65 98,62 106,58 114,55 121,50 128,46 136,42 143,38 150,33 157,29 163,24 170,18 176,13 182,7 188,2 190,0">
          <text:p/>
        </draw:polygon>
        <draw:polygon draw:style-name="gr73" draw:text-style-name="P34" draw:layer="layout" svg:width="0.201cm" svg:height="0.088cm" svg:x="25.383cm" svg:y="4.055cm" svg:viewBox="0 0 202 89" draw:points="202,0 200,1 194,8 188,14 182,19 175,25 169,30 162,36 155,40 147,45 140,50 133,54 125,58 117,62 109,65 101,69 93,72 85,74 77,77 69,80 60,82 52,84 42,85 34,87 25,88 17,88 8,89 0,89 0,85 8,84 17,84 25,83 33,82 42,81 51,80 59,77 68,75 76,73 84,70 92,68 100,65 108,61 115,58 123,54 131,50 138,46 145,42 152,37 159,32 166,27 173,22 179,16 185,10 191,5 196,0">
          <text:p/>
        </draw:polygon>
        <draw:polygon draw:style-name="gr74" draw:text-style-name="P35" draw:layer="layout" svg:width="0.206cm" svg:height="0.092cm" svg:x="25.383cm" svg:y="4.055cm" svg:viewBox="0 0 207 93" draw:points="207,0 203,4 197,11 191,17 185,23 178,28 171,34 164,40 157,45 150,50 142,54 135,59 127,63 119,67 111,70 103,74 95,77 87,80 78,82 70,84 61,86 52,88 43,90 34,91 26,92 17,93 8,93 0,93 0,89 8,89 17,88 25,88 34,87 42,85 51,84 60,82 69,80 77,78 85,75 93,73 101,70 109,66 117,63 125,59 133,55 140,51 147,46 155,41 162,36 169,30 175,25 182,19 188,14 194,8 200,1 202,0">
          <text:p/>
        </draw:polygon>
        <draw:polygon draw:style-name="gr75" draw:text-style-name="P36" draw:layer="layout" svg:width="0.218cm" svg:height="0.101cm" svg:x="25.383cm" svg:y="4.055cm" svg:viewBox="0 0 219 102" draw:points="219,0 216,4 210,10 203,17 197,23 190,29 183,35 176,40 169,46 162,51 154,56 147,61 139,65 131,69 123,73 115,77 106,81 98,84 89,87 81,89 72,92 63,94 54,97 45,98 37,99 28,100 19,101 9,102 0,102 0,92 8,92 18,92 27,91 35,90 44,89 53,87 61,85 70,83 78,81 87,79 95,76 103,73 111,69 119,66 127,62 135,58 142,53 150,49 157,44 164,39 171,34 178,28 185,23 191,17 197,11 203,4 207,0">
          <text:p/>
        </draw:polygon>
        <draw:polygon draw:style-name="gr76" draw:text-style-name="P37" draw:layer="layout" svg:width="0.229cm" svg:height="0.109cm" svg:x="25.383cm" svg:y="4.055cm" svg:viewBox="0 0 230 110" draw:points="230,0 228,2 222,9 216,16 210,23 203,29 196,36 189,42 182,48 174,54 167,59 159,64 150,69 142,74 134,78 125,82 117,86 108,90 100,93 91,96 82,99 73,101 64,103 55,105 46,107 37,108 27,109 18,110 9,110 0,110 0,102 9,102 18,101 27,100 36,99 44,98 53,97 62,95 71,93 80,90 88,88 97,85 105,82 114,78 122,74 130,70 138,66 146,62 154,57 162,52 169,47 176,41 183,36 190,29 197,23 203,17 210,10 216,4 219,0">
          <text:p/>
        </draw:polygon>
        <draw:polygon draw:style-name="gr77" draw:text-style-name="P38" draw:layer="layout" svg:width="0.24cm" svg:height="0.118cm" svg:x="25.383cm" svg:y="4.055cm" svg:viewBox="0 0 241 119" draw:points="241,0 235,8 229,15 222,22 216,29 209,35 202,42 194,48 187,54 179,60 170,65 163,71 154,75 146,80 138,85 129,89 120,93 112,96 103,101 94,104 84,107 75,109 66,112 57,113 47,115 38,116 28,117 19,118 9,119 0,119 0,110 9,110 18,110 27,109 37,108 46,107 55,105 64,103 73,101 82,98 91,95 100,92 108,89 117,85 125,81 134,77 142,73 150,68 158,63 166,58 173,53 182,47 189,41 196,35 203,29 210,23 216,16 222,9 228,2 230,0">
          <text:p/>
        </draw:polygon>
        <draw:polygon draw:style-name="gr77" draw:text-style-name="P38" draw:layer="layout" svg:width="0.251cm" svg:height="0.126cm" svg:x="25.383cm" svg:y="4.055cm" svg:viewBox="0 0 252 127" draw:points="252,0 248,5 241,13 235,21 228,28 222,35 215,43 207,49 200,56 192,62 184,68 176,73 168,79 160,84 151,89 143,93 134,98 125,102 116,105 106,109 97,112 87,115 77,118 68,120 58,122 48,124 39,125 29,126 19,127 9,127 0,127 0,119 9,119 19,118 28,117 38,116 47,115 57,113 66,112 75,109 84,107 95,104 104,101 113,97 121,94 130,90 139,86 147,81 155,76 164,72 171,66 179,61 187,55 194,49 202,43 209,35 216,29 222,22 229,15 235,8 241,0">
          <text:p/>
        </draw:polygon>
        <draw:polygon draw:style-name="gr78" draw:text-style-name="P39" draw:layer="layout" svg:width="0.261cm" svg:height="0.135cm" svg:x="25.383cm" svg:y="4.055cm" svg:viewBox="0 0 262 136" draw:points="262,0 260,3 254,11 248,19 242,26 235,35 228,42 220,49 213,56 205,62 197,69 189,75 181,80 173,86 164,91 155,96 146,101 137,105 128,110 119,113 109,117 100,120 90,123 80,126 71,128 60,130 50,132 40,133 30,135 20,135 10,136 0,136 0,127 9,127 19,127 29,126 39,125 48,124 58,122 69,120 78,118 88,115 97,112 106,109 116,105 125,102 134,98 143,93 151,89 160,84 168,79 176,73 184,68 192,62 200,56 207,49 215,43 222,36 228,28 235,21 241,13 248,5 252,0">
          <text:p/>
        </draw:polygon>
        <draw:polygon draw:style-name="gr79" draw:text-style-name="P40" draw:layer="layout" svg:width="0.272cm" svg:height="0.144cm" svg:x="25.383cm" svg:y="4.055cm" svg:viewBox="0 0 273 145" draw:points="273,0 267,8 261,16 255,25 248,33 241,41 234,48 226,55 219,62 211,69 203,75 194,82 186,88 177,93 168,99 159,104 150,109 141,113 132,117 122,121 112,125 102,128 93,131 83,134 73,137 62,139 52,140 41,142 31,143 20,144 10,144 0,145 0,136 10,136 20,135 30,135 40,133 51,132 61,130 71,128 80,126 90,123 100,120 109,117 119,113 128,110 137,105 146,101 155,96 164,91 173,86 181,80 189,75 197,69 205,62 213,56 220,49 228,42 235,35 242,27 248,19 254,11 260,3 262,0">
          <text:p/>
        </draw:polygon>
        <draw:polygon draw:style-name="gr79" draw:text-style-name="P40" draw:layer="layout" svg:width="0.282cm" svg:height="0.152cm" svg:x="25.383cm" svg:y="4.055cm" svg:viewBox="0 0 283 153" draw:points="283,0 280,4 274,13 268,21 261,29 254,38 247,45 240,53 232,60 224,68 216,74 208,81 199,87 191,94 182,99 173,105 164,110 154,115 145,120 134,124 124,129 114,133 104,137 94,140 84,142 73,145 63,147 52,149 42,150 31,152 21,152 10,153 0,153 0,145 10,144 20,144 31,143 41,142 51,140 61,139 72,137 82,134 92,131 101,128 111,124 121,120 131,116 141,112 150,108 159,103 168,98 177,92 186,87 194,81 203,74 211,68 219,61 226,54 234,47 241,40 248,32 255,24 261,16 267,8 273,0">
          <text:p/>
        </draw:polygon>
        <draw:polygon draw:style-name="gr80" draw:text-style-name="P41" draw:layer="layout" svg:width="0.292cm" svg:height="0.161cm" svg:x="25.383cm" svg:y="4.055cm" svg:viewBox="0 0 293 162" draw:points="293,0 287,9 281,18 275,27 268,36 261,44 253,52 246,60 238,68 230,75 222,82 213,89 204,95 196,102 186,108 177,113 167,119 157,124 147,129 137,133 127,137 117,141 107,145 96,148 86,151 75,153 65,156 54,157 43,159 32,160 21,161 10,162 0,162 0,153 10,153 21,152 31,152 42,150 52,149 63,147 73,145 84,142 94,140 104,137 114,133 124,129 134,125 144,121 153,116 163,111 173,106 182,100 191,95 199,88 208,82 216,75 224,69 232,61 240,54 247,46 254,39 261,30 268,21 274,13 280,4 283,0">
          <text:p/>
        </draw:polygon>
        <draw:polygon draw:style-name="gr81" draw:text-style-name="P42" draw:layer="layout" svg:width="0.302cm" svg:height="0.169cm" svg:x="25.383cm" svg:y="4.055cm" svg:viewBox="0 0 303 170" draw:points="303,0 301,4 295,14 288,23 281,32 274,40 267,49 260,57 252,65 244,73 236,80 227,89 218,96 210,102 200,109 191,115 182,121 172,126 162,131 152,136 142,141 130,145 120,149 109,153 99,156 88,159 77,162 66,164 55,166 44,167 33,169 22,170 11,170 0,170 0,162 10,162 21,161 32,160 43,159 54,157 65,156 75,153 86,151 96,148 107,145 117,141 127,137 138,133 148,129 158,124 168,119 177,113 186,108 196,102 204,95 213,89 222,81 230,74 238,67 246,59 253,51 261,43 268,35 275,26 281,18 287,9 293,0">
          <text:p/>
        </draw:polygon>
        <draw:polygon draw:style-name="gr82" draw:text-style-name="P43" draw:layer="layout" svg:width="0.312cm" svg:height="0.178cm" svg:x="25.383cm" svg:y="4.055cm" svg:viewBox="0 0 313 179" draw:points="313,0 308,9 302,18 295,28 288,37 281,46 274,55 266,63 258,71 250,79 241,87 233,94 224,101 215,109 205,116 196,122 186,128 176,134 166,139 156,144 145,149 135,153 124,157 113,161 102,164 91,167 80,170 69,172 58,174 46,176 34,177 22,178 11,179 0,179 0,170 11,170 22,170 33,169 44,167 56,166 67,164 78,162 89,159 100,156 110,153 121,149 131,145 142,141 152,136 162,131 172,126 182,121 191,115 200,109 210,101 218,95 227,88 236,80 244,73 252,65 260,57 267,49 274,40 281,32 288,23 295,14 301,4 303,0">
          <text:p/>
        </draw:polygon>
        <draw:polygon draw:style-name="gr83" draw:text-style-name="P44" draw:layer="layout" svg:width="0.322cm" svg:height="0.186cm" svg:x="25.383cm" svg:y="4.055cm" svg:viewBox="0 0 323 187" draw:points="323,0 321,3 315,13 309,23 302,33 295,42 288,51 280,60 272,69 264,77 256,85 247,93 238,101 229,108 220,115 209,122 199,128 189,135 179,141 169,147 158,152 148,157 137,161 126,165 115,169 104,173 92,176 81,178 69,181 58,183 46,184 35,186 23,187 11,187 0,187 0,179 11,179 22,178 34,177 45,176 57,174 68,172 79,170 90,167 101,164 112,161 123,157 134,153 144,149 155,144 165,139 175,134 185,127 195,121 204,115 214,108 224,101 233,94 241,87 250,79 258,71 266,63 274,55 281,46 288,37 295,28 302,18 308,9 313,0">
          <text:p/>
        </draw:polygon>
        <draw:polygon draw:style-name="gr84" draw:text-style-name="P45" draw:layer="layout" svg:width="0.332cm" svg:height="0.195cm" svg:x="25.383cm" svg:y="4.055cm" svg:viewBox="0 0 333 196" draw:points="333,0 329,8 322,18 316,28 309,38 302,47 294,57 286,66 278,75 270,83 261,92 253,100 244,107 234,115 225,123 215,130 205,137 195,143 184,149 174,154 163,160 152,165 141,169 130,173 118,177 107,181 95,184 84,187 72,189 60,191 48,193 36,194 25,195 12,196 0,196 0,187 11,187 24,187 36,186 47,184 59,183 70,181 82,178 93,176 105,173 116,169 127,165 138,161 149,157 159,152 170,147 180,141 190,135 200,129 210,123 220,115 229,108 238,101 247,93 256,85 264,77 272,69 280,60 288,51 295,42 302,33 309,23 315,13 321,3 323,0">
          <text:p/>
        </draw:polygon>
        <draw:polygon draw:style-name="gr85" draw:text-style-name="P46" draw:layer="layout" svg:width="0.342cm" svg:height="0.204cm" svg:x="25.383cm" svg:y="4.055cm" svg:viewBox="0 0 343 205" draw:points="343,0 342,2 336,12 330,23 323,33 316,43 309,53 301,62 293,72 285,81 276,89 267,98 258,106 249,115 239,123 230,130 220,137 209,144 199,150 188,156 178,162 167,167 155,172 144,177 133,181 121,185 109,189 97,192 85,195 73,198 61,200 48,201 36,203 24,204 12,204 0,205 0,196 12,196 24,195 35,194 47,193 59,191 71,189 83,187 94,184 107,181 118,177 130,173 141,169 152,165 163,160 174,154 184,149 195,143 205,137 215,130 225,123 234,116 244,108 253,100 261,92 270,83 278,75 286,66 294,57 302,47 309,38 316,28 322,18 329,8 333,0">
          <text:p/>
        </draw:polygon>
        <draw:polygon draw:style-name="gr86" draw:text-style-name="P47" draw:layer="layout" svg:width="0.352cm" svg:height="0.212cm" svg:x="25.383cm" svg:y="4.055cm" svg:viewBox="0 0 353 213" draw:points="353,0 350,6 343,17 337,27 330,38 323,48 315,58 307,68 299,77 291,87 282,96 273,105 264,114 254,122 245,129 235,137 224,144 214,151 203,158 192,164 181,170 170,175 159,180 147,185 134,190 123,194 111,197 99,201 86,203 74,206 62,208 49,210 37,211 25,212 12,213 0,213 0,205 12,204 24,204 36,203 48,201 61,200 73,198 85,195 96,192 108,189 120,185 132,181 144,177 155,172 167,167 178,162 188,156 199,150 209,144 220,137 230,130 239,123 249,115 258,107 267,99 276,90 285,82 293,72 301,62 309,53 316,43 323,33 330,23 336,12 342,2 343,0">
          <text:p/>
        </draw:polygon>
        <draw:polygon draw:style-name="gr87" draw:text-style-name="P48" draw:layer="layout" svg:width="0.361cm" svg:height="0.221cm" svg:x="25.383cm" svg:y="4.055cm" svg:viewBox="0 0 362 222" draw:points="362,0 357,10 351,22 344,33 337,43 330,54 322,64 314,74 306,84 297,93 288,102 279,111 270,120 260,128 250,136 240,144 229,151 219,158 208,165 197,171 185,177 174,183 162,188 150,193 138,198 126,202 114,205 102,209 89,212 77,214 63,217 51,218 38,220 25,221 12,221 0,222 0,213 12,213 25,212 37,211 49,210 62,208 75,206 87,203 100,201 112,197 124,194 135,190 147,185 159,180 170,175 181,170 192,164 203,158 214,151 224,144 235,137 245,129 254,122 264,114 273,105 282,96 291,87 299,78 307,69 315,59 323,49 330,39 337,28 343,18 350,6 353,0">
          <text:p/>
        </draw:polygon>
        <draw:polygon draw:style-name="gr87" draw:text-style-name="P48" draw:layer="layout" svg:width="0.371cm" svg:height="0.229cm" svg:x="25.383cm" svg:y="4.055cm" svg:viewBox="0 0 372 230" draw:points="372,0 371,2 365,14 358,25 351,36 344,47 337,58 329,68 321,79 312,88 303,98 294,108 285,117 275,125 265,134 255,142 245,150 234,157 223,165 212,171 201,178 189,185 177,191 166,196 153,201 141,206 129,210 116,214 104,217 91,220 78,223 66,225 53,227 40,228 26,229 13,230 0,230 0,222 12,221 25,221 39,220 52,218 64,217 77,214 89,212 102,209 114,205 126,202 138,198 150,193 162,188 174,183 185,176 197,170 208,164 219,157 229,150 240,143 250,135 260,127 270,119 279,110 288,101 297,92 306,83 314,73 322,63 330,53 337,42 344,32 351,21 357,10 362,0">
          <text:p/>
        </draw:polygon>
        <draw:polygon draw:style-name="gr88" draw:text-style-name="P49" draw:layer="layout" svg:width="0.38cm" svg:height="0.238cm" svg:x="25.383cm" svg:y="4.055cm" svg:viewBox="0 0 381 239" draw:points="381,0 378,6 372,18 366,30 359,41 351,52 344,63 336,74 327,84 319,95 310,105 300,115 291,124 281,133 271,141 259,150 249,158 238,165 227,173 215,180 204,186 192,193 180,198 168,204 156,209 143,214 131,218 118,222 105,225 92,229 79,231 66,234 53,235 39,237 26,238 13,239 0,239 0,230 13,230 26,229 39,228 52,227 65,225 77,223 90,220 103,217 115,214 128,210 140,206 152,201 165,196 176,191 188,185 200,179 211,172 222,166 233,158 244,151 254,143 264,135 275,126 285,118 294,109 303,99 312,88 321,79 329,68 337,58 344,47 351,36 358,25 365,14 371,2 372,0">
          <text:p/>
        </draw:polygon>
        <draw:path draw:style-name="gr89" draw:text-style-name="P50" draw:layer="layout" svg:width="0.432cm" svg:height="0.432cm" svg:x="25.383cm" svg:y="3.869cm" svg:viewBox="0 0 433 433" svg:d="M391 186l-5 10-6 12-7 12-7 12-8 12-7 11-9 11-8 10-9 11-10 10-10 10-9 9-10 9-11 9-10 9-11 8-11 8-12 7-11 7-12 7-12 6-12 6-13 6-12 5-13 5-13 4-13 4-13 4-13 3-13 3-14 2-13 2-14 1-13 1-14 1h-13v-8h13l13-1 13-1 14-2 13-1 13-3 13-2 13-4 13-3 13-4 12-4 13-5 12-5 12-6 12-5 12-7 11-6 12-7 11-8 11-7 10-8 11-9 10-8 10-9 9-9 10-10 9-10 9-10 9-10 8-11 7-11 8-12 7-11 6-12 6-12 3-6zM432 0l1 1v12l-1 12z">
          <text:p/>
        </draw:path>
        <draw:path draw:style-name="gr89" draw:text-style-name="P50" draw:layer="layout" svg:width="0.441cm" svg:height="0.44cm" svg:x="25.383cm" svg:y="3.87cm" svg:viewBox="0 0 442 441" svg:d="M400 185v2l-6 12-7 12-7 12-7 12-8 12-9 11-8 11-9 11-9 10-9 11-10 11-9 9-11 10-10 9-11 8-11 9-11 8-12 7-12 7-12 7-12 7-13 6-12 6-13 5-13 5-13 4-13 4-14 4-13 3-14 3-13 2-14 2-14 2-14 1-14 1h-13v-9h13l14-1 13-1 14-1 13-2 14-2 13-3 13-3 13-4 13-4 13-4 13-5 12-5 13-6 12-6 12-6 12-7 11-7 12-7 11-8 11-8 10-9 11-9 10-9 9-10 10-10 9-10 9-11 8-10 9-11 8-11 8-11 7-12 7-12 6-12 5-10zM432 24l1-12v-12l9 8-1 5v13l-1 14-2 14-2 14-2 13-2 8z">
          <text:p/>
        </draw:path>
        <draw:path draw:style-name="gr90" draw:text-style-name="P51" draw:layer="layout" svg:width="0.449cm" svg:height="0.44cm" svg:x="25.383cm" svg:y="3.878cm" svg:viewBox="0 0 450 441" svg:d="M409 177l-3 5-6 13-6 12-7 13-8 12-8 12-8 11-8 11-9 11-9 11-10 11-9 11-11 10-10 9-11 9-11 9-11 9-12 8-11 7-13 8-12 7-12 6-13 7-13 5-13 6-13 5-13 4-14 5-14 3-13 4-14 2-14 3-14 2-14 1-14 2h-14-14v-8h13l14-1 14-1 14-2 14-2 13-2 14-3 13-3 14-4 13-4 13-4 13-5 13-5 12-6 13-6 12-7 12-7 12-7 12-7 11-8 11-9 11-8 10-9 11-10 9-9 10-11 9-11 9-10 9-11 8-11 8-11 8-12 7-12 7-12 7-12 6-12v-2zM431 81l2-8 3-13 2-14 2-14 1-14v-13l1-5 8 8-1 11-1 14-1 14-2 14-3 14-3 14-3 14-5 13z">
          <text:p/>
        </draw:path>
        <draw:path draw:style-name="gr91" draw:text-style-name="P52" draw:layer="layout" svg:width="0.457cm" svg:height="0.441cm" svg:x="25.383cm" svg:y="3.886cm" svg:viewBox="0 0 458 442" svg:d="M418 169l-4 9-6 13-7 13-7 12-8 12-7 12-9 12-8 12-9 11-10 11-9 11-10 11-11 10-10 10-11 9-12 9-11 9-12 8-12 8-12 7-13 7-12 7-13 6-13 6-14 6-13 5-14 5-14 4-13 4-14 3-15 3-14 2-14 2-14 2-15 1-14 1h-14v-9h14 14l14-2 14-1 14-2 14-3 14-2 13-4 14-3 14-5 13-4 13-5 13-6 13-5 13-7 12-6 12-7 13-8 11-7 12-8 11-9 11-9 11-9 10-9 11-10 9-11 10-11 9-11 9-11 8-11 8-11 8-12 8-12 7-13 6-12 6-13 3-5zM431 108l4-13 4-14 3-14 3-14 2-14 1-14 1-14 1-11 8 8v4l-1 14-2 14-2 14-2 15-3 14-4 14-3 14-6 13-4 12z">
          <text:p/>
        </draw:path>
        <draw:path draw:style-name="gr92" draw:text-style-name="P53" draw:layer="layout" svg:width="0.465cm" svg:height="0.442cm" svg:x="25.383cm" svg:y="3.894cm" svg:viewBox="0 0 466 443" svg:d="M429 161l-7 13-6 13-7 13-8 12-7 13-8 12-9 12-9 12-9 11-9 11-10 11-10 12-11 10-11 10-11 9-11 10-12 8-12 9-12 8-13 8-13 7-12 7-14 6-13 6-14 6-13 5-14 5-14 4-14 4-15 3-14 3-14 3-15 2-15 2-14 1h-15l-14 1v-9h14l14-1 15-1 14-2 14-2 14-2 15-3 14-3 13-4 14-4 14-5 13-5 14-6 13-6 13-6 12-7 13-7 12-7 12-8 12-8 11-9 12-9 11-9 10-10 11-10 10-12 9-10 10-11 9-11 8-12 9-12 7-12 8-12 7-12 7-13 6-13 4-9zM432 128l4-12 5-13 3-14 4-14 3-14 2-15 2-14 2-14 1-14v-4l8 9-1 10-1 14-2 15-3 14-3 15-3 14-4 14-4 14-5 14-5 14-3 5z">
          <text:p/>
        </draw:path>
        <draw:polygon draw:style-name="gr93" draw:text-style-name="P54" draw:layer="layout" svg:width="0.473cm" svg:height="0.441cm" svg:x="25.383cm" svg:y="3.903cm" svg:viewBox="0 0 474 442" draw:points="432,152 432,143 435,138 440,124 445,110 449,96 453,82 456,68 459,53 462,39 464,24 465,10 466,0 474,7 474,11 472,25 470,40 468,55 465,69 461,84 457,98 453,113 448,127 443,141 437,155 431,168 424,182 417,195 410,208 402,220 393,233 384,245 375,257 366,269 356,280 346,292 336,303 325,313 314,323 303,333 291,342 279,351 267,360 254,368 242,376 229,383 215,390 202,397 188,403 175,409 161,414 146,419 132,423 118,427 103,431 89,434 74,436 59,438 44,440 29,441 14,442 0,442 0,434 14,433 29,433 43,432 58,430 73,428 87,425 101,422 116,419 130,415 144,411 158,406 171,401 185,395 198,389 212,383 224,376 237,369 250,361 262,353 274,344 286,336 297,326 308,317 319,307 330,297 340,285 350,274 359,263 368,252 377,240 386,228 394,216 402,203 410,191 417,178 423,165 429,152">
          <text:p/>
        </draw:polygon>
        <draw:polygon draw:style-name="gr94" draw:text-style-name="P55" draw:layer="layout" svg:width="0.481cm" svg:height="0.443cm" svg:x="25.383cm" svg:y="3.91cm" svg:viewBox="0 0 482 444" draw:points="482,8 481,19 479,34 476,49 473,64 469,79 465,94 461,108 456,123 451,137 445,151 438,165 432,178 425,192 417,205 409,218 401,231 392,243 383,255 373,267 364,279 353,291 342,302 331,313 320,323 308,333 296,342 284,351 272,360 259,368 246,376 233,384 219,391 206,398 192,404 178,410 164,415 149,420 135,425 120,429 105,432 90,435 75,438 60,440 45,442 30,443 15,443 0,444 0,435 14,435 29,434 44,433 59,431 74,429 89,427 103,424 118,420 132,416 146,412 161,407 175,402 188,396 202,390 215,383 229,376 242,369 254,361 267,353 279,344 291,335 303,326 314,316 325,306 336,296 346,284 357,273 367,262 376,250 385,238 394,226 402,213 410,201 417,188 424,175 431,161 437,148 443,134 448,120 453,106 457,91 461,77 465,62 468,48 470,33 472,18 474,4 474,0">
          <text:p/>
        </draw:polygon>
        <draw:polygon draw:style-name="gr95" draw:text-style-name="P56" draw:layer="layout" svg:width="0.489cm" svg:height="0.443cm" svg:x="25.383cm" svg:y="3.918cm" svg:viewBox="0 0 490 444" draw:points="490,8 489,12 487,28 484,43 481,58 478,73 474,88 469,103 464,118 459,132 453,146 446,160 439,174 432,188 425,201 416,215 408,228 399,240 390,253 380,265 370,276 360,289 349,300 338,311 326,321 315,331 302,341 289,350 276,359 263,368 250,376 237,383 223,391 209,397 195,404 181,410 166,415 152,420 137,425 122,429 107,432 92,436 77,438 61,440 46,442 30,443 15,444 0,444 0,436 15,435 30,435 45,434 60,432 75,430 90,427 105,424 120,421 135,417 149,412 164,407 178,402 192,396 206,390 219,383 233,376 246,368 259,360 272,352 284,343 297,334 309,325 321,315 332,305 343,294 353,283 364,271 373,259 383,247 392,235 401,223 409,210 417,197 425,184 432,170 438,157 445,143 451,129 456,115 461,100 465,86 469,71 473,56 476,41 479,26 481,11 482,0">
          <text:p/>
        </draw:polygon>
        <draw:polygon draw:style-name="gr96" draw:text-style-name="P57" draw:layer="layout" svg:width="0.496cm" svg:height="0.444cm" svg:x="25.383cm" svg:y="3.926cm" svg:viewBox="0 0 497 445" draw:points="497,8 495,21 493,37 490,52 486,67 482,83 477,98 472,113 466,127 460,142 454,156 447,170 440,184 432,198 424,211 415,224 406,237 397,250 387,262 376,274 366,287 355,298 344,309 332,320 320,330 308,340 295,349 282,358 269,367 256,375 242,383 228,390 214,397 200,404 185,410 170,415 154,420 139,425 124,429 109,433 93,436 78,439 62,441 47,443 31,444 15,445 0,445 0,436 15,436 30,435 46,434 61,432 77,430 92,428 107,424 122,421 137,417 152,412 167,407 182,402 196,396 210,389 224,383 238,375 251,368 264,360 277,351 290,342 302,333 315,323 326,313 338,303 349,292 360,280 370,268 380,257 390,245 399,232 408,220 416,207 425,193 432,180 439,166 446,152 453,138 459,124 464,110 469,95 474,80 478,65 481,50 484,35 487,20 489,4 490,0">
          <text:p/>
        </draw:polygon>
        <draw:polygon draw:style-name="gr97" draw:text-style-name="P58" draw:layer="layout" svg:width="0.504cm" svg:height="0.444cm" svg:x="25.383cm" svg:y="3.934cm" svg:viewBox="0 0 505 445" draw:points="505,7 504,14 501,30 498,46 494,62 490,77 485,92 480,107 474,122 468,137 462,152 455,166 447,180 439,194 431,208 422,221 413,234 403,247 393,260 383,272 372,285 361,296 349,307 338,318 325,328 313,338 300,348 287,357 274,366 260,374 246,382 232,390 218,397 203,404 188,410 173,415 158,420 143,425 127,429 112,433 96,436 80,439 63,441 48,443 32,444 16,445 0,445 0,437 15,437 31,436 47,435 62,433 79,431 94,428 110,425 125,421 140,417 155,412 170,407 185,402 200,396 214,389 228,382 242,375 256,367 269,359 282,350 295,341 308,332 320,322 332,312 344,301 355,290 366,278 376,266 387,254 397,242 406,229 415,216 424,203 432,190 440,176 447,162 454,148 460,134 466,119 472,105 477,90 482,75 486,59 490,44 493,29 495,13 497,0">
          <text:p/>
        </draw:polygon>
        <draw:polygon draw:style-name="gr98" draw:text-style-name="P59" draw:layer="layout" svg:width="0.512cm" svg:height="0.446cm" svg:x="25.383cm" svg:y="3.941cm" svg:viewBox="0 0 513 447" draw:points="513,8 512,9 510,25 506,41 503,57 498,72 493,88 488,103 482,119 476,134 469,148 462,163 455,177 447,192 438,205 429,219 419,232 409,245 399,258 388,270 377,283 366,295 354,307 342,317 330,328 317,338 304,348 291,357 277,366 263,375 249,383 235,391 220,398 205,404 190,411 175,416 160,422 144,426 128,431 113,435 97,438 81,441 65,443 48,445 32,446 16,447 0,447 0,438 16,438 32,437 48,436 63,434 79,432 95,429 111,426 126,422 142,418 157,413 172,408 187,403 202,397 217,390 231,383 245,375 259,367 273,359 286,350 299,341 312,331 324,321 337,311 348,300 360,289 371,277 382,265 392,253 402,240 412,227 421,214 431,201 439,187 447,173 455,159 462,145 468,130 474,115 480,100 485,85 490,70 494,55 498,39 501,23 504,7 505,0">
          <text:p/>
        </draw:polygon>
        <draw:polygon draw:style-name="gr99" draw:text-style-name="P60" draw:layer="layout" svg:width="0.519cm" svg:height="0.447cm" svg:x="25.383cm" svg:y="3.949cm" svg:viewBox="0 0 520 448" draw:points="520,7 518,18 515,35 511,51 506,67 502,83 496,98 490,114 484,129 477,144 470,159 462,174 454,188 445,202 436,216 427,229 417,243 406,256 396,268 385,280 373,293 361,305 349,316 336,327 323,337 310,347 296,356 282,366 268,374 253,382 239,390 224,397 209,404 193,411 178,416 162,422 147,427 131,431 114,435 98,438 82,441 66,443 49,445 33,447 16,447 0,448 0,439 16,439 32,438 48,437 65,435 81,433 97,430 113,427 128,423 144,418 160,414 175,408 190,403 205,396 220,390 235,383 249,375 263,367 277,358 291,349 304,340 318,330 331,320 343,309 355,299 367,286 378,275 389,262 400,250 410,237 420,224 429,211 438,197 447,184 455,169 462,155 469,140 476,126 482,111 488,95 493,80 498,64 503,49 506,33 510,17 512,1 513,0">
          <text:p/>
        </draw:polygon>
        <draw:polygon draw:style-name="gr100" draw:text-style-name="P61" draw:layer="layout" svg:width="0.526cm" svg:height="0.448cm" svg:x="25.383cm" svg:y="3.956cm" svg:viewBox="0 0 527 449" draw:points="527,8 526,13 523,30 519,46 515,62 510,78 504,94 498,110 492,125 485,141 478,156 470,171 461,185 453,200 443,214 434,227 424,241 413,254 402,267 391,279 379,292 367,304 355,315 342,326 329,337 315,347 301,357 287,366 273,375 258,383 244,391 229,398 213,405 198,412 182,417 166,423 150,428 134,432 116,436 100,440 83,443 67,445 50,447 33,448 16,449 0,449 0,441 16,440 33,440 49,438 66,436 82,434 98,431 114,428 132,424 148,420 163,415 179,409 194,404 210,397 225,390 240,383 254,375 269,367 283,359 297,349 310,340 323,330 336,320 349,309 361,298 373,285 385,273 396,261 406,249 417,236 427,222 436,209 445,195 454,181 462,167 470,152 477,137 484,122 490,107 496,91 502,76 506,60 511,44 515,28 518,11 520,0">
          <text:p/>
        </draw:polygon>
        <draw:polygon draw:style-name="gr101" draw:text-style-name="P62" draw:layer="layout" svg:width="0.534cm" svg:height="0.449cm" svg:x="25.383cm" svg:y="3.964cm" svg:viewBox="0 0 535 450" draw:points="535,7 531,23 527,40 523,57 518,73 511,89 505,105 499,121 492,136 484,152 476,167 468,182 459,196 449,210 440,224 429,238 419,251 408,264 396,277 384,289 372,302 359,314 346,325 333,336 319,346 305,356 291,365 276,374 262,382 246,390 231,398 216,405 200,411 184,418 168,423 151,428 135,433 118,437 101,440 85,443 68,445 51,447 34,449 17,449 0,450 0,441 16,441 33,440 50,439 67,437 83,435 100,432 116,428 133,424 149,420 165,415 181,409 197,404 212,397 228,390 243,383 257,375 272,367 286,358 300,349 314,339 328,329 341,318 354,307 366,296 378,283 390,271 401,259 412,246 423,233 433,219 442,206 452,192 460,177 469,163 477,148 484,133 491,117 497,102 503,86 509,70 514,54 519,38 523,22 526,5 527,0">
          <text:p/>
        </draw:polygon>
        <draw:polygon draw:style-name="gr102" draw:text-style-name="P63" draw:layer="layout" svg:width="0.541cm" svg:height="0.45cm" svg:x="25.383cm" svg:y="3.971cm" svg:viewBox="0 0 542 451" draw:points="542,7 540,18 536,35 531,52 526,68 520,85 514,101 508,117 500,133 493,149 485,164 476,179 467,194 458,208 448,223 437,236 426,250 415,263 403,276 391,288 379,301 366,313 353,324 339,335 325,346 310,356 296,365 281,374 266,383 250,391 235,399 219,406 203,412 187,419 170,424 154,429 137,434 120,438 103,441 86,444 69,447 52,449 34,450 17,451 0,451 0,443 17,442 34,442 51,440 68,438 85,436 101,433 118,430 135,426 151,421 168,416 184,411 200,404 216,398 231,391 246,383 262,375 276,367 291,358 305,349 320,339 334,329 347,318 360,307 373,294 385,282 397,270 409,257 420,244 430,231 441,217 450,203 460,189 469,175 477,160 485,145 493,129 500,114 506,98 512,82 518,66 523,50 527,33 531,16 535,0">
          <text:p/>
        </draw:polygon>
        <draw:polygon draw:style-name="gr103" draw:text-style-name="P64" draw:layer="layout" svg:width="0.552cm" svg:height="0.45cm" svg:x="25.383cm" svg:y="3.978cm" svg:viewBox="0 0 553 451" draw:points="553,11 552,14 548,31 543,48 538,65 532,82 526,99 519,115 512,131 504,147 496,163 487,179 478,194 468,209 458,223 447,237 436,251 425,265 413,278 400,292 388,304 374,316 361,327 347,338 333,349 318,359 303,369 288,378 272,387 256,395 240,403 224,411 208,417 191,424 174,429 157,435 140,439 123,443 105,447 88,450 85,451 0,451 0,444 17,444 34,443 52,442 69,440 86,437 103,434 120,431 137,427 154,422 170,417 187,412 203,405 219,399 235,392 250,384 266,376 281,367 297,358 311,349 325,339 339,328 353,317 366,306 379,295 391,281 403,269 415,256 426,243 437,229 448,216 458,201 467,187 476,172 485,157 493,142 500,126 508,110 514,94 520,78 526,61 531,45 536,28 540,11 542,0">
          <text:p/>
        </draw:polygon>
        <draw:polygon draw:style-name="gr104" draw:text-style-name="P65" draw:layer="layout" svg:width="0.478cm" svg:height="0.439cm" svg:x="25.468cm" svg:y="3.989cm" svg:viewBox="0 0 479 440" draw:points="479,11 476,24 471,41 465,58 460,76 453,93 446,109 439,126 431,142 422,158 413,175 404,191 394,206 383,221 372,235 361,249 349,263 337,277 324,290 311,302 298,314 284,326 270,338 255,349 241,359 225,369 210,378 194,387 178,396 162,404 145,411 128,418 111,425 94,431 77,436 64,440 0,440 3,439 20,436 38,432 56,428 73,424 90,418 107,413 124,406 140,400 156,392 172,384 188,376 203,367 218,358 233,348 248,338 262,327 276,316 289,305 303,293 315,281 328,268 340,255 351,241 362,227 373,213 383,199 393,184 402,168 411,152 419,136 427,120 434,104 441,88 447,71 453,54 458,37 463,20 467,3 468,0">
          <text:p/>
        </draw:polygon>
        <draw:polygon draw:style-name="gr105" draw:text-style-name="P66" draw:layer="layout" svg:width="0.425cm" svg:height="0.428cm" svg:x="25.531cm" svg:y="4cm" svg:viewBox="0 0 426 429" draw:points="426,11 425,16 420,34 415,51 409,70 402,87 395,104 387,121 379,138 370,154 361,171 352,186 341,202 331,217 320,232 308,247 296,261 283,274 270,288 257,301 243,313 229,325 215,337 200,348 185,359 168,369 152,378 136,388 120,396 103,405 86,412 69,419 52,426 44,429 0,429 13,425 30,420 47,414 64,407 81,400 98,393 114,385 130,376 146,367 161,358 177,348 192,338 207,327 221,315 235,303 248,291 261,279 274,266 286,252 298,238 309,224 320,210 331,195 341,180 350,164 359,148 368,132 376,116 383,99 390,83 397,66 402,47 408,30 413,13 416,0">
          <text:p/>
        </draw:polygon>
        <draw:polygon draw:style-name="gr106" draw:text-style-name="P67" draw:layer="layout" svg:width="0.392cm" svg:height="0.417cm" svg:x="25.575cm" svg:y="4.011cm" svg:viewBox="0 0 393 418" draw:points="393,10 388,26 383,44 377,62 370,80 363,98 355,115 347,132 338,149 328,165 318,181 308,197 297,213 286,228 274,243 262,257 249,271 236,285 222,298 208,311 193,323 179,335 164,346 148,358 132,369 116,379 99,388 83,397 66,405 48,413 37,418 0,418 8,415 25,408 43,401 60,394 77,385 93,377 109,367 125,358 141,347 156,336 171,325 185,313 199,301 213,289 226,276 239,262 252,249 264,235 276,220 287,205 297,190 308,174 317,159 326,142 335,126 343,109 351,92 358,75 365,58 371,40 376,23 381,5 382,0">
          <text:p/>
        </draw:polygon>
        <draw:polygon draw:style-name="gr107" draw:text-style-name="P68" draw:layer="layout" svg:width="0.366cm" svg:height="0.407cm" svg:x="25.611cm" svg:y="4.021cm" svg:viewBox="0 0 367 408" draw:points="367,11 365,20 359,38 353,57 346,75 339,93 331,110 322,128 313,145 303,162 293,178 283,194 272,210 260,226 248,241 235,257 222,271 209,285 195,298 180,311 166,324 151,336 135,348 118,359 102,369 86,380 69,389 52,398 34,407 32,408 0,408 11,403 29,395 46,387 62,378 79,369 95,359 111,348 128,337 143,326 157,314 172,302 186,289 200,276 213,262 226,248 238,233 250,218 261,203 272,187 282,171 292,155 302,139 311,122 319,105 327,88 334,70 341,52 347,34 352,16 357,0">
          <text:p/>
        </draw:polygon>
        <draw:polygon draw:style-name="gr108" draw:text-style-name="P69" draw:layer="layout" svg:width="0.345cm" svg:height="0.396cm" svg:x="25.643cm" svg:y="4.032cm" svg:viewBox="0 0 346 397" draw:points="346,10 345,12 339,31 333,50 325,69 317,87 309,105 301,124 291,141 281,158 271,175 260,192 249,208 237,224 225,239 212,254 199,269 185,283 171,297 156,310 141,323 125,335 110,347 93,358 77,369 60,380 43,389 29,397 0,397 2,396 20,387 37,378 54,369 70,358 86,348 102,337 118,325 133,313 147,300 162,287 176,274 189,260 202,246 215,231 227,216 239,200 250,184 260,168 270,152 280,135 289,118 298,99 306,82 313,64 320,46 326,27 333,9 335,0">
          <text:p/>
        </draw:polygon>
        <draw:polygon draw:style-name="gr109" draw:text-style-name="P70" draw:layer="layout" svg:width="0.326cm" svg:height="0.387cm" svg:x="25.672cm" svg:y="4.042cm" svg:viewBox="0 0 327 388" draw:points="327,11 323,26 316,45 309,64 301,83 293,101 284,119 275,137 265,155 254,172 243,189 231,205 219,222 207,237 193,253 180,268 165,282 150,296 135,310 120,323 104,335 88,347 72,359 55,370 38,381 27,388 0,388 14,379 31,370 48,359 64,348 81,337 96,325 112,313 127,300 142,287 156,273 171,259 184,244 197,229 209,214 221,198 232,182 243,165 253,148 263,131 273,114 281,96 289,78 297,60 304,41 310,22 316,3 317,0">
          <text:p/>
        </draw:polygon>
        <draw:polygon draw:style-name="gr110" draw:text-style-name="P71" draw:layer="layout" svg:width="0.309cm" svg:height="0.376cm" svg:x="25.699cm" svg:y="4.052cm" svg:viewBox="0 0 310 377" draw:points="310,11 308,19 301,39 294,58 286,77 277,96 268,114 259,132 249,150 238,168 227,185 215,202 202,218 189,234 176,250 162,266 148,281 133,295 118,309 101,323 85,336 69,348 52,360 35,371 26,377 0,377 11,371 28,360 45,349 61,337 77,325 93,313 109,300 124,286 139,272 153,257 166,242 180,226 192,211 204,194 216,178 227,161 238,144 248,126 257,108 266,90 274,72 282,53 289,34 296,15 300,0">
          <text:p/>
        </draw:polygon>
        <draw:polygon draw:style-name="gr111" draw:text-style-name="P72" draw:layer="layout" svg:width="0.294cm" svg:height="0.365cm" svg:x="25.725cm" svg:y="4.063cm" svg:viewBox="0 0 295 366" draw:points="295,10 294,12 287,32 280,52 272,71 263,90 254,109 244,129 234,147 223,165 211,182 199,199 186,216 173,233 160,249 146,264 131,279 116,294 100,308 84,322 68,335 51,347 34,359 25,366 0,366 10,360 27,349 44,337 60,325 76,312 92,298 107,284 122,270 136,255 150,240 163,224 176,208 189,192 201,175 212,158 223,140 233,121 242,103 251,85 260,66 268,47 275,28 282,8 284,0">
          <text:p/>
        </draw:polygon>
        <draw:polygon draw:style-name="gr112" draw:text-style-name="P73" draw:layer="layout" svg:width="0.28cm" svg:height="0.355cm" svg:x="25.749cm" svg:y="4.073cm" svg:viewBox="0 0 281 356" draw:points="281,10 275,26 268,46 260,66 251,86 241,105 231,124 221,142 210,161 198,179 185,196 173,213 159,230 144,246 130,262 115,277 100,292 84,307 68,320 51,334 34,347 23,356 0,356 9,348 26,336 43,324 59,311 75,297 91,283 106,268 121,253 135,238 148,222 162,205 175,188 187,171 199,154 210,136 220,118 230,99 239,80 248,61 256,42 263,22 270,2 271,0">
          <text:p/>
        </draw:polygon>
        <draw:polygon draw:style-name="gr113" draw:text-style-name="P74" draw:layer="layout" svg:width="0.267cm" svg:height="0.345cm" svg:x="25.772cm" svg:y="4.083cm" svg:viewBox="0 0 268 346" draw:points="268,10 264,21 256,41 247,61 238,81 229,101 219,120 208,139 196,158 184,176 172,194 159,211 145,229 131,246 116,262 101,277 86,293 69,307 53,321 36,335 22,346 0,346 11,338 28,325 45,311 61,298 77,283 92,268 107,253 121,237 135,221 149,203 161,186 174,169 186,151 197,132 207,114 217,95 227,76 236,56 244,36 251,16 257,0">
          <text:p/>
        </draw:polygon>
        <draw:polygon draw:style-name="gr114" draw:text-style-name="P75" draw:layer="layout" svg:width="0.252cm" svg:height="0.335cm" svg:x="25.794cm" svg:y="4.093cm" svg:viewBox="0 0 253 336" draw:points="253,7 250,14 243,34 234,55 225,75 215,96 205,115 194,134 182,153 169,172 157,190 144,207 130,224 115,241 101,258 85,273 69,289 53,304 36,318 19,332 14,336 0,336 14,325 31,311 47,297 64,283 79,267 94,252 109,236 123,219 137,202 150,185 162,167 174,149 187,130 198,111 208,92 217,71 226,51 235,31 242,11 246,0">
          <text:p/>
        </draw:polygon>
        <draw:polygon draw:style-name="gr115" draw:text-style-name="P76" draw:layer="layout" svg:width="0.244cm" svg:height="0.333cm" svg:x="25.808cm" svg:y="4.1cm" svg:viewBox="0 0 245 334" draw:points="245,7 244,10 237,30 228,51 219,72 209,93 199,112 188,132 175,151 163,169 150,188 136,206 122,223 108,240 93,256 77,272 61,288 45,303 28,318 10,332 6,334 6,329 0,329 5,325 22,311 39,297 55,282 71,266 87,251 101,234 116,217 130,200 143,183 155,165 168,146 180,127 191,108 201,89 211,69 220,48 229,27 236,7 239,0">
          <text:p/>
        </draw:polygon>
        <draw:polygon draw:style-name="gr116" draw:text-style-name="P77" draw:layer="layout" svg:width="0.245cm" svg:height="0.337cm" svg:x="25.814cm" svg:y="4.107cm" svg:viewBox="0 0 246 338" draw:points="246,7 239,27 230,48 221,68 211,88 200,109 189,129 177,148 164,167 151,186 137,204 123,221 108,239 93,255 77,272 61,287 44,302 27,317 10,331 0,338 0,327 4,325 22,311 39,296 55,281 71,265 87,249 102,233 116,216 130,199 144,181 157,162 169,144 182,125 193,104 203,85 213,64 222,44 231,23 238,3 239,0">
          <text:p/>
        </draw:polygon>
        <draw:polygon draw:style-name="gr117" draw:text-style-name="P78" draw:layer="layout" svg:width="0.252cm" svg:height="0.341cm" svg:x="25.814cm" svg:y="4.114cm" svg:viewBox="0 0 253 342" draw:points="253,6 247,23 238,44 228,65 218,85 208,106 196,125 184,145 172,165 158,184 144,202 130,220 115,237 99,254 83,271 67,287 50,302 33,317 15,331 0,342 0,331 10,324 27,310 44,295 61,280 77,265 93,248 108,232 123,214 137,197 151,179 164,160 177,140 189,121 200,101 211,81 221,61 230,41 239,20 246,0">
          <text:p/>
        </draw:polygon>
        <draw:polygon draw:style-name="gr118" draw:text-style-name="P79" draw:layer="layout" svg:width="0.258cm" svg:height="0.346cm" svg:x="25.814cm" svg:y="4.12cm" svg:viewBox="0 0 259 347" draw:points="259,7 254,20 246,41 236,62 226,83 215,104 204,124 192,143 179,163 166,182 152,201 137,219 122,237 106,254 89,271 73,287 56,302 38,317 20,332 2,346 0,347 0,336 15,325 33,311 50,296 67,281 83,265 99,248 116,231 131,214 145,196 159,177 172,158 184,139 196,119 208,100 218,79 228,59 238,38 247,17 253,0">
          <text:p/>
        </draw:polygon>
        <draw:polygon draw:style-name="gr119" draw:text-style-name="P80" draw:layer="layout" svg:width="0.265cm" svg:height="0.349cm" svg:x="25.814cm" svg:y="4.127cm" svg:viewBox="0 0 266 350" draw:points="266,6 262,16 253,38 244,59 234,80 223,101 211,121 199,141 185,161 171,180 157,199 143,217 128,235 112,253 96,270 79,286 61,302 44,317 25,332 7,346 0,350 0,340 2,339 20,325 38,310 56,295 73,280 89,264 106,247 121,229 136,211 151,193 165,175 178,156 192,136 204,117 215,97 226,76 236,55 246,34 254,13 259,0">
          <text:p/>
        </draw:polygon>
        <draw:polygon draw:style-name="gr120" draw:text-style-name="P81" draw:layer="layout" svg:width="0.272cm" svg:height="0.353cm" svg:x="25.814cm" svg:y="4.133cm" svg:viewBox="0 0 273 354" draw:points="273,7 270,13 261,35 252,57 241,78 230,99 218,119 206,140 193,159 179,179 165,198 150,216 135,234 119,252 103,269 86,286 68,302 49,318 31,332 12,347 0,354 0,344 7,340 25,326 44,311 61,296 80,279 97,263 113,246 129,229 144,211 158,193 172,174 186,155 199,135 211,115 223,95 234,74 244,53 253,32 262,10 266,0">
          <text:p/>
        </draw:polygon>
        <draw:polygon draw:style-name="gr121" draw:text-style-name="P82" draw:layer="layout" svg:width="0.278cm" svg:height="0.357cm" svg:x="25.814cm" svg:y="4.14cm" svg:viewBox="0 0 279 358" draw:points="279,7 278,9 269,32 259,53 249,75 238,96 226,117 213,137 200,157 186,177 171,196 156,215 140,233 124,251 108,268 90,284 73,301 55,317 36,332 17,347 0,358 0,347 12,340 31,325 49,311 67,294 85,278 102,262 118,245 134,227 149,209 164,191 178,172 193,152 206,133 218,112 230,92 241,71 252,50 261,28 270,6 273,0">
          <text:p/>
        </draw:polygon>
        <draw:polygon draw:style-name="gr122" draw:text-style-name="P83" draw:layer="layout" svg:width="0.285cm" svg:height="0.36cm" svg:x="25.814cm" svg:y="4.147cm" svg:viewBox="0 0 286 361" draw:points="286,6 277,28 267,50 256,72 245,93 233,114 220,135 207,155 193,175 179,194 163,213 147,232 131,249 114,267 96,284 78,300 60,316 41,331 22,345 2,360 0,361 0,350 17,339 36,324 55,309 73,294 90,277 108,261 124,244 140,226 156,208 171,189 186,170 200,150 213,130 226,110 238,89 249,68 259,46 269,25 278,2 279,0">
          <text:p/>
        </draw:polygon>
        <draw:polygon draw:style-name="gr122" draw:text-style-name="P83" draw:layer="layout" svg:width="0.292cm" svg:height="0.365cm" svg:x="25.814cm" svg:y="4.153cm" svg:viewBox="0 0 293 366" draw:points="293,7 285,25 275,49 264,71 253,92 240,114 227,134 213,155 199,175 184,195 169,214 153,232 137,250 120,268 102,285 84,301 65,317 46,333 27,347 7,361 0,366 0,355 2,354 22,340 41,326 60,311 78,295 96,279 114,262 131,244 147,227 163,208 178,189 192,170 206,150 219,130 233,109 245,88 256,67 267,45 277,22 286,0">
          <text:p/>
        </draw:polygon>
        <draw:polygon draw:style-name="gr123" draw:text-style-name="P84" draw:layer="layout" svg:width="0.298cm" svg:height="0.368cm" svg:x="25.814cm" svg:y="4.16cm" svg:viewBox="0 0 299 369" draw:points="299,7 293,22 283,44 272,68 260,89 248,111 235,132 221,153 207,173 192,193 177,212 160,231 143,249 126,267 108,284 90,301 71,317 52,332 32,347 12,362 0,369 0,359 7,354 27,340 46,326 65,310 84,294 102,278 120,261 137,243 153,225 169,207 185,188 200,168 214,148 228,127 240,107 253,85 264,64 275,41 285,18 293,0">
          <text:p/>
        </draw:polygon>
        <draw:polygon draw:style-name="gr124" draw:text-style-name="P85" draw:layer="layout" svg:width="0.305cm" svg:height="0.371cm" svg:x="25.814cm" svg:y="4.167cm" svg:viewBox="0 0 306 372" draw:points="306,6 301,18 290,41 279,63 268,86 255,108 242,130 228,151 214,171 199,191 183,211 166,230 149,248 132,266 114,283 95,300 76,317 57,332 37,347 16,362 0,372 0,362 12,355 32,340 52,325 71,310 90,294 108,277 126,260 143,242 160,224 176,205 192,186 207,166 221,146 235,125 248,104 260,81 272,60 283,37 293,15 299,0">
          <text:p/>
        </draw:polygon>
        <draw:polygon draw:style-name="gr125" draw:text-style-name="P86" draw:layer="layout" svg:width="0.311cm" svg:height="0.375cm" svg:x="25.814cm" svg:y="4.173cm" svg:viewBox="0 0 312 376" draw:points="312,7 309,16 298,39 287,61 275,84 263,106 249,127 236,149 221,170 206,190 190,210 174,229 157,248 139,266 121,284 102,301 83,317 62,333 42,348 21,363 0,376 0,366 16,356 37,341 57,326 77,311 96,294 115,277 133,260 150,242 167,224 183,205 199,185 214,165 228,145 242,123 255,101 268,80 279,57 290,35 301,12 306,0">
          <text:p/>
        </draw:polygon>
        <draw:polygon draw:style-name="gr125" draw:text-style-name="P86" draw:layer="layout" svg:width="0.318cm" svg:height="0.378cm" svg:x="25.814cm" svg:y="4.18cm" svg:viewBox="0 0 319 379" draw:points="319,6 316,12 306,35 295,58 283,81 270,103 257,125 243,146 228,168 213,189 197,208 180,228 163,247 145,265 127,283 108,300 88,317 68,333 48,348 27,363 5,377 0,379 0,369 21,356 43,341 63,326 83,310 102,294 121,277 139,259 157,241 174,222 190,203 206,183 221,162 236,141 249,120 263,99 275,77 287,54 298,32 309,9 312,0">
          <text:p/>
        </draw:polygon>
        <draw:polygon draw:style-name="gr126" draw:text-style-name="P87" draw:layer="layout" svg:width="0.324cm" svg:height="0.382cm" svg:x="25.814cm" svg:y="4.186cm" svg:viewBox="0 0 325 383" draw:points="325,7 324,9 314,33 302,56 290,79 277,101 264,123 250,145 235,166 219,187 203,208 185,228 168,247 150,265 131,283 112,301 93,317 73,334 52,349 31,364 9,378 0,383 0,373 5,371 26,357 47,342 67,327 87,311 107,294 126,277 144,259 162,241 179,222 197,201 213,182 228,161 243,140 257,119 270,97 283,75 295,52 306,29 316,6 319,0">
          <text:p/>
        </draw:polygon>
        <draw:polygon draw:style-name="gr127" draw:text-style-name="P88" draw:layer="layout" svg:width="0.331cm" svg:height="0.385cm" svg:x="25.814cm" svg:y="4.193cm" svg:viewBox="0 0 332 386" draw:points="332,6 321,30 310,53 298,76 285,99 271,121 257,143 242,164 226,185 210,205 193,225 175,246 157,264 138,282 119,300 99,317 78,333 57,349 36,364 14,378 0,386 0,376 9,371 31,357 52,342 73,327 94,310 113,294 132,276 151,258 169,240 186,220 203,200 219,180 235,159 250,138 264,116 277,94 290,72 302,49 314,26 324,2 325,0">
          <text:p/>
        </draw:polygon>
        <draw:polygon draw:style-name="gr128" draw:text-style-name="P89" draw:layer="layout" svg:width="0.341cm" svg:height="0.395cm" svg:x="25.814cm" svg:y="4.199cm" svg:viewBox="0 0 342 396" draw:points="342,10 333,29 321,53 309,76 296,99 282,122 267,144 256,160 59,357 43,369 21,383 0,396 0,380 14,372 36,358 57,343 78,326 98,310 118,293 137,275 156,257 174,239 192,219 210,199 226,179 242,158 257,137 271,115 285,93 298,70 310,47 321,24 332,0">
          <text:p/>
        </draw:polygon>
        <draw:path draw:style-name="gr129" draw:text-style-name="P90" draw:layer="layout" svg:width="0.35cm" svg:height="0.399cm" svg:x="25.814cm" svg:y="4.209cm" svg:viewBox="0 0 351 400" svg:d="M351 10l-6 14-12 25-13 23-13 24-6 9-45 45 11-16 15-22 14-23 13-23 12-23 12-24 9-19zM14 392l-9 6-5 2v-14l21-14 22-14 16-12z">
          <text:p/>
        </draw:path>
        <draw:path draw:style-name="gr130" draw:text-style-name="P91" draw:layer="layout" svg:width="0.36cm" svg:height="0.395cm" svg:x="25.814cm" svg:y="4.219cm" svg:viewBox="0 0 361 396" svg:d="M361 9l-5 11-12 24-8 16-35 35 6-9 13-24 13-23 12-25 6-14zM0 396v-6l5-2 9-6z">
          <text:p/>
        </draw:path>
        <draw:polygon draw:style-name="gr131" draw:text-style-name="P92" draw:layer="layout" svg:width="0.035cm" svg:height="0.051cm" svg:x="26.149cm" svg:y="4.228cm" svg:viewBox="0 0 36 52" draw:points="36,10 33,16 30,22 0,52 8,36 21,11 26,0">
          <text:p/>
        </draw:polygon>
        <draw:polygon draw:style-name="gr132" draw:text-style-name="P93" draw:layer="layout" svg:width="0.009cm" svg:height="0.012cm" svg:x="26.178cm" svg:y="4.238cm" svg:viewBox="0 0 10 13" draw:points="10,3 0,13 4,7 7,0">
          <text:p/>
        </draw:polygon>
        <draw:polygon draw:style-name="gr220" draw:text-style-name="P2" draw:layer="layout" svg:width="0.804cm" svg:height="0.745cm" svg:x="25.383cm" svg:y="3.869cm" svg:viewBox="0 0 805 746" draw:points="0,186 431,186 431,0 805,373 431,746 431,560 0,560">
          <text:p/>
        </draw:polygon>
        <draw:frame draw:style-name="gr257" draw:text-style-name="P4" draw:layer="layout" svg:width="2.759cm" svg:height="0.552cm" svg:x="27.501cm" svg:y="4.03cm">
          <draw:text-box>
            <text:p text:style-name="P3"><text:span text:style-name="T3">Deployment </text:span></text:p>
          </draw:text-box>
        </draw:frame>
        <draw:frame draw:style-name="gr237" draw:text-style-name="P4" draw:layer="layout" svg:width="2.049cm" svg:height="0.552cm" draw:transform="rotate (-1.5707963267949) translate (0.69cm 5.723cm)">
          <draw:text-box>
            <text:p text:style-name="P3"><text:span text:style-name="T3">Objective</text:span></text:p>
          </draw:text-box>
        </draw:frame>
        <draw:polygon draw:style-name="gr261" draw:text-style-name="P131" draw:layer="layout" svg:width="5.385cm" svg:height="9.152cm" svg:x="1.202cm" svg:y="9.584cm" svg:viewBox="0 0 5386 9153" draw:points="0,0 5386,0 5386,9153 0,9153">
          <text:p/>
        </draw:polygon>
        <draw:frame draw:style-name="gr262" draw:text-style-name="P4" draw:layer="layout" svg:width="1.312cm" svg:height="0.552cm" draw:transform="rotate (-1.5707963267949) translate (0.69cm 11.946cm)">
          <draw:text-box>
            <text:p text:style-name="P3"><text:span text:style-name="T3">Tasks</text:span></text:p>
          </draw:text-box>
        </draw:frame>
        <draw:frame draw:style-name="gr175" draw:text-style-name="P105" draw:layer="layout" svg:width="0.422cm" svg:height="0.475cm" svg:x="1.459cm" svg:y="9.75cm">
          <draw:text-box>
            <text:p text:style-name="P3"><text:span text:style-name="T19">1.</text:span></text:p>
          </draw:text-box>
        </draw:frame>
        <draw:frame draw:style-name="gr263" draw:text-style-name="P105" draw:layer="layout" svg:width="3.579cm" svg:height="0.475cm" svg:x="2.094cm" svg:y="9.75cm">
          <draw:text-box>
            <text:p text:style-name="P3"><text:span text:style-name="T19">Walk through Apps</text:span></text:p>
          </draw:text-box>
        </draw:frame>
        <draw:frame draw:style-name="gr175" draw:text-style-name="P105" draw:layer="layout" svg:width="0.422cm" svg:height="0.475cm" svg:x="1.459cm" svg:y="10.258cm">
          <draw:text-box>
            <text:p text:style-name="P3"><text:span text:style-name="T19">2.</text:span></text:p>
          </draw:text-box>
        </draw:frame>
        <draw:frame draw:style-name="gr264" draw:text-style-name="P105" draw:layer="layout" svg:width="4.026cm" svg:height="0.475cm" svg:x="2.094cm" svg:y="10.258cm">
          <draw:text-box>
            <text:p text:style-name="P3"><text:span text:style-name="T19">Investigate/group biz </text:span></text:p>
          </draw:text-box>
        </draw:frame>
        <draw:frame draw:style-name="gr265" draw:text-style-name="P105" draw:layer="layout" svg:width="1.649cm" svg:height="0.475cm" svg:x="2.094cm" svg:y="10.765cm">
          <draw:text-box>
            <text:p text:style-name="P3"><text:span text:style-name="T19">workflow</text:span></text:p>
          </draw:text-box>
        </draw:frame>
        <draw:frame draw:style-name="gr175" draw:text-style-name="P105" draw:layer="layout" svg:width="0.422cm" svg:height="0.475cm" svg:x="1.459cm" svg:y="11.275cm">
          <draw:text-box>
            <text:p text:style-name="P3"><text:span text:style-name="T19">3.</text:span></text:p>
          </draw:text-box>
        </draw:frame>
        <draw:frame draw:style-name="gr266" draw:text-style-name="P105" draw:layer="layout" svg:width="3.65cm" svg:height="0.475cm" svg:x="2.094cm" svg:y="11.275cm">
          <draw:text-box>
            <text:p text:style-name="P3"><text:span text:style-name="T19">Check dependence</text:span></text:p>
          </draw:text-box>
        </draw:frame>
        <draw:frame draw:style-name="gr175" draw:text-style-name="P105" draw:layer="layout" svg:width="0.422cm" svg:height="0.475cm" svg:x="1.459cm" svg:y="11.783cm">
          <draw:text-box>
            <text:p text:style-name="P3"><text:span text:style-name="T19">4.</text:span></text:p>
          </draw:text-box>
        </draw:frame>
        <draw:frame draw:style-name="gr267" draw:text-style-name="P105" draw:layer="layout" svg:width="1.955cm" svg:height="0.475cm" svg:x="2.094cm" svg:y="11.783cm">
          <draw:text-box>
            <text:p text:style-name="P3"><text:span text:style-name="T19">Collect all </text:span></text:p>
          </draw:text-box>
        </draw:frame>
        <draw:frame draw:style-name="gr268" draw:text-style-name="P105" draw:layer="layout" svg:width="3.39cm" svg:height="0.475cm" svg:x="2.094cm" svg:y="12.291cm">
          <draw:text-box>
            <text:p text:style-name="P3"><text:span text:style-name="T19">workflow/Mapping</text:span></text:p>
          </draw:text-box>
        </draw:frame>
        <draw:frame draw:style-name="gr178" draw:text-style-name="P105" draw:layer="layout" svg:width="0.423cm" svg:height="0.475cm" svg:x="1.459cm" svg:y="12.798cm">
          <draw:text-box>
            <text:p text:style-name="P3"><text:span text:style-name="T19">5.</text:span></text:p>
          </draw:text-box>
        </draw:frame>
        <draw:frame draw:style-name="gr269" draw:text-style-name="P105" draw:layer="layout" svg:width="3.908cm" svg:height="0.475cm" svg:x="2.094cm" svg:y="12.798cm">
          <draw:text-box>
            <text:p text:style-name="P3"><text:span text:style-name="T19">Collect performance </text:span></text:p>
          </draw:text-box>
        </draw:frame>
        <draw:frame draw:style-name="gr270" draw:text-style-name="P105" draw:layer="layout" svg:width="1.014cm" svg:height="0.475cm" svg:x="2.094cm" svg:y="13.307cm">
          <draw:text-box>
            <text:p text:style-name="P3"><text:span text:style-name="T19">index</text:span></text:p>
          </draw:text-box>
        </draw:frame>
        <draw:frame draw:style-name="gr175" draw:text-style-name="P105" draw:layer="layout" svg:width="0.422cm" svg:height="0.475cm" svg:x="1.459cm" svg:y="13.815cm">
          <draw:text-box>
            <text:p text:style-name="P3"><text:span text:style-name="T19">6.</text:span></text:p>
          </draw:text-box>
        </draw:frame>
        <draw:frame draw:style-name="gr271" draw:text-style-name="P105" draw:layer="layout" svg:width="3.555cm" svg:height="0.475cm" svg:x="2.094cm" svg:y="13.815cm">
          <draw:text-box>
            <text:p text:style-name="P3"><text:span text:style-name="T19">Collect parameters</text:span></text:p>
          </draw:text-box>
        </draw:frame>
        <draw:frame draw:style-name="gr175" draw:text-style-name="P105" draw:layer="layout" svg:width="0.422cm" svg:height="0.475cm" svg:x="1.459cm" svg:y="14.323cm">
          <draw:text-box>
            <text:p text:style-name="P3"><text:span text:style-name="T19">7.</text:span></text:p>
          </draw:text-box>
        </draw:frame>
        <draw:frame draw:style-name="gr272" draw:text-style-name="P105" draw:layer="layout" svg:width="2.261cm" svg:height="0.475cm" svg:x="2.094cm" svg:y="14.323cm">
          <draw:text-box>
            <text:p text:style-name="P3"><text:span text:style-name="T19">Check data </text:span></text:p>
          </draw:text-box>
        </draw:frame>
        <draw:frame draw:style-name="gr228" draw:text-style-name="P105" draw:layer="layout" svg:width="2.237cm" svg:height="0.475cm" svg:x="2.094cm" svg:y="14.832cm">
          <draw:text-box>
            <text:p text:style-name="P3"><text:span text:style-name="T19">size/volume</text:span></text:p>
          </draw:text-box>
        </draw:frame>
        <draw:frame draw:style-name="gr175" draw:text-style-name="P105" draw:layer="layout" svg:width="0.422cm" svg:height="0.475cm" svg:x="1.459cm" svg:y="15.34cm">
          <draw:text-box>
            <text:p text:style-name="P3"><text:span text:style-name="T19">8.</text:span></text:p>
          </draw:text-box>
        </draw:frame>
        <draw:frame draw:style-name="gr273" draw:text-style-name="P105" draw:layer="layout" svg:width="3.249cm" svg:height="0.475cm" svg:x="2.094cm" svg:y="15.34cm">
          <draw:text-box>
            <text:p text:style-name="P3"><text:span text:style-name="T19">Collect scheduler</text:span></text:p>
          </draw:text-box>
        </draw:frame>
        <draw:frame draw:style-name="gr175" draw:text-style-name="P105" draw:layer="layout" svg:width="0.422cm" svg:height="0.475cm" svg:x="1.459cm" svg:y="15.848cm">
          <draw:text-box>
            <text:p text:style-name="P3"><text:span text:style-name="T19">9.</text:span></text:p>
          </draw:text-box>
        </draw:frame>
        <draw:polygon draw:style-name="gr274" draw:text-style-name="P132" draw:layer="layout" svg:width="5.385cm" svg:height="3.929cm" svg:x="1.278cm" svg:y="5.562cm" svg:viewBox="0 0 5386 3930" draw:points="0,0 5386,0 5386,3930 0,3930">
          <text:p/>
        </draw:polygon>
        <draw:frame draw:style-name="gr275" draw:text-style-name="P105" draw:layer="layout" svg:width="3.532cm" svg:height="0.475cm" svg:x="2.094cm" svg:y="15.848cm">
          <draw:text-box>
            <text:p text:style-name="P3"><text:span text:style-name="T19">Refine project plan</text:span></text:p>
          </draw:text-box>
        </draw:frame>
        <draw:frame draw:style-name="gr187" draw:text-style-name="P4" draw:layer="layout" svg:width="0.491cm" svg:height="0.552cm" svg:x="1.536cm" svg:y="5.727cm">
          <draw:text-box>
            <text:p text:style-name="P3"><text:span text:style-name="T3">•</text:span></text:p>
          </draw:text-box>
        </draw:frame>
        <draw:frame draw:style-name="gr232" draw:text-style-name="P4" draw:layer="layout" svg:width="3.14cm" svg:height="0.552cm" svg:x="2.137cm" svg:y="5.727cm">
          <draw:text-box>
            <text:p text:style-name="P3"><text:span text:style-name="T3">Grasp current </text:span></text:p>
          </draw:text-box>
        </draw:frame>
        <draw:polygon draw:style-name="gr261" draw:text-style-name="P131" draw:layer="layout" svg:width="5.385cm" svg:height="9.152cm" svg:x="7.128cm" svg:y="9.584cm" svg:viewBox="0 0 5386 9153" draw:points="0,0 5386,0 5386,9153 0,9153">
          <text:p/>
        </draw:polygon>
        <draw:frame draw:style-name="gr276" draw:text-style-name="P4" draw:layer="layout" svg:width="3.686cm" svg:height="0.552cm" svg:x="2.137cm" svg:y="6.321cm">
          <draw:text-box>
            <text:p text:style-name="P3"><text:span text:style-name="T3">system &amp; all jobs</text:span></text:p>
          </draw:text-box>
        </draw:frame>
        <draw:frame draw:style-name="gr175" draw:text-style-name="P105" draw:layer="layout" svg:width="0.422cm" svg:height="0.475cm" svg:x="7.385cm" svg:y="9.75cm">
          <draw:text-box>
            <text:p text:style-name="P3"><text:span text:style-name="T19">1.</text:span></text:p>
          </draw:text-box>
        </draw:frame>
        <draw:frame draw:style-name="gr277" draw:text-style-name="P105" draw:layer="layout" svg:width="3.414cm" svg:height="0.475cm" svg:x="7.986cm" svg:y="9.75cm">
          <draw:text-box>
            <text:p text:style-name="P3"><text:span text:style-name="T19">List out functional </text:span></text:p>
          </draw:text-box>
        </draw:frame>
        <draw:frame draw:style-name="gr278" draw:text-style-name="P105" draw:layer="layout" svg:width="1.602cm" svg:height="0.475cm" svg:x="7.986cm" svg:y="10.258cm">
          <draw:text-box>
            <text:p text:style-name="P3"><text:span text:style-name="T19">modules</text:span></text:p>
          </draw:text-box>
        </draw:frame>
        <draw:frame draw:style-name="gr178" draw:text-style-name="P105" draw:layer="layout" svg:width="0.423cm" svg:height="0.475cm" svg:x="7.385cm" svg:y="10.765cm">
          <draw:text-box>
            <text:p text:style-name="P3"><text:span text:style-name="T19">2.</text:span></text:p>
          </draw:text-box>
        </draw:frame>
        <draw:frame draw:style-name="gr279" draw:text-style-name="P105" draw:layer="layout" svg:width="3.861cm" svg:height="0.475cm" svg:x="7.986cm" svg:y="10.765cm">
          <draw:text-box>
            <text:p text:style-name="P3"><text:span text:style-name="T19">Group functionalities</text:span></text:p>
          </draw:text-box>
        </draw:frame>
        <draw:frame draw:style-name="gr175" draw:text-style-name="P105" draw:layer="layout" svg:width="0.422cm" svg:height="0.475cm" svg:x="7.385cm" svg:y="11.275cm">
          <draw:text-box>
            <text:p text:style-name="P3"><text:span text:style-name="T19">3.</text:span></text:p>
          </draw:text-box>
        </draw:frame>
        <draw:frame draw:style-name="gr280" draw:text-style-name="P105" draw:layer="layout" svg:width="4.143cm" svg:height="0.475cm" svg:x="7.986cm" svg:y="11.275cm">
          <draw:text-box>
            <text:p text:style-name="P3"><text:span text:style-name="T19">Measure performance</text:span></text:p>
          </draw:text-box>
        </draw:frame>
        <draw:frame draw:style-name="gr175" draw:text-style-name="P105" draw:layer="layout" svg:width="0.422cm" svg:height="0.475cm" svg:x="7.385cm" svg:y="11.783cm">
          <draw:text-box>
            <text:p text:style-name="P3"><text:span text:style-name="T19">4.</text:span></text:p>
          </draw:text-box>
        </draw:frame>
        <draw:frame draw:style-name="gr281" draw:text-style-name="P105" draw:layer="layout" svg:width="3.744cm" svg:height="0.475cm" svg:x="7.986cm" svg:y="11.783cm">
          <draw:text-box>
            <text:p text:style-name="P3"><text:span text:style-name="T19">Design the topology</text:span></text:p>
          </draw:text-box>
        </draw:frame>
        <draw:frame draw:style-name="gr175" draw:text-style-name="P105" draw:layer="layout" svg:width="0.422cm" svg:height="0.475cm" svg:x="7.385cm" svg:y="12.291cm">
          <draw:text-box>
            <text:p text:style-name="P3"><text:span text:style-name="T19">5.</text:span></text:p>
          </draw:text-box>
        </draw:frame>
        <draw:frame draw:style-name="gr282" draw:text-style-name="P105" draw:layer="layout" svg:width="4.284cm" svg:height="0.475cm" svg:x="7.986cm" svg:y="12.291cm">
          <draw:text-box>
            <text:p text:style-name="P3"><text:span text:style-name="T19">Compare with existing </text:span></text:p>
          </draw:text-box>
        </draw:frame>
        <draw:frame draw:style-name="gr283" draw:text-style-name="P105" draw:layer="layout" svg:width="1.343cm" svg:height="0.475cm" svg:x="7.986cm" svg:y="12.798cm">
          <draw:text-box>
            <text:p text:style-name="P3"><text:span text:style-name="T19">system</text:span></text:p>
          </draw:text-box>
        </draw:frame>
        <draw:frame draw:style-name="gr175" draw:text-style-name="P105" draw:layer="layout" svg:width="0.422cm" svg:height="0.475cm" svg:x="7.385cm" svg:y="13.307cm">
          <draw:text-box>
            <text:p text:style-name="P3"><text:span text:style-name="T19">6.</text:span></text:p>
          </draw:text-box>
        </draw:frame>
        <draw:frame draw:style-name="gr284" draw:text-style-name="P105" draw:layer="layout" svg:width="2.637cm" svg:height="0.475cm" svg:x="8.104cm" svg:y="13.307cm">
          <draw:text-box>
            <text:p text:style-name="P3"><text:span text:style-name="T19">Research the </text:span></text:p>
          </draw:text-box>
        </draw:frame>
        <draw:frame draw:style-name="gr222" draw:text-style-name="P105" draw:layer="layout" svg:width="3.226cm" svg:height="0.475cm" svg:x="7.986cm" svg:y="13.815cm">
          <draw:text-box>
            <text:p text:style-name="P3"><text:span text:style-name="T19">alternative for all </text:span></text:p>
          </draw:text-box>
        </draw:frame>
        <draw:frame draw:style-name="gr285" draw:text-style-name="P105" draw:layer="layout" svg:width="4.238cm" svg:height="0.475cm" svg:x="7.986cm" svg:y="14.323cm">
          <draw:text-box>
            <text:p text:style-name="P3"><text:span text:style-name="T19">functions of Infomatica</text:span></text:p>
          </draw:text-box>
        </draw:frame>
        <draw:frame draw:style-name="gr175" draw:text-style-name="P105" draw:layer="layout" svg:width="0.422cm" svg:height="0.475cm" svg:x="7.385cm" svg:y="14.832cm">
          <draw:text-box>
            <text:p text:style-name="P3"><text:span text:style-name="T19">7.</text:span></text:p>
          </draw:text-box>
        </draw:frame>
        <draw:frame draw:style-name="gr286" draw:text-style-name="P105" draw:layer="layout" svg:width="2.284cm" svg:height="0.475cm" svg:x="7.986cm" svg:y="14.832cm">
          <draw:text-box>
            <text:p text:style-name="P3"><text:span text:style-name="T19">Finalize the </text:span></text:p>
          </draw:text-box>
        </draw:frame>
        <draw:frame draw:style-name="gr287" draw:text-style-name="P105" draw:layer="layout" svg:width="2.214cm" svg:height="0.475cm" svg:x="7.986cm" svg:y="15.34cm">
          <draw:text-box>
            <text:p text:style-name="P3"><text:span text:style-name="T19">architecture</text:span></text:p>
          </draw:text-box>
        </draw:frame>
        <draw:frame draw:style-name="gr175" draw:text-style-name="P105" draw:layer="layout" svg:width="0.422cm" svg:height="0.475cm" svg:x="7.385cm" svg:y="15.848cm">
          <draw:text-box>
            <text:p text:style-name="P3"><text:span text:style-name="T19">8.</text:span></text:p>
          </draw:text-box>
        </draw:frame>
        <draw:frame draw:style-name="gr288" draw:text-style-name="P105" draw:layer="layout" svg:width="2.05cm" svg:height="0.475cm" svg:x="7.986cm" svg:y="15.848cm">
          <draw:text-box>
            <text:p text:style-name="P3"><text:span text:style-name="T19">Set up the </text:span></text:p>
          </draw:text-box>
        </draw:frame>
        <draw:frame draw:style-name="gr289" draw:text-style-name="P105" draw:layer="layout" svg:width="2.543cm" svg:height="0.475cm" svg:x="7.986cm" svg:y="16.356cm">
          <draw:text-box>
            <text:p text:style-name="P3"><text:span text:style-name="T19">environments</text:span></text:p>
          </draw:text-box>
        </draw:frame>
        <draw:frame draw:style-name="gr175" draw:text-style-name="P105" draw:layer="layout" svg:width="0.422cm" svg:height="0.475cm" svg:x="7.385cm" svg:y="16.865cm">
          <draw:text-box>
            <text:p text:style-name="P3"><text:span text:style-name="T19">9.</text:span></text:p>
          </draw:text-box>
        </draw:frame>
        <draw:frame draw:style-name="gr290" draw:text-style-name="P105" draw:layer="layout" svg:width="4.214cm" svg:height="0.475cm" svg:x="7.986cm" svg:y="16.865cm">
          <draw:text-box>
            <text:p text:style-name="P3"><text:span text:style-name="T19">Define testing strategy</text:span></text:p>
          </draw:text-box>
        </draw:frame>
        <draw:polygon draw:style-name="gr274" draw:text-style-name="P132" draw:layer="layout" svg:width="5.385cm" svg:height="3.938cm" svg:x="7.128cm" svg:y="5.579cm" svg:viewBox="0 0 5386 3939" draw:points="0,0 5386,0 5386,3939 0,3939">
          <text:p/>
        </draw:polygon>
        <draw:frame draw:style-name="gr291" draw:text-style-name="P105" draw:layer="layout" svg:width="4.12cm" svg:height="0.475cm" svg:x="7.385cm" svg:y="17.373cm">
          <draw:text-box>
            <text:p text:style-name="P3"><text:span text:style-name="T19">10.Refine project plan</text:span></text:p>
          </draw:text-box>
        </draw:frame>
        <draw:frame draw:style-name="gr186" draw:text-style-name="P4" draw:layer="layout" svg:width="0.49cm" svg:height="0.552cm" svg:x="7.385cm" svg:y="5.751cm">
          <draw:text-box>
            <text:p text:style-name="P3"><text:span text:style-name="T3">•</text:span></text:p>
          </draw:text-box>
        </draw:frame>
        <draw:frame draw:style-name="gr292" draw:text-style-name="P4" draw:layer="layout" svg:width="4.068cm" svg:height="0.552cm" svg:x="7.986cm" svg:y="5.751cm">
          <draw:text-box>
            <text:p text:style-name="P3"><text:span text:style-name="T3">Certify the system </text:span></text:p>
          </draw:text-box>
        </draw:frame>
        <draw:frame draw:style-name="gr293" draw:text-style-name="P4" draw:layer="layout" svg:width="3.168cm" svg:height="0.552cm" svg:x="7.986cm" svg:y="6.343cm">
          <draw:text-box>
            <text:p text:style-name="P3"><text:span text:style-name="T3">architecture &amp; </text:span></text:p>
          </draw:text-box>
        </draw:frame>
        <draw:frame draw:style-name="gr294" draw:text-style-name="P4" draw:layer="layout" svg:width="3.468cm" svg:height="0.552cm" svg:x="7.986cm" svg:y="6.938cm">
          <draw:text-box>
            <text:p text:style-name="P3"><text:span text:style-name="T3">implementation </text:span></text:p>
          </draw:text-box>
        </draw:frame>
        <draw:polygon draw:style-name="gr274" draw:text-style-name="P132" draw:layer="layout" svg:width="5.377cm" svg:height="3.929cm" svg:x="13.656cm" svg:y="5.562cm" svg:viewBox="0 0 5378 3930" draw:points="0,0 5378,0 5378,3930 0,3930">
          <text:p/>
        </draw:polygon>
        <draw:frame draw:style-name="gr295" draw:text-style-name="P4" draw:layer="layout" svg:width="2.05cm" svg:height="0.552cm" svg:x="7.986cm" svg:y="7.53cm">
          <draw:text-box>
            <text:p text:style-name="P3"><text:span text:style-name="T3">approach</text:span></text:p>
          </draw:text-box>
        </draw:frame>
        <draw:frame draw:style-name="gr187" draw:text-style-name="P4" draw:layer="layout" svg:width="0.491cm" svg:height="0.552cm" svg:x="13.911cm" svg:y="5.727cm">
          <draw:text-box>
            <text:p text:style-name="P3"><text:span text:style-name="T3">•</text:span></text:p>
          </draw:text-box>
        </draw:frame>
        <draw:frame draw:style-name="gr296" draw:text-style-name="P4" draw:layer="layout" svg:width="4.096cm" svg:height="0.552cm" svg:x="14.513cm" svg:y="5.727cm">
          <draw:text-box>
            <text:p text:style-name="P3"><text:span text:style-name="T3">Implement all ETL </text:span></text:p>
          </draw:text-box>
        </draw:frame>
        <draw:frame draw:style-name="gr297" draw:text-style-name="P4" draw:layer="layout" svg:width="3.523cm" svg:height="0.552cm" svg:x="14.513cm" svg:y="6.321cm">
          <draw:text-box>
            <text:p text:style-name="P3"><text:span text:style-name="T3">conversion with </text:span></text:p>
          </draw:text-box>
        </draw:frame>
        <draw:frame draw:style-name="gr2" draw:text-style-name="P2" draw:layer="layout" svg:width="0.882cm" svg:height="1.136cm" svg:x="16.188cm" svg:y="6.697cm">
          <draw:image xlink:href="Pictures/10000001000000460000005A0BC6759B.png" xlink:type="simple" xlink:show="embed" xlink:actuate="onLoad" draw:mime-type="image/png">
            <text:p/>
          </draw:image>
        </draw:frame>
        <draw:polygon draw:style-name="gr274" draw:text-style-name="P132" draw:layer="layout" svg:width="5.385cm" svg:height="3.929cm" svg:x="19.964cm" svg:y="5.562cm" svg:viewBox="0 0 5386 3930" draw:points="0,0 5386,0 5386,3930 0,3930">
          <text:p/>
        </draw:polygon>
        <draw:frame draw:style-name="gr298" draw:text-style-name="P4" draw:layer="layout" svg:width="2.185cm" svg:height="0.552cm" svg:x="14.513cm" svg:y="6.914cm">
          <draw:text-box>
            <text:p text:style-name="P3"><text:span text:style-name="T3">software </text:span><text:span text:style-name="T24">*</text:span></text:p>
          </draw:text-box>
        </draw:frame>
        <draw:frame draw:style-name="gr187" draw:text-style-name="P4" draw:layer="layout" svg:width="0.491cm" svg:height="0.552cm" svg:x="20.226cm" svg:y="5.727cm">
          <draw:text-box>
            <text:p text:style-name="P3"><text:span text:style-name="T3">•</text:span></text:p>
          </draw:text-box>
        </draw:frame>
        <draw:frame draw:style-name="gr299" draw:text-style-name="P4" draw:layer="layout" svg:width="2.322cm" svg:height="0.552cm" svg:x="20.827cm" svg:y="5.727cm">
          <draw:text-box>
            <text:p text:style-name="P3"><text:span text:style-name="T3">Ensure all </text:span></text:p>
          </draw:text-box>
        </draw:frame>
        <draw:frame draw:style-name="gr300" draw:text-style-name="P4" draw:layer="layout" svg:width="3.277cm" svg:height="0.552cm" svg:x="20.827cm" svg:y="6.321cm">
          <draw:text-box>
            <text:p text:style-name="P3"><text:span text:style-name="T3">functions work </text:span></text:p>
          </draw:text-box>
        </draw:frame>
        <draw:frame draw:style-name="gr301" draw:text-style-name="P4" draw:layer="layout" svg:width="3.714cm" svg:height="0.552cm" svg:x="20.827cm" svg:y="6.914cm">
          <draw:text-box>
            <text:p text:style-name="P3"><text:span text:style-name="T3">correctly, data is </text:span></text:p>
          </draw:text-box>
        </draw:frame>
        <draw:polygon draw:style-name="gr274" draw:text-style-name="P132" draw:layer="layout" svg:width="5.385cm" svg:height="3.929cm" svg:x="26.221cm" svg:y="5.562cm" svg:viewBox="0 0 5386 3930" draw:points="0,0 5386,0 5386,3930 0,3930">
          <text:p/>
        </draw:polygon>
        <draw:frame draw:style-name="gr302" draw:text-style-name="P4" draw:layer="layout" svg:width="2.022cm" svg:height="0.552cm" svg:x="20.827cm" svg:y="7.506cm">
          <draw:text-box>
            <text:p text:style-name="P3"><text:span text:style-name="T3">accurate </text:span></text:p>
          </draw:text-box>
        </draw:frame>
        <draw:frame draw:style-name="gr187" draw:text-style-name="P4" draw:layer="layout" svg:width="0.491cm" svg:height="0.552cm" svg:x="26.485cm" svg:y="5.727cm">
          <draw:text-box>
            <text:p text:style-name="P3"><text:span text:style-name="T3">•</text:span></text:p>
          </draw:text-box>
        </draw:frame>
        <draw:frame draw:style-name="gr303" draw:text-style-name="P4" draw:layer="layout" svg:width="3.933cm" svg:height="0.552cm" svg:x="27.087cm" svg:y="5.727cm">
          <draw:text-box>
            <text:p text:style-name="P3"><text:span text:style-name="T3">Launch all jobs in </text:span></text:p>
          </draw:text-box>
        </draw:frame>
        <draw:polygon draw:style-name="gr261" draw:text-style-name="P131" draw:layer="layout" svg:width="5.385cm" svg:height="9.152cm" svg:x="13.639cm" svg:y="9.584cm" svg:viewBox="0 0 5386 9153" draw:points="0,0 5386,0 5386,9153 0,9153">
          <text:p/>
        </draw:polygon>
        <draw:frame draw:style-name="gr304" draw:text-style-name="P4" draw:layer="layout" svg:width="1.203cm" svg:height="0.552cm" svg:x="27.087cm" svg:y="6.321cm">
          <draw:text-box>
            <text:p text:style-name="P3"><text:span text:style-name="T3">batch</text:span></text:p>
          </draw:text-box>
        </draw:frame>
        <draw:frame draw:style-name="gr175" draw:text-style-name="P105" draw:layer="layout" svg:width="0.422cm" svg:height="0.475cm" svg:x="13.901cm" svg:y="9.75cm">
          <draw:text-box>
            <text:p text:style-name="P3"><text:span text:style-name="T19">1.</text:span></text:p>
          </draw:text-box>
        </draw:frame>
        <draw:frame draw:style-name="gr283" draw:text-style-name="P105" draw:layer="layout" svg:width="1.343cm" svg:height="0.475cm" svg:x="14.536cm" svg:y="9.75cm">
          <draw:text-box>
            <text:p text:style-name="P3"><text:span text:style-name="T19">Define </text:span></text:p>
          </draw:text-box>
        </draw:frame>
        <draw:frame draw:style-name="gr280" draw:text-style-name="P105" draw:layer="layout" svg:width="4.143cm" svg:height="0.475cm" svg:x="14.536cm" svg:y="10.258cm">
          <draw:text-box>
            <text:p text:style-name="P3"><text:span text:style-name="T19">workflow/worklet as a </text:span></text:p>
          </draw:text-box>
        </draw:frame>
        <draw:frame draw:style-name="gr305" draw:text-style-name="P105" draw:layer="layout" svg:width="3.273cm" svg:height="0.475cm" svg:x="14.536cm" svg:y="10.765cm">
          <draw:text-box>
            <text:p text:style-name="P3"><text:span text:style-name="T19">new schedule job</text:span></text:p>
          </draw:text-box>
        </draw:frame>
        <draw:frame draw:style-name="gr175" draw:text-style-name="P105" draw:layer="layout" svg:width="0.422cm" svg:height="0.475cm" svg:x="13.901cm" svg:y="11.275cm">
          <draw:text-box>
            <text:p text:style-name="P3"><text:span text:style-name="T19">2.</text:span></text:p>
          </draw:text-box>
        </draw:frame>
        <draw:frame draw:style-name="gr263" draw:text-style-name="P105" draw:layer="layout" svg:width="3.579cm" svg:height="0.475cm" svg:x="14.536cm" svg:y="11.275cm">
          <draw:text-box>
            <text:p text:style-name="P3"><text:span text:style-name="T19">Parse per Mapping</text:span></text:p>
          </draw:text-box>
        </draw:frame>
        <draw:frame draw:style-name="gr175" draw:text-style-name="P105" draw:layer="layout" svg:width="0.422cm" svg:height="0.475cm" svg:x="13.901cm" svg:y="11.783cm">
          <draw:text-box>
            <text:p text:style-name="P3"><text:span text:style-name="T19">3.</text:span></text:p>
          </draw:text-box>
        </draw:frame>
        <draw:frame draw:style-name="gr306" draw:text-style-name="P105" draw:layer="layout" svg:width="3.507cm" svg:height="0.475cm" svg:x="14.536cm" svg:y="11.783cm">
          <draw:text-box>
            <text:p text:style-name="P3"><text:span text:style-name="T19">Extract &amp; verify all </text:span></text:p>
          </draw:text-box>
        </draw:frame>
        <draw:frame draw:style-name="gr269" draw:text-style-name="P105" draw:layer="layout" svg:width="3.908cm" svg:height="0.475cm" svg:x="14.536cm" svg:y="12.291cm">
          <draw:text-box>
            <text:p text:style-name="P3"><text:span text:style-name="T19">SQLs using software</text:span></text:p>
          </draw:text-box>
        </draw:frame>
        <draw:frame draw:style-name="gr178" draw:text-style-name="P105" draw:layer="layout" svg:width="0.423cm" svg:height="0.475cm" svg:x="13.901cm" svg:y="12.798cm">
          <draw:text-box>
            <text:p text:style-name="P3"><text:span text:style-name="T19">4.</text:span></text:p>
          </draw:text-box>
        </draw:frame>
        <draw:frame draw:style-name="gr307" draw:text-style-name="P105" draw:layer="layout" svg:width="4.097cm" svg:height="0.475cm" svg:x="14.536cm" svg:y="12.798cm">
          <draw:text-box>
            <text:p text:style-name="P3"><text:span text:style-name="T19">Engineering all SQLs </text:span></text:p>
          </draw:text-box>
        </draw:frame>
        <draw:frame draw:style-name="gr308" draw:text-style-name="P105" draw:layer="layout" svg:width="1.861cm" svg:height="0.475cm" svg:x="14.536cm" svg:y="13.307cm">
          <draw:text-box>
            <text:p text:style-name="P3"><text:span text:style-name="T19">with shell </text:span></text:p>
          </draw:text-box>
        </draw:frame>
        <draw:frame draw:style-name="gr175" draw:text-style-name="P105" draw:layer="layout" svg:width="0.422cm" svg:height="0.475cm" svg:x="13.901cm" svg:y="13.815cm">
          <draw:text-box>
            <text:p text:style-name="P3"><text:span text:style-name="T19">5.</text:span></text:p>
          </draw:text-box>
        </draw:frame>
        <draw:polygon draw:style-name="gr261" draw:text-style-name="P131" draw:layer="layout" svg:width="5.384cm" svg:height="9.152cm" svg:x="19.939cm" svg:y="9.584cm" svg:viewBox="0 0 5385 9153" draw:points="0,0 5385,0 5385,9153 0,9153">
          <text:p/>
        </draw:polygon>
        <draw:frame draw:style-name="gr309" draw:text-style-name="P105" draw:layer="layout" svg:width="3.296cm" svg:height="0.475cm" svg:x="14.536cm" svg:y="13.815cm">
          <draw:text-box>
            <text:p text:style-name="P3"><text:span text:style-name="T19">Finish unit testing</text:span></text:p>
          </draw:text-box>
        </draw:frame>
        <draw:frame draw:style-name="gr175" draw:text-style-name="P105" draw:layer="layout" svg:width="0.422cm" svg:height="0.475cm" svg:x="20.199cm" svg:y="9.75cm">
          <draw:text-box>
            <text:p text:style-name="P3"><text:span text:style-name="T19">1.</text:span></text:p>
          </draw:text-box>
        </draw:frame>
        <draw:frame draw:style-name="gr277" draw:text-style-name="P105" draw:layer="layout" svg:width="3.414cm" svg:height="0.475cm" svg:x="20.8cm" svg:y="9.75cm">
          <draw:text-box>
            <text:p text:style-name="P3"><text:span text:style-name="T19">Define the testing </text:span></text:p>
          </draw:text-box>
        </draw:frame>
        <draw:frame draw:style-name="gr310" draw:text-style-name="P105" draw:layer="layout" svg:width="1.814cm" svg:height="0.475cm" svg:x="20.8cm" svg:y="10.258cm">
          <draw:text-box>
            <text:p text:style-name="P3"><text:span text:style-name="T19">scenarios</text:span></text:p>
          </draw:text-box>
        </draw:frame>
        <draw:frame draw:style-name="gr178" draw:text-style-name="P105" draw:layer="layout" svg:width="0.423cm" svg:height="0.475cm" svg:x="20.199cm" svg:y="10.765cm">
          <draw:text-box>
            <text:p text:style-name="P3"><text:span text:style-name="T19">2.</text:span></text:p>
          </draw:text-box>
        </draw:frame>
        <draw:frame draw:style-name="gr311" draw:text-style-name="P105" draw:layer="layout" svg:width="3.814cm" svg:height="0.475cm" svg:x="20.8cm" svg:y="10.765cm">
          <draw:text-box>
            <text:p text:style-name="P3"><text:span text:style-name="T19">Arrange testing data</text:span></text:p>
          </draw:text-box>
        </draw:frame>
        <draw:frame draw:style-name="gr175" draw:text-style-name="P105" draw:layer="layout" svg:width="0.422cm" svg:height="0.475cm" svg:x="20.199cm" svg:y="11.275cm">
          <draw:text-box>
            <text:p text:style-name="P3"><text:span text:style-name="T19">3.</text:span></text:p>
          </draw:text-box>
        </draw:frame>
        <draw:frame draw:style-name="gr312" draw:text-style-name="P105" draw:layer="layout" svg:width="2.614cm" svg:height="0.475cm" svg:x="20.8cm" svg:y="11.275cm">
          <draw:text-box>
            <text:p text:style-name="P3"><text:span text:style-name="T19">Execute UAT </text:span></text:p>
          </draw:text-box>
        </draw:frame>
        <draw:frame draw:style-name="gr175" draw:text-style-name="P105" draw:layer="layout" svg:width="0.422cm" svg:height="0.475cm" svg:x="20.199cm" svg:y="11.783cm">
          <draw:text-box>
            <text:p text:style-name="P3"><text:span text:style-name="T19">4.</text:span></text:p>
          </draw:text-box>
        </draw:frame>
        <draw:polygon draw:style-name="gr261" draw:text-style-name="P131" draw:layer="layout" svg:width="5.385cm" svg:height="9.152cm" svg:x="26.187cm" svg:y="9.584cm" svg:viewBox="0 0 5386 9153" draw:points="0,0 5386,0 5386,9153 0,9153">
          <text:p/>
        </draw:polygon>
        <draw:frame draw:style-name="gr313" draw:text-style-name="P105" draw:layer="layout" svg:width="3.672cm" svg:height="0.475cm" svg:x="20.8cm" svg:y="11.783cm">
          <draw:text-box>
            <text:p text:style-name="P3"><text:span text:style-name="T19">Full tasks rehearsal</text:span></text:p>
          </draw:text-box>
        </draw:frame>
        <draw:frame draw:style-name="gr175" draw:text-style-name="P105" draw:layer="layout" svg:width="0.422cm" svg:height="0.475cm" svg:x="26.448cm" svg:y="9.75cm">
          <draw:text-box>
            <text:p text:style-name="P3"><text:span text:style-name="T19">1.</text:span></text:p>
          </draw:text-box>
        </draw:frame>
        <draw:frame draw:style-name="gr314" draw:text-style-name="P105" draw:layer="layout" svg:width="4.167cm" svg:height="0.475cm" svg:x="27.049cm" svg:y="9.75cm">
          <draw:text-box>
            <text:p text:style-name="P3"><text:span text:style-name="T19">Deploy jobs per Sprint</text:span></text:p>
          </draw:text-box>
        </draw:frame>
        <draw:frame draw:style-name="gr175" draw:text-style-name="P105" draw:layer="layout" svg:width="0.422cm" svg:height="0.475cm" svg:x="26.448cm" svg:y="10.258cm">
          <draw:text-box>
            <text:p text:style-name="P3"><text:span text:style-name="T19">2.</text:span></text:p>
          </draw:text-box>
        </draw:frame>
        <draw:frame draw:style-name="gr284" draw:text-style-name="P105" draw:layer="layout" svg:width="2.637cm" svg:height="0.475cm" svg:x="27.049cm" svg:y="10.258cm">
          <draw:text-box>
            <text:p text:style-name="P3"><text:span text:style-name="T19">Reconciliation</text:span></text:p>
          </draw:text-box>
        </draw:frame>
        <draw:frame draw:style-name="gr178" draw:text-style-name="P105" draw:layer="layout" svg:width="0.423cm" svg:height="0.475cm" svg:x="26.448cm" svg:y="10.765cm">
          <draw:text-box>
            <text:p text:style-name="P3"><text:span text:style-name="T19">3.</text:span></text:p>
          </draw:text-box>
        </draw:frame>
        <draw:frame draw:style-name="gr269" draw:text-style-name="P105" draw:layer="layout" svg:width="3.908cm" svg:height="0.475cm" svg:x="27.049cm" svg:y="10.765cm">
          <draw:text-box>
            <text:p text:style-name="P3"><text:span text:style-name="T19">Collect performance </text:span></text:p>
          </draw:text-box>
        </draw:frame>
        <draw:frame draw:style-name="gr278" draw:text-style-name="P105" draw:layer="layout" svg:width="1.602cm" svg:height="0.475cm" svg:x="27.049cm" svg:y="11.275cm">
          <draw:text-box>
            <text:p text:style-name="P3"><text:span text:style-name="T19">indicator</text:span></text:p>
          </draw:text-box>
        </draw:frame>
        <draw:frame draw:style-name="gr175" draw:text-style-name="P105" draw:layer="layout" svg:width="0.422cm" svg:height="0.475cm" svg:x="26.448cm" svg:y="11.783cm">
          <draw:text-box>
            <text:p text:style-name="P3"><text:span text:style-name="T19">4.</text:span></text:p>
          </draw:text-box>
        </draw:frame>
        <draw:frame draw:style-name="gr315" draw:text-style-name="P105" draw:layer="layout" svg:width="2.897cm" svg:height="0.475cm" svg:x="27.049cm" svg:y="11.783cm">
          <draw:text-box>
            <text:p text:style-name="P3"><text:span text:style-name="T19">Diagnose issue</text:span></text:p>
          </draw:text-box>
        </draw:frame>
        <draw:frame draw:style-name="gr175" draw:text-style-name="P105" draw:layer="layout" svg:width="0.422cm" svg:height="0.475cm" svg:x="26.448cm" svg:y="12.291cm">
          <draw:text-box>
            <text:p text:style-name="P3"><text:span text:style-name="T19">5.</text:span></text:p>
          </draw:text-box>
        </draw:frame>
        <draw:frame draw:style-name="gr316" draw:text-style-name="P105" draw:layer="layout" svg:width="3.461cm" svg:height="0.475cm" svg:x="27.049cm" svg:y="12.291cm">
          <draw:text-box>
            <text:p text:style-name="P3"><text:span text:style-name="T19">Tune performance</text:span></text:p>
          </draw:text-box>
        </draw:frame>
        <draw:frame draw:style-name="gr178" draw:text-style-name="P105" draw:layer="layout" svg:width="0.423cm" svg:height="0.475cm" svg:x="26.448cm" svg:y="12.798cm">
          <draw:text-box>
            <text:p text:style-name="P3"><text:span text:style-name="T19">6.</text:span></text:p>
          </draw:text-box>
        </draw:frame>
        <draw:frame draw:style-name="gr317" draw:text-style-name="P105" draw:layer="layout" svg:width="2.895cm" svg:height="0.475cm" svg:x="27.049cm" svg:y="12.798cm">
          <draw:text-box>
            <text:p text:style-name="P3"><text:span text:style-name="T19">Decommission </text:span></text:p>
          </draw:text-box>
        </draw:frame>
        <draw:polygon draw:style-name="gr274" draw:text-style-name="P132" draw:layer="layout" svg:width="5.385cm" svg:height="3.929cm" svg:x="7.128cm" svg:y="5.562cm" svg:viewBox="0 0 5386 3930" draw:points="0,0 5386,0 5386,3930 0,3930">
          <text:p/>
        </draw:polygon>
        <draw:frame draw:style-name="gr267" draw:text-style-name="P105" draw:layer="layout" svg:width="1.955cm" svg:height="0.475cm" svg:x="27.049cm" svg:y="13.307cm">
          <draw:text-box>
            <text:p text:style-name="P3"><text:span text:style-name="T19">Infomatica</text:span></text:p>
          </draw:text-box>
        </draw:frame>
        <draw:frame draw:style-name="gr187" draw:text-style-name="P4" draw:layer="layout" svg:width="0.491cm" svg:height="0.552cm" svg:x="7.385cm" svg:y="5.727cm">
          <draw:text-box>
            <text:p text:style-name="P3"><text:span text:style-name="T3">•</text:span></text:p>
          </draw:text-box>
        </draw:frame>
        <draw:frame draw:style-name="gr292" draw:text-style-name="P4" draw:layer="layout" svg:width="4.068cm" svg:height="0.552cm" svg:x="7.986cm" svg:y="5.727cm">
          <draw:text-box>
            <text:p text:style-name="P3"><text:span text:style-name="T3">Certify the system </text:span></text:p>
          </draw:text-box>
        </draw:frame>
        <draw:frame draw:style-name="gr293" draw:text-style-name="P4" draw:layer="layout" svg:width="3.168cm" svg:height="0.552cm" svg:x="7.986cm" svg:y="6.321cm">
          <draw:text-box>
            <text:p text:style-name="P3"><text:span text:style-name="T3">architecture &amp; </text:span></text:p>
          </draw:text-box>
        </draw:frame>
        <draw:frame draw:style-name="gr294" draw:text-style-name="P4" draw:layer="layout" svg:width="3.468cm" svg:height="0.552cm" svg:x="7.986cm" svg:y="6.914cm">
          <draw:text-box>
            <text:p text:style-name="P3"><text:span text:style-name="T3">implementation </text:span></text:p>
          </draw:text-box>
        </draw:frame>
        <draw:frame draw:style-name="gr295" draw:text-style-name="P4" draw:layer="layout" svg:width="2.05cm" svg:height="0.552cm" svg:x="7.986cm" svg:y="7.506cm">
          <draw:text-box>
            <text:p text:style-name="P3"><text:span text:style-name="T3">approach</text:span></text:p>
          </draw:text-box>
        </draw:frame>
      </draw:page>
      <draw:page draw:name="page11" draw:style-name="dp1" draw:master-page-name="master-page3">
        <draw:polygon draw:style-name="gr8" draw:text-style-name="P6" draw:layer="layout" svg:width="2.175cm" svg:height="0.128cm" svg:x="0cm" svg:y="3.056cm" svg:viewBox="0 0 2176 129" draw:points="0,0 2176,0 2176,129 0,129">
          <text:p/>
        </draw:polygon>
        <draw:path draw:style-name="gr45" draw:text-style-name="P6" draw:layer="layout" svg:width="3.785cm" svg:height="1.651cm" svg:x="1.701cm" svg:y="8.263cm" svg:viewBox="0 0 3786 1652" svg:d="M0 275c0-152 123-275 276-275h3235c152 0 275 123 275 275v1102c0 152-123 275-275 275h-3235c-153 0-276-123-276-275z">
          <text:p/>
        </draw:path>
        <draw:frame draw:style-name="gr318" draw:text-style-name="P9" draw:layer="layout" svg:width="11.257cm" svg:height="1.309cm" svg:x="0.899cm" svg:y="1.518cm">
          <draw:text-box>
            <text:p text:style-name="P3"><text:span text:style-name="T7">Investigate the system</text:span></text:p>
          </draw:text-box>
        </draw:frame>
        <draw:path draw:style-name="gr45" draw:text-style-name="P6" draw:layer="layout" svg:width="3.785cm" svg:height="1.66cm" svg:x="1.701cm" svg:y="10.642cm" svg:viewBox="0 0 3786 1661" svg:d="M0 278c0-154 124-278 278-278h3231c153 0 277 124 277 278v1106c0 153-124 277-277 277h-3231c-154 0-278-124-278-277z">
          <text:p/>
        </draw:path>
        <draw:frame draw:style-name="gr319" draw:text-style-name="P4" draw:layer="layout" svg:width="3.005cm" svg:height="0.552cm" svg:x="2.094cm" svg:y="8.834cm">
          <draw:text-box>
            <text:p text:style-name="P3"><text:span text:style-name="T3">Source tables</text:span></text:p>
          </draw:text-box>
        </draw:frame>
        <draw:path draw:style-name="gr45" draw:text-style-name="P6" draw:layer="layout" svg:width="3.785cm" svg:height="1.652cm" svg:x="1.701cm" svg:y="13.03cm" svg:viewBox="0 0 3786 1653" svg:d="M0 275c0-152 123-275 276-275h3235c152 0 275 123 275 275v1102c0 153-123 276-275 276h-3235c-153 0-276-123-276-276z">
          <text:p/>
        </draw:path>
        <draw:frame draw:style-name="gr320" draw:text-style-name="P4" draw:layer="layout" svg:width="2.568cm" svg:height="0.552cm" svg:x="2.305cm" svg:y="11.218cm">
          <draw:text-box>
            <text:p text:style-name="P3"><text:span text:style-name="T3">Source files</text:span></text:p>
          </draw:text-box>
        </draw:frame>
        <draw:frame draw:style-name="gr299" draw:text-style-name="P4" draw:layer="layout" svg:width="2.322cm" svg:height="0.552cm" svg:x="2.517cm" svg:y="13.305cm">
          <draw:text-box>
            <text:p text:style-name="P3"><text:span text:style-name="T3">Dictionary </text:span></text:p>
          </draw:text-box>
        </draw:frame>
        <draw:path draw:style-name="gr45" draw:text-style-name="P6" draw:layer="layout" svg:width="3.785cm" svg:height="1.66cm" svg:x="1.701cm" svg:y="5.672cm" svg:viewBox="0 0 3786 1661" svg:d="M0 278c0-154 124-278 278-278h3231c153 0 277 124 277 278v1106c0 153-124 277-277 277h-3231c-154 0-278-124-278-277z">
          <text:p/>
        </draw:path>
        <draw:frame draw:style-name="gr262" draw:text-style-name="P4" draw:layer="layout" svg:width="1.312cm" svg:height="0.552cm" svg:x="2.94cm" svg:y="13.9cm">
          <draw:text-box>
            <text:p text:style-name="P3"><text:span text:style-name="T3">tables</text:span></text:p>
          </draw:text-box>
        </draw:frame>
        <draw:frame draw:style-name="gr321" draw:text-style-name="P4" draw:layer="layout" svg:width="1.694cm" svg:height="0.552cm" svg:x="2.822cm" svg:y="5.953cm">
          <draw:text-box>
            <text:p text:style-name="P3"><text:span text:style-name="T3">Source </text:span></text:p>
          </draw:text-box>
        </draw:frame>
        <draw:path draw:style-name="gr322" draw:text-style-name="P104" draw:layer="layout" svg:width="3.784cm" svg:height="1.659cm" svg:x="28.143cm" svg:y="8.585cm" svg:viewBox="0 0 3785 1660" svg:d="M0 276c0-152 124-276 277-276h3232c152 0 276 124 276 276v1108c0 152-124 276-276 276h-3232c-153 0-277-124-277-276z">
          <text:p/>
        </draw:path>
        <draw:frame draw:style-name="gr323" draw:text-style-name="P4" draw:layer="layout" svg:width="2.595cm" svg:height="0.552cm" svg:x="2.305cm" svg:y="6.545cm">
          <draw:text-box>
            <text:p text:style-name="P3"><text:span text:style-name="T3">applications</text:span></text:p>
          </draw:text-box>
        </draw:frame>
        <draw:path draw:style-name="gr322" draw:text-style-name="P104" draw:layer="layout" svg:width="3.784cm" svg:height="1.652cm" svg:x="28.143cm" svg:y="10.972cm" svg:viewBox="0 0 3785 1653" svg:d="M0 276c0-153 123-276 276-276h3234c152 0 275 123 275 276v1102c0 152-123 275-275 275h-3234c-153 0-276-123-276-275z">
          <text:p/>
        </draw:path>
        <draw:frame draw:style-name="gr324" draw:text-style-name="P4" draw:layer="layout" svg:width="2.868cm" svg:height="0.552cm" svg:x="28.605cm" svg:y="9.161cm">
          <draw:text-box>
            <text:p text:style-name="P3"><text:span text:style-name="T3">Target tables</text:span></text:p>
          </draw:text-box>
        </draw:frame>
        <draw:path draw:style-name="gr322" draw:text-style-name="P104" draw:layer="layout" svg:width="3.784cm" svg:height="1.66cm" svg:x="28.143cm" svg:y="13.351cm" svg:viewBox="0 0 3785 1661" svg:d="M0 277c0-153 124-277 277-277h3232c152 0 276 124 276 277v1107c0 153-124 277-276 277h-3232c-153 0-277-124-277-277z">
          <text:p/>
        </draw:path>
        <draw:frame draw:style-name="gr325" draw:text-style-name="P4" draw:layer="layout" svg:width="2.431cm" svg:height="0.552cm" svg:x="28.825cm" svg:y="11.545cm">
          <draw:text-box>
            <text:p text:style-name="P3"><text:span text:style-name="T3">Target files</text:span></text:p>
          </draw:text-box>
        </draw:frame>
        <draw:frame draw:style-name="gr326" draw:text-style-name="P4" draw:layer="layout" svg:width="1.176cm" svg:height="0.552cm" svg:x="29.52cm" svg:y="13.633cm">
          <draw:text-box>
            <text:p text:style-name="P3"><text:span text:style-name="T3">Data </text:span></text:p>
          </draw:text-box>
        </draw:frame>
        <draw:path draw:style-name="gr322" draw:text-style-name="P104" draw:layer="layout" svg:width="3.784cm" svg:height="1.66cm" svg:x="28.143cm" svg:y="6.002cm" svg:viewBox="0 0 3785 1661" svg:d="M0 277c0-153 124-277 277-277h3232c152 0 276 124 276 277v1106c0 154-124 278-276 278h-3232c-153 0-277-124-277-278z">
          <text:p/>
        </draw:path>
        <draw:frame draw:style-name="gr327" draw:text-style-name="P4" draw:layer="layout" svg:width="2.513cm" svg:height="0.552cm" svg:x="28.792cm" svg:y="14.227cm">
          <draw:text-box>
            <text:p text:style-name="P3"><text:span text:style-name="T3">relationship</text:span></text:p>
          </draw:text-box>
        </draw:frame>
        <draw:frame draw:style-name="gr328" draw:text-style-name="P4" draw:layer="layout" svg:width="1.558cm" svg:height="0.552cm" svg:x="29.333cm" svg:y="6.28cm">
          <draw:text-box>
            <text:p text:style-name="P3"><text:span text:style-name="T3">Target </text:span></text:p>
          </draw:text-box>
        </draw:frame>
        <draw:path draw:style-name="gr160" draw:text-style-name="P2" draw:layer="layout" svg:width="0.931cm" svg:height="7.704cm" svg:x="25.785cm" svg:y="6.481cm" svg:viewBox="0 0 932 7705" svg:d="M932 7705c-258 0-467-199-467-444v-2964c0-246-208-445-465-445 257 0 465-199 465-445v-2962c0-246 209-445 467-445">
          <text:p/>
        </draw:path>
        <draw:path draw:style-name="gr160" draw:text-style-name="P2" draw:layer="layout" svg:width="0.931cm" svg:height="7.705cm" svg:x="6.413cm" svg:y="6.506cm" svg:viewBox="0 0 932 7706" svg:d="M0 0c257 0 466 199 466 445v3018c0 246 209 445 466 445-257 0-466 199-466 445v2908c0 245-209 445-466 445">
          <text:p/>
        </draw:path>
        <draw:frame draw:style-name="gr2" draw:text-style-name="P2" draw:layer="layout" svg:width="8.756cm" svg:height="6.749cm" svg:x="7.645cm" svg:y="8.128cm">
          <draw:image xlink:href="Pictures/10000001000002B200000214E4FD8AE1.png" xlink:type="simple" xlink:show="embed" xlink:actuate="onLoad" draw:mime-type="image/png">
            <text:p/>
          </draw:image>
        </draw:frame>
        <draw:frame draw:style-name="gr2" draw:text-style-name="P2" draw:layer="layout" svg:width="7.731cm" svg:height="6.029cm" svg:x="7.916cm" svg:y="8.551cm">
          <draw:image xlink:href="Pictures/1000000100000261000001DB7C673B72.png" xlink:type="simple" xlink:show="embed" xlink:actuate="onLoad" draw:mime-type="image/png">
            <text:p/>
          </draw:image>
        </draw:frame>
        <draw:path draw:style-name="gr329" draw:text-style-name="P133" draw:layer="layout" svg:width="7.213cm" svg:height="0.051cm" svg:x="8.42cm" svg:y="14.634cm" svg:viewBox="0 0 7214 52" svg:d="M6909 52h-6605c-106 0-209-19-304-52h7214c-95 33-198 52-305 52z">
          <text:p/>
        </draw:path>
        <draw:path draw:style-name="gr330" draw:text-style-name="P134" draw:layer="layout" svg:width="7.453cm" svg:height="0.05cm" svg:x="8.3cm" svg:y="14.584cm" svg:viewBox="0 0 7454 51" svg:d="M7334 51h-7214c-42-15-82-32-120-51h7454c-39 19-79 36-120 51z">
          <text:p/>
        </draw:path>
        <draw:path draw:style-name="gr331" draw:text-style-name="P135" draw:layer="layout" svg:width="7.628cm" svg:height="0.051cm" svg:x="8.212cm" svg:y="14.533cm" svg:viewBox="0 0 7629 52" svg:d="M7542 52h-7454c-30-17-60-33-88-52h7629c-28 19-57 35-87 52z">
          <text:p/>
        </draw:path>
        <draw:path draw:style-name="gr332" draw:text-style-name="P136" draw:layer="layout" svg:width="7.769cm" svg:height="0.05cm" svg:x="8.142cm" svg:y="14.483cm" svg:viewBox="0 0 7770 51" svg:d="M7699 51h-7629c-24-17-47-33-70-51h7770c-23 18-46 34-71 51z">
          <text:p/>
        </draw:path>
        <draw:path draw:style-name="gr333" draw:text-style-name="P137" draw:layer="layout" svg:width="7.887cm" svg:height="0.051cm" svg:x="8.083cm" svg:y="14.432cm" svg:viewBox="0 0 7888 52" svg:d="M7829 52h-7770c-20-17-40-34-59-52h7888c-19 18-39 35-59 52z">
          <text:p/>
        </draw:path>
        <draw:path draw:style-name="gr334" draw:text-style-name="P138" draw:layer="layout" svg:width="7.987cm" svg:height="0.051cm" svg:x="8.033cm" svg:y="14.381cm" svg:viewBox="0 0 7988 52" svg:d="M7938 52h-7888c-17-17-34-34-50-52h7988c-16 18-33 35-50 52z">
          <text:p/>
        </draw:path>
        <draw:path draw:style-name="gr335" draw:text-style-name="P139" draw:layer="layout" svg:width="8.074cm" svg:height="0.05cm" svg:x="7.989cm" svg:y="14.331cm" svg:viewBox="0 0 8075 51" svg:d="M8032 51h-7988c-15-17-30-34-44-51h8075c-13 17-28 34-43 51z">
          <text:p/>
        </draw:path>
        <draw:path draw:style-name="gr336" draw:text-style-name="P140" draw:layer="layout" svg:width="8.149cm" svg:height="0.051cm" svg:x="7.952cm" svg:y="14.28cm" svg:viewBox="0 0 8150 52" svg:d="M8112 52h-8075c-13-18-25-35-37-52h8150c-12 17-24 34-38 52z">
          <text:p/>
        </draw:path>
        <draw:path draw:style-name="gr336" draw:text-style-name="P140" draw:layer="layout" svg:width="8.215cm" svg:height="0.05cm" svg:x="7.919cm" svg:y="14.23cm" svg:viewBox="0 0 8216 51" svg:d="M8183 51h-8150c-12-17-23-34-33-51h8216c-11 17-21 34-33 51z">
          <text:p/>
        </draw:path>
        <draw:path draw:style-name="gr337" draw:text-style-name="P141" draw:layer="layout" svg:width="8.271cm" svg:height="0.051cm" svg:x="7.891cm" svg:y="14.179cm" svg:viewBox="0 0 8272 52" svg:d="M8244 52h-8216c-10-18-19-35-28-52h8272c-9 17-18 34-28 52z">
          <text:p/>
        </draw:path>
        <draw:path draw:style-name="gr337" draw:text-style-name="P141" draw:layer="layout" svg:width="8.321cm" svg:height="0.051cm" svg:x="7.866cm" svg:y="14.128cm" svg:viewBox="0 0 8322 52" svg:d="M8297 52h-8272c-9-18-17-34-25-52h8322c-8 18-16 34-25 52z">
          <text:p/>
        </draw:path>
        <draw:path draw:style-name="gr338" draw:text-style-name="P142" draw:layer="layout" svg:width="8.363cm" svg:height="0.05cm" svg:x="7.845cm" svg:y="14.078cm" svg:viewBox="0 0 8364 51" svg:d="M8343 51h-8322c-7-17-14-34-21-51h8364c-7 17-14 34-21 51z">
          <text:p/>
        </draw:path>
        <draw:path draw:style-name="gr339" draw:text-style-name="P143" draw:layer="layout" svg:width="8.397cm" svg:height="0.051cm" svg:x="7.828cm" svg:y="14.027cm" svg:viewBox="0 0 8398 52" svg:d="M8381 52h-8364c-6-18-12-35-17-52h8398c-5 17-11 34-17 52z">
          <text:p/>
        </draw:path>
        <draw:path draw:style-name="gr340" draw:text-style-name="P144" draw:layer="layout" svg:width="8.426cm" svg:height="0.05cm" svg:x="7.813cm" svg:y="13.977cm" svg:viewBox="0 0 8427 51" svg:d="M8413 51h-8398c-6-18-10-34-15-51h8427c-4 17-9 33-14 51z">
          <text:p/>
        </draw:path>
        <draw:path draw:style-name="gr341" draw:text-style-name="P145" draw:layer="layout" svg:width="8.449cm" svg:height="0.051cm" svg:x="7.802cm" svg:y="13.926cm" svg:viewBox="0 0 8450 52" svg:d="M8438 52h-8427c-4-18-8-35-11-52h8450c-4 17-7 34-12 52z">
          <text:p/>
        </draw:path>
        <draw:path draw:style-name="gr342" draw:text-style-name="P146" draw:layer="layout" svg:width="8.465cm" svg:height="0.051cm" svg:x="7.794cm" svg:y="13.875cm" svg:viewBox="0 0 8466 52" svg:d="M8458 52h-8450c-3-18-6-35-8-52h8466c-2 17-5 34-8 52z">
          <text:p/>
        </draw:path>
        <draw:path draw:style-name="gr343" draw:text-style-name="P147" draw:layer="layout" svg:width="8.477cm" svg:height="0.05cm" svg:x="7.788cm" svg:y="13.825cm" svg:viewBox="0 0 8478 51" svg:d="M8472 51h-8466c-3-17-5-34-6-51h8478c-2 17-3 34-6 51z">
          <text:p/>
        </draw:path>
        <draw:path draw:style-name="gr344" draw:text-style-name="P148" draw:layer="layout" svg:width="8.483cm" svg:height="0.052cm" svg:x="7.785cm" svg:y="13.774cm" svg:viewBox="0 0 8484 53" svg:d="M8481 53h-8478c-1-18-2-35-3-53h8484c-1 18-2 35-3 53z">
          <text:p/>
        </draw:path>
        <draw:path draw:style-name="gr344" draw:text-style-name="P148" draw:layer="layout" svg:width="8.483cm" svg:height="0.05cm" svg:x="7.785cm" svg:y="13.724cm" svg:viewBox="0 0 8484 51" svg:d="M8484 22c0 10 0 19 0 29h-8484c0-10 0-19 0-29v-22h8484z">
          <text:p/>
        </draw:path>
        <draw:polygon draw:style-name="gr345" draw:text-style-name="P149" draw:layer="layout" svg:width="8.483cm" svg:height="0.051cm" svg:x="7.785cm" svg:y="13.673cm" svg:viewBox="0 0 8484 52" draw:points="8484,52 0,52 0,0 8484,0">
          <text:p/>
        </draw:polygon>
        <draw:polygon draw:style-name="gr346" draw:text-style-name="P150" draw:layer="layout" svg:width="8.483cm" svg:height="0.051cm" svg:x="7.785cm" svg:y="13.622cm" svg:viewBox="0 0 8484 52" draw:points="8484,52 0,52 0,0 8484,0">
          <text:p/>
        </draw:polygon>
        <draw:polygon draw:style-name="gr347" draw:text-style-name="P151" draw:layer="layout" svg:width="8.483cm" svg:height="0.05cm" svg:x="7.785cm" svg:y="13.572cm" svg:viewBox="0 0 8484 51" draw:points="8484,51 0,51 0,0 8484,0">
          <text:p/>
        </draw:polygon>
        <draw:polygon draw:style-name="gr348" draw:text-style-name="P152" draw:layer="layout" svg:width="8.483cm" svg:height="0.051cm" svg:x="7.785cm" svg:y="13.521cm" svg:viewBox="0 0 8484 52" draw:points="8484,52 0,52 0,0 8484,0">
          <text:p/>
        </draw:polygon>
        <draw:polygon draw:style-name="gr348" draw:text-style-name="P152" draw:layer="layout" svg:width="8.483cm" svg:height="0.051cm" svg:x="7.785cm" svg:y="13.47cm" svg:viewBox="0 0 8484 52" draw:points="8484,52 0,52 0,0 8484,0">
          <text:p/>
        </draw:polygon>
        <draw:polygon draw:style-name="gr349" draw:text-style-name="P153" draw:layer="layout" svg:width="8.483cm" svg:height="0.05cm" svg:x="7.785cm" svg:y="13.42cm" svg:viewBox="0 0 8484 51" draw:points="8484,51 0,51 0,0 8484,0">
          <text:p/>
        </draw:polygon>
        <draw:polygon draw:style-name="gr349" draw:text-style-name="P153" draw:layer="layout" svg:width="8.483cm" svg:height="0.051cm" svg:x="7.785cm" svg:y="13.369cm" svg:viewBox="0 0 8484 52" draw:points="8484,52 0,52 0,0 8484,0">
          <text:p/>
        </draw:polygon>
        <draw:polygon draw:style-name="gr350" draw:text-style-name="P154" draw:layer="layout" svg:width="8.483cm" svg:height="0.05cm" svg:x="7.785cm" svg:y="13.319cm" svg:viewBox="0 0 8484 51" draw:points="8484,51 0,51 0,0 8484,0">
          <text:p/>
        </draw:polygon>
        <draw:polygon draw:style-name="gr351" draw:text-style-name="P155" draw:layer="layout" svg:width="8.483cm" svg:height="0.051cm" svg:x="7.785cm" svg:y="13.268cm" svg:viewBox="0 0 8484 52" draw:points="8484,52 0,52 0,0 8484,0">
          <text:p/>
        </draw:polygon>
        <draw:polygon draw:style-name="gr352" draw:text-style-name="P156" draw:layer="layout" svg:width="8.483cm" svg:height="0.051cm" svg:x="7.785cm" svg:y="13.217cm" svg:viewBox="0 0 8484 52" draw:points="8484,52 0,52 0,0 8484,0">
          <text:p/>
        </draw:polygon>
        <draw:polygon draw:style-name="gr353" draw:text-style-name="P157" draw:layer="layout" svg:width="8.483cm" svg:height="0.05cm" svg:x="7.785cm" svg:y="13.167cm" svg:viewBox="0 0 8484 51" draw:points="8484,51 0,51 0,0 8484,0">
          <text:p/>
        </draw:polygon>
        <draw:polygon draw:style-name="gr354" draw:text-style-name="P158" draw:layer="layout" svg:width="8.483cm" svg:height="0.051cm" svg:x="7.785cm" svg:y="13.116cm" svg:viewBox="0 0 8484 52" draw:points="8484,52 0,52 0,0 8484,0">
          <text:p/>
        </draw:polygon>
        <draw:polygon draw:style-name="gr355" draw:text-style-name="P159" draw:layer="layout" svg:width="8.483cm" svg:height="0.05cm" svg:x="7.785cm" svg:y="13.066cm" svg:viewBox="0 0 8484 51" draw:points="8484,51 0,51 0,0 8484,0">
          <text:p/>
        </draw:polygon>
        <draw:polygon draw:style-name="gr356" draw:text-style-name="P160" draw:layer="layout" svg:width="8.483cm" svg:height="0.051cm" svg:x="7.785cm" svg:y="13.015cm" svg:viewBox="0 0 8484 52" draw:points="8484,52 0,52 0,0 8484,0">
          <text:p/>
        </draw:polygon>
        <draw:polygon draw:style-name="gr356" draw:text-style-name="P160" draw:layer="layout" svg:width="8.483cm" svg:height="0.051cm" svg:x="7.785cm" svg:y="12.964cm" svg:viewBox="0 0 8484 52" draw:points="8484,52 0,52 0,0 8484,0">
          <text:p/>
        </draw:polygon>
        <draw:polygon draw:style-name="gr357" draw:text-style-name="P161" draw:layer="layout" svg:width="8.483cm" svg:height="0.05cm" svg:x="7.785cm" svg:y="12.914cm" svg:viewBox="0 0 8484 51" draw:points="8484,51 0,51 0,0 8484,0">
          <text:p/>
        </draw:polygon>
        <draw:polygon draw:style-name="gr357" draw:text-style-name="P161" draw:layer="layout" svg:width="8.483cm" svg:height="0.051cm" svg:x="7.785cm" svg:y="12.863cm" svg:viewBox="0 0 8484 52" draw:points="8484,52 0,52 0,0 8484,0">
          <text:p/>
        </draw:polygon>
        <draw:polygon draw:style-name="gr358" draw:text-style-name="P162" draw:layer="layout" svg:width="8.483cm" svg:height="0.05cm" svg:x="7.785cm" svg:y="12.813cm" svg:viewBox="0 0 8484 51" draw:points="8484,51 0,51 0,0 8484,0">
          <text:p/>
        </draw:polygon>
        <draw:polygon draw:style-name="gr359" draw:text-style-name="P163" draw:layer="layout" svg:width="8.483cm" svg:height="0.051cm" svg:x="7.785cm" svg:y="12.762cm" svg:viewBox="0 0 8484 52" draw:points="8484,52 0,52 0,0 8484,0">
          <text:p/>
        </draw:polygon>
        <draw:polygon draw:style-name="gr360" draw:text-style-name="P164" draw:layer="layout" svg:width="8.483cm" svg:height="0.051cm" svg:x="7.785cm" svg:y="12.711cm" svg:viewBox="0 0 8484 52" draw:points="8484,52 0,52 0,0 8484,0">
          <text:p/>
        </draw:polygon>
        <draw:polygon draw:style-name="gr361" draw:text-style-name="P165" draw:layer="layout" svg:width="8.483cm" svg:height="0.05cm" svg:x="7.785cm" svg:y="12.661cm" svg:viewBox="0 0 8484 51" draw:points="8484,51 0,51 0,0 8484,0">
          <text:p/>
        </draw:polygon>
        <draw:polygon draw:style-name="gr362" draw:text-style-name="P166" draw:layer="layout" svg:width="8.483cm" svg:height="0.051cm" svg:x="7.785cm" svg:y="12.61cm" svg:viewBox="0 0 8484 52" draw:points="8484,52 0,52 0,0 8484,0">
          <text:p/>
        </draw:polygon>
        <draw:polygon draw:style-name="gr363" draw:text-style-name="P167" draw:layer="layout" svg:width="8.483cm" svg:height="0.05cm" svg:x="7.785cm" svg:y="12.56cm" svg:viewBox="0 0 8484 51" draw:points="8484,51 0,51 0,0 8484,0">
          <text:p/>
        </draw:polygon>
        <draw:polygon draw:style-name="gr364" draw:text-style-name="P168" draw:layer="layout" svg:width="8.483cm" svg:height="0.051cm" svg:x="7.785cm" svg:y="12.509cm" svg:viewBox="0 0 8484 52" draw:points="8484,52 0,52 0,0 8484,0">
          <text:p/>
        </draw:polygon>
        <draw:polygon draw:style-name="gr364" draw:text-style-name="P168" draw:layer="layout" svg:width="8.483cm" svg:height="0.051cm" svg:x="7.785cm" svg:y="12.458cm" svg:viewBox="0 0 8484 52" draw:points="8484,52 0,52 0,0 8484,0">
          <text:p/>
        </draw:polygon>
        <draw:polygon draw:style-name="gr365" draw:text-style-name="P169" draw:layer="layout" svg:width="8.483cm" svg:height="0.05cm" svg:x="7.785cm" svg:y="12.408cm" svg:viewBox="0 0 8484 51" draw:points="8484,51 0,51 0,0 8484,0">
          <text:p/>
        </draw:polygon>
        <draw:polygon draw:style-name="gr365" draw:text-style-name="P169" draw:layer="layout" svg:width="8.483cm" svg:height="0.051cm" svg:x="7.785cm" svg:y="12.357cm" svg:viewBox="0 0 8484 52" draw:points="8484,52 0,52 0,0 8484,0">
          <text:p/>
        </draw:polygon>
        <draw:polygon draw:style-name="gr366" draw:text-style-name="P170" draw:layer="layout" svg:width="8.483cm" svg:height="0.101cm" svg:x="7.785cm" svg:y="12.256cm" svg:viewBox="0 0 8484 102" draw:points="8484,102 0,102 0,0 8484,0">
          <text:p/>
        </draw:polygon>
        <draw:polygon draw:style-name="gr367" draw:text-style-name="P171" draw:layer="layout" svg:width="8.483cm" svg:height="0.101cm" svg:x="7.785cm" svg:y="12.155cm" svg:viewBox="0 0 8484 102" draw:points="8484,102 0,102 0,0 8484,0">
          <text:p/>
        </draw:polygon>
        <draw:polygon draw:style-name="gr368" draw:text-style-name="P172" draw:layer="layout" svg:width="8.483cm" svg:height="0.101cm" svg:x="7.785cm" svg:y="12.054cm" svg:viewBox="0 0 8484 102" draw:points="8484,102 0,102 0,0 8484,0">
          <text:p/>
        </draw:polygon>
        <draw:polygon draw:style-name="gr369" draw:text-style-name="P173" draw:layer="layout" svg:width="8.483cm" svg:height="0.102cm" svg:x="7.785cm" svg:y="11.952cm" svg:viewBox="0 0 8484 103" draw:points="8484,103 0,103 0,0 8484,0">
          <text:p/>
        </draw:polygon>
        <draw:polygon draw:style-name="gr370" draw:text-style-name="P174" draw:layer="layout" svg:width="8.483cm" svg:height="0.101cm" svg:x="7.785cm" svg:y="11.851cm" svg:viewBox="0 0 8484 102" draw:points="8484,102 0,102 0,0 8484,0">
          <text:p/>
        </draw:polygon>
        <draw:polygon draw:style-name="gr371" draw:text-style-name="P175" draw:layer="layout" svg:width="8.483cm" svg:height="0.101cm" svg:x="7.785cm" svg:y="11.75cm" svg:viewBox="0 0 8484 102" draw:points="8484,102 0,102 0,0 8484,0">
          <text:p/>
        </draw:polygon>
        <draw:polygon draw:style-name="gr372" draw:text-style-name="P176" draw:layer="layout" svg:width="8.483cm" svg:height="0.101cm" svg:x="7.785cm" svg:y="11.649cm" svg:viewBox="0 0 8484 102" draw:points="8484,102 0,102 0,0 8484,0">
          <text:p/>
        </draw:polygon>
        <draw:polygon draw:style-name="gr373" draw:text-style-name="P177" draw:layer="layout" svg:width="8.483cm" svg:height="0.101cm" svg:x="7.785cm" svg:y="11.548cm" svg:viewBox="0 0 8484 102" draw:points="8484,102 0,102 0,0 8484,0">
          <text:p/>
        </draw:polygon>
        <draw:polygon draw:style-name="gr374" draw:text-style-name="P178" draw:layer="layout" svg:width="8.483cm" svg:height="0.102cm" svg:x="7.785cm" svg:y="11.446cm" svg:viewBox="0 0 8484 103" draw:points="8484,103 0,103 0,0 8484,0">
          <text:p/>
        </draw:polygon>
        <draw:polygon draw:style-name="gr375" draw:text-style-name="P179" draw:layer="layout" svg:width="8.483cm" svg:height="0.101cm" svg:x="7.785cm" svg:y="11.345cm" svg:viewBox="0 0 8484 102" draw:points="8484,102 0,102 0,0 8484,0">
          <text:p/>
        </draw:polygon>
        <draw:polygon draw:style-name="gr376" draw:text-style-name="P180" draw:layer="layout" svg:width="8.483cm" svg:height="0.101cm" svg:x="7.785cm" svg:y="11.244cm" svg:viewBox="0 0 8484 102" draw:points="8484,102 0,102 0,0 8484,0">
          <text:p/>
        </draw:polygon>
        <draw:polygon draw:style-name="gr377" draw:text-style-name="P181" draw:layer="layout" svg:width="8.483cm" svg:height="0.101cm" svg:x="7.785cm" svg:y="11.143cm" svg:viewBox="0 0 8484 102" draw:points="8484,102 0,102 0,0 8484,0">
          <text:p/>
        </draw:polygon>
        <draw:polygon draw:style-name="gr378" draw:text-style-name="P182" draw:layer="layout" svg:width="8.483cm" svg:height="0.101cm" svg:x="7.785cm" svg:y="11.042cm" svg:viewBox="0 0 8484 102" draw:points="8484,102 0,102 0,0 8484,0">
          <text:p/>
        </draw:polygon>
        <draw:polygon draw:style-name="gr379" draw:text-style-name="P183" draw:layer="layout" svg:width="8.483cm" svg:height="0.102cm" svg:x="7.785cm" svg:y="10.94cm" svg:viewBox="0 0 8484 103" draw:points="8484,103 0,103 0,0 8484,0">
          <text:p/>
        </draw:polygon>
        <draw:polygon draw:style-name="gr380" draw:text-style-name="P184" draw:layer="layout" svg:width="8.483cm" svg:height="0.101cm" svg:x="7.785cm" svg:y="10.839cm" svg:viewBox="0 0 8484 102" draw:points="8484,102 0,102 0,0 8484,0">
          <text:p/>
        </draw:polygon>
        <draw:polygon draw:style-name="gr381" draw:text-style-name="P185" draw:layer="layout" svg:width="8.483cm" svg:height="0.101cm" svg:x="7.785cm" svg:y="10.738cm" svg:viewBox="0 0 8484 102" draw:points="8484,102 0,102 0,0 8484,0">
          <text:p/>
        </draw:polygon>
        <draw:polygon draw:style-name="gr382" draw:text-style-name="P186" draw:layer="layout" svg:width="8.483cm" svg:height="0.101cm" svg:x="7.785cm" svg:y="10.637cm" svg:viewBox="0 0 8484 102" draw:points="8484,102 0,102 0,0 8484,0">
          <text:p/>
        </draw:polygon>
        <draw:polygon draw:style-name="gr383" draw:text-style-name="P187" draw:layer="layout" svg:width="8.483cm" svg:height="0.101cm" svg:x="7.785cm" svg:y="10.536cm" svg:viewBox="0 0 8484 102" draw:points="8484,102 0,102 0,0 8484,0">
          <text:p/>
        </draw:polygon>
        <draw:polygon draw:style-name="gr384" draw:text-style-name="P188" draw:layer="layout" svg:width="8.483cm" svg:height="0.102cm" svg:x="7.785cm" svg:y="10.434cm" svg:viewBox="0 0 8484 103" draw:points="8484,103 0,103 0,0 8484,0">
          <text:p/>
        </draw:polygon>
        <draw:polygon draw:style-name="gr385" draw:text-style-name="P189" draw:layer="layout" svg:width="8.483cm" svg:height="0.101cm" svg:x="7.785cm" svg:y="10.333cm" svg:viewBox="0 0 8484 102" draw:points="8484,102 0,102 0,0 8484,0">
          <text:p/>
        </draw:polygon>
        <draw:polygon draw:style-name="gr386" draw:text-style-name="P190" draw:layer="layout" svg:width="8.483cm" svg:height="0.101cm" svg:x="7.785cm" svg:y="10.232cm" svg:viewBox="0 0 8484 102" draw:points="8484,102 0,102 0,0 8484,0">
          <text:p/>
        </draw:polygon>
        <draw:polygon draw:style-name="gr387" draw:text-style-name="P191" draw:layer="layout" svg:width="8.483cm" svg:height="0.101cm" svg:x="7.785cm" svg:y="10.131cm" svg:viewBox="0 0 8484 102" draw:points="8484,102 0,102 0,0 8484,0">
          <text:p/>
        </draw:polygon>
        <draw:polygon draw:style-name="gr388" draw:text-style-name="P192" draw:layer="layout" svg:width="8.483cm" svg:height="0.101cm" svg:x="7.785cm" svg:y="10.03cm" svg:viewBox="0 0 8484 102" draw:points="8484,102 0,102 0,0 8484,0">
          <text:p/>
        </draw:polygon>
        <draw:polygon draw:style-name="gr389" draw:text-style-name="P193" draw:layer="layout" svg:width="8.483cm" svg:height="0.102cm" svg:x="7.785cm" svg:y="9.928cm" svg:viewBox="0 0 8484 103" draw:points="8484,103 0,103 0,0 8484,0">
          <text:p/>
        </draw:polygon>
        <draw:polygon draw:style-name="gr390" draw:text-style-name="P194" draw:layer="layout" svg:width="8.483cm" svg:height="0.101cm" svg:x="7.785cm" svg:y="9.827cm" svg:viewBox="0 0 8484 102" draw:points="8484,102 0,102 0,0 8484,0">
          <text:p/>
        </draw:polygon>
        <draw:polygon draw:style-name="gr391" draw:text-style-name="P195" draw:layer="layout" svg:width="8.483cm" svg:height="0.101cm" svg:x="7.785cm" svg:y="9.726cm" svg:viewBox="0 0 8484 102" draw:points="8484,102 0,102 0,0 8484,0">
          <text:p/>
        </draw:polygon>
        <draw:polygon draw:style-name="gr392" draw:text-style-name="P196" draw:layer="layout" svg:width="8.483cm" svg:height="0.101cm" svg:x="7.785cm" svg:y="9.625cm" svg:viewBox="0 0 8484 102" draw:points="8484,102 0,102 0,0 8484,0">
          <text:p/>
        </draw:polygon>
        <draw:polygon draw:style-name="gr393" draw:text-style-name="P197" draw:layer="layout" svg:width="8.483cm" svg:height="0.101cm" svg:x="7.785cm" svg:y="9.524cm" svg:viewBox="0 0 8484 102" draw:points="8484,102 0,102 0,0 8484,0">
          <text:p/>
        </draw:polygon>
        <draw:polygon draw:style-name="gr394" draw:text-style-name="P198" draw:layer="layout" svg:width="8.483cm" svg:height="0.102cm" svg:x="7.785cm" svg:y="9.422cm" svg:viewBox="0 0 8484 103" draw:points="8484,103 0,103 0,0 8484,0">
          <text:p/>
        </draw:polygon>
        <draw:polygon draw:style-name="gr395" draw:text-style-name="P199" draw:layer="layout" svg:width="8.483cm" svg:height="0.101cm" svg:x="7.785cm" svg:y="9.321cm" svg:viewBox="0 0 8484 102" draw:points="8484,102 0,102 0,0 8484,0">
          <text:p/>
        </draw:polygon>
        <draw:polygon draw:style-name="gr396" draw:text-style-name="P200" draw:layer="layout" svg:width="8.483cm" svg:height="0.101cm" svg:x="7.785cm" svg:y="9.22cm" svg:viewBox="0 0 8484 102" draw:points="8484,102 0,102 0,0 8484,0">
          <text:p/>
        </draw:polygon>
        <draw:path draw:style-name="gr397" draw:text-style-name="P201" draw:layer="layout" svg:width="8.483cm" svg:height="0.101cm" svg:x="7.785cm" svg:y="9.119cm" svg:viewBox="0 0 8484 102" svg:d="M0 30c0-11 0-21 0-30h8484c0 9 0 19 0 30v72h-8484z">
          <text:p/>
        </draw:path>
        <draw:path draw:style-name="gr398" draw:text-style-name="P202" draw:layer="layout" svg:width="8.483cm" svg:height="0.101cm" svg:x="7.785cm" svg:y="9.018cm" svg:viewBox="0 0 8484 102" svg:d="M9 0h8466c5 34 8 68 9 102h-8484c1-34 4-68 9-102z">
          <text:p/>
        </draw:path>
        <draw:path draw:style-name="gr399" draw:text-style-name="P203" draw:layer="layout" svg:width="8.465cm" svg:height="0.102cm" svg:x="7.794cm" svg:y="8.916cm" svg:viewBox="0 0 8466 103" svg:d="M19 0h8427c9 34 15 68 20 103h-8466c4-35 11-69 19-103z">
          <text:p/>
        </draw:path>
        <draw:path draw:style-name="gr400" draw:text-style-name="P204" draw:layer="layout" svg:width="8.426cm" svg:height="0.101cm" svg:x="7.813cm" svg:y="8.815cm" svg:viewBox="0 0 8427 102" svg:d="M32 0h8364c12 34 23 68 31 102h-8427c9-34 20-68 32-102z">
          <text:p/>
        </draw:path>
        <draw:path draw:style-name="gr401" draw:text-style-name="P205" draw:layer="layout" svg:width="8.363cm" svg:height="0.101cm" svg:x="7.845cm" svg:y="8.714cm" svg:viewBox="0 0 8364 102" svg:d="M46 0h8272c17 34 32 67 46 102h-8364c13-35 29-68 46-102z">
          <text:p/>
        </draw:path>
        <draw:path draw:style-name="gr402" draw:text-style-name="P206" draw:layer="layout" svg:width="8.271cm" svg:height="0.101cm" svg:x="7.891cm" svg:y="8.613cm" svg:viewBox="0 0 8272 102" svg:d="M61 0h8150c22 33 43 67 61 102h-8272c18-35 38-69 61-102z">
          <text:p/>
        </draw:path>
        <draw:path draw:style-name="gr403" draw:text-style-name="P207" draw:layer="layout" svg:width="8.149cm" svg:height="0.101cm" svg:x="7.952cm" svg:y="8.512cm" svg:viewBox="0 0 8150 102" svg:d="M81 0h7988c29 32 56 66 81 102h-8150c24-36 52-70 81-102z">
          <text:p/>
        </draw:path>
        <draw:path draw:style-name="gr404" draw:text-style-name="P208" draw:layer="layout" svg:width="7.987cm" svg:height="0.102cm" svg:x="8.033cm" svg:y="8.41cm" svg:viewBox="0 0 7988 103" svg:d="M109 0h7770c39 32 75 66 109 103h-7988c33-37 70-71 109-103z">
          <text:p/>
        </draw:path>
        <draw:path draw:style-name="gr405" draw:text-style-name="P209" draw:layer="layout" svg:width="7.769cm" svg:height="0.101cm" svg:x="8.142cm" svg:y="8.309cm" svg:viewBox="0 0 7770 102" svg:d="M158 0h7454c56 30 109 64 158 102h-7770c49-38 102-72 158-102z">
          <text:p/>
        </draw:path>
        <draw:path draw:style-name="gr406" draw:text-style-name="P210" draw:layer="layout" svg:width="7.453cm" svg:height="0.101cm" svg:x="8.3cm" svg:y="8.208cm" svg:viewBox="0 0 7454 102" svg:d="M424 0h6605c153 0 297 37 425 102h-7454c127-65 272-102 424-102z">
          <text:p/>
        </draw:path>
        <draw:path draw:style-name="gr160" draw:text-style-name="P2" draw:layer="layout" svg:width="8.483cm" svg:height="6.478cm" svg:x="7.785cm" svg:y="8.208cm" svg:viewBox="0 0 8484 6479" svg:d="M0 940c0-519 420-940 939-940h6605c519 0 940 421 940 940v4598c0 519-421 941-940 941h-6605c-519 0-939-422-939-941z">
          <text:p/>
        </draw:path>
        <draw:frame draw:style-name="gr323" draw:text-style-name="P4" draw:layer="layout" svg:width="2.595cm" svg:height="0.552cm" svg:x="28.749cm" svg:y="6.872cm">
          <draw:text-box>
            <text:p text:style-name="P3"><text:span text:style-name="T3">applications</text:span></text:p>
          </draw:text-box>
        </draw:frame>
        <draw:frame draw:style-name="gr186" draw:text-style-name="P4" draw:layer="layout" svg:width="0.49cm" svg:height="0.552cm" svg:x="8.317cm" svg:y="8.817cm">
          <draw:text-box>
            <text:p text:style-name="P3"><text:span text:style-name="T13">•</text:span></text:p>
          </draw:text-box>
        </draw:frame>
        <draw:frame draw:style-name="gr48" draw:text-style-name="P4" draw:layer="layout" svg:width="2.349cm" svg:height="0.552cm" svg:x="9.113cm" svg:y="8.817cm">
          <draw:text-box>
            <text:p text:style-name="P3"><text:span text:style-name="T13">End users </text:span></text:p>
          </draw:text-box>
        </draw:frame>
        <draw:frame draw:style-name="gr186" draw:text-style-name="P4" draw:layer="layout" svg:width="0.49cm" svg:height="0.552cm" svg:x="8.317cm" svg:y="9.41cm">
          <draw:text-box>
            <text:p text:style-name="P3"><text:span text:style-name="T13">•</text:span></text:p>
          </draw:text-box>
        </draw:frame>
        <draw:frame draw:style-name="gr407" draw:text-style-name="P4" draw:layer="layout" svg:width="5.626cm" svg:height="0.552cm" svg:x="9.113cm" svg:y="9.41cm">
          <draw:text-box>
            <text:p text:style-name="P3"><text:span text:style-name="T13">Source application/tables </text:span></text:p>
          </draw:text-box>
        </draw:frame>
        <draw:frame draw:style-name="gr186" draw:text-style-name="P4" draw:layer="layout" svg:width="0.49cm" svg:height="0.552cm" svg:x="8.317cm" svg:y="10.003cm">
          <draw:text-box>
            <text:p text:style-name="P3"><text:span text:style-name="T13">•</text:span></text:p>
          </draw:text-box>
        </draw:frame>
        <draw:frame draw:style-name="gr408" draw:text-style-name="P4" draw:layer="layout" svg:width="2.186cm" svg:height="0.552cm" svg:x="9.113cm" svg:y="10.003cm">
          <draw:text-box>
            <text:p text:style-name="P3"><text:span text:style-name="T13">Scenarios</text:span></text:p>
          </draw:text-box>
        </draw:frame>
        <draw:frame draw:style-name="gr186" draw:text-style-name="P4" draw:layer="layout" svg:width="0.49cm" svg:height="0.552cm" svg:x="8.317cm" svg:y="10.596cm">
          <draw:text-box>
            <text:p text:style-name="P3"><text:span text:style-name="T13">•</text:span></text:p>
          </draw:text-box>
        </draw:frame>
        <draw:frame draw:style-name="gr409" draw:text-style-name="P4" draw:layer="layout" svg:width="5.378cm" svg:height="0.552cm" svg:x="9.113cm" svg:y="10.596cm">
          <draw:text-box>
            <text:p text:style-name="P3"><text:span text:style-name="T13">Number of tasks, reports</text:span></text:p>
          </draw:text-box>
        </draw:frame>
        <draw:frame draw:style-name="gr186" draw:text-style-name="P4" draw:layer="layout" svg:width="0.49cm" svg:height="0.552cm" svg:x="8.317cm" svg:y="11.189cm">
          <draw:text-box>
            <text:p text:style-name="P3"><text:span text:style-name="T13">•</text:span></text:p>
          </draw:text-box>
        </draw:frame>
        <draw:frame draw:style-name="gr410" draw:text-style-name="P4" draw:layer="layout" svg:width="4.288cm" svg:height="0.552cm" svg:x="9.113cm" svg:y="11.189cm">
          <draw:text-box>
            <text:p text:style-name="P3"><text:span text:style-name="T13">Input file/ input data</text:span></text:p>
          </draw:text-box>
        </draw:frame>
        <draw:frame draw:style-name="gr186" draw:text-style-name="P4" draw:layer="layout" svg:width="0.49cm" svg:height="0.552cm" svg:x="8.317cm" svg:y="11.781cm">
          <draw:text-box>
            <text:p text:style-name="P3"><text:span text:style-name="T13">•</text:span></text:p>
          </draw:text-box>
        </draw:frame>
        <draw:frame draw:style-name="gr411" draw:text-style-name="P4" draw:layer="layout" svg:width="4.26cm" svg:height="0.552cm" svg:x="9.113cm" svg:y="11.781cm">
          <draw:text-box>
            <text:p text:style-name="P3"><text:span text:style-name="T13">Start time, end time</text:span></text:p>
          </draw:text-box>
        </draw:frame>
        <draw:frame draw:style-name="gr187" draw:text-style-name="P4" draw:layer="layout" svg:width="0.491cm" svg:height="0.552cm" svg:x="8.317cm" svg:y="12.373cm">
          <draw:text-box>
            <text:p text:style-name="P3"><text:span text:style-name="T13">•</text:span></text:p>
          </draw:text-box>
        </draw:frame>
        <draw:frame draw:style-name="gr412" draw:text-style-name="P4" draw:layer="layout" svg:width="4.642cm" svg:height="0.552cm" svg:x="9.113cm" svg:y="12.373cm">
          <draw:text-box>
            <text:p text:style-name="P3"><text:span text:style-name="T13">Dependence/ Criteria</text:span></text:p>
          </draw:text-box>
        </draw:frame>
        <draw:frame draw:style-name="gr186" draw:text-style-name="P4" draw:layer="layout" svg:width="0.49cm" svg:height="0.552cm" svg:x="8.317cm" svg:y="12.967cm">
          <draw:text-box>
            <text:p text:style-name="P3"><text:span text:style-name="T13">•</text:span></text:p>
          </draw:text-box>
        </draw:frame>
        <draw:frame draw:style-name="gr413" draw:text-style-name="P4" draw:layer="layout" svg:width="6.007cm" svg:height="0.552cm" svg:x="9.113cm" svg:y="12.967cm">
          <draw:text-box>
            <text:p text:style-name="P3"><text:span text:style-name="T13">Not functional requirements</text:span></text:p>
          </draw:text-box>
        </draw:frame>
        <draw:frame draw:style-name="gr186" draw:text-style-name="P4" draw:layer="layout" svg:width="0.49cm" svg:height="0.552cm" svg:x="8.317cm" svg:y="13.56cm">
          <draw:text-box>
            <text:p text:style-name="P3"><text:span text:style-name="T13">•</text:span></text:p>
          </draw:text-box>
        </draw:frame>
        <draw:frame draw:style-name="gr2" draw:text-style-name="P2" draw:layer="layout" svg:width="8.519cm" svg:height="6.732cm" svg:x="16.959cm" svg:y="8.145cm">
          <draw:image xlink:href="Pictures/100000010000029F00000213F683F901.png" xlink:type="simple" xlink:show="embed" xlink:actuate="onLoad" draw:mime-type="image/png">
            <text:p/>
          </draw:image>
        </draw:frame>
        <draw:frame draw:style-name="gr2" draw:text-style-name="P2" draw:layer="layout" svg:width="7.443cm" svg:height="6.622cm" svg:x="17.264cm" svg:y="8.263cm">
          <draw:image xlink:href="Pictures/100000010000024B0000020A4A75515E.png" xlink:type="simple" xlink:show="embed" xlink:actuate="onLoad" draw:mime-type="image/png">
            <text:p/>
          </draw:image>
        </draw:frame>
        <draw:path draw:style-name="gr329" draw:text-style-name="P133" draw:layer="layout" svg:width="6.746cm" svg:height="0.051cm" svg:x="17.848cm" svg:y="14.634cm" svg:viewBox="0 0 6747 52" svg:d="M6421 52h-6094c-114 0-224-19-327-52h6747c-103 33-212 52-326 52z">
          <text:p/>
        </draw:path>
        <draw:path draw:style-name="gr330" draw:text-style-name="P134" draw:layer="layout" svg:width="7.005cm" svg:height="0.05cm" svg:x="17.719cm" svg:y="14.584cm" svg:viewBox="0 0 7006 51" svg:d="M6876 51h-6747c-44-15-88-31-129-51h7006c-42 20-85 36-130 51z">
          <text:p/>
        </draw:path>
        <draw:path draw:style-name="gr331" draw:text-style-name="P135" draw:layer="layout" svg:width="7.195cm" svg:height="0.05cm" svg:x="17.624cm" svg:y="14.534cm" svg:viewBox="0 0 7196 51" svg:d="M7101 51h-7006c-33-16-65-33-95-51h7196c-31 18-63 35-95 51z">
          <text:p/>
        </draw:path>
        <draw:path draw:style-name="gr332" draw:text-style-name="P136" draw:layer="layout" svg:width="7.349cm" svg:height="0.051cm" svg:x="17.547cm" svg:y="14.483cm" svg:viewBox="0 0 7350 52" svg:d="M7273 52h-7196c-27-17-52-34-77-52h7350c-25 18-51 35-77 52z">
          <text:p/>
        </draw:path>
        <draw:path draw:style-name="gr333" draw:text-style-name="P137" draw:layer="layout" svg:width="7.478cm" svg:height="0.05cm" svg:x="17.482cm" svg:y="14.433cm" svg:viewBox="0 0 7479 51" svg:d="M7415 51h-7350c-23-17-44-34-65-51h7479c-20 17-42 34-64 51z">
          <text:p/>
        </draw:path>
        <draw:path draw:style-name="gr334" draw:text-style-name="P138" draw:layer="layout" svg:width="7.59cm" svg:height="0.051cm" svg:x="17.426cm" svg:y="14.382cm" svg:viewBox="0 0 7591 52" svg:d="M7535 52h-7479c-19-18-38-34-56-52h7591c-18 18-36 34-56 52z">
          <text:p/>
        </draw:path>
        <draw:path draw:style-name="gr335" draw:text-style-name="P139" draw:layer="layout" svg:width="7.688cm" svg:height="0.05cm" svg:x="17.377cm" svg:y="14.332cm" svg:viewBox="0 0 7689 51" svg:d="M7640 51h-7591c-17-17-33-34-49-51h7689c-15 17-32 34-49 51z">
          <text:p/>
        </draw:path>
        <draw:path draw:style-name="gr336" draw:text-style-name="P140" draw:layer="layout" svg:width="7.774cm" svg:height="0.051cm" svg:x="17.334cm" svg:y="14.281cm" svg:viewBox="0 0 7775 52" svg:d="M7732 52h-7689c-15-18-29-35-43-52h7775c-13 17-28 34-43 52z">
          <text:p/>
        </draw:path>
        <draw:path draw:style-name="gr336" draw:text-style-name="P140" draw:layer="layout" svg:width="7.85cm" svg:height="0.05cm" svg:x="17.296cm" svg:y="14.231cm" svg:viewBox="0 0 7851 51" svg:d="M7813 51h-7775c-13-17-26-34-38-51h7851c-12 17-24 34-38 51z">
          <text:p/>
        </draw:path>
        <draw:path draw:style-name="gr337" draw:text-style-name="P141" draw:layer="layout" svg:width="7.918cm" svg:height="0.051cm" svg:x="17.262cm" svg:y="14.18cm" svg:viewBox="0 0 7919 52" svg:d="M7885 52h-7851c-12-18-23-35-34-52h7919c-11 17-22 34-34 52z">
          <text:p/>
        </draw:path>
        <draw:path draw:style-name="gr337" draw:text-style-name="P141" draw:layer="layout" svg:width="7.978cm" svg:height="0.05cm" svg:x="17.232cm" svg:y="14.13cm" svg:viewBox="0 0 7979 51" svg:d="M7949 51h-7919c-10-17-20-34-30-51h7979c-9 17-19 34-30 51z">
          <text:p/>
        </draw:path>
        <draw:path draw:style-name="gr338" draw:text-style-name="P142" draw:layer="layout" svg:width="8.03cm" svg:height="0.051cm" svg:x="17.206cm" svg:y="14.079cm" svg:viewBox="0 0 8031 52" svg:d="M8005 52h-7979c-9-18-18-35-26-52h8031c-8 17-17 34-26 52z">
          <text:p/>
        </draw:path>
        <draw:path draw:style-name="gr339" draw:text-style-name="P143" draw:layer="layout" svg:width="8.076cm" svg:height="0.05cm" svg:x="17.183cm" svg:y="14.029cm" svg:viewBox="0 0 8077 51" svg:d="M8054 51h-8031c-8-17-16-34-23-51h8077c-7 17-15 34-23 51z">
          <text:p/>
        </draw:path>
        <draw:path draw:style-name="gr340" draw:text-style-name="P144" draw:layer="layout" svg:width="8.116cm" svg:height="0.051cm" svg:x="17.163cm" svg:y="13.978cm" svg:viewBox="0 0 8117 52" svg:d="M8097 52h-8077c-7-18-14-35-20-52h8117c-6 17-13 34-20 52z">
          <text:p/>
        </draw:path>
        <draw:path draw:style-name="gr341" draw:text-style-name="P145" draw:layer="layout" svg:width="8.15cm" svg:height="0.05cm" svg:x="17.146cm" svg:y="13.928cm" svg:viewBox="0 0 8151 51" svg:d="M8134 51h-8117c-6-17-12-34-17-51h8151c-5 17-11 34-17 51z">
          <text:p/>
        </draw:path>
        <draw:path draw:style-name="gr342" draw:text-style-name="P146" draw:layer="layout" svg:width="8.179cm" svg:height="0.051cm" svg:x="17.132cm" svg:y="13.877cm" svg:viewBox="0 0 8180 52" svg:d="M8165 52h-8151c-5-18-10-35-14-52h8180c-5 17-10 34-15 52z">
          <text:p/>
        </draw:path>
        <draw:path draw:style-name="gr343" draw:text-style-name="P147" draw:layer="layout" svg:width="8.202cm" svg:height="0.05cm" svg:x="17.12cm" svg:y="13.827cm" svg:viewBox="0 0 8203 51" svg:d="M8192 51h-8180c-4-17-8-34-12-51h8203c-3 17-7 34-11 51z">
          <text:p/>
        </draw:path>
        <draw:path draw:style-name="gr344" draw:text-style-name="P148" draw:layer="layout" svg:width="8.22cm" svg:height="0.051cm" svg:x="17.111cm" svg:y="13.776cm" svg:viewBox="0 0 8221 52" svg:d="M8212 52h-8203c-3-18-6-35-9-52h8221c-2 17-5 34-9 52z">
          <text:p/>
        </draw:path>
        <draw:path draw:style-name="gr344" draw:text-style-name="P148" draw:layer="layout" svg:width="8.234cm" svg:height="0.05cm" svg:x="17.104cm" svg:y="13.726cm" svg:viewBox="0 0 8235 51" svg:d="M8228 51h-8221c-3-17-5-34-7-51h8235c-2 17-4 34-7 51z">
          <text:p/>
        </draw:path>
        <draw:path draw:style-name="gr345" draw:text-style-name="P149" draw:layer="layout" svg:width="8.242cm" svg:height="0.05cm" svg:x="17.1cm" svg:y="13.676cm" svg:viewBox="0 0 8243 51" svg:d="M8239 51h-8235c-2-18-3-35-4-51h8243c-1 16-2 33-4 51z">
          <text:p/>
        </draw:path>
        <draw:path draw:style-name="gr346" draw:text-style-name="P150" draw:layer="layout" svg:width="8.246cm" svg:height="0.051cm" svg:x="17.098cm" svg:y="13.625cm" svg:viewBox="0 0 8247 52" svg:d="M8245 52h-8243c-1-18-2-35-2-52h8247c0 17-1 34-2 52z">
          <text:p/>
        </draw:path>
        <draw:path draw:style-name="gr347" draw:text-style-name="P151" draw:layer="layout" svg:width="8.246cm" svg:height="0.05cm" svg:x="17.098cm" svg:y="13.575cm" svg:viewBox="0 0 8247 51" svg:d="M8247 33c0 6 0 12 0 18h-8247c0-6 0-12 0-18v-33h8247z">
          <text:p/>
        </draw:path>
        <draw:polygon draw:style-name="gr348" draw:text-style-name="P152" draw:layer="layout" svg:width="8.246cm" svg:height="0.052cm" svg:x="17.098cm" svg:y="13.524cm" svg:viewBox="0 0 8247 53" draw:points="8247,53 0,53 0,0 8247,0">
          <text:p/>
        </draw:polygon>
        <draw:polygon draw:style-name="gr348" draw:text-style-name="P152" draw:layer="layout" svg:width="8.246cm" svg:height="0.05cm" svg:x="17.098cm" svg:y="13.474cm" svg:viewBox="0 0 8247 51" draw:points="8247,51 0,51 0,0 8247,0">
          <text:p/>
        </draw:polygon>
        <draw:polygon draw:style-name="gr349" draw:text-style-name="P153" draw:layer="layout" svg:width="8.246cm" svg:height="0.051cm" svg:x="17.098cm" svg:y="13.423cm" svg:viewBox="0 0 8247 52" draw:points="8247,52 0,52 0,0 8247,0">
          <text:p/>
        </draw:polygon>
        <draw:polygon draw:style-name="gr349" draw:text-style-name="P153" draw:layer="layout" svg:width="8.246cm" svg:height="0.05cm" svg:x="17.098cm" svg:y="13.373cm" svg:viewBox="0 0 8247 51" draw:points="8247,51 0,51 0,0 8247,0">
          <text:p/>
        </draw:polygon>
        <draw:polygon draw:style-name="gr350" draw:text-style-name="P154" draw:layer="layout" svg:width="8.246cm" svg:height="0.051cm" svg:x="17.098cm" svg:y="13.322cm" svg:viewBox="0 0 8247 52" draw:points="8247,52 0,52 0,0 8247,0">
          <text:p/>
        </draw:polygon>
        <draw:polygon draw:style-name="gr351" draw:text-style-name="P155" draw:layer="layout" svg:width="8.246cm" svg:height="0.05cm" svg:x="17.098cm" svg:y="13.272cm" svg:viewBox="0 0 8247 51" draw:points="8247,51 0,51 0,0 8247,0">
          <text:p/>
        </draw:polygon>
        <draw:polygon draw:style-name="gr352" draw:text-style-name="P156" draw:layer="layout" svg:width="8.246cm" svg:height="0.051cm" svg:x="17.098cm" svg:y="13.221cm" svg:viewBox="0 0 8247 52" draw:points="8247,52 0,52 0,0 8247,0">
          <text:p/>
        </draw:polygon>
        <draw:polygon draw:style-name="gr353" draw:text-style-name="P157" draw:layer="layout" svg:width="8.246cm" svg:height="0.05cm" svg:x="17.098cm" svg:y="13.171cm" svg:viewBox="0 0 8247 51" draw:points="8247,51 0,51 0,0 8247,0">
          <text:p/>
        </draw:polygon>
        <draw:polygon draw:style-name="gr354" draw:text-style-name="P158" draw:layer="layout" svg:width="8.246cm" svg:height="0.051cm" svg:x="17.098cm" svg:y="13.12cm" svg:viewBox="0 0 8247 52" draw:points="8247,52 0,52 0,0 8247,0">
          <text:p/>
        </draw:polygon>
        <draw:polygon draw:style-name="gr355" draw:text-style-name="P159" draw:layer="layout" svg:width="8.246cm" svg:height="0.05cm" svg:x="17.098cm" svg:y="13.07cm" svg:viewBox="0 0 8247 51" draw:points="8247,51 0,51 0,0 8247,0">
          <text:p/>
        </draw:polygon>
        <draw:polygon draw:style-name="gr356" draw:text-style-name="P160" draw:layer="layout" svg:width="8.246cm" svg:height="0.051cm" svg:x="17.098cm" svg:y="13.019cm" svg:viewBox="0 0 8247 52" draw:points="8247,52 0,52 0,0 8247,0">
          <text:p/>
        </draw:polygon>
        <draw:polygon draw:style-name="gr356" draw:text-style-name="P160" draw:layer="layout" svg:width="8.246cm" svg:height="0.05cm" svg:x="17.098cm" svg:y="12.969cm" svg:viewBox="0 0 8247 51" draw:points="8247,51 0,51 0,0 8247,0">
          <text:p/>
        </draw:polygon>
        <draw:polygon draw:style-name="gr357" draw:text-style-name="P161" draw:layer="layout" svg:width="8.246cm" svg:height="0.05cm" svg:x="17.098cm" svg:y="12.919cm" svg:viewBox="0 0 8247 51" draw:points="8247,51 0,51 0,0 8247,0">
          <text:p/>
        </draw:polygon>
        <draw:polygon draw:style-name="gr357" draw:text-style-name="P161" draw:layer="layout" svg:width="8.246cm" svg:height="0.051cm" svg:x="17.098cm" svg:y="12.868cm" svg:viewBox="0 0 8247 52" draw:points="8247,52 0,52 0,0 8247,0">
          <text:p/>
        </draw:polygon>
        <draw:polygon draw:style-name="gr358" draw:text-style-name="P162" draw:layer="layout" svg:width="8.246cm" svg:height="0.05cm" svg:x="17.098cm" svg:y="12.818cm" svg:viewBox="0 0 8247 51" draw:points="8247,51 0,51 0,0 8247,0">
          <text:p/>
        </draw:polygon>
        <draw:polygon draw:style-name="gr359" draw:text-style-name="P163" draw:layer="layout" svg:width="8.246cm" svg:height="0.051cm" svg:x="17.098cm" svg:y="12.767cm" svg:viewBox="0 0 8247 52" draw:points="8247,52 0,52 0,0 8247,0">
          <text:p/>
        </draw:polygon>
        <draw:polygon draw:style-name="gr360" draw:text-style-name="P164" draw:layer="layout" svg:width="8.246cm" svg:height="0.05cm" svg:x="17.098cm" svg:y="12.717cm" svg:viewBox="0 0 8247 51" draw:points="8247,51 0,51 0,0 8247,0">
          <text:p/>
        </draw:polygon>
        <draw:polygon draw:style-name="gr361" draw:text-style-name="P165" draw:layer="layout" svg:width="8.246cm" svg:height="0.051cm" svg:x="17.098cm" svg:y="12.666cm" svg:viewBox="0 0 8247 52" draw:points="8247,52 0,52 0,0 8247,0">
          <text:p/>
        </draw:polygon>
        <draw:polygon draw:style-name="gr362" draw:text-style-name="P166" draw:layer="layout" svg:width="8.246cm" svg:height="0.05cm" svg:x="17.098cm" svg:y="12.616cm" svg:viewBox="0 0 8247 51" draw:points="8247,51 0,51 0,0 8247,0">
          <text:p/>
        </draw:polygon>
        <draw:polygon draw:style-name="gr363" draw:text-style-name="P167" draw:layer="layout" svg:width="8.246cm" svg:height="0.051cm" svg:x="17.098cm" svg:y="12.565cm" svg:viewBox="0 0 8247 52" draw:points="8247,52 0,52 0,0 8247,0">
          <text:p/>
        </draw:polygon>
        <draw:polygon draw:style-name="gr364" draw:text-style-name="P168" draw:layer="layout" svg:width="8.246cm" svg:height="0.05cm" svg:x="17.098cm" svg:y="12.515cm" svg:viewBox="0 0 8247 51" draw:points="8247,51 0,51 0,0 8247,0">
          <text:p/>
        </draw:polygon>
        <draw:polygon draw:style-name="gr364" draw:text-style-name="P168" draw:layer="layout" svg:width="8.246cm" svg:height="0.051cm" svg:x="17.098cm" svg:y="12.464cm" svg:viewBox="0 0 8247 52" draw:points="8247,52 0,52 0,0 8247,0">
          <text:p/>
        </draw:polygon>
        <draw:polygon draw:style-name="gr365" draw:text-style-name="P169" draw:layer="layout" svg:width="8.246cm" svg:height="0.05cm" svg:x="17.098cm" svg:y="12.414cm" svg:viewBox="0 0 8247 51" draw:points="8247,51 0,51 0,0 8247,0">
          <text:p/>
        </draw:polygon>
        <draw:polygon draw:style-name="gr365" draw:text-style-name="P169" draw:layer="layout" svg:width="8.246cm" svg:height="0.051cm" svg:x="17.098cm" svg:y="12.363cm" svg:viewBox="0 0 8247 52" draw:points="8247,52 0,52 0,0 8247,0">
          <text:p/>
        </draw:polygon>
        <draw:polygon draw:style-name="gr366" draw:text-style-name="P170" draw:layer="layout" svg:width="8.246cm" svg:height="0.101cm" svg:x="17.098cm" svg:y="12.262cm" svg:viewBox="0 0 8247 102" draw:points="8247,102 0,102 0,0 8247,0">
          <text:p/>
        </draw:polygon>
        <draw:polygon draw:style-name="gr367" draw:text-style-name="P171" draw:layer="layout" svg:width="8.246cm" svg:height="0.101cm" svg:x="17.098cm" svg:y="12.161cm" svg:viewBox="0 0 8247 102" draw:points="8247,102 0,102 0,0 8247,0">
          <text:p/>
        </draw:polygon>
        <draw:polygon draw:style-name="gr368" draw:text-style-name="P172" draw:layer="layout" svg:width="8.246cm" svg:height="0.1cm" svg:x="17.098cm" svg:y="12.061cm" svg:viewBox="0 0 8247 101" draw:points="8247,101 0,101 0,0 8247,0">
          <text:p/>
        </draw:polygon>
        <draw:polygon draw:style-name="gr369" draw:text-style-name="P173" draw:layer="layout" svg:width="8.246cm" svg:height="0.101cm" svg:x="17.098cm" svg:y="11.96cm" svg:viewBox="0 0 8247 102" draw:points="8247,102 0,102 0,0 8247,0">
          <text:p/>
        </draw:polygon>
        <draw:polygon draw:style-name="gr370" draw:text-style-name="P174" draw:layer="layout" svg:width="8.246cm" svg:height="0.101cm" svg:x="17.098cm" svg:y="11.859cm" svg:viewBox="0 0 8247 102" draw:points="8247,102 0,102 0,0 8247,0">
          <text:p/>
        </draw:polygon>
        <draw:polygon draw:style-name="gr371" draw:text-style-name="P175" draw:layer="layout" svg:width="8.246cm" svg:height="0.101cm" svg:x="17.098cm" svg:y="11.758cm" svg:viewBox="0 0 8247 102" draw:points="8247,102 0,102 0,0 8247,0">
          <text:p/>
        </draw:polygon>
        <draw:polygon draw:style-name="gr372" draw:text-style-name="P176" draw:layer="layout" svg:width="8.246cm" svg:height="0.101cm" svg:x="17.098cm" svg:y="11.657cm" svg:viewBox="0 0 8247 102" draw:points="8247,102 0,102 0,0 8247,0">
          <text:p/>
        </draw:polygon>
        <draw:polygon draw:style-name="gr373" draw:text-style-name="P177" draw:layer="layout" svg:width="8.246cm" svg:height="0.101cm" svg:x="17.098cm" svg:y="11.556cm" svg:viewBox="0 0 8247 102" draw:points="8247,102 0,102 0,0 8247,0">
          <text:p/>
        </draw:polygon>
        <draw:polygon draw:style-name="gr374" draw:text-style-name="P178" draw:layer="layout" svg:width="8.246cm" svg:height="0.101cm" svg:x="17.098cm" svg:y="11.455cm" svg:viewBox="0 0 8247 102" draw:points="8247,102 0,102 0,0 8247,0">
          <text:p/>
        </draw:polygon>
        <draw:polygon draw:style-name="gr375" draw:text-style-name="P179" draw:layer="layout" svg:width="8.246cm" svg:height="0.101cm" svg:x="17.098cm" svg:y="11.354cm" svg:viewBox="0 0 8247 102" draw:points="8247,102 0,102 0,0 8247,0">
          <text:p/>
        </draw:polygon>
        <draw:polygon draw:style-name="gr376" draw:text-style-name="P180" draw:layer="layout" svg:width="8.246cm" svg:height="0.101cm" svg:x="17.098cm" svg:y="11.253cm" svg:viewBox="0 0 8247 102" draw:points="8247,102 0,102 0,0 8247,0">
          <text:p/>
        </draw:polygon>
        <draw:polygon draw:style-name="gr377" draw:text-style-name="P181" draw:layer="layout" svg:width="8.246cm" svg:height="0.101cm" svg:x="17.098cm" svg:y="11.152cm" svg:viewBox="0 0 8247 102" draw:points="8247,102 0,102 0,0 8247,0">
          <text:p/>
        </draw:polygon>
        <draw:polygon draw:style-name="gr378" draw:text-style-name="P182" draw:layer="layout" svg:width="8.246cm" svg:height="0.101cm" svg:x="17.098cm" svg:y="11.051cm" svg:viewBox="0 0 8247 102" draw:points="8247,102 0,102 0,0 8247,0">
          <text:p/>
        </draw:polygon>
        <draw:polygon draw:style-name="gr379" draw:text-style-name="P183" draw:layer="layout" svg:width="8.246cm" svg:height="0.101cm" svg:x="17.098cm" svg:y="10.95cm" svg:viewBox="0 0 8247 102" draw:points="8247,102 0,102 0,0 8247,0">
          <text:p/>
        </draw:polygon>
        <draw:polygon draw:style-name="gr380" draw:text-style-name="P184" draw:layer="layout" svg:width="8.246cm" svg:height="0.102cm" svg:x="17.098cm" svg:y="10.849cm" svg:viewBox="0 0 8247 103" draw:points="8247,103 0,103 0,0 8247,0">
          <text:p/>
        </draw:polygon>
        <draw:polygon draw:style-name="gr381" draw:text-style-name="P185" draw:layer="layout" svg:width="8.246cm" svg:height="0.101cm" svg:x="17.098cm" svg:y="10.748cm" svg:viewBox="0 0 8247 102" draw:points="8247,102 0,102 0,0 8247,0">
          <text:p/>
        </draw:polygon>
        <draw:polygon draw:style-name="gr382" draw:text-style-name="P186" draw:layer="layout" svg:width="8.246cm" svg:height="0.101cm" svg:x="17.098cm" svg:y="10.647cm" svg:viewBox="0 0 8247 102" draw:points="8247,102 0,102 0,0 8247,0">
          <text:p/>
        </draw:polygon>
        <draw:polygon draw:style-name="gr383" draw:text-style-name="P187" draw:layer="layout" svg:width="8.246cm" svg:height="0.101cm" svg:x="17.098cm" svg:y="10.546cm" svg:viewBox="0 0 8247 102" draw:points="8247,102 0,102 0,0 8247,0">
          <text:p/>
        </draw:polygon>
        <draw:polygon draw:style-name="gr384" draw:text-style-name="P188" draw:layer="layout" svg:width="8.246cm" svg:height="0.1cm" svg:x="17.098cm" svg:y="10.446cm" svg:viewBox="0 0 8247 101" draw:points="8247,101 0,101 0,0 8247,0">
          <text:p/>
        </draw:polygon>
        <draw:polygon draw:style-name="gr385" draw:text-style-name="P189" draw:layer="layout" svg:width="8.246cm" svg:height="0.101cm" svg:x="17.098cm" svg:y="10.345cm" svg:viewBox="0 0 8247 102" draw:points="8247,102 0,102 0,0 8247,0">
          <text:p/>
        </draw:polygon>
        <draw:polygon draw:style-name="gr386" draw:text-style-name="P190" draw:layer="layout" svg:width="8.246cm" svg:height="0.101cm" svg:x="17.098cm" svg:y="10.244cm" svg:viewBox="0 0 8247 102" draw:points="8247,102 0,102 0,0 8247,0">
          <text:p/>
        </draw:polygon>
        <draw:polygon draw:style-name="gr387" draw:text-style-name="P191" draw:layer="layout" svg:width="8.246cm" svg:height="0.101cm" svg:x="17.098cm" svg:y="10.143cm" svg:viewBox="0 0 8247 102" draw:points="8247,102 0,102 0,0 8247,0">
          <text:p/>
        </draw:polygon>
        <draw:polygon draw:style-name="gr388" draw:text-style-name="P192" draw:layer="layout" svg:width="8.246cm" svg:height="0.101cm" svg:x="17.098cm" svg:y="10.042cm" svg:viewBox="0 0 8247 102" draw:points="8247,102 0,102 0,0 8247,0">
          <text:p/>
        </draw:polygon>
        <draw:polygon draw:style-name="gr389" draw:text-style-name="P193" draw:layer="layout" svg:width="8.246cm" svg:height="0.101cm" svg:x="17.098cm" svg:y="9.941cm" svg:viewBox="0 0 8247 102" draw:points="8247,102 0,102 0,0 8247,0">
          <text:p/>
        </draw:polygon>
        <draw:polygon draw:style-name="gr390" draw:text-style-name="P194" draw:layer="layout" svg:width="8.246cm" svg:height="0.101cm" svg:x="17.098cm" svg:y="9.84cm" svg:viewBox="0 0 8247 102" draw:points="8247,102 0,102 0,0 8247,0">
          <text:p/>
        </draw:polygon>
        <draw:polygon draw:style-name="gr391" draw:text-style-name="P195" draw:layer="layout" svg:width="8.246cm" svg:height="0.101cm" svg:x="17.098cm" svg:y="9.739cm" svg:viewBox="0 0 8247 102" draw:points="8247,102 0,102 0,0 8247,0">
          <text:p/>
        </draw:polygon>
        <draw:polygon draw:style-name="gr392" draw:text-style-name="P196" draw:layer="layout" svg:width="8.246cm" svg:height="0.101cm" svg:x="17.098cm" svg:y="9.638cm" svg:viewBox="0 0 8247 102" draw:points="8247,102 0,102 0,0 8247,0">
          <text:p/>
        </draw:polygon>
        <draw:polygon draw:style-name="gr393" draw:text-style-name="P197" draw:layer="layout" svg:width="8.246cm" svg:height="0.101cm" svg:x="17.098cm" svg:y="9.537cm" svg:viewBox="0 0 8247 102" draw:points="8247,102 0,102 0,0 8247,0">
          <text:p/>
        </draw:polygon>
        <draw:polygon draw:style-name="gr394" draw:text-style-name="P198" draw:layer="layout" svg:width="8.246cm" svg:height="0.101cm" svg:x="17.098cm" svg:y="9.436cm" svg:viewBox="0 0 8247 102" draw:points="8247,102 0,102 0,0 8247,0">
          <text:p/>
        </draw:polygon>
        <draw:polygon draw:style-name="gr395" draw:text-style-name="P199" draw:layer="layout" svg:width="8.246cm" svg:height="0.101cm" svg:x="17.098cm" svg:y="9.335cm" svg:viewBox="0 0 8247 102" draw:points="8247,102 0,102 0,0 8247,0">
          <text:p/>
        </draw:polygon>
        <draw:path draw:style-name="gr396" draw:text-style-name="P200" draw:layer="layout" svg:width="8.246cm" svg:height="0.101cm" svg:x="17.098cm" svg:y="9.234cm" svg:viewBox="0 0 8247 102" svg:d="M0 69c0-23 1-45 2-69h8243c2 24 2 46 2 69v33h-8247z">
          <text:p/>
        </draw:path>
        <draw:path draw:style-name="gr397" draw:text-style-name="P201" draw:layer="layout" svg:width="8.242cm" svg:height="0.101cm" svg:x="17.1cm" svg:y="9.133cm" svg:viewBox="0 0 8243 102" svg:d="M11 0h8221c6 34 9 68 11 102h-8243c2-34 6-68 11-102z">
          <text:p/>
        </draw:path>
        <draw:path draw:style-name="gr398" draw:text-style-name="P202" draw:layer="layout" svg:width="8.22cm" svg:height="0.101cm" svg:x="17.111cm" svg:y="9.032cm" svg:viewBox="0 0 8221 102" svg:d="M21 0h8180c8 34 15 68 20 102h-8221c5-34 12-68 21-102z">
          <text:p/>
        </draw:path>
        <draw:path draw:style-name="gr399" draw:text-style-name="P203" draw:layer="layout" svg:width="8.179cm" svg:height="0.101cm" svg:x="17.132cm" svg:y="8.931cm" svg:viewBox="0 0 8180 102" svg:d="M31 0h8117c12 34 23 68 32 102h-8180c9-34 19-68 31-102z">
          <text:p/>
        </draw:path>
        <draw:path draw:style-name="gr400" draw:text-style-name="P204" draw:layer="layout" svg:width="8.116cm" svg:height="0.101cm" svg:x="17.163cm" svg:y="8.83cm" svg:viewBox="0 0 8117 102" svg:d="M43 0h8031c16 34 31 68 43 102h-8117c13-34 27-68 43-102z">
          <text:p/>
        </draw:path>
        <draw:path draw:style-name="gr401" draw:text-style-name="P205" draw:layer="layout" svg:width="8.03cm" svg:height="0.1cm" svg:x="17.206cm" svg:y="8.73cm" svg:viewBox="0 0 8031 101" svg:d="M56 0h7919c21 33 39 67 56 101h-8031c17-34 36-68 56-101z">
          <text:p/>
        </draw:path>
        <draw:path draw:style-name="gr402" draw:text-style-name="P206" draw:layer="layout" svg:width="7.918cm" svg:height="0.101cm" svg:x="17.262cm" svg:y="8.629cm" svg:viewBox="0 0 7919 102" svg:d="M72 0h7775c26 33 50 66 72 102h-7919c22-36 46-69 72-102z">
          <text:p/>
        </draw:path>
        <draw:path draw:style-name="gr403" draw:text-style-name="P207" draw:layer="layout" svg:width="7.774cm" svg:height="0.101cm" svg:x="17.334cm" svg:y="8.528cm" svg:viewBox="0 0 7775 102" svg:d="M92 0h7591c33 32 64 66 92 102h-7775c29-36 59-70 92-102z">
          <text:p/>
        </draw:path>
        <draw:path draw:style-name="gr404" draw:text-style-name="P208" draw:layer="layout" svg:width="7.59cm" svg:height="0.101cm" svg:x="17.426cm" svg:y="8.427cm" svg:viewBox="0 0 7591 102" svg:d="M121 0h7350c42 31 83 65 120 102h-7591c38-37 78-71 121-102z">
          <text:p/>
        </draw:path>
        <draw:path draw:style-name="gr405" draw:text-style-name="P209" draw:layer="layout" svg:width="7.349cm" svg:height="0.101cm" svg:x="17.547cm" svg:y="8.326cm" svg:viewBox="0 0 7350 102" svg:d="M172 0h7006c60 29 118 63 172 102h-7350c54-39 111-73 172-102z">
          <text:p/>
        </draw:path>
        <draw:path draw:style-name="gr406" draw:text-style-name="P210" draw:layer="layout" svg:width="7.005cm" svg:height="0.101cm" svg:x="17.719cm" svg:y="8.225cm" svg:viewBox="0 0 7006 102" svg:d="M456 0h6093c163 0 318 37 457 102h-7006c138-65 293-102 456-102z">
          <text:p/>
        </draw:path>
        <draw:path draw:style-name="gr160" draw:text-style-name="P2" draw:layer="layout" svg:width="8.246cm" svg:height="6.46cm" svg:x="17.098cm" svg:y="8.225cm" svg:viewBox="0 0 8247 6461" svg:d="M0 1077c0-595 482-1077 1077-1077h6094c595 0 1076 482 1076 1077v4307c0 595-481 1077-1076 1077h-6094c-595 0-1077-482-1077-1077z">
          <text:p/>
        </draw:path>
        <draw:frame draw:style-name="gr414" draw:text-style-name="P4" draw:layer="layout" svg:width="6.117cm" svg:height="0.552cm" svg:x="9.113cm" svg:y="13.56cm">
          <draw:text-box>
            <text:p text:style-name="P3"><text:span text:style-name="T13">Any lookup/dictionary tables</text:span></text:p>
          </draw:text-box>
        </draw:frame>
        <draw:frame draw:style-name="gr186" draw:text-style-name="P4" draw:layer="layout" svg:width="0.49cm" svg:height="0.552cm" svg:x="17.672cm" svg:y="8.53cm">
          <draw:text-box>
            <text:p text:style-name="P3"><text:span text:style-name="T13">•</text:span></text:p>
          </draw:text-box>
        </draw:frame>
        <draw:frame draw:style-name="gr48" draw:text-style-name="P4" draw:layer="layout" svg:width="2.349cm" svg:height="0.552cm" svg:x="18.468cm" svg:y="8.53cm">
          <draw:text-box>
            <text:p text:style-name="P3"><text:span text:style-name="T13">End users </text:span></text:p>
          </draw:text-box>
        </draw:frame>
        <draw:frame draw:style-name="gr186" draw:text-style-name="P4" draw:layer="layout" svg:width="0.49cm" svg:height="0.552cm" svg:x="17.672cm" svg:y="9.122cm">
          <draw:text-box>
            <text:p text:style-name="P3"><text:span text:style-name="T13">•</text:span></text:p>
          </draw:text-box>
        </draw:frame>
        <draw:frame draw:style-name="gr415" draw:text-style-name="P4" draw:layer="layout" svg:width="4.506cm" svg:height="0.552cm" svg:x="18.468cm" svg:y="9.122cm">
          <draw:text-box>
            <text:p text:style-name="P3"><text:span text:style-name="T13">Target application &amp; </text:span></text:p>
          </draw:text-box>
        </draw:frame>
        <draw:frame draw:style-name="gr416" draw:text-style-name="P4" draw:layer="layout" svg:width="2.104cm" svg:height="0.552cm" svg:x="18.468cm" svg:y="9.714cm">
          <draw:text-box>
            <text:p text:style-name="P3"><text:span text:style-name="T13">scenarios</text:span></text:p>
          </draw:text-box>
        </draw:frame>
        <draw:frame draw:style-name="gr186" draw:text-style-name="P4" draw:layer="layout" svg:width="0.49cm" svg:height="0.552cm" svg:x="17.672cm" svg:y="10.308cm">
          <draw:text-box>
            <text:p text:style-name="P3"><text:span text:style-name="T13">•</text:span></text:p>
          </draw:text-box>
        </draw:frame>
        <draw:frame draw:style-name="gr417" draw:text-style-name="P4" draw:layer="layout" svg:width="3.879cm" svg:height="0.552cm" svg:x="18.468cm" svg:y="10.308cm">
          <draw:text-box>
            <text:p text:style-name="P3"><text:span text:style-name="T13">generated reports</text:span></text:p>
          </draw:text-box>
        </draw:frame>
        <draw:frame draw:style-name="gr186" draw:text-style-name="P4" draw:layer="layout" svg:width="0.49cm" svg:height="0.552cm" svg:x="17.672cm" svg:y="10.901cm">
          <draw:text-box>
            <text:p text:style-name="P3"><text:span text:style-name="T13">•</text:span></text:p>
          </draw:text-box>
        </draw:frame>
        <draw:frame draw:style-name="gr418" draw:text-style-name="P4" draw:layer="layout" svg:width="4.971cm" svg:height="0.552cm" svg:x="18.468cm" svg:y="10.901cm">
          <draw:text-box>
            <text:p text:style-name="P3"><text:span text:style-name="T13">Output file/ output data</text:span></text:p>
          </draw:text-box>
        </draw:frame>
        <draw:frame draw:style-name="gr186" draw:text-style-name="P4" draw:layer="layout" svg:width="0.49cm" svg:height="0.552cm" svg:x="17.672cm" svg:y="11.494cm">
          <draw:text-box>
            <text:p text:style-name="P3"><text:span text:style-name="T13">•</text:span></text:p>
          </draw:text-box>
        </draw:frame>
        <draw:frame draw:style-name="gr419" draw:text-style-name="P4" draw:layer="layout" svg:width="5.816cm" svg:height="0.552cm" svg:x="18.468cm" svg:y="11.494cm">
          <draw:text-box>
            <text:p text:style-name="P3"><text:span text:style-name="T13">Ready time of data, log file</text:span></text:p>
          </draw:text-box>
        </draw:frame>
        <draw:frame draw:style-name="gr187" draw:text-style-name="P4" draw:layer="layout" svg:width="0.491cm" svg:height="0.552cm" svg:x="17.672cm" svg:y="12.085cm">
          <draw:text-box>
            <text:p text:style-name="P3"><text:span text:style-name="T13">•</text:span></text:p>
          </draw:text-box>
        </draw:frame>
        <draw:frame draw:style-name="gr420" draw:text-style-name="P4" draw:layer="layout" svg:width="3.522cm" svg:height="0.552cm" svg:x="18.468cm" svg:y="12.085cm">
          <draw:text-box>
            <text:p text:style-name="P3"><text:span text:style-name="T13">Summary report</text:span></text:p>
          </draw:text-box>
        </draw:frame>
        <draw:frame draw:style-name="gr186" draw:text-style-name="P4" draw:layer="layout" svg:width="0.49cm" svg:height="0.552cm" svg:x="17.672cm" svg:y="12.68cm">
          <draw:text-box>
            <text:p text:style-name="P3"><text:span text:style-name="T13">•</text:span></text:p>
          </draw:text-box>
        </draw:frame>
        <draw:frame draw:style-name="gr421" draw:text-style-name="P4" draw:layer="layout" svg:width="5.407cm" svg:height="0.552cm" svg:x="18.468cm" svg:y="12.68cm">
          <draw:text-box>
            <text:p text:style-name="P3"><text:span text:style-name="T13">Any data back to source </text:span></text:p>
          </draw:text-box>
        </draw:frame>
        <draw:frame draw:style-name="gr422" draw:text-style-name="P4" draw:layer="layout" svg:width="2.486cm" svg:height="0.552cm" svg:x="18.468cm" svg:y="13.272cm">
          <draw:text-box>
            <text:p text:style-name="P3"><text:span text:style-name="T13">application </text:span></text:p>
          </draw:text-box>
        </draw:frame>
        <draw:frame draw:style-name="gr187" draw:text-style-name="P4" draw:layer="layout" svg:width="0.491cm" svg:height="0.552cm" svg:x="17.672cm" svg:y="13.864cm">
          <draw:text-box>
            <text:p text:style-name="P3"><text:span text:style-name="T13">•</text:span></text:p>
          </draw:text-box>
        </draw:frame>
        <draw:path draw:style-name="gr45" draw:text-style-name="P6" draw:layer="layout" svg:width="4.894cm" svg:height="2.21cm" svg:x="1.515cm" svg:y="15.011cm" svg:viewBox="0 0 4895 2211" svg:d="M0 368c0-203 165-368 368-368h4158c204 0 369 165 369 368v1474c0 204-165 369-369 369h-4158c-203 0-368-165-368-369z">
          <text:p/>
        </draw:path>
        <draw:frame draw:style-name="gr159" draw:text-style-name="P4" draw:layer="layout" svg:width="4.206cm" svg:height="0.552cm" svg:x="18.468cm" svg:y="13.864cm">
          <draw:text-box>
            <text:p text:style-name="P3"><text:span text:style-name="T13">Verification method</text:span></text:p>
          </draw:text-box>
        </draw:frame>
        <draw:frame draw:style-name="gr423" draw:text-style-name="P4" draw:layer="layout" svg:width="4.042cm" svg:height="0.552cm" svg:x="2.013cm" svg:y="15.567cm">
          <draw:text-box>
            <text:p text:style-name="P3"><text:span text:style-name="T3">Informatica usage </text:span></text:p>
          </draw:text-box>
        </draw:frame>
        <draw:frame draw:style-name="gr2" draw:text-style-name="P2" draw:layer="layout" svg:width="9.467cm" svg:height="4.869cm" svg:x="12.184cm" svg:y="3.531cm">
          <draw:image xlink:href="Pictures/10000001000002EA00000180524DAC52.png" xlink:type="simple" xlink:show="embed" xlink:actuate="onLoad" draw:mime-type="image/png">
            <text:p/>
          </draw:image>
        </draw:frame>
        <draw:frame draw:style-name="gr2" draw:text-style-name="P2" draw:layer="layout" svg:width="8.883cm" svg:height="3.066cm" svg:x="12.548cm" svg:y="4.496cm">
          <draw:image xlink:href="Pictures/10000001000002BC000000F2ADC5241A.png" xlink:type="simple" xlink:show="embed" xlink:actuate="onLoad" draw:mime-type="image/png">
            <text:p/>
          </draw:image>
        </draw:frame>
        <draw:path draw:style-name="gr329" draw:text-style-name="P133" draw:layer="layout" svg:width="8.127cm" svg:height="0.037cm" svg:x="12.857cm" svg:y="8.172cm" svg:viewBox="0 0 8128 38" svg:d="M7895 38h-7663c-81 0-159-14-232-38h8128c-74 24-152 38-233 38z">
          <text:p/>
        </draw:path>
        <draw:path draw:style-name="gr330" draw:text-style-name="P134" draw:layer="layout" svg:width="8.311cm" svg:height="0.036cm" svg:x="12.765cm" svg:y="8.136cm" svg:viewBox="0 0 8312 37" svg:d="M8220 37h-8128c-32-10-63-22-92-37h8312c-30 15-61 27-92 37z">
          <text:p/>
        </draw:path>
        <draw:path draw:style-name="gr331" draw:text-style-name="P135" draw:layer="layout" svg:width="8.446cm" svg:height="0.036cm" svg:x="12.697cm" svg:y="8.1cm" svg:viewBox="0 0 8447 37" svg:d="M8379 37h-8311c-24-11-46-23-68-37h8447c-21 14-45 26-68 37z">
          <text:p/>
        </draw:path>
        <draw:path draw:style-name="gr332" draw:text-style-name="P136" draw:layer="layout" svg:width="8.556cm" svg:height="0.036cm" svg:x="12.642cm" svg:y="8.064cm" svg:viewBox="0 0 8557 37" svg:d="M8502 37h-8447c-19-11-37-23-55-37h8557c-18 14-36 26-55 37z">
          <text:p/>
        </draw:path>
        <draw:path draw:style-name="gr333" draw:text-style-name="P137" draw:layer="layout" svg:width="8.648cm" svg:height="0.036cm" svg:x="12.596cm" svg:y="8.028cm" svg:viewBox="0 0 8649 37" svg:d="M8603 37h-8557c-16-11-31-23-46-37h8649c-15 14-30 26-46 37z">
          <text:p/>
        </draw:path>
        <draw:path draw:style-name="gr334" draw:text-style-name="P138" draw:layer="layout" svg:width="8.728cm" svg:height="0.036cm" svg:x="12.556cm" svg:y="7.992cm" svg:viewBox="0 0 8729 37" svg:d="M8689 37h-8649c-14-11-27-23-40-37h8729c-13 14-26 26-40 37z">
          <text:p/>
        </draw:path>
        <draw:path draw:style-name="gr335" draw:text-style-name="P139" draw:layer="layout" svg:width="8.798cm" svg:height="0.035cm" svg:x="12.521cm" svg:y="7.957cm" svg:viewBox="0 0 8799 36" svg:d="M8764 36h-8729c-12-11-23-23-35-36h8799c-11 13-23 25-35 36z">
          <text:p/>
        </draw:path>
        <draw:path draw:style-name="gr336" draw:text-style-name="P140" draw:layer="layout" svg:width="8.859cm" svg:height="0.036cm" svg:x="12.491cm" svg:y="7.921cm" svg:viewBox="0 0 8860 37" svg:d="M8829 37h-8799c-10-12-20-24-30-37h8860c-10 13-21 25-31 37z">
          <text:p/>
        </draw:path>
        <draw:path draw:style-name="gr336" draw:text-style-name="P140" draw:layer="layout" svg:width="8.913cm" svg:height="0.036cm" svg:x="12.464cm" svg:y="7.885cm" svg:viewBox="0 0 8914 37" svg:d="M8887 37h-8860c-10-12-19-24-27-37h8914c-9 13-18 25-27 37z">
          <text:p/>
        </draw:path>
        <draw:path draw:style-name="gr337" draw:text-style-name="P141" draw:layer="layout" svg:width="8.961cm" svg:height="0.036cm" svg:x="12.44cm" svg:y="7.849cm" svg:viewBox="0 0 8962 37" svg:d="M8938 37h-8914c-9-12-17-24-24-37h8962c-8 13-16 25-24 37z">
          <text:p/>
        </draw:path>
        <draw:path draw:style-name="gr337" draw:text-style-name="P141" draw:layer="layout" svg:width="9.004cm" svg:height="0.036cm" svg:x="12.418cm" svg:y="7.813cm" svg:viewBox="0 0 9005 37" svg:d="M8984 37h-8962c-8-12-15-24-22-37h9005c-7 13-14 25-21 37z">
          <text:p/>
        </draw:path>
        <draw:path draw:style-name="gr338" draw:text-style-name="P142" draw:layer="layout" svg:width="9.04cm" svg:height="0.036cm" svg:x="12.4cm" svg:y="7.777cm" svg:viewBox="0 0 9041 37" svg:d="M9023 37h-9005c-6-12-12-24-18-37h9041c-5 13-12 25-18 37z">
          <text:p/>
        </draw:path>
        <draw:path draw:style-name="gr339" draw:text-style-name="P143" draw:layer="layout" svg:width="9.074cm" svg:height="0.036cm" svg:x="12.383cm" svg:y="7.741cm" svg:viewBox="0 0 9075 37" svg:d="M9058 37h-9041c-6-12-11-24-17-37h9075c-5 13-11 25-17 37z">
          <text:p/>
        </draw:path>
        <draw:path draw:style-name="gr340" draw:text-style-name="P144" draw:layer="layout" svg:width="9.102cm" svg:height="0.036cm" svg:x="12.369cm" svg:y="7.705cm" svg:viewBox="0 0 9103 37" svg:d="M9089 37h-9075c-5-12-9-25-14-37h9103c-4 12-9 25-14 37z">
          <text:p/>
        </draw:path>
        <draw:path draw:style-name="gr341" draw:text-style-name="P145" draw:layer="layout" svg:width="9.126cm" svg:height="0.036cm" svg:x="12.357cm" svg:y="7.669cm" svg:viewBox="0 0 9127 37" svg:d="M9115 37h-9103c-4-12-8-25-12-37h9127c-4 12-8 25-12 37z">
          <text:p/>
        </draw:path>
        <draw:path draw:style-name="gr342" draw:text-style-name="P146" draw:layer="layout" svg:width="9.146cm" svg:height="0.036cm" svg:x="12.347cm" svg:y="7.633cm" svg:viewBox="0 0 9147 37" svg:d="M9137 37h-9127c-4-12-7-25-10-37h9147c-3 12-6 25-10 37z">
          <text:p/>
        </draw:path>
        <draw:path draw:style-name="gr343" draw:text-style-name="P147" draw:layer="layout" svg:width="9.163cm" svg:height="0.036cm" svg:x="12.339cm" svg:y="7.597cm" svg:viewBox="0 0 9164 37" svg:d="M9155 37h-9147c-3-12-6-25-8-37h9164c-3 12-6 25-9 37z">
          <text:p/>
        </draw:path>
        <draw:path draw:style-name="gr344" draw:text-style-name="P148" draw:layer="layout" svg:width="9.176cm" svg:height="0.036cm" svg:x="12.332cm" svg:y="7.561cm" svg:viewBox="0 0 9177 37" svg:d="M9171 37h-9164c-3-12-5-24-7-37h9177c-2 13-4 25-6 37z">
          <text:p/>
        </draw:path>
        <draw:path draw:style-name="gr344" draw:text-style-name="P148" draw:layer="layout" svg:width="9.186cm" svg:height="0.035cm" svg:x="12.327cm" svg:y="7.526cm" svg:viewBox="0 0 9187 36" svg:d="M9182 36h-9177c-2-11-3-24-5-36h9187c-1 12-3 25-5 36z">
          <text:p/>
        </draw:path>
        <draw:path draw:style-name="gr345" draw:text-style-name="P149" draw:layer="layout" svg:width="9.192cm" svg:height="0.036cm" svg:x="12.324cm" svg:y="7.49cm" svg:viewBox="0 0 9193 37" svg:d="M9190 37h-9187c-1-12-2-25-3-37h9193c-1 12-2 25-3 37z">
          <text:p/>
        </draw:path>
        <draw:path draw:style-name="gr346" draw:text-style-name="P150" draw:layer="layout" svg:width="9.194cm" svg:height="0.036cm" svg:x="12.323cm" svg:y="7.454cm" svg:viewBox="0 0 9195 37" svg:d="M9194 37h-9193c-1-12-1-25-1-37h9195c0 12 0 25-1 37z">
          <text:p/>
        </draw:path>
        <draw:path draw:style-name="gr347" draw:text-style-name="P151" draw:layer="layout" svg:width="9.195cm" svg:height="0.036cm" svg:x="12.323cm" svg:y="7.418cm" svg:viewBox="0 0 9196 37" svg:d="M9196 25c0 4 0 8-1 12h-9195c0-4 0-8 0-12v-25h9196z">
          <text:p/>
        </draw:path>
        <draw:polygon draw:style-name="gr348" draw:text-style-name="P152" draw:layer="layout" svg:width="9.195cm" svg:height="0.036cm" svg:x="12.323cm" svg:y="7.382cm" svg:viewBox="0 0 9196 37" draw:points="9196,37 0,37 0,0 9196,0">
          <text:p/>
        </draw:polygon>
        <draw:polygon draw:style-name="gr348" draw:text-style-name="P152" draw:layer="layout" svg:width="9.195cm" svg:height="0.036cm" svg:x="12.323cm" svg:y="7.346cm" svg:viewBox="0 0 9196 37" draw:points="9196,37 0,37 0,0 9196,0">
          <text:p/>
        </draw:polygon>
        <draw:polygon draw:style-name="gr349" draw:text-style-name="P153" draw:layer="layout" svg:width="9.195cm" svg:height="0.036cm" svg:x="12.323cm" svg:y="7.31cm" svg:viewBox="0 0 9196 37" draw:points="9196,37 0,37 0,0 9196,0">
          <text:p/>
        </draw:polygon>
        <draw:polygon draw:style-name="gr349" draw:text-style-name="P153" draw:layer="layout" svg:width="9.195cm" svg:height="0.036cm" svg:x="12.323cm" svg:y="7.274cm" svg:viewBox="0 0 9196 37" draw:points="9196,37 0,37 0,0 9196,0">
          <text:p/>
        </draw:polygon>
        <draw:polygon draw:style-name="gr350" draw:text-style-name="P154" draw:layer="layout" svg:width="9.195cm" svg:height="0.036cm" svg:x="12.323cm" svg:y="7.238cm" svg:viewBox="0 0 9196 37" draw:points="9196,37 0,37 0,0 9196,0">
          <text:p/>
        </draw:polygon>
        <draw:polygon draw:style-name="gr351" draw:text-style-name="P155" draw:layer="layout" svg:width="9.195cm" svg:height="0.036cm" svg:x="12.323cm" svg:y="7.202cm" svg:viewBox="0 0 9196 37" draw:points="9196,37 0,37 0,0 9196,0">
          <text:p/>
        </draw:polygon>
        <draw:polygon draw:style-name="gr352" draw:text-style-name="P156" draw:layer="layout" svg:width="9.195cm" svg:height="0.036cm" svg:x="12.323cm" svg:y="7.166cm" svg:viewBox="0 0 9196 37" draw:points="9196,37 0,37 0,0 9196,0">
          <text:p/>
        </draw:polygon>
        <draw:polygon draw:style-name="gr353" draw:text-style-name="P157" draw:layer="layout" svg:width="9.195cm" svg:height="0.036cm" svg:x="12.323cm" svg:y="7.13cm" svg:viewBox="0 0 9196 37" draw:points="9196,37 0,37 0,0 9196,0">
          <text:p/>
        </draw:polygon>
        <draw:polygon draw:style-name="gr354" draw:text-style-name="P158" draw:layer="layout" svg:width="9.195cm" svg:height="0.035cm" svg:x="12.323cm" svg:y="7.095cm" svg:viewBox="0 0 9196 36" draw:points="9196,36 0,36 0,0 9196,0">
          <text:p/>
        </draw:polygon>
        <draw:polygon draw:style-name="gr355" draw:text-style-name="P159" draw:layer="layout" svg:width="9.195cm" svg:height="0.036cm" svg:x="12.323cm" svg:y="7.059cm" svg:viewBox="0 0 9196 37" draw:points="9196,37 0,37 0,0 9196,0">
          <text:p/>
        </draw:polygon>
        <draw:polygon draw:style-name="gr356" draw:text-style-name="P160" draw:layer="layout" svg:width="9.195cm" svg:height="0.036cm" svg:x="12.323cm" svg:y="7.023cm" svg:viewBox="0 0 9196 37" draw:points="9196,37 0,37 0,0 9196,0">
          <text:p/>
        </draw:polygon>
        <draw:polygon draw:style-name="gr356" draw:text-style-name="P160" draw:layer="layout" svg:width="9.195cm" svg:height="0.036cm" svg:x="12.323cm" svg:y="6.987cm" svg:viewBox="0 0 9196 37" draw:points="9196,37 0,37 0,0 9196,0">
          <text:p/>
        </draw:polygon>
        <draw:polygon draw:style-name="gr357" draw:text-style-name="P161" draw:layer="layout" svg:width="9.195cm" svg:height="0.036cm" svg:x="12.323cm" svg:y="6.951cm" svg:viewBox="0 0 9196 37" draw:points="9196,37 0,37 0,0 9196,0">
          <text:p/>
        </draw:polygon>
        <draw:polygon draw:style-name="gr357" draw:text-style-name="P161" draw:layer="layout" svg:width="9.195cm" svg:height="0.036cm" svg:x="12.323cm" svg:y="6.915cm" svg:viewBox="0 0 9196 37" draw:points="9196,37 0,37 0,0 9196,0">
          <text:p/>
        </draw:polygon>
        <draw:polygon draw:style-name="gr358" draw:text-style-name="P162" draw:layer="layout" svg:width="9.195cm" svg:height="0.036cm" svg:x="12.323cm" svg:y="6.879cm" svg:viewBox="0 0 9196 37" draw:points="9196,37 0,37 0,0 9196,0">
          <text:p/>
        </draw:polygon>
        <draw:polygon draw:style-name="gr359" draw:text-style-name="P163" draw:layer="layout" svg:width="9.195cm" svg:height="0.036cm" svg:x="12.323cm" svg:y="6.843cm" svg:viewBox="0 0 9196 37" draw:points="9196,37 0,37 0,0 9196,0">
          <text:p/>
        </draw:polygon>
        <draw:polygon draw:style-name="gr360" draw:text-style-name="P164" draw:layer="layout" svg:width="9.195cm" svg:height="0.037cm" svg:x="12.323cm" svg:y="6.807cm" svg:viewBox="0 0 9196 38" draw:points="9196,38 0,38 0,0 9196,0">
          <text:p/>
        </draw:polygon>
        <draw:polygon draw:style-name="gr361" draw:text-style-name="P165" draw:layer="layout" svg:width="9.195cm" svg:height="0.036cm" svg:x="12.323cm" svg:y="6.771cm" svg:viewBox="0 0 9196 37" draw:points="9196,37 0,37 0,0 9196,0">
          <text:p/>
        </draw:polygon>
        <draw:polygon draw:style-name="gr362" draw:text-style-name="P166" draw:layer="layout" svg:width="9.195cm" svg:height="0.036cm" svg:x="12.323cm" svg:y="6.735cm" svg:viewBox="0 0 9196 37" draw:points="9196,37 0,37 0,0 9196,0">
          <text:p/>
        </draw:polygon>
        <draw:polygon draw:style-name="gr363" draw:text-style-name="P167" draw:layer="layout" svg:width="9.195cm" svg:height="0.036cm" svg:x="12.323cm" svg:y="6.699cm" svg:viewBox="0 0 9196 37" draw:points="9196,37 0,37 0,0 9196,0">
          <text:p/>
        </draw:polygon>
        <draw:polygon draw:style-name="gr364" draw:text-style-name="P168" draw:layer="layout" svg:width="9.195cm" svg:height="0.036cm" svg:x="12.323cm" svg:y="6.663cm" svg:viewBox="0 0 9196 37" draw:points="9196,37 0,37 0,0 9196,0">
          <text:p/>
        </draw:polygon>
        <draw:polygon draw:style-name="gr364" draw:text-style-name="P168" draw:layer="layout" svg:width="9.195cm" svg:height="0.035cm" svg:x="12.323cm" svg:y="6.628cm" svg:viewBox="0 0 9196 36" draw:points="9196,36 0,36 0,0 9196,0">
          <text:p/>
        </draw:polygon>
        <draw:polygon draw:style-name="gr365" draw:text-style-name="P169" draw:layer="layout" svg:width="9.195cm" svg:height="0.036cm" svg:x="12.323cm" svg:y="6.592cm" svg:viewBox="0 0 9196 37" draw:points="9196,37 0,37 0,0 9196,0">
          <text:p/>
        </draw:polygon>
        <draw:polygon draw:style-name="gr365" draw:text-style-name="P169" draw:layer="layout" svg:width="9.195cm" svg:height="0.036cm" svg:x="12.323cm" svg:y="6.556cm" svg:viewBox="0 0 9196 37" draw:points="9196,37 0,37 0,0 9196,0">
          <text:p/>
        </draw:polygon>
        <draw:polygon draw:style-name="gr366" draw:text-style-name="P170" draw:layer="layout" svg:width="9.195cm" svg:height="0.072cm" svg:x="12.323cm" svg:y="6.484cm" svg:viewBox="0 0 9196 73" draw:points="9196,73 0,73 0,0 9196,0">
          <text:p/>
        </draw:polygon>
        <draw:polygon draw:style-name="gr367" draw:text-style-name="P171" draw:layer="layout" svg:width="9.195cm" svg:height="0.072cm" svg:x="12.323cm" svg:y="6.412cm" svg:viewBox="0 0 9196 73" draw:points="9196,73 0,73 0,0 9196,0">
          <text:p/>
        </draw:polygon>
        <draw:polygon draw:style-name="gr368" draw:text-style-name="P172" draw:layer="layout" svg:width="9.195cm" svg:height="0.072cm" svg:x="12.323cm" svg:y="6.34cm" svg:viewBox="0 0 9196 73" draw:points="9196,73 0,73 0,0 9196,0">
          <text:p/>
        </draw:polygon>
        <draw:polygon draw:style-name="gr369" draw:text-style-name="P173" draw:layer="layout" svg:width="9.195cm" svg:height="0.072cm" svg:x="12.323cm" svg:y="6.268cm" svg:viewBox="0 0 9196 73" draw:points="9196,73 0,73 0,0 9196,0">
          <text:p/>
        </draw:polygon>
        <draw:polygon draw:style-name="gr370" draw:text-style-name="P174" draw:layer="layout" svg:width="9.195cm" svg:height="0.071cm" svg:x="12.323cm" svg:y="6.197cm" svg:viewBox="0 0 9196 72" draw:points="9196,72 0,72 0,0 9196,0">
          <text:p/>
        </draw:polygon>
        <draw:polygon draw:style-name="gr371" draw:text-style-name="P175" draw:layer="layout" svg:width="9.195cm" svg:height="0.072cm" svg:x="12.323cm" svg:y="6.125cm" svg:viewBox="0 0 9196 73" draw:points="9196,73 0,73 0,0 9196,0">
          <text:p/>
        </draw:polygon>
        <draw:polygon draw:style-name="gr372" draw:text-style-name="P176" draw:layer="layout" svg:width="9.195cm" svg:height="0.072cm" svg:x="12.323cm" svg:y="6.053cm" svg:viewBox="0 0 9196 73" draw:points="9196,73 0,73 0,0 9196,0">
          <text:p/>
        </draw:polygon>
        <draw:polygon draw:style-name="gr373" draw:text-style-name="P177" draw:layer="layout" svg:width="9.195cm" svg:height="0.072cm" svg:x="12.323cm" svg:y="5.981cm" svg:viewBox="0 0 9196 73" draw:points="9196,73 0,73 0,0 9196,0">
          <text:p/>
        </draw:polygon>
        <draw:polygon draw:style-name="gr374" draw:text-style-name="P178" draw:layer="layout" svg:width="9.195cm" svg:height="0.072cm" svg:x="12.323cm" svg:y="5.909cm" svg:viewBox="0 0 9196 73" draw:points="9196,73 0,73 0,0 9196,0">
          <text:p/>
        </draw:polygon>
        <draw:polygon draw:style-name="gr375" draw:text-style-name="P179" draw:layer="layout" svg:width="9.195cm" svg:height="0.072cm" svg:x="12.323cm" svg:y="5.837cm" svg:viewBox="0 0 9196 73" draw:points="9196,73 0,73 0,0 9196,0">
          <text:p/>
        </draw:polygon>
        <draw:polygon draw:style-name="gr376" draw:text-style-name="P180" draw:layer="layout" svg:width="9.195cm" svg:height="0.071cm" svg:x="12.323cm" svg:y="5.766cm" svg:viewBox="0 0 9196 72" draw:points="9196,72 0,72 0,0 9196,0">
          <text:p/>
        </draw:polygon>
        <draw:polygon draw:style-name="gr377" draw:text-style-name="P181" draw:layer="layout" svg:width="9.195cm" svg:height="0.072cm" svg:x="12.323cm" svg:y="5.694cm" svg:viewBox="0 0 9196 73" draw:points="9196,73 0,73 0,0 9196,0">
          <text:p/>
        </draw:polygon>
        <draw:polygon draw:style-name="gr378" draw:text-style-name="P182" draw:layer="layout" svg:width="9.195cm" svg:height="0.072cm" svg:x="12.323cm" svg:y="5.622cm" svg:viewBox="0 0 9196 73" draw:points="9196,73 0,73 0,0 9196,0">
          <text:p/>
        </draw:polygon>
        <draw:polygon draw:style-name="gr379" draw:text-style-name="P183" draw:layer="layout" svg:width="9.195cm" svg:height="0.072cm" svg:x="12.323cm" svg:y="5.55cm" svg:viewBox="0 0 9196 73" draw:points="9196,73 0,73 0,0 9196,0">
          <text:p/>
        </draw:polygon>
        <draw:polygon draw:style-name="gr380" draw:text-style-name="P184" draw:layer="layout" svg:width="9.195cm" svg:height="0.072cm" svg:x="12.323cm" svg:y="5.478cm" svg:viewBox="0 0 9196 73" draw:points="9196,73 0,73 0,0 9196,0">
          <text:p/>
        </draw:polygon>
        <draw:polygon draw:style-name="gr381" draw:text-style-name="P185" draw:layer="layout" svg:width="9.195cm" svg:height="0.072cm" svg:x="12.323cm" svg:y="5.406cm" svg:viewBox="0 0 9196 73" draw:points="9196,73 0,73 0,0 9196,0">
          <text:p/>
        </draw:polygon>
        <draw:polygon draw:style-name="gr382" draw:text-style-name="P186" draw:layer="layout" svg:width="9.195cm" svg:height="0.071cm" svg:x="12.323cm" svg:y="5.335cm" svg:viewBox="0 0 9196 72" draw:points="9196,72 0,72 0,0 9196,0">
          <text:p/>
        </draw:polygon>
        <draw:polygon draw:style-name="gr383" draw:text-style-name="P187" draw:layer="layout" svg:width="9.195cm" svg:height="0.072cm" svg:x="12.323cm" svg:y="5.263cm" svg:viewBox="0 0 9196 73" draw:points="9196,73 0,73 0,0 9196,0">
          <text:p/>
        </draw:polygon>
        <draw:polygon draw:style-name="gr384" draw:text-style-name="P188" draw:layer="layout" svg:width="9.195cm" svg:height="0.072cm" svg:x="12.323cm" svg:y="5.191cm" svg:viewBox="0 0 9196 73" draw:points="9196,73 0,73 0,0 9196,0">
          <text:p/>
        </draw:polygon>
        <draw:polygon draw:style-name="gr385" draw:text-style-name="P189" draw:layer="layout" svg:width="9.195cm" svg:height="0.072cm" svg:x="12.323cm" svg:y="5.119cm" svg:viewBox="0 0 9196 73" draw:points="9196,73 0,73 0,0 9196,0">
          <text:p/>
        </draw:polygon>
        <draw:polygon draw:style-name="gr386" draw:text-style-name="P190" draw:layer="layout" svg:width="9.195cm" svg:height="0.072cm" svg:x="12.323cm" svg:y="5.047cm" svg:viewBox="0 0 9196 73" draw:points="9196,73 0,73 0,0 9196,0">
          <text:p/>
        </draw:polygon>
        <draw:polygon draw:style-name="gr387" draw:text-style-name="P191" draw:layer="layout" svg:width="9.195cm" svg:height="0.072cm" svg:x="12.323cm" svg:y="4.975cm" svg:viewBox="0 0 9196 73" draw:points="9196,73 0,73 0,0 9196,0">
          <text:p/>
        </draw:polygon>
        <draw:polygon draw:style-name="gr388" draw:text-style-name="P192" draw:layer="layout" svg:width="9.195cm" svg:height="0.071cm" svg:x="12.323cm" svg:y="4.904cm" svg:viewBox="0 0 9196 72" draw:points="9196,72 0,72 0,0 9196,0">
          <text:p/>
        </draw:polygon>
        <draw:polygon draw:style-name="gr389" draw:text-style-name="P193" draw:layer="layout" svg:width="9.195cm" svg:height="0.072cm" svg:x="12.323cm" svg:y="4.832cm" svg:viewBox="0 0 9196 73" draw:points="9196,73 0,73 0,0 9196,0">
          <text:p/>
        </draw:polygon>
        <draw:polygon draw:style-name="gr390" draw:text-style-name="P194" draw:layer="layout" svg:width="9.195cm" svg:height="0.072cm" svg:x="12.323cm" svg:y="4.76cm" svg:viewBox="0 0 9196 73" draw:points="9196,73 0,73 0,0 9196,0">
          <text:p/>
        </draw:polygon>
        <draw:polygon draw:style-name="gr391" draw:text-style-name="P195" draw:layer="layout" svg:width="9.195cm" svg:height="0.072cm" svg:x="12.323cm" svg:y="4.688cm" svg:viewBox="0 0 9196 73" draw:points="9196,73 0,73 0,0 9196,0">
          <text:p/>
        </draw:polygon>
        <draw:polygon draw:style-name="gr392" draw:text-style-name="P196" draw:layer="layout" svg:width="9.195cm" svg:height="0.072cm" svg:x="12.323cm" svg:y="4.616cm" svg:viewBox="0 0 9196 73" draw:points="9196,73 0,73 0,0 9196,0">
          <text:p/>
        </draw:polygon>
        <draw:polygon draw:style-name="gr393" draw:text-style-name="P197" draw:layer="layout" svg:width="9.195cm" svg:height="0.072cm" svg:x="12.323cm" svg:y="4.544cm" svg:viewBox="0 0 9196 73" draw:points="9196,73 0,73 0,0 9196,0">
          <text:p/>
        </draw:polygon>
        <draw:polygon draw:style-name="gr394" draw:text-style-name="P198" draw:layer="layout" svg:width="9.195cm" svg:height="0.071cm" svg:x="12.323cm" svg:y="4.473cm" svg:viewBox="0 0 9196 72" draw:points="9196,72 0,72 0,0 9196,0">
          <text:p/>
        </draw:polygon>
        <draw:polygon draw:style-name="gr395" draw:text-style-name="P199" draw:layer="layout" svg:width="9.195cm" svg:height="0.072cm" svg:x="12.323cm" svg:y="4.401cm" svg:viewBox="0 0 9196 73" draw:points="9196,73 0,73 0,0 9196,0">
          <text:p/>
        </draw:polygon>
        <draw:path draw:style-name="gr396" draw:text-style-name="P200" draw:layer="layout" svg:width="9.195cm" svg:height="0.072cm" svg:x="12.323cm" svg:y="4.329cm" svg:viewBox="0 0 9196 73" svg:d="M0 49c0-17 0-33 1-49h9193c1 16 2 32 2 49v24h-9196z">
          <text:p/>
        </draw:path>
        <draw:path draw:style-name="gr397" draw:text-style-name="P201" draw:layer="layout" svg:width="9.192cm" svg:height="0.072cm" svg:x="12.324cm" svg:y="4.257cm" svg:viewBox="0 0 9193 73" svg:d="M8 0h9177c4 24 7 49 8 73h-9193c2-24 4-49 8-73z">
          <text:p/>
        </draw:path>
        <draw:path draw:style-name="gr398" draw:text-style-name="P202" draw:layer="layout" svg:width="9.176cm" svg:height="0.072cm" svg:x="12.332cm" svg:y="4.185cm" svg:viewBox="0 0 9177 73" svg:d="M15 0h9147c6 24 11 49 15 73h-9177c4-24 9-49 15-73z">
          <text:p/>
        </draw:path>
        <draw:path draw:style-name="gr399" draw:text-style-name="P203" draw:layer="layout" svg:width="9.146cm" svg:height="0.072cm" svg:x="12.347cm" svg:y="4.113cm" svg:viewBox="0 0 9147 73" svg:d="M22 0h9103c9 24 16 49 22 73h-9147c6-24 14-49 22-73z">
          <text:p/>
        </draw:path>
        <draw:path draw:style-name="gr400" draw:text-style-name="P204" draw:layer="layout" svg:width="9.102cm" svg:height="0.071cm" svg:x="12.369cm" svg:y="4.042cm" svg:viewBox="0 0 9103 72" svg:d="M31 0h9041c12 23 22 48 31 72h-9103c9-24 19-49 31-72z">
          <text:p/>
        </draw:path>
        <draw:path draw:style-name="gr401" draw:text-style-name="P205" draw:layer="layout" svg:width="9.04cm" svg:height="0.072cm" svg:x="12.4cm" svg:y="3.97cm" svg:viewBox="0 0 9041 73" svg:d="M40 0h8962c14 23 28 48 39 73h-9041c12-25 25-50 40-73z">
          <text:p/>
        </draw:path>
        <draw:path draw:style-name="gr402" draw:text-style-name="P206" draw:layer="layout" svg:width="8.961cm" svg:height="0.072cm" svg:x="12.44cm" svg:y="3.898cm" svg:viewBox="0 0 8962 73" svg:d="M51 0h8860c18 23 35 48 51 73h-8962c15-25 32-50 51-73z">
          <text:p/>
        </draw:path>
        <draw:path draw:style-name="gr403" draw:text-style-name="P207" draw:layer="layout" svg:width="8.859cm" svg:height="0.072cm" svg:x="12.491cm" svg:y="3.826cm" svg:viewBox="0 0 8860 73" svg:d="M65 0h8729c23 23 45 48 66 73h-8860c20-25 42-50 65-73z">
          <text:p/>
        </draw:path>
        <draw:path draw:style-name="gr404" draw:text-style-name="P208" draw:layer="layout" svg:width="8.728cm" svg:height="0.072cm" svg:x="12.556cm" svg:y="3.754cm" svg:viewBox="0 0 8729 73" svg:d="M86 0h8557c31 22 59 47 86 73h-8729c27-26 56-51 86-73z">
          <text:p/>
        </draw:path>
        <draw:path draw:style-name="gr405" draw:text-style-name="P209" draw:layer="layout" svg:width="8.556cm" svg:height="0.072cm" svg:x="12.642cm" svg:y="3.682cm" svg:viewBox="0 0 8557 73" svg:d="M123 0h8312c43 21 84 45 122 73h-8557c38-28 79-52 123-73z">
          <text:p/>
        </draw:path>
        <draw:path draw:style-name="gr406" draw:text-style-name="P210" draw:layer="layout" svg:width="8.311cm" svg:height="0.071cm" svg:x="12.765cm" svg:y="3.611cm" svg:viewBox="0 0 8312 72" svg:d="M324 0h7662c117 0 227 25 326 72h-8312c98-47 208-72 324-72z">
          <text:p/>
        </draw:path>
        <draw:path draw:style-name="gr160" draw:text-style-name="P2" draw:layer="layout" svg:width="9.195cm" svg:height="4.597cm" svg:x="12.323cm" svg:y="3.611cm" svg:viewBox="0 0 9196 4598" svg:d="M0 766c0-424 343-766 766-766h7663c424 0 767 342 767 766v3066c0 423-343 766-767 766h-7663c-423 0-766-343-766-766z">
          <text:p/>
        </draw:path>
        <draw:frame draw:style-name="gr416" draw:text-style-name="P4" draw:layer="layout" svg:width="2.104cm" svg:height="0.552cm" svg:x="2.919cm" svg:y="16.16cm">
          <draw:text-box>
            <text:p text:style-name="P3"><text:span text:style-name="T3">scenarios</text:span></text:p>
          </draw:text-box>
        </draw:frame>
        <draw:frame draw:style-name="gr424" draw:text-style-name="P4" draw:layer="layout" svg:width="7.672cm" svg:height="0.552cm" svg:x="13.169cm" svg:y="4.758cm">
          <draw:text-box>
            <text:p text:style-name="P3"><text:span text:style-name="T13">Existing Data architecture(storage, </text:span></text:p>
          </draw:text-box>
        </draw:frame>
        <draw:frame draw:style-name="gr425" draw:text-style-name="P4" draw:layer="layout" svg:width="8.026cm" svg:height="0.552cm" svg:x="12.974cm" svg:y="5.35cm">
          <draw:text-box>
            <text:p text:style-name="P3"><text:span text:style-name="T13">hardware, software, cluster, backup, </text:span></text:p>
          </draw:text-box>
        </draw:frame>
        <draw:frame draw:style-name="gr296" draw:text-style-name="P4" draw:layer="layout" svg:width="4.096cm" svg:height="0.552cm" svg:x="14.888cm" svg:y="5.942cm">
          <draw:text-box>
            <text:p text:style-name="P3"><text:span text:style-name="T13">data security…etc)</text:span></text:p>
          </draw:text-box>
        </draw:frame>
        <draw:frame draw:style-name="gr426" draw:text-style-name="P4" draw:layer="layout" svg:width="7.508cm" svg:height="0.552cm" svg:x="13.245cm" svg:y="6.536cm">
          <draw:text-box>
            <text:p text:style-name="P3"><text:span text:style-name="T13">Oracle / Sybase / DB2 technology </text:span></text:p>
          </draw:text-box>
        </draw:frame>
      </draw:page>
      <draw:page draw:name="page12" draw:style-name="dp1" draw:master-page-name="master-page3">
        <draw:polygon draw:style-name="gr1" draw:text-style-name="P1" draw:layer="layout" svg:width="33.866cm" svg:height="19.049cm" svg:x="0cm" svg:y="0cm" svg:viewBox="0 0 33867 19050" draw:points="0,0 33867,0 33867,19050 0,19050">
          <text:p/>
        </draw:polygon>
        <draw:polygon draw:style-name="gr8" draw:text-style-name="P6" draw:layer="layout" svg:width="2.175cm" svg:height="0.128cm" svg:x="0cm" svg:y="3.056cm" svg:viewBox="0 0 2176 129" draw:points="0,0 2176,0 2176,129 0,129">
          <text:p/>
        </draw:polygon>
        <draw:path draw:style-name="gr45" draw:text-style-name="P6" draw:layer="layout" svg:width="6.079cm" svg:height="1.634cm" svg:x="8.068cm" svg:y="3.369cm" svg:viewBox="0 0 6080 1635" svg:d="M0 273c0-151 122-273 273-273h5535c150 0 272 122 272 273v1090c0 150-122 272-272 272h-5535c-151 0-273-122-273-272z">
          <text:p/>
        </draw:path>
        <draw:frame draw:style-name="gr427" draw:text-style-name="P9" draw:layer="layout" svg:width="20.835cm" svg:height="1.309cm" svg:x="0.899cm" svg:y="1.518cm">
          <draw:text-box>
            <text:p text:style-name="P3"><text:span text:style-name="T7">Key information in converting a workflow</text:span></text:p>
          </draw:text-box>
        </draw:frame>
        <draw:frame draw:style-name="gr428" draw:text-style-name="P4" draw:layer="layout" svg:width="2.541cm" svg:height="0.552cm" svg:x="9.845cm" svg:y="3.635cm">
          <draw:text-box>
            <text:p text:style-name="P3"><text:span text:style-name="T3">Understand</text:span></text:p>
          </draw:text-box>
        </draw:frame>
        <draw:path draw:style-name="gr45" draw:text-style-name="P6" draw:layer="layout" svg:width="6.079cm" svg:height="1.16cm" svg:x="8.068cm" svg:y="5.579cm" svg:viewBox="0 0 6080 1161" svg:d="M0 193c0-107 87-193 194-193h5693c107 0 193 86 193 193v775c0 107-86 193-193 193h-5693c-107 0-194-86-194-193z">
          <text:p/>
        </draw:path>
        <draw:frame draw:style-name="gr429" draw:text-style-name="P4" draw:layer="layout" svg:width="4.041cm" svg:height="0.552cm" svg:x="9.091cm" svg:y="4.227cm">
          <draw:text-box>
            <text:p text:style-name="P3"><text:span text:style-name="T3">Workflow/Mapping</text:span></text:p>
          </draw:text-box>
        </draw:frame>
        <draw:polygon draw:style-name="gr430" draw:text-style-name="P211" draw:layer="layout" svg:width="14.647cm" svg:height="1.371cm" svg:x="15.341cm" svg:y="7.205cm" svg:viewBox="0 0 14648 1372" draw:points="0,0 14420,0 14648,228 14648,1372 0,1372">
          <text:p/>
        </draw:polygon>
        <draw:frame draw:style-name="gr431" draw:text-style-name="P4" draw:layer="layout" svg:width="3.687cm" svg:height="0.552cm" svg:x="9.273cm" svg:y="5.902cm">
          <draw:text-box>
            <text:p text:style-name="P3"><text:span text:style-name="T3">Parsing Mapping</text:span></text:p>
          </draw:text-box>
        </draw:frame>
        <draw:frame draw:style-name="gr432" draw:text-style-name="P4" draw:layer="layout" svg:width="12.885cm" svg:height="0.552cm" svg:x="15.597cm" svg:y="7.399cm">
          <draw:text-box>
            <text:p text:style-name="P3"><text:span text:style-name="T3">Connector, Route Conditions, Pre-SQL, Post-SQL, context </text:span></text:p>
          </draw:text-box>
        </draw:frame>
        <draw:path draw:style-name="gr45" draw:text-style-name="P6" draw:layer="layout" svg:width="6.079cm" svg:height="1.16cm" svg:x="8.068cm" svg:y="7.315cm" svg:viewBox="0 0 6080 1161" svg:d="M0 193c0-107 87-193 194-193h5693c107 0 193 86 193 193v774c0 107-86 194-193 194h-5693c-107 0-194-87-194-194z">
          <text:p/>
        </draw:path>
        <draw:frame draw:style-name="gr433" draw:text-style-name="P4" draw:layer="layout" svg:width="9.092cm" svg:height="0.552cm" svg:x="15.597cm" svg:y="7.992cm">
          <draw:text-box>
            <text:p text:style-name="P3"><text:span text:style-name="T3">parameters, Log file, exception controlling</text:span></text:p>
          </draw:text-box>
        </draw:frame>
        <draw:frame draw:style-name="gr434" draw:text-style-name="P4" draw:layer="layout" svg:width="4.478cm" svg:height="0.552cm" svg:x="8.934cm" svg:y="7.341cm">
          <draw:text-box>
            <text:p text:style-name="P3"><text:span text:style-name="T3">Compose SQL from </text:span></text:p>
          </draw:text-box>
        </draw:frame>
        <draw:path draw:style-name="gr45" draw:text-style-name="P6" draw:layer="layout" svg:width="6.079cm" svg:height="1.16cm" svg:x="8.068cm" svg:y="9.05cm" svg:viewBox="0 0 6080 1161" svg:d="M0 194c0-107 87-194 194-194h5693c107 0 193 87 193 194v774c0 107-86 193-193 193h-5693c-107 0-194-86-194-193z">
          <text:p/>
        </draw:path>
        <draw:frame draw:style-name="gr435" draw:text-style-name="P4" draw:layer="layout" svg:width="5.406cm" svg:height="0.552cm" svg:x="8.418cm" svg:y="7.935cm">
          <draw:text-box>
            <text:p text:style-name="P3"><text:span text:style-name="T3">Mappings/transformation</text:span></text:p>
          </draw:text-box>
        </draw:frame>
        <draw:polygon draw:style-name="gr436" draw:text-style-name="P211" draw:layer="layout" svg:width="11.431cm" svg:height="1.16cm" svg:x="15.341cm" svg:y="9.05cm" svg:viewBox="0 0 11432 1161" draw:points="0,0 11239,0 11432,194 11432,1161 0,1161">
          <text:p/>
        </draw:polygon>
        <draw:frame draw:style-name="gr437" draw:text-style-name="P4" draw:layer="layout" svg:width="3.742cm" svg:height="0.552cm" svg:x="9.239cm" svg:y="9.374cm">
          <draw:text-box>
            <text:p text:style-name="P3"><text:span text:style-name="T3">SQL Engineering</text:span></text:p>
          </draw:text-box>
        </draw:frame>
        <draw:path draw:style-name="gr45" draw:text-style-name="P6" draw:layer="layout" svg:width="6.079cm" svg:height="1.16cm" svg:x="8.068cm" svg:y="10.786cm" svg:viewBox="0 0 6080 1161" svg:d="M0 193c0-107 87-193 194-193h5693c107 0 193 86 193 193v775c0 107-86 193-193 193h-5693c-107 0-194-86-194-193z">
          <text:p/>
        </draw:path>
        <draw:frame draw:style-name="gr438" draw:text-style-name="P4" draw:layer="layout" svg:width="7.234cm" svg:height="0.552cm" svg:x="15.597cm" svg:y="9.423cm">
          <draw:text-box>
            <text:p text:style-name="P3"><text:span text:style-name="T3">DB Type, DB privilege, DBOwner</text:span></text:p>
          </draw:text-box>
        </draw:frame>
        <draw:path draw:style-name="gr45" draw:text-style-name="P6" draw:layer="layout" svg:width="6.079cm" svg:height="1.16cm" svg:x="8.068cm" svg:y="12.522cm" svg:viewBox="0 0 6080 1161" svg:d="M0 193c0-107 87-193 194-193h5693c107 0 193 86 193 193v774c0 107-86 194-193 194h-5693c-107 0-194-87-194-194z">
          <text:p/>
        </draw:path>
        <draw:frame draw:style-name="gr439" draw:text-style-name="P4" draw:layer="layout" svg:width="4.097cm" svg:height="0.552cm" svg:x="9.061cm" svg:y="11.11cm">
          <draw:text-box>
            <text:p text:style-name="P3"><text:span text:style-name="T3">Set up a scheduler</text:span></text:p>
          </draw:text-box>
        </draw:frame>
        <draw:path draw:style-name="gr45" draw:text-style-name="P6" draw:layer="layout" svg:width="6.079cm" svg:height="1.16cm" svg:x="8.068cm" svg:y="15.985cm" svg:viewBox="0 0 6080 1161" svg:d="M0 193c0-107 87-193 194-193h5693c107 0 193 86 193 193v774c0 107-86 194-193 194h-5693c-107 0-194-87-194-194z">
          <text:p/>
        </draw:path>
        <draw:frame draw:style-name="gr258" draw:text-style-name="P4" draw:layer="layout" svg:width="4.424cm" svg:height="0.552cm" svg:x="8.9cm" svg:y="12.846cm">
          <draw:text-box>
            <text:p text:style-name="P3"><text:span text:style-name="T3">Prepare testing data</text:span></text:p>
          </draw:text-box>
        </draw:frame>
        <draw:polygon draw:style-name="gr150" draw:text-style-name="P101" draw:layer="layout" svg:width="0.212cm" svg:height="0.575cm" svg:x="10.769cm" svg:y="5.008cm" svg:viewBox="0 0 213 576" draw:points="125,0 125,364 213,364 107,576 0,364 88,364 88,0">
          <text:p/>
        </draw:polygon>
        <draw:polygon draw:style-name="gr150" draw:text-style-name="P101" draw:layer="layout" svg:width="0.212cm" svg:height="0.576cm" svg:x="10.769cm" svg:y="6.743cm" svg:viewBox="0 0 213 577" draw:points="125,0 125,364 213,364 107,577 0,364 88,364 88,0">
          <text:p/>
        </draw:polygon>
        <draw:polygon draw:style-name="gr150" draw:text-style-name="P101" draw:layer="layout" svg:width="0.212cm" svg:height="0.576cm" svg:x="10.769cm" svg:y="8.479cm" svg:viewBox="0 0 213 577" draw:points="125,0 125,364 213,364 107,577 0,364 88,364 88,0">
          <text:p/>
        </draw:polygon>
        <draw:polygon draw:style-name="gr150" draw:text-style-name="P101" draw:layer="layout" svg:width="0.212cm" svg:height="0.575cm" svg:x="10.769cm" svg:y="10.215cm" svg:viewBox="0 0 213 576" draw:points="125,0 125,364 213,364 107,576 0,364 88,364 88,0">
          <text:p/>
        </draw:polygon>
        <draw:polygon draw:style-name="gr150" draw:text-style-name="P101" draw:layer="layout" svg:width="0.212cm" svg:height="0.576cm" svg:x="10.769cm" svg:y="11.95cm" svg:viewBox="0 0 213 577" draw:points="125,0 125,364 213,364 107,577 0,364 88,364 88,0">
          <text:p/>
        </draw:polygon>
        <draw:path draw:style-name="gr45" draw:text-style-name="P6" draw:layer="layout" svg:width="6.079cm" svg:height="1.16cm" svg:x="8.068cm" svg:y="17.72cm" svg:viewBox="0 0 6080 1161" svg:d="M0 194c0-107 87-194 194-194h5693c107 0 193 87 193 194v774c0 107-86 193-193 193h-5693c-107 0-194-86-194-193z">
          <text:p/>
        </draw:path>
        <draw:frame draw:style-name="gr440" draw:text-style-name="P4" draw:layer="layout" svg:width="3.66cm" svg:height="0.552cm" svg:x="9.281cm" svg:y="16.317cm">
          <draw:text-box>
            <text:p text:style-name="P3"><text:span text:style-name="T3">Launch workflow</text:span></text:p>
          </draw:text-box>
        </draw:frame>
        <draw:path draw:style-name="gr45" draw:text-style-name="P6" draw:layer="layout" svg:width="6.079cm" svg:height="1.152cm" svg:x="8.068cm" svg:y="14.257cm" svg:viewBox="0 0 6080 1153" svg:d="M0 193c0-107 86-193 192-193h5696c106 0 192 86 192 193v768c0 106-86 192-192 192h-5696c-106 0-192-86-192-192z">
          <text:p/>
        </draw:path>
        <draw:frame draw:style-name="gr441" draw:text-style-name="P4" draw:layer="layout" svg:width="3.059cm" svg:height="0.552cm" svg:x="9.586cm" svg:y="18.054cm">
          <draw:text-box>
            <text:p text:style-name="P3"><text:span text:style-name="T3">Reconciliation</text:span></text:p>
          </draw:text-box>
        </draw:frame>
        <draw:polygon draw:style-name="gr150" draw:text-style-name="P101" draw:layer="layout" svg:width="0.212cm" svg:height="0.576cm" svg:x="10.769cm" svg:y="13.686cm" svg:viewBox="0 0 213 577" draw:points="125,0 125,364 213,364 107,577 0,364 88,364 88,0">
          <text:p/>
        </draw:polygon>
        <draw:polygon draw:style-name="gr150" draw:text-style-name="P101" draw:layer="layout" svg:width="0.212cm" svg:height="0.576cm" svg:x="10.769cm" svg:y="15.413cm" svg:viewBox="0 0 213 577" draw:points="125,0 125,364 213,364 107,577 0,364 88,364 88,0">
          <text:p/>
        </draw:polygon>
        <draw:polygon draw:style-name="gr150" draw:text-style-name="P101" draw:layer="layout" svg:width="0.212cm" svg:height="0.575cm" svg:x="10.769cm" svg:y="17.149cm" svg:viewBox="0 0 213 576" draw:points="125,0 125,364 213,364 107,576 0,364 88,364 88,0">
          <text:p/>
        </draw:polygon>
        <draw:polygon draw:style-name="gr430" draw:text-style-name="P211" draw:layer="layout" svg:width="13.792cm" svg:height="1.159cm" svg:x="15.316cm" svg:y="10.778cm" svg:viewBox="0 0 13793 1160" draw:points="0,0 13600,0 13793,193 13793,1160 0,1160">
          <text:p/>
        </draw:polygon>
        <draw:frame draw:style-name="gr442" draw:text-style-name="P4" draw:layer="layout" svg:width="1.612cm" svg:height="0.552cm" svg:x="10.306cm" svg:y="14.582cm">
          <draw:text-box>
            <text:p text:style-name="P3"><text:span text:style-name="T3">Testing</text:span></text:p>
          </draw:text-box>
        </draw:frame>
        <draw:polygon draw:style-name="gr436" draw:text-style-name="P211" draw:layer="layout" svg:width="11.431cm" svg:height="1.16cm" svg:x="15.341cm" svg:y="12.505cm" svg:viewBox="0 0 11432 1161" draw:points="0,0 11239,0 11432,193 11432,1161 0,1161">
          <text:p/>
        </draw:polygon>
        <draw:frame draw:style-name="gr443" draw:text-style-name="P4" draw:layer="layout" svg:width="11.767cm" svg:height="0.552cm" svg:x="15.574cm" svg:y="11.153cm">
          <draw:text-box>
            <text:p text:style-name="P3"><text:span text:style-name="T3">Context parameter, dependence, DB privilege, trigger </text:span></text:p>
          </draw:text-box>
        </draw:frame>
        <draw:polygon draw:style-name="gr436" draw:text-style-name="P211" draw:layer="layout" svg:width="11.431cm" svg:height="1.152cm" svg:x="15.316cm" svg:y="14.224cm" svg:viewBox="0 0 11432 1153" draw:points="0,0 11240,0 11432,193 11432,1153 0,1153">
          <text:p/>
        </draw:polygon>
        <draw:frame draw:style-name="gr444" draw:text-style-name="P4" draw:layer="layout" svg:width="6.498cm" svg:height="0.552cm" svg:x="15.597cm" svg:y="12.883cm">
          <draw:text-box>
            <text:p text:style-name="P3"><text:span text:style-name="T3">Data range, Data primary Key</text:span></text:p>
          </draw:text-box>
        </draw:frame>
        <draw:polygon draw:style-name="gr436" draw:text-style-name="P211" draw:layer="layout" svg:width="11.431cm" svg:height="1.16cm" svg:x="15.341cm" svg:y="15.985cm" svg:viewBox="0 0 11432 1161" draw:points="0,0 11239,0 11432,193 11432,1161 0,1161">
          <text:p/>
        </draw:polygon>
        <draw:frame draw:style-name="gr445" draw:text-style-name="P4" draw:layer="layout" svg:width="7.128cm" svg:height="0.552cm" svg:x="15.574cm" svg:y="14.597cm">
          <draw:text-box>
            <text:p text:style-name="P3"><text:span text:style-name="T3">The output of exception handling</text:span></text:p>
          </draw:text-box>
        </draw:frame>
        <draw:polygon draw:style-name="gr436" draw:text-style-name="P211" draw:layer="layout" svg:width="12.903cm" svg:height="1.16cm" svg:x="15.316cm" svg:y="17.712cm" svg:viewBox="0 0 12904 1161" draw:points="0,0 12711,0 12904,193 12904,1161 0,1161">
          <text:p/>
        </draw:polygon>
        <draw:frame draw:style-name="gr446" draw:text-style-name="P4" draw:layer="layout" svg:width="8.545cm" svg:height="0.552cm" svg:x="15.597cm" svg:y="16.365cm">
          <draw:text-box>
            <text:p text:style-name="P3"><text:span text:style-name="T3">Compare the result with Informatica job</text:span></text:p>
          </draw:text-box>
        </draw:frame>
        <draw:polygon draw:style-name="gr436" draw:text-style-name="P211" draw:layer="layout" svg:width="14.647cm" svg:height="1.372cm" svg:x="15.316cm" svg:y="5.469cm" svg:viewBox="0 0 14648 1373" draw:points="0,0 14419,0 14648,229 14648,1373 0,1373">
          <text:p/>
        </draw:polygon>
        <draw:frame draw:style-name="gr447" draw:text-style-name="P4" draw:layer="layout" svg:width="11.384cm" svg:height="0.552cm" svg:x="15.574cm" svg:y="18.093cm">
          <draw:text-box>
            <text:p text:style-name="P3"><text:span text:style-name="T3">Identify whether a new SQL issue or a existing issue</text:span></text:p>
          </draw:text-box>
        </draw:frame>
        <draw:polygon draw:style-name="gr430" draw:text-style-name="P211" draw:layer="layout" svg:width="14.647cm" svg:height="1.372cm" svg:x="15.341cm" svg:y="3.513cm" svg:viewBox="0 0 14648 1373" draw:points="0,0 14420,0 14648,229 14648,1373 0,1373">
          <text:p/>
        </draw:polygon>
        <draw:frame draw:style-name="gr448" draw:text-style-name="P4" draw:layer="layout" svg:width="12.558cm" svg:height="0.552cm" svg:x="15.574cm" svg:y="5.96cm">
          <draw:text-box>
            <text:p text:style-name="P3"><text:span text:style-name="T3">Identify whether caused by a fault tolerance of informatica</text:span></text:p>
          </draw:text-box>
        </draw:frame>
        <draw:frame draw:style-name="gr449" draw:text-style-name="P4" draw:layer="layout" svg:width="9.091cm" svg:height="0.552cm" svg:x="15.597cm" svg:y="3.999cm">
          <draw:text-box>
            <text:p text:style-name="P3"><text:span text:style-name="T3">Identify workflow / mapping /the sub-route</text:span></text:p>
          </draw:text-box>
        </draw:frame>
      </draw:page>
      <draw:page draw:name="page13" draw:style-name="dp1" draw:master-page-name="master-page3">
        <draw:polygon draw:style-name="gr1" draw:text-style-name="P1" draw:layer="layout" svg:width="33.866cm" svg:height="19.049cm" svg:x="0cm" svg:y="0cm" svg:viewBox="0 0 33867 19050" draw:points="0,0 33867,0 33867,19050 0,19050">
          <text:p/>
        </draw:polygon>
        <draw:frame draw:style-name="gr2" draw:text-style-name="P2" draw:layer="layout" svg:width="33.866cm" svg:height="19.049cm" svg:x="0cm" svg:y="0cm">
          <draw:image xlink:href="Pictures/10000000000007D10000046614069405.jpg" xlink:type="simple" xlink:show="embed" xlink:actuate="onLoad" draw:mime-type="image/jpeg">
            <text:p/>
          </draw:image>
        </draw:frame>
        <draw:frame draw:style-name="gr450" draw:text-style-name="P12" draw:layer="layout" svg:width="19.828cm" svg:height="2.237cm" svg:x="2.384cm" svg:y="7.643cm">
          <draw:text-box>
            <text:p text:style-name="P3"><text:span text:style-name="T11">3. Project management</text:span></text:p>
          </draw:text-box>
        </draw:frame>
      </draw:page>
      <draw:page draw:name="page14" draw:style-name="dp1" draw:master-page-name="master-page3">
        <draw:polygon draw:style-name="gr1" draw:text-style-name="P1" draw:layer="layout" svg:width="33.866cm" svg:height="19.049cm" svg:x="0cm" svg:y="0cm" svg:viewBox="0 0 33867 19050" draw:points="0,0 33867,0 33867,19050 0,19050">
          <text:p/>
        </draw:polygon>
        <draw:polygon draw:style-name="gr8" draw:text-style-name="P6" draw:layer="layout" svg:width="2.175cm" svg:height="0.128cm" svg:x="0cm" svg:y="3.056cm" svg:viewBox="0 0 2176 129" draw:points="0,0 2176,0 2176,129 0,129">
          <text:p/>
        </draw:polygon>
        <draw:path draw:style-name="gr451" draw:text-style-name="P212" draw:layer="layout" svg:width="8.56cm" svg:height="7.323cm" svg:x="1.27cm" svg:y="9.11cm" svg:viewBox="0 0 8561 7324" svg:d="M0 652c0-361 292-652 652-652h7257c361 0 652 291 652 652v6021c0 359-291 651-652 651h-7257c-360 0-652-292-652-651z">
          <text:p/>
        </draw:path>
        <draw:frame draw:style-name="gr452" draw:text-style-name="P9" draw:layer="layout" svg:width="9.067cm" svg:height="1.309cm" svg:x="0.899cm" svg:y="1.426cm">
          <draw:text-box>
            <text:p text:style-name="P3"><text:span text:style-name="T7">Delivery approach</text:span></text:p>
          </draw:text-box>
        </draw:frame>
        <draw:frame draw:style-name="gr453" draw:text-style-name="P106" draw:layer="layout" svg:width="0.634cm" svg:height="0.712cm" svg:x="1.715cm" svg:y="11.465cm">
          <draw:text-box>
            <text:p text:style-name="P3"><text:span text:style-name="T25">•</text:span></text:p>
          </draw:text-box>
        </draw:frame>
        <draw:frame draw:style-name="gr454" draw:text-style-name="P106" draw:layer="layout" svg:width="5.649cm" svg:height="0.712cm" svg:x="2.511cm" svg:y="11.465cm">
          <draw:text-box>
            <text:p text:style-name="P3"><text:span text:style-name="T25">Overall project plan </text:span></text:p>
          </draw:text-box>
        </draw:frame>
        <draw:frame draw:style-name="gr453" draw:text-style-name="P106" draw:layer="layout" svg:width="0.634cm" svg:height="0.712cm" svg:x="1.715cm" svg:y="12.456cm">
          <draw:text-box>
            <text:p text:style-name="P3"><text:span text:style-name="T25">•</text:span></text:p>
          </draw:text-box>
        </draw:frame>
        <draw:frame draw:style-name="gr455" draw:text-style-name="P106" draw:layer="layout" svg:width="6.779cm" svg:height="0.712cm" svg:x="2.511cm" svg:y="12.456cm">
          <draw:text-box>
            <text:p text:style-name="P3"><text:span text:style-name="T25">Detailed project solution</text:span></text:p>
          </draw:text-box>
        </draw:frame>
        <draw:frame draw:style-name="gr453" draw:text-style-name="P106" draw:layer="layout" svg:width="0.634cm" svg:height="0.712cm" svg:x="1.715cm" svg:y="13.447cm">
          <draw:text-box>
            <text:p text:style-name="P3"><text:span text:style-name="T25">•</text:span></text:p>
          </draw:text-box>
        </draw:frame>
        <draw:path draw:style-name="gr8" draw:text-style-name="P6" draw:layer="layout" svg:width="6.977cm" svg:height="1.922cm" svg:x="1.972cm" svg:y="7.789cm" svg:viewBox="0 0 6978 1923" svg:d="M0 962c0-532 430-962 961-962h5056c530 0 961 430 961 962 0 530-431 961-961 961h-5056c-531 0-961-431-961-961z">
          <text:p/>
        </draw:path>
        <draw:frame draw:style-name="gr456" draw:text-style-name="P106" draw:layer="layout" svg:width="5.12cm" svg:height="0.712cm" svg:x="2.511cm" svg:y="13.447cm">
          <draw:text-box>
            <text:p text:style-name="P3"><text:span text:style-name="T25">Delivery standard </text:span></text:p>
          </draw:text-box>
        </draw:frame>
        <draw:path draw:style-name="gr457" draw:text-style-name="P213" draw:layer="layout" svg:width="1.695cm" svg:height="1.332cm" svg:x="4.157cm" svg:y="4.92cm" svg:viewBox="0 0 1696 1333" svg:d="M0 690c0-221 41-391 123-508 82-116 200-175 354-175 294 0 442 218 442 653 0 215-40 380-120 498-80 116-196 175-347 175-301 0-452-214-452-643zM271 683c0 296 63 444 190 444 123 0 186-153 186-457 0-305-61-458-181-458-130 0-195 157-195 471zM1696 0v1310h-268v-1009c-34 29-79 55-136 78s-110 37-158 42v-229c151-44 282-108 392-192z">
          <text:p/>
        </draw:path>
        <draw:path draw:style-name="gr451" draw:text-style-name="P212" draw:layer="layout" svg:width="8.383cm" svg:height="7.323cm" svg:x="12.742cm" svg:y="9.076cm" svg:viewBox="0 0 8384 7324" svg:d="M0 652c0-360 292-652 652-652h7080c360 0 652 292 652 652v6021c0 360-292 651-652 651h-7080c-360 0-652-291-652-651z">
          <text:p/>
        </draw:path>
        <draw:frame draw:style-name="gr458" draw:text-style-name="P10" draw:layer="layout" svg:width="5.879cm" svg:height="0.937cm" svg:x="2.529cm" svg:y="8.265cm">
          <draw:text-box>
            <text:p text:style-name="P3"><text:span text:style-name="T26">Overall planning</text:span></text:p>
          </draw:text-box>
        </draw:frame>
        <draw:frame draw:style-name="gr453" draw:text-style-name="P106" draw:layer="layout" svg:width="0.634cm" svg:height="0.712cm" svg:x="13.19cm" svg:y="11.922cm">
          <draw:text-box>
            <text:p text:style-name="P3"><text:span text:style-name="T25">•</text:span></text:p>
          </draw:text-box>
        </draw:frame>
        <draw:frame draw:style-name="gr456" draw:text-style-name="P106" draw:layer="layout" svg:width="5.12cm" svg:height="0.712cm" svg:x="13.987cm" svg:y="11.922cm">
          <draw:text-box>
            <text:p text:style-name="P3"><text:span text:style-name="T25">Componentization</text:span></text:p>
          </draw:text-box>
        </draw:frame>
        <draw:frame draw:style-name="gr459" draw:text-style-name="P106" draw:layer="layout" svg:width="0.635cm" svg:height="0.712cm" svg:x="13.19cm" svg:y="12.912cm">
          <draw:text-box>
            <text:p text:style-name="P3"><text:span text:style-name="T25">•</text:span></text:p>
          </draw:text-box>
        </draw:frame>
        <draw:path draw:style-name="gr8" draw:text-style-name="P6" draw:layer="layout" svg:width="6.976cm" svg:height="1.922cm" svg:x="13.445cm" svg:y="7.755cm" svg:viewBox="0 0 6977 1923" svg:d="M0 962c0-532 430-962 961-962h5055c531 0 961 430 961 962 0 531-430 961-961 961h-5055c-531 0-961-430-961-961z">
          <text:p/>
        </draw:path>
        <draw:frame draw:style-name="gr460" draw:text-style-name="P106" draw:layer="layout" svg:width="3.743cm" svg:height="0.712cm" svg:x="13.987cm" svg:y="12.912cm">
          <draw:text-box>
            <text:p text:style-name="P3"><text:span text:style-name="T25">Agile &amp; sprint</text:span></text:p>
          </draw:text-box>
        </draw:frame>
        <draw:frame draw:style-name="gr461" draw:text-style-name="P11" draw:layer="layout" svg:width="2.032cm" svg:height="0.928cm" svg:x="16.028cm" svg:y="7.804cm">
          <draw:text-box>
            <text:p text:style-name="P3"><text:span text:style-name="T27">Agile </text:span></text:p>
          </draw:text-box>
        </draw:frame>
        <draw:path draw:style-name="gr457" draw:text-style-name="P213" draw:layer="layout" svg:width="1.917cm" svg:height="1.325cm" svg:x="15.629cm" svg:y="4.889cm" svg:viewBox="0 0 1918 1326" svg:d="M0 683c0-222 41-391 122-508 82-116 200-175 354-175 295 0 443 218 443 653 0 215-40 380-120 498-80 116-196 175-347 175-301 0-452-214-452-643zM270 676c0 296 63 445 190 445 124 0 186-154 186-458 0-305-61-458-181-458-130 0-195 157-195 471zM1375 1081h543v222h-852v-95c0-66 13-128 37-184 25-55 59-106 101-154 43-47 110-103 201-167 82-62 140-117 173-164 33-48 50-98 50-152 0-115-63-173-189-173-110 0-215 44-315 132v-238c111-72 237-108 377-108 127 0 229 33 303 98s111 155 111 270c0 64-10 122-32 173-21 52-53 100-93 146-41 45-106 99-196 162-87 62-145 109-175 143-29 34-44 63-44 89z">
          <text:p/>
        </draw:path>
        <draw:path draw:style-name="gr451" draw:text-style-name="P212" draw:layer="layout" svg:width="8.382cm" svg:height="7.323cm" svg:x="24.214cm" svg:y="9.093cm" svg:viewBox="0 0 8383 7324" svg:d="M0 652c0-361 292-652 652-652h7079c360 0 652 291 652 652v6021c0 360-292 651-652 651h-7079c-360 0-652-291-652-651z">
          <text:p/>
        </draw:path>
        <draw:frame draw:style-name="gr462" draw:text-style-name="P11" draw:layer="layout" svg:width="4.885cm" svg:height="0.928cm" svg:x="14.597cm" svg:y="8.652cm">
          <draw:text-box>
            <text:p text:style-name="P3"><text:span text:style-name="T27">development </text:span></text:p>
          </draw:text-box>
        </draw:frame>
        <draw:frame draw:style-name="gr453" draw:text-style-name="P106" draw:layer="layout" svg:width="0.634cm" svg:height="0.712cm" svg:x="24.666cm" svg:y="10.455cm">
          <draw:text-box>
            <text:p text:style-name="P3"><text:span text:style-name="T25">•</text:span></text:p>
          </draw:text-box>
        </draw:frame>
        <draw:frame draw:style-name="gr463" draw:text-style-name="P106" draw:layer="layout" svg:width="6.002cm" svg:height="0.712cm" svg:x="25.462cm" svg:y="10.455cm">
          <draw:text-box>
            <text:p text:style-name="P3"><text:span text:style-name="T25">Onsite team focus on</text:span></text:p>
          </draw:text-box>
        </draw:frame>
        <draw:frame draw:style-name="gr464" draw:text-style-name="P106" draw:layer="layout" svg:width="4.449cm" svg:height="0.712cm" svg:x="25.462cm" svg:y="11.446cm">
          <draw:text-box>
            <text:p text:style-name="P3"><text:span text:style-name="T25">communication/</text:span></text:p>
          </draw:text-box>
        </draw:frame>
        <draw:frame draw:style-name="gr465" draw:text-style-name="P106" draw:layer="layout" svg:width="3.708cm" svg:height="0.712cm" svg:x="25.462cm" svg:y="12.437cm">
          <draw:text-box>
            <text:p text:style-name="P3"><text:span text:style-name="T25">reconciliation</text:span></text:p>
          </draw:text-box>
        </draw:frame>
        <draw:frame draw:style-name="gr453" draw:text-style-name="P106" draw:layer="layout" svg:width="0.634cm" svg:height="0.712cm" svg:x="24.666cm" svg:y="13.427cm">
          <draw:text-box>
            <text:p text:style-name="P3"><text:span text:style-name="T25">•</text:span></text:p>
          </draw:text-box>
        </draw:frame>
        <draw:frame draw:style-name="gr466" draw:text-style-name="P106" draw:layer="layout" svg:width="2.437cm" svg:height="0.712cm" svg:x="25.462cm" svg:y="13.427cm">
          <draw:text-box>
            <text:p text:style-name="P3"><text:span text:style-name="T25">Offshore</text:span></text:p>
          </draw:text-box>
        </draw:frame>
        <draw:frame draw:style-name="gr467" draw:text-style-name="P106" draw:layer="layout" svg:width="1.52cm" svg:height="0.712cm" svg:x="28.926cm" svg:y="13.427cm">
          <draw:text-box>
            <text:p text:style-name="P3"><text:span text:style-name="T25">focus</text:span></text:p>
          </draw:text-box>
        </draw:frame>
        <draw:frame draw:style-name="gr194" draw:text-style-name="P106" draw:layer="layout" svg:width="0.708cm" svg:height="0.712cm" svg:x="31.458cm" svg:y="13.427cm">
          <draw:text-box>
            <text:p text:style-name="P3"><text:span text:style-name="T25">on</text:span></text:p>
          </draw:text-box>
        </draw:frame>
        <draw:path draw:style-name="gr8" draw:text-style-name="P6" draw:layer="layout" svg:width="6.976cm" svg:height="1.922cm" svg:x="24.917cm" svg:y="7.772cm" svg:viewBox="0 0 6977 1923" svg:d="M0 962c0-532 430-962 961-962h5054c532 0 962 430 962 962 0 530-430 961-962 961h-5054c-531 0-961-431-961-961z">
          <text:p/>
        </draw:path>
        <draw:frame draw:style-name="gr468" draw:text-style-name="P106" draw:layer="layout" svg:width="5.685cm" svg:height="0.712cm" svg:x="25.462cm" svg:y="14.419cm">
          <draw:text-box>
            <text:p text:style-name="P3"><text:span text:style-name="T25">development/testing</text:span></text:p>
          </draw:text-box>
        </draw:frame>
        <draw:path draw:style-name="gr457" draw:text-style-name="P213" draw:layer="layout" svg:width="1.916cm" svg:height="1.325cm" svg:x="27.101cm" svg:y="4.908cm" svg:viewBox="0 0 1917 1326" svg:d="M0 683c0-222 41-391 122-508 82-116 200-175 355-175 295 0 442 218 442 653 0 215-40 380-120 498-80 117-197 175-347 175-301 0-452-214-452-643zM271 676c0 296 63 445 189 445 124 0 186-154 186-458 0-305-60-458-181-458-130 0-194 157-194 471zM1109 1024c85 65 185 97 299 97 72 0 130-16 172-48 42-33 64-79 64-138 0-60-26-107-76-139-50-31-121-48-212-48h-114v-205h105c172 0 258-58 258-174 0-109-66-164-198-164-86 0-169 28-250 84v-220c88-46 192-69 312-69 121 0 219 28 294 84 76 56 114 134 114 233 0 167-85 273-255 316v4c90 10 161 42 214 98 54 55 81 123 81 202 0 123-45 218-134 286-89 69-208 103-356 103-132 0-238-22-318-66z">
          <text:p/>
        </draw:path>
        <draw:frame draw:style-name="gr469" draw:text-style-name="P11" draw:layer="layout" svg:width="5.62cm" svg:height="0.928cm" svg:x="25.598cm" svg:y="8.247cm">
          <draw:text-box>
            <text:p text:style-name="P3"><text:span text:style-name="T27">Onsite/offshore</text:span></text:p>
          </draw:text-box>
        </draw:frame>
      </draw:page>
      <draw:page draw:name="page15" draw:style-name="dp1" draw:master-page-name="master-page3">
        <draw:polygon draw:style-name="gr1" draw:text-style-name="P1" draw:layer="layout" svg:width="33.866cm" svg:height="19.049cm" svg:x="0cm" svg:y="0cm" svg:viewBox="0 0 33867 19050" draw:points="0,0 33867,0 33867,19050 0,19050">
          <text:p/>
        </draw:polygon>
        <draw:polygon draw:style-name="gr8" draw:text-style-name="P6" draw:layer="layout" svg:width="2.175cm" svg:height="0.128cm" svg:x="0cm" svg:y="3.056cm" svg:viewBox="0 0 2176 129" draw:points="0,0 2176,0 2176,129 0,129">
          <text:p/>
        </draw:polygon>
        <draw:polygon draw:style-name="gr45" draw:text-style-name="P6" draw:layer="layout" svg:width="3.675cm" svg:height="1.491cm" svg:x="12.335cm" svg:y="5.715cm" svg:viewBox="0 0 3676 1492" draw:points="0,0 3676,0 3676,1492 0,1492">
          <text:p/>
        </draw:polygon>
        <draw:frame draw:style-name="gr470" draw:text-style-name="P9" draw:layer="layout" svg:width="9.657cm" svg:height="1.309cm" svg:x="0.899cm" svg:y="1.518cm">
          <draw:text-box>
            <text:p text:style-name="P3"><text:span text:style-name="T7">Delivery approach <text:s/></text:span></text:p>
          </draw:text-box>
        </draw:frame>
        <draw:frame draw:style-name="gr471" draw:text-style-name="P4" draw:layer="layout" svg:width="2.294cm" svg:height="0.552cm" svg:x="13.086cm" svg:y="5.909cm">
          <draw:text-box>
            <text:p text:style-name="P3"><text:span text:style-name="T3">First Task </text:span></text:p>
          </draw:text-box>
        </draw:frame>
        <draw:polygon draw:style-name="gr45" draw:text-style-name="P6" draw:layer="layout" svg:width="3.675cm" svg:height="1.49cm" svg:x="0.863cm" svg:y="5.74cm" svg:viewBox="0 0 3676 1491" draw:points="0,0 3676,0 3676,1491 0,1491">
          <text:p/>
        </draw:polygon>
        <draw:frame draw:style-name="gr321" draw:text-style-name="P4" draw:layer="layout" svg:width="1.694cm" svg:height="0.552cm" svg:x="13.399cm" svg:y="6.502cm">
          <draw:text-box>
            <text:p text:style-name="P3"><text:span text:style-name="T3">Go-live </text:span></text:p>
          </draw:text-box>
        </draw:frame>
        <draw:polygon draw:style-name="gr45" draw:text-style-name="P6" draw:layer="layout" svg:width="4.056cm" svg:height="1.49cm" svg:x="6.434cm" svg:y="5.74cm" svg:viewBox="0 0 4057 1491" draw:points="0,0 4057,0 4057,1491 0,1491">
          <text:p/>
        </draw:polygon>
        <draw:frame draw:style-name="gr472" draw:text-style-name="P4" draw:layer="layout" svg:width="2.896cm" svg:height="0.552cm" svg:x="1.332cm" svg:y="6.231cm">
          <draw:text-box>
            <text:p text:style-name="P3"><text:span text:style-name="T3">Investigation </text:span></text:p>
          </draw:text-box>
        </draw:frame>
        <draw:frame draw:style-name="gr473" draw:text-style-name="P4" draw:layer="layout" svg:width="2.622cm" svg:height="0.552cm" svg:x="7.159cm" svg:y="5.935cm">
          <draw:text-box>
            <text:p text:style-name="P3"><text:span text:style-name="T3">Architecture</text:span></text:p>
          </draw:text-box>
        </draw:frame>
        <draw:polygon draw:style-name="gr45" draw:text-style-name="P6" draw:layer="layout" svg:width="3.675cm" svg:height="1.465cm" svg:x="23.401cm" svg:y="10.82cm" svg:viewBox="0 0 3676 1466" draw:points="0,0 3676,0 3676,1466 0,1466">
          <text:p/>
        </draw:polygon>
        <draw:frame draw:style-name="gr474" draw:text-style-name="P4" draw:layer="layout" svg:width="3.332cm" svg:height="0.552cm" svg:x="6.795cm" svg:y="6.53cm">
          <draw:text-box>
            <text:p text:style-name="P3"><text:span text:style-name="T3">implementation</text:span></text:p>
          </draw:text-box>
        </draw:frame>
        <draw:frame draw:style-name="gr475" draw:text-style-name="P4" draw:layer="layout" svg:width="0.93cm" svg:height="0.552cm" svg:x="24.851cm" svg:y="11cm">
          <draw:text-box>
            <text:p text:style-name="P3"><text:span text:style-name="T3">Full </text:span></text:p>
          </draw:text-box>
        </draw:frame>
        <draw:frame draw:style-name="gr2" draw:text-style-name="P2" draw:layer="layout" svg:width="5.248cm" svg:height="4.249cm" svg:x="14.503cm" svg:y="8.729cm">
          <draw:image xlink:href="Pictures/10000001000001C60000016F22825850.png" xlink:type="simple" xlink:show="embed" xlink:actuate="onLoad" draw:mime-type="image/png">
            <text:p/>
          </draw:image>
        </draw:frame>
        <draw:polygon draw:style-name="gr191" draw:text-style-name="P104" draw:layer="layout" svg:width="3.675cm" svg:height="1.1cm" svg:x="19.083cm" svg:y="7.061cm" svg:viewBox="0 0 3676 1101" draw:points="0,0 3676,0 3676,1101 0,1101">
          <text:p/>
        </draw:polygon>
        <draw:frame draw:style-name="gr476" draw:text-style-name="P4" draw:layer="layout" svg:width="1.886cm" svg:height="0.552cm" svg:x="24.445cm" svg:y="11.592cm">
          <draw:text-box>
            <text:p text:style-name="P3"><text:span text:style-name="T3">Launch <text:s/></text:span></text:p>
          </draw:text-box>
        </draw:frame>
        <draw:polygon draw:style-name="gr191" draw:text-style-name="P104" draw:layer="layout" svg:width="3.674cm" svg:height="1.101cm" svg:x="19.507cm" svg:y="7.484cm" svg:viewBox="0 0 3675 1102" draw:points="0,0 3675,0 3675,1102 0,1102">
          <text:p/>
        </draw:polygon>
        <draw:frame draw:style-name="gr321" draw:text-style-name="P4" draw:layer="layout" svg:width="1.694cm" svg:height="0.552cm" svg:x="20.074cm" svg:y="7.357cm">
          <draw:text-box>
            <text:p text:style-name="P3"><text:span text:style-name="T3">Sprint 1</text:span></text:p>
          </draw:text-box>
        </draw:frame>
        <draw:polygon draw:style-name="gr191" draw:text-style-name="P104" draw:layer="layout" svg:width="3.675cm" svg:height="1.101cm" svg:x="19.93cm" svg:y="7.907cm" svg:viewBox="0 0 3676 1102" draw:points="0,0 3676,0 3676,1102 0,1102">
          <text:p/>
        </draw:polygon>
        <draw:frame draw:style-name="gr321" draw:text-style-name="P4" draw:layer="layout" svg:width="1.694cm" svg:height="0.552cm" svg:x="20.497cm" svg:y="7.78cm">
          <draw:text-box>
            <text:p text:style-name="P3"><text:span text:style-name="T3">Sprint 2</text:span></text:p>
          </draw:text-box>
        </draw:frame>
        <draw:polygon draw:style-name="gr191" draw:text-style-name="P104" draw:layer="layout" svg:width="3.675cm" svg:height="1.1cm" svg:x="20.353cm" svg:y="8.331cm" svg:viewBox="0 0 3676 1101" draw:points="0,0 3676,0 3676,1101 0,1101">
          <text:p/>
        </draw:polygon>
        <draw:frame draw:style-name="gr321" draw:text-style-name="P4" draw:layer="layout" svg:width="1.694cm" svg:height="0.552cm" svg:x="20.92cm" svg:y="8.204cm">
          <draw:text-box>
            <text:p text:style-name="P3"><text:span text:style-name="T3">Sprint 3</text:span></text:p>
          </draw:text-box>
        </draw:frame>
        <draw:polygon draw:style-name="gr191" draw:text-style-name="P104" draw:layer="layout" svg:width="3.674cm" svg:height="1.101cm" svg:x="20.777cm" svg:y="8.754cm" svg:viewBox="0 0 3675 1102" draw:points="0,0 3675,0 3675,1102 0,1102">
          <text:p/>
        </draw:polygon>
        <draw:frame draw:style-name="gr321" draw:text-style-name="P4" draw:layer="layout" svg:width="1.694cm" svg:height="0.552cm" svg:x="21.344cm" svg:y="8.626cm">
          <draw:text-box>
            <text:p text:style-name="P3"><text:span text:style-name="T3">Sprint 4</text:span></text:p>
          </draw:text-box>
        </draw:frame>
        <draw:polygon draw:style-name="gr150" draw:text-style-name="P101" draw:layer="layout" svg:width="1.9cm" svg:height="0.212cm" svg:x="4.542cm" svg:y="6.383cm" svg:viewBox="0 0 1901 213" draw:points="0,90 1689,90 1689,0 1901,107 1689,213 1689,125 0,125">
          <text:p/>
        </draw:polygon>
        <draw:polygon draw:style-name="gr150" draw:text-style-name="P101" draw:layer="layout" svg:width="1.85cm" svg:height="0.212cm" svg:x="10.494cm" svg:y="6.361cm" svg:viewBox="0 0 1851 213" draw:points="0,149 1640,124 1641,213 1851,104 1638,0 1639,89 0,114">
          <text:p/>
        </draw:polygon>
        <draw:polygon draw:style-name="gr150" draw:text-style-name="P101" draw:layer="layout" svg:width="1.616cm" svg:height="1.67cm" svg:x="14.164cm" svg:y="7.197cm" svg:viewBox="0 0 1617 1671" draw:points="26,0 1483,1506 1546,1445 1617,1671 1394,1592 1457,1531 0,24">
          <text:p/>
        </draw:polygon>
        <draw:polygon draw:style-name="gr150" draw:text-style-name="P101" draw:layer="layout" svg:width="3.658cm" svg:height="0.777cm" svg:x="19.753cm" svg:y="10.841cm" svg:viewBox="0 0 3659 778" draw:points="7,0 3455,657 3471,570 3659,714 3431,778 3448,692 0,34">
          <text:p/>
        </draw:polygon>
        <draw:frame draw:style-name="gr477" draw:text-style-name="P4" draw:layer="layout" svg:width="1.967cm" svg:height="0.552cm" svg:x="21.632cm" svg:y="9.051cm">
          <draw:text-box>
            <text:p text:style-name="P3"><text:span text:style-name="T3">Sprint 10</text:span></text:p>
          </draw:text-box>
        </draw:frame>
        <draw:frame draw:style-name="gr229" draw:text-style-name="P4" draw:layer="layout" svg:width="22.054cm" svg:height="0.552cm" svg:x="0.254cm" svg:y="17.152cm">
          <draw:text-box>
            <text:p text:style-name="P3"><text:span text:style-name="T13">Kickoff <text:s text:c="20"/>System Investigation <text:s text:c="12"/>Architecture design <text:s text:c="21"/>Partial launch <text:s text:c="8"/></text:span></text:p>
          </draw:text-box>
        </draw:frame>
        <draw:polygon draw:style-name="gr150" draw:text-style-name="P101" draw:layer="layout" svg:width="31.519cm" svg:height="0.211cm" svg:x="0.867cm" svg:y="16.205cm" svg:viewBox="0 0 31520 212" draw:points="0,88 31308,88 31308,0 31520,106 31308,212 31308,123 0,123">
          <text:p/>
        </draw:polygon>
        <draw:path draw:style-name="gr230" draw:text-style-name="P6" draw:layer="layout" svg:width="0.77cm" svg:height="0.77cm" svg:x="0.817cm" svg:y="15.938cm" svg:viewBox="0 0 771 771" svg:d="M0 385c0-213 172-385 386-385 213 0 385 172 385 385s-172 386-385 386c-214 0-386-173-386-386z">
          <text:p/>
        </draw:path>
        <draw:path draw:style-name="gr230" draw:text-style-name="P6" draw:layer="layout" svg:width="0.77cm" svg:height="0.77cm" svg:x="6.769cm" svg:y="15.938cm" svg:viewBox="0 0 771 771" svg:d="M0 385c0-213 172-385 385-385 214 0 386 172 386 385s-172 386-386 386c-213 0-385-173-385-386z">
          <text:p/>
        </draw:path>
        <draw:path draw:style-name="gr230" draw:text-style-name="P6" draw:layer="layout" svg:width="0.77cm" svg:height="0.77cm" svg:x="12.721cm" svg:y="15.938cm" svg:viewBox="0 0 771 771" svg:d="M0 385c0-213 172-385 385-385s386 172 386 385-173 386-386 386-385-173-385-386z">
          <text:p/>
        </draw:path>
        <draw:path draw:style-name="gr230" draw:text-style-name="P6" draw:layer="layout" svg:width="0.77cm" svg:height="0.77cm" svg:x="30.577cm" svg:y="15.938cm" svg:viewBox="0 0 771 771" svg:d="M0 385c0-213 172-385 385-385s386 172 386 385-173 386-386 386-385-173-385-386z">
          <text:p/>
        </draw:path>
        <draw:path draw:style-name="gr230" draw:text-style-name="P6" draw:layer="layout" svg:width="0.77cm" svg:height="0.77cm" svg:x="18.673cm" svg:y="15.938cm" svg:viewBox="0 0 771 771" svg:d="M0 385c0-213 172-385 386-385 213 0 385 172 385 385s-172 386-385 386c-214 0-386-173-386-386z">
          <text:p/>
        </draw:path>
        <draw:path draw:style-name="gr230" draw:text-style-name="P6" draw:layer="layout" svg:width="0.77cm" svg:height="0.77cm" svg:x="24.625cm" svg:y="15.938cm" svg:viewBox="0 0 771 771" svg:d="M0 385c0-213 172-385 385-385 214 0 386 172 386 385s-172 386-386 386c-213 0-385-173-385-386z">
          <text:p/>
        </draw:path>
        <draw:polygon draw:style-name="gr45" draw:text-style-name="P6" draw:layer="layout" svg:width="3.675cm" svg:height="1.465cm" svg:x="29.624cm" svg:y="10.82cm" svg:viewBox="0 0 3676 1466" draw:points="0,0 3676,0 3676,1466 0,1466">
          <text:p/>
        </draw:polygon>
        <draw:frame draw:style-name="gr478" draw:text-style-name="P4" draw:layer="layout" svg:width="9.145cm" svg:height="0.552cm" svg:x="23.882cm" svg:y="17.152cm">
          <draw:text-box>
            <text:p text:style-name="P3"><text:span text:style-name="T13">Full launch <text:s text:c="27"/>Maintenance </text:span></text:p>
          </draw:text-box>
        </draw:frame>
        <draw:polygon draw:style-name="gr150" draw:text-style-name="P101" draw:layer="layout" svg:width="2.552cm" svg:height="0.212cm" svg:x="27.08cm" svg:y="11.446cm" svg:viewBox="0 0 2553 213" draw:points="0,90 2341,90 2341,0 2553,107 2341,213 2341,125 0,125">
          <text:p/>
        </draw:polygon>
        <draw:frame draw:style-name="gr243" draw:text-style-name="P4" draw:layer="layout" svg:width="2.814cm" svg:height="0.552cm" svg:x="30.078cm" svg:y="11.296cm">
          <draw:text-box>
            <text:p text:style-name="P3"><text:span text:style-name="T3">Maintenance</text:span></text:p>
          </draw:text-box>
        </draw:frame>
      </draw:page>
      <draw:page draw:name="page16" draw:style-name="dp1" draw:master-page-name="master-page3">
        <draw:polygon draw:style-name="gr1" draw:text-style-name="P1" draw:layer="layout" svg:width="33.866cm" svg:height="19.049cm" svg:x="0cm" svg:y="0cm" svg:viewBox="0 0 33867 19050" draw:points="0,0 33867,0 33867,19050 0,19050">
          <text:p/>
        </draw:polygon>
        <draw:frame draw:style-name="gr2" draw:text-style-name="P2" draw:layer="layout" svg:width="33.866cm" svg:height="19.049cm" svg:x="0cm" svg:y="0cm">
          <draw:image xlink:href="Pictures/10000001000007D10000046675075CCA.png" xlink:type="simple" xlink:show="embed" xlink:actuate="onLoad" draw:mime-type="image/png">
            <text:p/>
          </draw:image>
        </draw:frame>
        <draw:polygon draw:style-name="gr8" draw:text-style-name="P6" draw:layer="layout" svg:width="2.175cm" svg:height="0.128cm" svg:x="0cm" svg:y="3.056cm" svg:viewBox="0 0 2176 129" draw:points="0,0 2176,0 2176,129 0,129">
          <text:p/>
        </draw:polygon>
        <draw:polygon draw:style-name="gr479" draw:text-style-name="P6" draw:layer="layout" svg:width="0.542cm" svg:height="0.542cm" svg:x="32.105cm" svg:y="16.416cm" svg:viewBox="0 0 543 543" draw:points="0,272 272,0 543,272 272,543">
          <text:p/>
        </draw:polygon>
        <draw:frame draw:style-name="gr2" draw:text-style-name="P2" draw:layer="layout" svg:width="1.508cm" svg:height="2.804cm" svg:x="0.559cm" svg:y="3.852cm">
          <draw:image xlink:href="Pictures/1000000100000077000000DD6F876B4B.png" xlink:type="simple" xlink:show="embed" xlink:actuate="onLoad" draw:mime-type="image/png">
            <text:p/>
          </draw:image>
        </draw:frame>
        <draw:frame draw:style-name="gr480" draw:text-style-name="P9" draw:layer="layout" svg:width="14.41cm" svg:height="0.996cm" svg:x="0.899cm" svg:y="1.824cm">
          <draw:text-box>
            <text:p text:style-name="P3"><text:span text:style-name="T28">Project High Level Plan / Milestone</text:span></text:p>
          </draw:text-box>
        </draw:frame>
        <draw:frame draw:style-name="gr481" draw:text-style-name="P105" draw:layer="layout" svg:width="2.495cm" svg:height="0.475cm" draw:transform="rotate (-1.5707963267949) translate (1.794cm 4.075cm)">
          <draw:text-box>
            <text:p text:style-name="P3"><text:span text:style-name="T19">Exist system </text:span></text:p>
          </draw:text-box>
        </draw:frame>
        <draw:frame draw:style-name="gr2" draw:text-style-name="P2" draw:layer="layout" svg:width="1.508cm" svg:height="2.583cm" svg:x="0.559cm" svg:y="6.977cm">
          <draw:image xlink:href="Pictures/1000000100000077000000CC695F4D0B.png" xlink:type="simple" xlink:show="embed" xlink:actuate="onLoad" draw:mime-type="image/png">
            <text:p/>
          </draw:image>
        </draw:frame>
        <draw:frame draw:style-name="gr482" draw:text-style-name="P105" draw:layer="layout" svg:width="2.355cm" svg:height="0.475cm" draw:transform="rotate (-1.5707963267949) translate (1.286cm 4.066cm)">
          <draw:text-box>
            <text:p text:style-name="P3"><text:span text:style-name="T19">investigation</text:span></text:p>
          </draw:text-box>
        </draw:frame>
        <draw:frame draw:style-name="gr483" draw:text-style-name="P105" draw:layer="layout" svg:width="2.378cm" svg:height="0.475cm" draw:transform="rotate (-1.5707963267949) translate (1.794cm 7.131cm)">
          <draw:text-box>
            <text:p text:style-name="P3"><text:span text:style-name="T19">Architecture </text:span></text:p>
          </draw:text-box>
        </draw:frame>
        <draw:frame draw:style-name="gr2" draw:text-style-name="P2" draw:layer="layout" svg:width="1.5cm" svg:height="3.176cm" svg:x="0.584cm" svg:y="9.796cm">
          <draw:image xlink:href="Pictures/1000000100000077000000FBCBE2DDB6.png" xlink:type="simple" xlink:show="embed" xlink:actuate="onLoad" draw:mime-type="image/png">
            <text:p/>
          </draw:image>
        </draw:frame>
        <draw:frame draw:style-name="gr484" draw:text-style-name="P105" draw:layer="layout" svg:width="1.767cm" svg:height="0.475cm" draw:transform="rotate (-1.5707963267949) translate (1.286cm 7.444cm)">
          <draw:text-box>
            <text:p text:style-name="P3"><text:span text:style-name="T19">&amp; design </text:span></text:p>
          </draw:text-box>
        </draw:frame>
        <draw:frame draw:style-name="gr485" draw:text-style-name="P105" draw:layer="layout" svg:width="2.99cm" svg:height="0.475cm" draw:transform="rotate (-1.5707963267949) translate (1.817cm 9.946cm)">
          <draw:text-box>
            <text:p text:style-name="P3"><text:span text:style-name="T19">implementation </text:span></text:p>
          </draw:text-box>
        </draw:frame>
        <draw:frame draw:style-name="gr2" draw:text-style-name="P2" draw:layer="layout" svg:width="1.508cm" svg:height="2.482cm" svg:x="0.584cm" svg:y="13.183cm">
          <draw:image xlink:href="Pictures/1000000100000077000000C441180F59.png" xlink:type="simple" xlink:show="embed" xlink:actuate="onLoad" draw:mime-type="image/png">
            <text:p/>
          </draw:image>
        </draw:frame>
        <draw:frame draw:style-name="gr486" draw:text-style-name="P105" draw:layer="layout" svg:width="1.225cm" svg:height="0.475cm" draw:transform="rotate (-1.5707963267949) translate (1.309cm 10.827cm)">
          <draw:text-box>
            <text:p text:style-name="P3"><text:span text:style-name="T19">Sprint </text:span></text:p>
          </draw:text-box>
        </draw:frame>
        <draw:polygon draw:style-name="gr487" draw:text-style-name="P214" draw:layer="layout" svg:width="5.521cm" svg:height="0.652cm" svg:x="9.575cm" svg:y="5.808cm" svg:viewBox="0 0 5522 653" draw:points="0,0 5196,0 5522,326 5196,653 0,653 326,326">
          <text:p/>
        </draw:polygon>
        <draw:frame draw:style-name="gr488" draw:text-style-name="P105" draw:layer="layout" svg:width="1.508cm" svg:height="0.475cm" draw:transform="rotate (-1.5707963267949) translate (1.821cm 13.732cm)">
          <draw:text-box>
            <text:p text:style-name="P3"><text:span text:style-name="T19">Testing </text:span></text:p>
          </draw:text-box>
        </draw:frame>
        <draw:polygon draw:style-name="gr487" draw:text-style-name="P214" draw:layer="layout" svg:width="5.503cm" svg:height="0.652cm" svg:x="4.182cm" svg:y="5.808cm" svg:viewBox="0 0 5504 653" draw:points="0,0 5153,0 5504,326 5153,653 0,653">
          <text:p/>
        </draw:polygon>
        <draw:frame draw:style-name="gr489" draw:text-style-name="P128" draw:layer="layout" svg:width="4.164cm" svg:height="0.42cm" svg:x="10.252cm" svg:y="5.941cm">
          <draw:text-box>
            <text:p text:style-name="P3"><text:span text:style-name="T29">Group business workflow</text:span></text:p>
          </draw:text-box>
        </draw:frame>
        <draw:polygon draw:style-name="gr236" draw:text-style-name="P6" draw:layer="layout" svg:width="4.08cm" svg:height="0.77cm" svg:x="27.669cm" svg:y="16.349cm" svg:viewBox="0 0 4081 771" draw:points="0,0 3696,0 4081,386 3696,771 0,771">
          <text:p/>
        </draw:polygon>
        <draw:frame draw:style-name="gr490" draw:text-style-name="P128" draw:layer="layout" svg:width="4.515cm" svg:height="0.42cm" svg:x="4.498cm" svg:y="5.943cm">
          <draw:text-box>
            <text:p text:style-name="P3"><text:span text:style-name="T29">Collect user/DB/workflow…</text:span></text:p>
          </draw:text-box>
        </draw:frame>
        <draw:polygon draw:style-name="gr491" draw:text-style-name="P103" draw:layer="layout" svg:width="0.636cm" svg:height="0.542cm" svg:x="18.965cm" svg:y="7.484cm" svg:viewBox="0 0 637 543" draw:points="0,271 318,0 637,271 318,543">
          <text:p/>
        </draw:polygon>
        <draw:polygon draw:style-name="gr236" draw:text-style-name="P6" draw:layer="layout" svg:width="5.182cm" svg:height="0.77cm" svg:x="9.033cm" svg:y="7.374cm" svg:viewBox="0 0 5183 771" draw:points="0,0 4798,0 5183,385 4798,771 0,771">
          <text:p/>
        </draw:polygon>
        <draw:frame draw:style-name="gr492" draw:text-style-name="P128" draw:layer="layout" svg:width="2.859cm" svg:height="0.42cm" svg:x="28.1cm" svg:y="16.547cm">
          <draw:text-box>
            <text:p text:style-name="P3"><text:span text:style-name="T29">Warranty support</text:span></text:p>
          </draw:text-box>
        </draw:frame>
        <draw:polygon draw:style-name="gr236" draw:text-style-name="P6" draw:layer="layout" svg:width="4.597cm" svg:height="0.77cm" svg:x="14.215cm" svg:y="7.374cm" svg:viewBox="0 0 4598 771" draw:points="0,0 4213,0 4598,385 4213,771 0,771 385,385">
          <text:p/>
        </draw:polygon>
        <draw:frame draw:style-name="gr493" draw:text-style-name="P215" draw:layer="layout" svg:width="3.191cm" svg:height="0.42cm" svg:x="9.846cm" svg:y="7.566cm">
          <draw:text-box>
            <text:p text:style-name="P3"><text:span text:style-name="T30">Architecture design</text:span></text:p>
          </draw:text-box>
        </draw:frame>
        <draw:polygon draw:style-name="gr479" draw:text-style-name="P6" draw:layer="layout" svg:width="0.542cm" svg:height="0.541cm" svg:x="27.203cm" svg:y="13.428cm" svg:viewBox="0 0 543 542" draw:points="0,271 272,0 543,271 272,542">
          <text:p/>
        </draw:polygon>
        <draw:polygon draw:style-name="gr236" draw:text-style-name="P6" draw:layer="layout" svg:width="4.123cm" svg:height="0.77cm" svg:x="18.33cm" svg:y="13.284cm" svg:viewBox="0 0 4124 771" draw:points="0,0 3739,0 4124,386 3739,771 0,771">
          <text:p/>
        </draw:polygon>
        <draw:frame draw:style-name="gr494" draw:text-style-name="P215" draw:layer="layout" svg:width="3.315cm" svg:height="0.42cm" svg:x="14.973cm" svg:y="7.566cm">
          <draw:text-box>
            <text:p text:style-name="P3"><text:span text:style-name="T30">finalize architecture </text:span></text:p>
          </draw:text-box>
        </draw:frame>
        <draw:polygon draw:style-name="gr236" draw:text-style-name="P6" draw:layer="layout" svg:width="4.631cm" svg:height="0.771cm" svg:x="22.326cm" svg:y="13.309cm" svg:viewBox="0 0 4632 772" draw:points="0,0 4247,0 4632,386 4247,772 0,772 385,386">
          <text:p/>
        </draw:polygon>
        <draw:frame draw:style-name="gr495" draw:text-style-name="P128" draw:layer="layout" svg:width="1.928cm" svg:height="0.42cm" svg:x="19.231cm" svg:y="13.48cm">
          <draw:text-box>
            <text:p text:style-name="P3"><text:span text:style-name="T29">Test signoff</text:span></text:p>
          </draw:text-box>
        </draw:frame>
        <draw:polygon draw:style-name="gr487" draw:text-style-name="P214" draw:layer="layout" svg:width="4.979cm" svg:height="0.652cm" svg:x="11.48cm" svg:y="11.201cm" svg:viewBox="0 0 4980 653" draw:points="0,0 4629,0 4980,327 4629,653 0,653">
          <text:p/>
        </draw:polygon>
        <draw:frame draw:style-name="gr496" draw:text-style-name="P128" draw:layer="layout" svg:width="2.301cm" svg:height="0.42cm" svg:x="23.495cm" svg:y="13.508cm">
          <draw:text-box>
            <text:p text:style-name="P3"><text:span text:style-name="T29">Launch report</text:span></text:p>
          </draw:text-box>
        </draw:frame>
        <draw:polygon draw:style-name="gr487" draw:text-style-name="P214" draw:layer="layout" svg:width="5.529cm" svg:height="0.652cm" svg:x="16.289cm" svg:y="11.201cm" svg:viewBox="0 0 5530 653" draw:points="0,0 5204,0 5530,327 5204,653 0,653 326,327">
          <text:p/>
        </draw:polygon>
        <draw:frame draw:style-name="gr497" draw:text-style-name="P128" draw:layer="layout" svg:width="2.57cm" svg:height="0.42cm" svg:x="12.508cm" svg:y="11.337cm">
          <draw:text-box>
            <text:p text:style-name="P3"><text:span text:style-name="T29">100 TC drafting</text:span></text:p>
          </draw:text-box>
        </draw:frame>
        <draw:polygon draw:style-name="gr487" draw:text-style-name="P214" draw:layer="layout" svg:width="4.674cm" svg:height="0.678cm" svg:x="16.56cm" svg:y="14.257cm" svg:viewBox="0 0 4675 679" draw:points="0,0 4309,0 4675,340 4309,679 0,679">
          <text:p/>
        </draw:polygon>
        <draw:frame draw:style-name="gr498" draw:text-style-name="P128" draw:layer="layout" svg:width="3.75cm" svg:height="0.42cm" svg:x="17.189cm" svg:y="11.337cm">
          <draw:text-box>
            <text:p text:style-name="P3"><text:span text:style-name="T29">gen. auto testing script</text:span></text:p>
          </draw:text-box>
        </draw:frame>
        <draw:polygon draw:style-name="gr487" draw:text-style-name="P214" draw:layer="layout" svg:width="5.749cm" svg:height="0.652cm" svg:x="21.158cm" svg:y="14.257cm" svg:viewBox="0 0 5750 653" draw:points="0,0 5424,0 5750,326 5424,653 0,653 326,326">
          <text:p/>
        </draw:polygon>
        <draw:frame draw:style-name="gr499" draw:text-style-name="P128" draw:layer="layout" svg:width="3.605cm" svg:height="0.42cm" svg:x="16.922cm" svg:y="14.408cm">
          <draw:text-box>
            <text:p text:style-name="P3"><text:span text:style-name="T29">Test Data preparation</text:span></text:p>
          </draw:text-box>
        </draw:frame>
        <draw:polygon draw:style-name="gr236" draw:text-style-name="P6" draw:layer="layout" svg:width="3.124cm" svg:height="0.77cm" svg:x="2.489cm" svg:y="2.802cm" svg:viewBox="0 0 3125 771" draw:points="0,0 2740,0 3125,385 2740,771 0,771">
          <text:p/>
        </draw:polygon>
        <draw:frame draw:style-name="gr500" draw:text-style-name="P128" draw:layer="layout" svg:width="4.308cm" svg:height="0.42cm" svg:x="21.891cm" svg:y="14.397cm">
          <draw:text-box>
            <text:p text:style-name="P3"><text:span text:style-name="T29">Verify the result with INFA</text:span></text:p>
          </draw:text-box>
        </draw:frame>
        <draw:frame draw:style-name="gr246" draw:text-style-name="P128" draw:layer="layout" svg:width="1.513cm" svg:height="0.42cm" svg:x="3.214cm" svg:y="2.773cm">
          <draw:text-box>
            <text:p text:style-name="P3"><text:span text:style-name="T29">Contract </text:span></text:p>
          </draw:text-box>
        </draw:frame>
        <draw:polygon draw:style-name="gr236" draw:text-style-name="P6" draw:layer="layout" svg:width="4.53cm" svg:height="0.77cm" svg:x="4.842cm" svg:y="4.817cm" svg:viewBox="0 0 4531 771" draw:points="0,0 4146,0 4531,386 4146,771 0,771">
          <text:p/>
        </draw:polygon>
        <draw:frame draw:style-name="gr501" draw:text-style-name="P128" draw:layer="layout" svg:width="1.1cm" svg:height="0.42cm" svg:x="3.316cm" svg:y="3.213cm">
          <draw:text-box>
            <text:p text:style-name="P3"><text:span text:style-name="T29">signed</text:span></text:p>
          </draw:text-box>
        </draw:frame>
        <draw:polygon draw:style-name="gr491" draw:text-style-name="P103" draw:layer="layout" svg:width="0.542cm" svg:height="0.55cm" svg:x="15.197cm" svg:y="4.927cm" svg:viewBox="0 0 543 551" draw:points="0,275 272,0 543,275 272,551">
          <text:p/>
        </draw:polygon>
        <draw:polygon draw:style-name="gr236" draw:text-style-name="P6" draw:layer="layout" svg:width="5.554cm" svg:height="0.77cm" svg:x="9.508cm" svg:y="4.817cm" svg:viewBox="0 0 5555 771" draw:points="0,0 5169,0 5555,386 5169,771 0,771">
          <text:p/>
        </draw:polygon>
        <draw:frame draw:style-name="gr502" draw:text-style-name="P215" draw:layer="layout" svg:width="3.563cm" svg:height="0.42cm" svg:x="5.135cm" svg:y="5.009cm">
          <draw:text-box>
            <text:p text:style-name="P3"><text:span text:style-name="T30">Collect system inform</text:span></text:p>
          </draw:text-box>
        </draw:frame>
        <draw:frame draw:style-name="gr503" draw:text-style-name="P128" draw:layer="layout" svg:width="2.736cm" svg:height="0.42cm" svg:x="10.786cm" svg:y="4.788cm">
          <draw:text-box>
            <text:p text:style-name="P3"><text:span text:style-name="T29">Scope/business </text:span></text:p>
          </draw:text-box>
        </draw:frame>
        <draw:path draw:style-name="gr150" draw:text-style-name="P101" draw:layer="layout" svg:width="1.383cm" svg:height="3.162cm" svg:x="27.02cm" svg:y="13.685cm" svg:viewBox="0 0 1384 3163" svg:d="M730 35h618v1428h-1330c-10 0-18 9-18 18v1576c0 10 8 18 18 18h423v88l212-106-212-106v88h-406v-1540h1331c10 0 18-8 18-18v-1463c0-10-8-18-18-18h-636z">
          <text:p/>
        </draw:path>
        <draw:polygon draw:style-name="gr150" draw:text-style-name="P101" draw:layer="layout" svg:width="31.828cm" svg:height="0.382cm" svg:x="1.468cm" svg:y="18.034cm" svg:viewBox="0 0 31829 383" draw:points="0,128 31448,128 31448,0 31829,191 31448,383 31448,255 0,255">
          <text:p/>
        </draw:polygon>
        <draw:path draw:style-name="gr150" draw:text-style-name="P101" draw:layer="layout" svg:width="2.075cm" svg:height="2.138cm" svg:x="4.194cm" svg:y="3.178cm" svg:viewBox="0 0 2076 2139" svg:d="M1423 36h617v972h-2022c-10 0-18 8-18 17v1008c0 10 8 17 18 17h423v89l212-106-212-106v88h-406v-972h2023c10 0 18-8 18-18v-1007c0-10-8-18-18-18h-635z">
          <text:p/>
        </draw:path>
        <draw:line draw:style-name="gr504" draw:text-style-name="P2" draw:layer="layout" svg:x1="5.617cm" svg:y1="3.585cm" svg:x2="5.617cm" svg:y2="18.229cm">
          <text:p/>
        </draw:line>
        <draw:line draw:style-name="gr504" draw:text-style-name="P2" draw:layer="layout" svg:x1="15.066cm" svg:y1="4.737cm" svg:x2="15.066cm" svg:y2="18.178cm">
          <text:p/>
        </draw:line>
        <draw:line draw:style-name="gr504" draw:text-style-name="P2" draw:layer="layout" svg:x1="21.89cm" svg:y1="10.9cm" svg:x2="21.89cm" svg:y2="18.279cm">
          <text:p/>
        </draw:line>
        <draw:line draw:style-name="gr504" draw:text-style-name="P2" draw:layer="layout" svg:x1="26.962cm" svg:y1="13.703cm" svg:x2="26.962cm" svg:y2="18.177cm">
          <text:p/>
        </draw:line>
        <draw:line draw:style-name="gr160" draw:text-style-name="P2" draw:layer="layout" svg:x1="0.571cm" svg:y1="13.085cm" svg:x2="21.982cm" svg:y2="13.085cm">
          <text:p/>
        </draw:line>
        <draw:line draw:style-name="gr160" draw:text-style-name="P2" draw:layer="layout" svg:x1="0.554cm" svg:y1="9.664cm" svg:x2="18.814cm" svg:y2="9.664cm">
          <text:p/>
        </draw:line>
        <draw:line draw:style-name="gr160" draw:text-style-name="P2" draw:layer="layout" svg:x1="0.571cm" svg:y1="6.819cm" svg:x2="15.065cm" svg:y2="6.819cm">
          <text:p/>
        </draw:line>
        <draw:line draw:style-name="gr160" draw:text-style-name="P2" draw:layer="layout" svg:x1="0.596cm" svg:y1="3.831cm" svg:x2="5.282cm" svg:y2="3.831cm">
          <text:p/>
        </draw:line>
        <draw:frame draw:style-name="gr2" draw:text-style-name="P2" draw:layer="layout" svg:width="1.5cm" svg:height="2.482cm" svg:x="0.584cm" svg:y="15.824cm">
          <draw:image xlink:href="Pictures/1000000100000077000000C441180F59.png" xlink:type="simple" xlink:show="embed" xlink:actuate="onLoad" draw:mime-type="image/png">
            <text:p/>
          </draw:image>
        </draw:frame>
        <draw:frame draw:style-name="gr505" draw:text-style-name="P128" draw:layer="layout" svg:width="2.031cm" svg:height="0.42cm" svg:x="11.082cm" svg:y="5.228cm">
          <draw:text-box>
            <text:p text:style-name="P3"><text:span text:style-name="T29">confirmation</text:span></text:p>
          </draw:text-box>
        </draw:frame>
        <draw:frame draw:style-name="gr506" draw:text-style-name="P105" draw:layer="layout" svg:width="1.837cm" svg:height="0.475cm" draw:transform="rotate (-1.5707963267949) translate (1.817cm 16.203cm)">
          <draw:text-box>
            <text:p text:style-name="P3"><text:span text:style-name="T19">Warranty </text:span></text:p>
          </draw:text-box>
        </draw:frame>
        <draw:line draw:style-name="gr160" draw:text-style-name="P2" draw:layer="layout" svg:x1="0.571cm" svg:y1="15.777cm" svg:x2="21.982cm" svg:y2="15.777cm">
          <text:p/>
        </draw:line>
        <draw:frame draw:style-name="gr507" draw:text-style-name="P105" draw:layer="layout" svg:width="1.414cm" svg:height="0.475cm" draw:transform="rotate (-1.5707963267949) translate (1.309cm 16.364cm)">
          <draw:text-box>
            <text:p text:style-name="P3"><text:span text:style-name="T19">support</text:span></text:p>
          </draw:text-box>
        </draw:frame>
        <draw:frame draw:style-name="gr508" draw:text-style-name="P4" draw:layer="layout" svg:width="19.239cm" svg:height="0.552cm" svg:x="5.267cm" svg:y="18.385cm">
          <draw:text-box>
            <text:p text:style-name="P3"><text:span text:style-name="T13">M1 <text:s text:c="19"/>M2 <text:s text:c="19"/>M3 <text:s text:c="15"/>M4 <text:s text:c="31"/>M5 <text:s text:c="21"/>M6 </text:span></text:p>
          </draw:text-box>
        </draw:frame>
        <draw:polygon draw:style-name="gr487" draw:text-style-name="P214" draw:layer="layout" svg:width="4.022cm" svg:height="0.652cm" svg:x="8.923cm" svg:y="8.348cm" svg:viewBox="0 0 4023 653" draw:points="0,0 3672,0 4023,326 3672,653 0,653">
          <text:p/>
        </draw:polygon>
        <draw:frame draw:style-name="gr509" draw:text-style-name="P4" draw:layer="layout" svg:width="2.867cm" svg:height="0.552cm" svg:x="26.871cm" svg:y="18.385cm">
          <draw:text-box>
            <text:p text:style-name="P3"><text:span text:style-name="T13">M7 <text:s text:c="10"/>M8</text:span></text:p>
          </draw:text-box>
        </draw:frame>
        <draw:polygon draw:style-name="gr479" draw:text-style-name="P6" draw:layer="layout" svg:width="0.542cm" svg:height="0.542cm" svg:x="22.047cm" svg:y="10.388cm" svg:viewBox="0 0 543 543" draw:points="0,272 271,0 543,272 271,543">
          <text:p/>
        </draw:polygon>
        <draw:polygon draw:style-name="gr236" draw:text-style-name="P6" draw:layer="layout" svg:width="4.03cm" svg:height="0.77cm" svg:x="11.48cm" svg:y="10.278cm" svg:viewBox="0 0 4031 771" draw:points="0,0 3646,0 4031,386 3646,771 0,771">
          <text:p/>
        </draw:polygon>
        <draw:frame draw:style-name="gr510" draw:text-style-name="P128" draw:layer="layout" svg:width="3.087cm" svg:height="0.42cm" svg:x="9.217cm" svg:y="8.486cm">
          <draw:text-box>
            <text:p text:style-name="P3"><text:span text:style-name="T29">Collect benchmark</text:span></text:p>
          </draw:text-box>
        </draw:frame>
        <draw:polygon draw:style-name="gr236" draw:text-style-name="P6" draw:layer="layout" svg:width="6.105cm" svg:height="0.771cm" svg:x="15.341cm" svg:y="10.287cm" svg:viewBox="0 0 6106 772" draw:points="0,0 5719,0 6106,387 5719,772 0,772 385,387">
          <text:p/>
        </draw:polygon>
        <draw:frame draw:style-name="gr511" draw:text-style-name="P128" draw:layer="layout" svg:width="2.963cm" svg:height="0.42cm" svg:x="11.831cm" svg:y="10.472cm">
          <draw:text-box>
            <text:p text:style-name="P3"><text:span text:style-name="T29">Unit tasks convert</text:span></text:p>
          </draw:text-box>
        </draw:frame>
        <draw:path draw:style-name="gr150" draw:text-style-name="P101" draw:layer="layout" svg:width="0.687cm" svg:height="2.188cm" svg:x="15.743cm" svg:y="5.193cm" svg:viewBox="0 0 688 2189" svg:d="M0 0h582c10 0 18 8 18 18v1960h88l-106 211-106-211h89v-1943h-565z">
          <text:p/>
        </draw:path>
        <draw:path draw:style-name="gr150" draw:text-style-name="P101" draw:layer="layout" svg:width="3.793cm" svg:height="2.548cm" svg:x="16.459cm" svg:y="7.742cm" svg:viewBox="0 0 3794 2549" svg:d="M3142 35h617v1366h-3653c-10 0-18 9-18 18v918h-88l106 212 105-212h-88v-900h3654c10 0 17-8 17-18v-1402c0-10-7-17-17-17h-635z">
          <text:p/>
        </draw:path>
        <draw:path draw:style-name="gr150" draw:text-style-name="P101" draw:layer="layout" svg:width="5.564cm" svg:height="3.13cm" svg:x="17.681cm" svg:y="10.646cm" svg:viewBox="0 0 5565 3131" svg:d="M4912 35h618v1412h-5512c-10 0-18 8-18 18v1560c0 10 8 18 18 18h423v88l212-106-212-106v88h-405v-1524h5511c10 0 18-8 18-18v-1448c0-10-8-17-18-17h-635z">
          <text:p/>
        </draw:path>
        <draw:polygon draw:style-name="gr487" draw:text-style-name="P214" draw:layer="layout" svg:width="6.036cm" svg:height="0.644cm" svg:x="12.776cm" svg:y="8.356cm" svg:viewBox="0 0 6037 645" draw:points="0,0 5716,0 6037,322 5716,645 0,645 321,322">
          <text:p/>
        </draw:polygon>
        <draw:frame draw:style-name="gr512" draw:text-style-name="P215" draw:layer="layout" svg:width="3.708cm" svg:height="0.42cm" svg:x="16.539cm" svg:y="10.482cm">
          <draw:text-box>
            <text:p text:style-name="P3"><text:span text:style-name="T30">Verify SQL &amp; workflow</text:span></text:p>
          </draw:text-box>
        </draw:frame>
        <draw:line draw:style-name="gr504" draw:text-style-name="P2" draw:layer="layout" svg:x1="18.825cm" svg:y1="7.378cm" svg:x2="18.825cm" svg:y2="18.283cm">
          <text:p/>
        </draw:line>
        <draw:line draw:style-name="gr504" draw:text-style-name="P2" draw:layer="layout" svg:x1="31.872cm" svg:y1="16.692cm" svg:x2="31.872cm" svg:y2="18.235cm">
          <text:p/>
        </draw:line>
        <draw:frame draw:style-name="gr513" draw:text-style-name="P128" draw:layer="layout" svg:width="3.004cm" svg:height="0.42cm" svg:x="14.303cm" svg:y="8.487cm">
          <draw:text-box>
            <text:p text:style-name="P3"><text:span text:style-name="T29">Architecture setup</text:span></text:p>
          </draw:text-box>
        </draw:frame>
        <draw:polygon draw:style-name="gr487" draw:text-style-name="P214" draw:layer="layout" svg:width="6.317cm" svg:height="0.652cm" svg:x="15.51cm" svg:y="11.988cm" svg:viewBox="0 0 6318 653" draw:points="0,0 5992,0 6318,327 5992,653 0,653 327,327">
          <text:p/>
        </draw:polygon>
        <draw:frame draw:style-name="gr474" draw:text-style-name="P4" draw:layer="layout" svg:width="3.332cm" svg:height="0.552cm" svg:x="1.241cm" svg:y="18.369cm">
          <draw:text-box>
            <text:p text:style-name="P3"><text:span text:style-name="T13">Actual timeline:</text:span></text:p>
          </draw:text-box>
        </draw:frame>
        <draw:polygon draw:style-name="gr487" draw:text-style-name="P214" draw:layer="layout" svg:width="4.14cm" svg:height="0.652cm" svg:x="11.497cm" svg:y="11.971cm" svg:viewBox="0 0 4141 653" draw:points="0,0 3790,0 4141,327 3790,653 0,653">
          <text:p/>
        </draw:polygon>
        <draw:frame draw:style-name="gr514" draw:text-style-name="P128" draw:layer="layout" svg:width="4.868cm" svg:height="0.42cm" svg:x="16.09cm" svg:y="12.126cm">
          <draw:text-box>
            <text:p text:style-name="P3"><text:span text:style-name="T29">form a report and identify gap</text:span></text:p>
          </draw:text-box>
        </draw:frame>
        <draw:polygon draw:style-name="gr487" draw:text-style-name="P214" draw:layer="layout" svg:width="5.748cm" svg:height="0.652cm" svg:x="21.209cm" svg:y="15.129cm" svg:viewBox="0 0 5749 653" draw:points="0,0 5423,0 5749,327 5423,653 0,653 325,327">
          <text:p/>
        </draw:polygon>
        <draw:frame draw:style-name="gr493" draw:text-style-name="P128" draw:layer="layout" svg:width="3.191cm" svg:height="0.42cm" svg:x="11.813cm" svg:y="12.111cm">
          <draw:text-box>
            <text:p text:style-name="P3"><text:span text:style-name="T29">execution test case</text:span></text:p>
          </draw:text-box>
        </draw:frame>
        <draw:polygon draw:style-name="gr487" draw:text-style-name="P214" draw:layer="layout" svg:width="4.589cm" svg:height="0.677cm" svg:x="16.56cm" svg:y="15.079cm" svg:viewBox="0 0 4590 678" draw:points="0,0 4226,0 4590,339 4226,678 0,678">
          <text:p/>
        </draw:polygon>
        <draw:frame draw:style-name="gr515" draw:text-style-name="P128" draw:layer="layout" svg:width="4.205cm" svg:height="0.42cm" svg:x="21.993cm" svg:y="15.268cm">
          <draw:text-box>
            <text:p text:style-name="P3"><text:span text:style-name="T29">Stop original task in INFA</text:span></text:p>
          </draw:text-box>
        </draw:frame>
        <draw:polygon draw:style-name="gr516" draw:text-style-name="P211" draw:layer="layout" svg:width="8.83cm" svg:height="5.485cm" svg:x="23.279cm" svg:y="5.422cm" svg:viewBox="0 0 8831 5486" draw:points="0,0 1471,0 3679,0 8831,0 8831,1709 8831,2442 8831,2931 3679,2931 616,5486 1471,2931 0,2931 0,2442 0,1709">
          <text:p/>
        </draw:polygon>
        <draw:frame draw:style-name="gr517" draw:text-style-name="P128" draw:layer="layout" svg:width="2.694cm" svg:height="0.42cm" svg:x="17.346cm" svg:y="15.23cm">
          <draw:text-box>
            <text:p text:style-name="P3"><text:span text:style-name="T29">Setup scheduler</text:span></text:p>
          </draw:text-box>
        </draw:frame>
        <draw:frame draw:style-name="gr518" draw:text-style-name="P4" draw:layer="layout" svg:width="8.245cm" svg:height="0.552cm" svg:x="23.631cm" svg:y="6.332cm">
          <draw:text-box>
            <text:p text:style-name="P3"><text:span text:style-name="T3">Recommend delivery all reports in 10 </text:span></text:p>
          </draw:text-box>
        </draw:frame>
        <draw:frame draw:style-name="gr519" draw:text-style-name="P4" draw:layer="layout" svg:width="7.863cm" svg:height="0.552cm" svg:x="23.894cm" svg:y="6.926cm">
          <draw:text-box>
            <text:p text:style-name="P3"><text:span text:style-name="T3">Sprints to avoid next renew license <text:s/></text:span></text:p>
          </draw:text-box>
        </draw:frame>
      </draw:page>
      <draw:page draw:name="page17" draw:style-name="dp1" draw:master-page-name="master-page3">
        <draw:polygon draw:style-name="gr1" draw:text-style-name="P1" draw:layer="layout" svg:width="33.866cm" svg:height="19.049cm" svg:x="0cm" svg:y="0cm" svg:viewBox="0 0 33867 19050" draw:points="0,0 33867,0 33867,19050 0,19050">
          <text:p/>
        </draw:polygon>
        <draw:polygon draw:style-name="gr8" draw:text-style-name="P6" draw:layer="layout" svg:width="2.175cm" svg:height="0.128cm" svg:x="0cm" svg:y="3.056cm" svg:viewBox="0 0 2176 129" draw:points="0,0 2176,0 2176,129 0,129">
          <text:p/>
        </draw:polygon>
        <draw:polygon draw:style-name="gr520" draw:text-style-name="P2" draw:layer="layout" svg:width="4.445cm" svg:height="10.973cm" svg:x="4.576cm" svg:y="4.652cm" svg:viewBox="0 0 4446 10974" draw:points="0,0 4446,0 4446,10974 0,10974">
          <text:p/>
        </draw:polygon>
        <draw:frame draw:style-name="gr521" draw:text-style-name="P9" draw:layer="layout" svg:width="20.713cm" svg:height="1.309cm" svg:x="0.899cm" svg:y="1.518cm">
          <draw:text-box>
            <text:p text:style-name="P3"><text:span text:style-name="T31">Project Org-Chart &amp; Communication Plan</text:span></text:p>
          </draw:text-box>
        </draw:frame>
        <draw:frame draw:style-name="gr522" draw:text-style-name="P105" draw:layer="layout" svg:width="3.178cm" svg:height="0.475cm" svg:x="5.751cm" svg:y="3.936cm">
          <draw:text-box>
            <text:p text:style-name="P3"><text:span text:style-name="T32">Gientech onsite</text:span></text:p>
          </draw:text-box>
        </draw:frame>
        <draw:frame draw:style-name="gr523" draw:text-style-name="P99" draw:layer="layout" svg:width="2.067cm" svg:height="0.314cm" svg:x="1.871cm" svg:y="6.014cm">
          <draw:text-box>
            <text:p text:style-name="P3"><text:span text:style-name="T33">Project <text:s/>Sponsor</text:span></text:p>
          </draw:text-box>
        </draw:frame>
        <draw:frame draw:style-name="gr524" draw:text-style-name="P99" draw:layer="layout" svg:width="2.13cm" svg:height="0.314cm" svg:x="5.621cm" svg:y="6.095cm">
          <draw:text-box>
            <text:p text:style-name="P3"><text:span text:style-name="T34">Project <text:s/>Manager</text:span></text:p>
          </draw:text-box>
        </draw:frame>
        <draw:frame draw:style-name="gr525" draw:text-style-name="P99" draw:layer="layout" svg:width="2.409cm" svg:height="0.314cm" svg:x="9.916cm" svg:y="9.203cm">
          <draw:text-box>
            <text:p text:style-name="P3"><text:span text:style-name="T35">Business Unit Lead</text:span></text:p>
          </draw:text-box>
        </draw:frame>
        <draw:frame draw:style-name="gr526" draw:text-style-name="P99" draw:layer="layout" svg:width="1.291cm" svg:height="0.314cm" svg:x="13.959cm" svg:y="7.83cm">
          <draw:text-box>
            <text:p text:style-name="P3"><text:span text:style-name="T36">Dev Team</text:span></text:p>
          </draw:text-box>
        </draw:frame>
        <draw:frame draw:style-name="gr526" draw:text-style-name="P99" draw:layer="layout" svg:width="1.291cm" svg:height="0.314cm" svg:x="13.959cm" svg:y="10.097cm">
          <draw:text-box>
            <text:p text:style-name="P3"><text:span text:style-name="T36">Dev Team</text:span></text:p>
          </draw:text-box>
        </draw:frame>
        <draw:frame draw:style-name="gr527" draw:text-style-name="P99" draw:layer="layout" svg:width="0.918cm" svg:height="0.314cm" svg:x="2.343cm" svg:y="8.188cm">
          <draw:text-box>
            <text:p text:style-name="P3"><text:span text:style-name="T33">IT User</text:span></text:p>
          </draw:text-box>
        </draw:frame>
        <draw:frame draw:style-name="gr528" draw:text-style-name="P99" draw:layer="layout" svg:width="1.741cm" svg:height="0.314cm" svg:x="5.886cm" svg:y="7.74cm">
          <draw:text-box>
            <text:p text:style-name="P3"><text:span text:style-name="T34">Scrum Master</text:span></text:p>
          </draw:text-box>
        </draw:frame>
        <draw:frame draw:style-name="gr529" draw:text-style-name="P99" draw:layer="layout" svg:width="0.375cm" svg:height="0.314cm" svg:x="6.583cm" svg:y="11.076cm">
          <draw:text-box>
            <text:p text:style-name="P3"><text:span text:style-name="T34">BA</text:span></text:p>
          </draw:text-box>
        </draw:frame>
        <draw:polygon draw:style-name="gr530" draw:text-style-name="P2" draw:layer="layout" svg:width="6.672cm" svg:height="10.973cm" svg:x="9.029cm" svg:y="4.643cm" svg:viewBox="0 0 6673 10974" draw:points="0,0 6673,0 6673,10974 0,10974">
          <text:p/>
        </draw:polygon>
        <draw:frame draw:style-name="gr531" draw:text-style-name="P99" draw:layer="layout" svg:width="1.058cm" svg:height="0.314cm" svg:x="6.233cm" svg:y="9.463cm">
          <draw:text-box>
            <text:p text:style-name="P3"><text:span text:style-name="T34">Sol Arch</text:span></text:p>
          </draw:text-box>
        </draw:frame>
        <draw:frame draw:style-name="gr532" draw:text-style-name="P105" draw:layer="layout" svg:width="1.695cm" svg:height="0.475cm" svg:x="11.243cm" svg:y="3.965cm">
          <draw:text-box>
            <text:p text:style-name="P3"><text:span text:style-name="T37">offshore</text:span></text:p>
          </draw:text-box>
        </draw:frame>
        <draw:frame draw:style-name="gr533" draw:text-style-name="P99" draw:layer="layout" svg:width="1.337cm" svg:height="0.314cm" svg:x="13.934cm" svg:y="12.362cm">
          <draw:text-box>
            <text:p text:style-name="P3"><text:span text:style-name="T36">Test Team</text:span></text:p>
          </draw:text-box>
        </draw:frame>
        <draw:frame draw:style-name="gr534" draw:text-style-name="P14" draw:layer="layout" svg:width="0.812cm" svg:height="0.399cm" svg:x="14.213cm" svg:y="14.667cm">
          <draw:text-box>
            <text:p text:style-name="P3"><text:span text:style-name="T38">PMO</text:span></text:p>
          </draw:text-box>
        </draw:frame>
        <draw:frame draw:style-name="gr535" draw:text-style-name="P99" draw:layer="layout" svg:width="2.114cm" svg:height="0.314cm" svg:x="10.032cm" svg:y="10.901cm">
          <draw:text-box>
            <text:p text:style-name="P3"><text:span text:style-name="T35">ETL &amp; SQL Lead</text:span></text:p>
          </draw:text-box>
        </draw:frame>
        <draw:frame draw:style-name="gr536" draw:text-style-name="P99" draw:layer="layout" svg:width="3.046cm" svg:height="0.314cm" svg:x="9.99cm" svg:y="14.859cm">
          <draw:text-box>
            <text:p text:style-name="P3"><text:span text:style-name="T35">Quality <text:s/>Assurance Lead</text:span></text:p>
          </draw:text-box>
        </draw:frame>
        <draw:polygon draw:style-name="gr1" draw:text-style-name="P1" draw:layer="layout" svg:width="4.278cm" svg:height="0.677cm" svg:x="17.043cm" svg:y="4.607cm" svg:viewBox="0 0 4279 678" draw:points="0,0 4279,0 4279,678 0,678">
          <text:p/>
        </draw:polygon>
        <draw:polygon draw:style-name="gr1" draw:text-style-name="P1" draw:layer="layout" svg:width="4.402cm" svg:height="0.677cm" svg:x="21.321cm" svg:y="4.607cm" svg:viewBox="0 0 4403 678" draw:points="0,0 4403,0 4403,678 0,678">
          <text:p/>
        </draw:polygon>
        <draw:polygon draw:style-name="gr1" draw:text-style-name="P1" draw:layer="layout" svg:width="2.645cm" svg:height="0.677cm" svg:x="25.723cm" svg:y="4.607cm" svg:viewBox="0 0 2646 678" draw:points="0,0 2646,0 2646,678 0,678">
          <text:p/>
        </draw:polygon>
        <draw:polygon draw:style-name="gr1" draw:text-style-name="P1" draw:layer="layout" svg:width="3.81cm" svg:height="0.677cm" svg:x="28.368cm" svg:y="4.607cm" svg:viewBox="0 0 3811 678" draw:points="0,0 3811,0 3811,678 0,678">
          <text:p/>
        </draw:polygon>
        <draw:polygon draw:style-name="gr1" draw:text-style-name="P1" draw:layer="layout" svg:width="4.278cm" svg:height="4.163cm" svg:x="17.043cm" svg:y="5.284cm" svg:viewBox="0 0 4279 4164" draw:points="0,0 4279,0 4279,4164 0,4164">
          <text:p/>
        </draw:polygon>
        <draw:polygon draw:style-name="gr1" draw:text-style-name="P1" draw:layer="layout" svg:width="4.402cm" svg:height="4.163cm" svg:x="21.321cm" svg:y="5.284cm" svg:viewBox="0 0 4403 4164" draw:points="0,0 4403,0 4403,4164 0,4164">
          <text:p/>
        </draw:polygon>
        <draw:polygon draw:style-name="gr1" draw:text-style-name="P1" draw:layer="layout" svg:width="2.645cm" svg:height="4.163cm" svg:x="25.723cm" svg:y="5.284cm" svg:viewBox="0 0 2646 4164" draw:points="0,0 2646,0 2646,4164 0,4164">
          <text:p/>
        </draw:polygon>
        <draw:polygon draw:style-name="gr1" draw:text-style-name="P1" draw:layer="layout" svg:width="3.81cm" svg:height="4.163cm" svg:x="28.368cm" svg:y="5.284cm" svg:viewBox="0 0 3811 4164" draw:points="0,0 3811,0 3811,4164 0,4164">
          <text:p/>
        </draw:polygon>
        <draw:polygon draw:style-name="gr1" draw:text-style-name="P1" draw:layer="layout" svg:width="4.278cm" svg:height="2.425cm" svg:x="17.043cm" svg:y="9.447cm" svg:viewBox="0 0 4279 2426" draw:points="0,0 4279,0 4279,2426 0,2426">
          <text:p/>
        </draw:polygon>
        <draw:polygon draw:style-name="gr1" draw:text-style-name="P1" draw:layer="layout" svg:width="4.402cm" svg:height="2.425cm" svg:x="21.321cm" svg:y="9.447cm" svg:viewBox="0 0 4403 2426" draw:points="0,0 4403,0 4403,2426 0,2426">
          <text:p/>
        </draw:polygon>
        <draw:polygon draw:style-name="gr1" draw:text-style-name="P1" draw:layer="layout" svg:width="2.645cm" svg:height="2.425cm" svg:x="25.723cm" svg:y="9.447cm" svg:viewBox="0 0 2646 2426" draw:points="0,0 2646,0 2646,2426 0,2426">
          <text:p/>
        </draw:polygon>
        <draw:polygon draw:style-name="gr1" draw:text-style-name="P1" draw:layer="layout" svg:width="3.81cm" svg:height="2.425cm" svg:x="28.368cm" svg:y="9.447cm" svg:viewBox="0 0 3811 2426" draw:points="0,0 3811,0 3811,2426 0,2426">
          <text:p/>
        </draw:polygon>
        <draw:polygon draw:style-name="gr1" draw:text-style-name="P1" draw:layer="layout" svg:width="4.278cm" svg:height="3.294cm" svg:x="17.043cm" svg:y="11.872cm" svg:viewBox="0 0 4279 3295" draw:points="0,0 4279,0 4279,3295 0,3295">
          <text:p/>
        </draw:polygon>
        <draw:polygon draw:style-name="gr1" draw:text-style-name="P1" draw:layer="layout" svg:width="4.402cm" svg:height="3.294cm" svg:x="21.321cm" svg:y="11.872cm" svg:viewBox="0 0 4403 3295" draw:points="0,0 4403,0 4403,3295 0,3295">
          <text:p/>
        </draw:polygon>
        <draw:polygon draw:style-name="gr1" draw:text-style-name="P1" draw:layer="layout" svg:width="2.645cm" svg:height="3.294cm" svg:x="25.723cm" svg:y="11.872cm" svg:viewBox="0 0 2646 3295" draw:points="0,0 2646,0 2646,3295 0,3295">
          <text:p/>
        </draw:polygon>
        <draw:polygon draw:style-name="gr1" draw:text-style-name="P1" draw:layer="layout" svg:width="3.81cm" svg:height="3.294cm" svg:x="28.368cm" svg:y="11.872cm" svg:viewBox="0 0 3811 3295" draw:points="0,0 3811,0 3811,3295 0,3295">
          <text:p/>
        </draw:polygon>
        <draw:polygon draw:style-name="gr1" draw:text-style-name="P1" draw:layer="layout" svg:width="4.278cm" svg:height="1.556cm" svg:x="17.043cm" svg:y="15.166cm" svg:viewBox="0 0 4279 1557" draw:points="0,0 4279,0 4279,1557 0,1557">
          <text:p/>
        </draw:polygon>
        <draw:polygon draw:style-name="gr1" draw:text-style-name="P1" draw:layer="layout" svg:width="4.402cm" svg:height="1.556cm" svg:x="21.321cm" svg:y="15.166cm" svg:viewBox="0 0 4403 1557" draw:points="0,0 4403,0 4403,1557 0,1557">
          <text:p/>
        </draw:polygon>
        <draw:polygon draw:style-name="gr1" draw:text-style-name="P1" draw:layer="layout" svg:width="2.645cm" svg:height="1.556cm" svg:x="25.723cm" svg:y="15.166cm" svg:viewBox="0 0 2646 1557" draw:points="0,0 2646,0 2646,1557 0,1557">
          <text:p/>
        </draw:polygon>
        <draw:polygon draw:style-name="gr1" draw:text-style-name="P1" draw:layer="layout" svg:width="3.81cm" svg:height="1.556cm" svg:x="28.368cm" svg:y="15.166cm" svg:viewBox="0 0 3811 1557" draw:points="0,0 3811,0 3811,1557 0,1557">
          <text:p/>
        </draw:polygon>
        <draw:line draw:style-name="gr537" draw:text-style-name="P2" draw:layer="layout" svg:x1="21.321cm" svg:y1="4.589cm" svg:x2="21.321cm" svg:y2="16.74cm">
          <text:p/>
        </draw:line>
        <draw:line draw:style-name="gr537" draw:text-style-name="P2" draw:layer="layout" svg:x1="25.723cm" svg:y1="4.589cm" svg:x2="25.723cm" svg:y2="16.74cm">
          <text:p/>
        </draw:line>
        <draw:line draw:style-name="gr537" draw:text-style-name="P2" draw:layer="layout" svg:x1="28.368cm" svg:y1="4.589cm" svg:x2="28.368cm" svg:y2="16.74cm">
          <text:p/>
        </draw:line>
        <draw:line draw:style-name="gr537" draw:text-style-name="P2" draw:layer="layout" svg:x1="17.025cm" svg:y1="5.284cm" svg:x2="32.195cm" svg:y2="5.284cm">
          <text:p/>
        </draw:line>
        <draw:line draw:style-name="gr537" draw:text-style-name="P2" draw:layer="layout" svg:x1="17.025cm" svg:y1="9.447cm" svg:x2="32.195cm" svg:y2="9.447cm">
          <text:p/>
        </draw:line>
        <draw:line draw:style-name="gr537" draw:text-style-name="P2" draw:layer="layout" svg:x1="17.025cm" svg:y1="11.872cm" svg:x2="32.195cm" svg:y2="11.872cm">
          <text:p/>
        </draw:line>
        <draw:line draw:style-name="gr537" draw:text-style-name="P2" draw:layer="layout" svg:x1="17.025cm" svg:y1="15.166cm" svg:x2="32.195cm" svg:y2="15.166cm">
          <text:p/>
        </draw:line>
        <draw:line draw:style-name="gr537" draw:text-style-name="P2" draw:layer="layout" svg:x1="17.043cm" svg:y1="4.589cm" svg:x2="17.043cm" svg:y2="16.74cm">
          <text:p/>
        </draw:line>
        <draw:line draw:style-name="gr537" draw:text-style-name="P2" draw:layer="layout" svg:x1="32.178cm" svg:y1="4.589cm" svg:x2="32.178cm" svg:y2="16.74cm">
          <text:p/>
        </draw:line>
        <draw:line draw:style-name="gr537" draw:text-style-name="P2" draw:layer="layout" svg:x1="17.025cm" svg:y1="4.607cm" svg:x2="32.195cm" svg:y2="4.607cm">
          <text:p/>
        </draw:line>
        <draw:line draw:style-name="gr537" draw:text-style-name="P2" draw:layer="layout" svg:x1="17.025cm" svg:y1="16.722cm" svg:x2="32.195cm" svg:y2="16.722cm">
          <text:p/>
        </draw:line>
        <draw:frame draw:style-name="gr535" draw:text-style-name="P99" draw:layer="layout" svg:width="2.114cm" svg:height="0.314cm" svg:x="10.065cm" svg:y="12.81cm">
          <draw:text-box>
            <text:p text:style-name="P3"><text:span text:style-name="T35">ETL &amp; SQL Lead</text:span></text:p>
          </draw:text-box>
        </draw:frame>
        <draw:frame draw:style-name="gr538" draw:text-style-name="P14" draw:layer="layout" svg:width="3.341cm" svg:height="0.399cm" svg:x="17.53cm" svg:y="4.762cm">
          <draw:text-box>
            <text:p text:style-name="P3"><text:span text:style-name="T39">Meetings &amp; Reports</text:span></text:p>
          </draw:text-box>
        </draw:frame>
        <draw:frame draw:style-name="gr539" draw:text-style-name="P14" draw:layer="layout" svg:width="1.345cm" svg:height="0.399cm" svg:x="22.854cm" svg:y="4.762cm">
          <draw:text-box>
            <text:p text:style-name="P3"><text:span text:style-name="T39">Content</text:span></text:p>
          </draw:text-box>
        </draw:frame>
        <draw:frame draw:style-name="gr540" draw:text-style-name="P14" draw:layer="layout" svg:width="1.109cm" svg:height="0.399cm" svg:x="26.494cm" svg:y="4.762cm">
          <draw:text-box>
            <text:p text:style-name="P3"><text:span text:style-name="T39">Owner</text:span></text:p>
          </draw:text-box>
        </draw:frame>
        <draw:frame draw:style-name="gr541" draw:text-style-name="P14" draw:layer="layout" svg:width="1.84cm" svg:height="0.399cm" svg:x="29.361cm" svg:y="4.762cm">
          <draw:text-box>
            <text:p text:style-name="P3"><text:span text:style-name="T39">Participant</text:span></text:p>
          </draw:text-box>
        </draw:frame>
        <draw:frame draw:style-name="gr542" draw:text-style-name="P216" draw:layer="layout" svg:width="2.539cm" svg:height="0.365cm" svg:x="17.302cm" svg:y="5.444cm">
          <draw:text-box>
            <text:p text:style-name="P3"><text:span text:style-name="T40">Monthly Steering </text:span></text:p>
          </draw:text-box>
        </draw:frame>
        <draw:frame draw:style-name="gr543" draw:text-style-name="P217" draw:layer="layout" svg:width="2.738cm" svg:height="0.361cm" svg:x="17.302cm" svg:y="5.885cm">
          <draw:text-box>
            <text:p text:style-name="P3"><text:span text:style-name="T41">Committee Project </text:span></text:p>
          </draw:text-box>
        </draw:frame>
        <draw:frame draw:style-name="gr544" draw:text-style-name="P217" draw:layer="layout" svg:width="1.147cm" svg:height="0.361cm" svg:x="17.302cm" svg:y="6.317cm">
          <draw:text-box>
            <text:p text:style-name="P3"><text:span text:style-name="T41">Meeting</text:span></text:p>
          </draw:text-box>
        </draw:frame>
        <draw:frame draw:style-name="gr545" draw:text-style-name="P216" draw:layer="layout" svg:width="0.322cm" svg:height="0.365cm" svg:x="21.582cm" svg:y="5.444cm">
          <draw:text-box>
            <text:p text:style-name="P3"><text:span text:style-name="T42">•</text:span></text:p>
          </draw:text-box>
        </draw:frame>
        <draw:frame draw:style-name="gr546" draw:text-style-name="P216" draw:layer="layout" svg:width="3.028cm" svg:height="0.365cm" svg:x="22.056cm" svg:y="5.444cm">
          <draw:text-box>
            <text:p text:style-name="P3"><text:span text:style-name="T40">Project overall status</text:span></text:p>
          </draw:text-box>
        </draw:frame>
        <draw:frame draw:style-name="gr547" draw:text-style-name="P217" draw:layer="layout" svg:width="0.321cm" svg:height="0.361cm" svg:x="21.582cm" svg:y="5.885cm">
          <draw:text-box>
            <text:p text:style-name="P3"><text:span text:style-name="T43">•</text:span></text:p>
          </draw:text-box>
        </draw:frame>
        <draw:frame draw:style-name="gr548" draw:text-style-name="P217" draw:layer="layout" svg:width="3.507cm" svg:height="0.361cm" svg:x="22.056cm" svg:y="5.885cm">
          <draw:text-box>
            <text:p text:style-name="P3"><text:span text:style-name="T41">Project overall schedule </text:span></text:p>
          </draw:text-box>
        </draw:frame>
        <draw:frame draw:style-name="gr549" draw:text-style-name="P217" draw:layer="layout" svg:width="0.842cm" svg:height="0.361cm" svg:x="22.056cm" svg:y="6.317cm">
          <draw:text-box>
            <text:p text:style-name="P3"><text:span text:style-name="T41">report</text:span></text:p>
          </draw:text-box>
        </draw:frame>
        <draw:frame draw:style-name="gr547" draw:text-style-name="P217" draw:layer="layout" svg:width="0.321cm" svg:height="0.361cm" svg:x="21.582cm" svg:y="6.749cm">
          <draw:text-box>
            <text:p text:style-name="P3"><text:span text:style-name="T43">•</text:span></text:p>
          </draw:text-box>
        </draw:frame>
        <draw:frame draw:style-name="gr550" draw:text-style-name="P217" draw:layer="layout" svg:width="2.863cm" svg:height="0.361cm" svg:x="22.056cm" svg:y="6.749cm">
          <draw:text-box>
            <text:p text:style-name="P3"><text:span text:style-name="T41">Key risks/issues for </text:span></text:p>
          </draw:text-box>
        </draw:frame>
        <draw:frame draw:style-name="gr551" draw:text-style-name="P216" draw:layer="layout" svg:width="3.536cm" svg:height="0.365cm" svg:x="22.056cm" svg:y="7.188cm">
          <draw:text-box>
            <text:p text:style-name="P3"><text:span text:style-name="T40">escalation and supports </text:span></text:p>
          </draw:text-box>
        </draw:frame>
        <draw:frame draw:style-name="gr552" draw:text-style-name="P217" draw:layer="layout" svg:width="1.076cm" svg:height="0.361cm" svg:x="22.056cm" svg:y="7.622cm">
          <draw:text-box>
            <text:p text:style-name="P3"><text:span text:style-name="T41">needed</text:span></text:p>
          </draw:text-box>
        </draw:frame>
        <draw:frame draw:style-name="gr547" draw:text-style-name="P217" draw:layer="layout" svg:width="0.321cm" svg:height="0.361cm" svg:x="21.582cm" svg:y="8.053cm">
          <draw:text-box>
            <text:p text:style-name="P3"><text:span text:style-name="T43">•</text:span></text:p>
          </draw:text-box>
        </draw:frame>
        <draw:frame draw:style-name="gr553" draw:text-style-name="P217" draw:layer="layout" svg:width="3.186cm" svg:height="0.361cm" svg:x="22.056cm" svg:y="8.053cm">
          <draw:text-box>
            <text:p text:style-name="P3"><text:span text:style-name="T41">Change management </text:span></text:p>
          </draw:text-box>
        </draw:frame>
        <draw:frame draw:style-name="gr554" draw:text-style-name="P217" draw:layer="layout" svg:width="0.932cm" svg:height="0.361cm" svg:x="22.056cm" svg:y="8.494cm">
          <draw:text-box>
            <text:p text:style-name="P3"><text:span text:style-name="T41">review</text:span></text:p>
          </draw:text-box>
        </draw:frame>
        <draw:frame draw:style-name="gr555" draw:text-style-name="P216" draw:layer="layout" svg:width="1.017cm" svg:height="0.365cm" svg:x="25.984cm" svg:y="5.444cm">
          <draw:text-box>
            <text:p text:style-name="P3"><text:span text:style-name="T40">Project</text:span></text:p>
          </draw:text-box>
        </draw:frame>
        <draw:frame draw:style-name="gr556" draw:text-style-name="P217" draw:layer="layout" svg:width="1.272cm" svg:height="0.361cm" svg:x="25.984cm" svg:y="5.885cm">
          <draw:text-box>
            <text:p text:style-name="P3"><text:span text:style-name="T41">Manager</text:span></text:p>
          </draw:text-box>
        </draw:frame>
        <draw:frame draw:style-name="gr557" draw:text-style-name="P217" draw:layer="layout" svg:width="1.253cm" svg:height="0.361cm" svg:x="25.984cm" svg:y="6.317cm">
          <draw:text-box>
            <text:p text:style-name="P3"><text:span text:style-name="T41">HK &amp; SZ</text:span></text:p>
          </draw:text-box>
        </draw:frame>
        <draw:frame draw:style-name="gr558" draw:text-style-name="P217" draw:layer="layout" svg:width="2.004cm" svg:height="0.361cm" svg:x="25.984cm" svg:y="6.749cm">
          <draw:text-box>
            <text:p text:style-name="P3"><text:span text:style-name="T41">Scrum Master</text:span></text:p>
          </draw:text-box>
        </draw:frame>
        <draw:frame draw:style-name="gr559" draw:text-style-name="P216" draw:layer="layout" svg:width="2.122cm" svg:height="0.365cm" svg:x="28.631cm" svg:y="5.444cm">
          <draw:text-box>
            <text:p text:style-name="P3"><text:span text:style-name="T40">Client SteerCo</text:span></text:p>
          </draw:text-box>
        </draw:frame>
        <draw:frame draw:style-name="gr560" draw:text-style-name="P217" draw:layer="layout" svg:width="2.595cm" svg:height="0.361cm" svg:x="28.631cm" svg:y="5.885cm">
          <draw:text-box>
            <text:p text:style-name="P3"><text:span text:style-name="T41">Program Manager</text:span></text:p>
          </draw:text-box>
        </draw:frame>
        <draw:frame draw:style-name="gr561" draw:text-style-name="P217" draw:layer="layout" svg:width="3.345cm" svg:height="0.361cm" svg:x="28.631cm" svg:y="6.317cm">
          <draw:text-box>
            <text:p text:style-name="P3"><text:span text:style-name="T41">HK &amp; SZ Scrum Master</text:span></text:p>
          </draw:text-box>
        </draw:frame>
        <draw:frame draw:style-name="gr562" draw:text-style-name="P217" draw:layer="layout" svg:width="3.453cm" svg:height="0.361cm" svg:x="17.302cm" svg:y="9.609cm">
          <draw:text-box>
            <text:p text:style-name="P3"><text:span text:style-name="T41">Monthly Project Review </text:span></text:p>
          </draw:text-box>
        </draw:frame>
        <draw:frame draw:style-name="gr544" draw:text-style-name="P217" draw:layer="layout" svg:width="1.147cm" svg:height="0.361cm" svg:x="17.302cm" svg:y="10.049cm">
          <draw:text-box>
            <text:p text:style-name="P3"><text:span text:style-name="T41">Meeting</text:span></text:p>
          </draw:text-box>
        </draw:frame>
        <draw:frame draw:style-name="gr547" draw:text-style-name="P217" draw:layer="layout" svg:width="0.321cm" svg:height="0.361cm" svg:x="21.582cm" svg:y="9.609cm">
          <draw:text-box>
            <text:p text:style-name="P3"><text:span text:style-name="T43">•</text:span></text:p>
          </draw:text-box>
        </draw:frame>
        <draw:frame draw:style-name="gr546" draw:text-style-name="P217" draw:layer="layout" svg:width="2.988cm" svg:height="0.361cm" svg:x="22.056cm" svg:y="9.609cm">
          <draw:text-box>
            <text:p text:style-name="P3"><text:span text:style-name="T41">Project overall status</text:span></text:p>
          </draw:text-box>
        </draw:frame>
        <draw:frame draw:style-name="gr547" draw:text-style-name="P217" draw:layer="layout" svg:width="0.321cm" svg:height="0.361cm" svg:x="21.582cm" svg:y="10.049cm">
          <draw:text-box>
            <text:p text:style-name="P3"><text:span text:style-name="T43">•</text:span></text:p>
          </draw:text-box>
        </draw:frame>
        <draw:frame draw:style-name="gr548" draw:text-style-name="P217" draw:layer="layout" svg:width="3.507cm" svg:height="0.361cm" svg:x="22.056cm" svg:y="10.049cm">
          <draw:text-box>
            <text:p text:style-name="P3"><text:span text:style-name="T41">Project overall schedule </text:span></text:p>
          </draw:text-box>
        </draw:frame>
        <draw:frame draw:style-name="gr549" draw:text-style-name="P217" draw:layer="layout" svg:width="0.842cm" svg:height="0.361cm" svg:x="22.056cm" svg:y="10.481cm">
          <draw:text-box>
            <text:p text:style-name="P3"><text:span text:style-name="T41">report</text:span></text:p>
          </draw:text-box>
        </draw:frame>
        <draw:frame draw:style-name="gr545" draw:text-style-name="P216" draw:layer="layout" svg:width="0.322cm" svg:height="0.365cm" svg:x="21.582cm" svg:y="10.912cm">
          <draw:text-box>
            <text:p text:style-name="P3"><text:span text:style-name="T42">•</text:span></text:p>
          </draw:text-box>
        </draw:frame>
        <draw:frame draw:style-name="gr563" draw:text-style-name="P216" draw:layer="layout" svg:width="3.064cm" svg:height="0.365cm" svg:x="22.056cm" svg:y="10.912cm">
          <draw:text-box>
            <text:p text:style-name="P3"><text:span text:style-name="T40">Key risks/issues and </text:span></text:p>
          </draw:text-box>
        </draw:frame>
        <draw:frame draw:style-name="gr564" draw:text-style-name="P217" draw:layer="layout" svg:width="2.399cm" svg:height="0.361cm" svg:x="22.056cm" svg:y="11.354cm">
          <draw:text-box>
            <text:p text:style-name="P3"><text:span text:style-name="T41">supports needed</text:span></text:p>
          </draw:text-box>
        </draw:frame>
        <draw:frame draw:style-name="gr557" draw:text-style-name="P217" draw:layer="layout" svg:width="1.253cm" svg:height="0.361cm" svg:x="25.984cm" svg:y="9.609cm">
          <draw:text-box>
            <text:p text:style-name="P3"><text:span text:style-name="T41">HK &amp; SZ</text:span></text:p>
          </draw:text-box>
        </draw:frame>
        <draw:frame draw:style-name="gr558" draw:text-style-name="P217" draw:layer="layout" svg:width="2.004cm" svg:height="0.361cm" svg:x="25.984cm" svg:y="10.049cm">
          <draw:text-box>
            <text:p text:style-name="P3"><text:span text:style-name="T41">Scrum Master</text:span></text:p>
          </draw:text-box>
        </draw:frame>
        <draw:frame draw:style-name="gr560" draw:text-style-name="P217" draw:layer="layout" svg:width="2.595cm" svg:height="0.361cm" svg:x="28.631cm" svg:y="9.609cm">
          <draw:text-box>
            <text:p text:style-name="P3"><text:span text:style-name="T41">Program Manager</text:span></text:p>
          </draw:text-box>
        </draw:frame>
        <draw:frame draw:style-name="gr561" draw:text-style-name="P217" draw:layer="layout" svg:width="3.345cm" svg:height="0.361cm" svg:x="28.631cm" svg:y="10.049cm">
          <draw:text-box>
            <text:p text:style-name="P3"><text:span text:style-name="T41">HK &amp; SZ Scrum Master</text:span></text:p>
          </draw:text-box>
        </draw:frame>
        <draw:frame draw:style-name="gr565" draw:text-style-name="P217" draw:layer="layout" svg:width="2.147cm" svg:height="0.361cm" svg:x="28.631cm" svg:y="10.481cm">
          <draw:text-box>
            <text:p text:style-name="P3"><text:span text:style-name="T41">HK Core Team</text:span></text:p>
          </draw:text-box>
        </draw:frame>
        <draw:frame draw:style-name="gr566" draw:text-style-name="P216" draw:layer="layout" svg:width="1.687cm" svg:height="0.365cm" svg:x="28.631cm" svg:y="10.912cm">
          <draw:text-box>
            <text:p text:style-name="P3"><text:span text:style-name="T40">SZ Leaders</text:span></text:p>
          </draw:text-box>
        </draw:frame>
        <draw:frame draw:style-name="gr567" draw:text-style-name="P217" draw:layer="layout" svg:width="3.435cm" svg:height="0.361cm" svg:x="17.302cm" svg:y="12.036cm">
          <draw:text-box>
            <text:p text:style-name="P3"><text:span text:style-name="T41">HK/SZ Bi-weekly Sprint </text:span></text:p>
          </draw:text-box>
        </draw:frame>
        <draw:frame draw:style-name="gr568" draw:text-style-name="P217" draw:layer="layout" svg:width="3.114cm" svg:height="0.361cm" svg:x="17.302cm" svg:y="12.476cm">
          <draw:text-box>
            <text:p text:style-name="P3"><text:span text:style-name="T41">Planning and Review </text:span></text:p>
          </draw:text-box>
        </draw:frame>
        <draw:frame draw:style-name="gr544" draw:text-style-name="P217" draw:layer="layout" svg:width="1.147cm" svg:height="0.361cm" svg:x="17.302cm" svg:y="12.908cm">
          <draw:text-box>
            <text:p text:style-name="P3"><text:span text:style-name="T41">Meeting</text:span></text:p>
          </draw:text-box>
        </draw:frame>
        <draw:frame draw:style-name="gr547" draw:text-style-name="P217" draw:layer="layout" svg:width="0.321cm" svg:height="0.361cm" svg:x="21.582cm" svg:y="12.036cm">
          <draw:text-box>
            <text:p text:style-name="P3"><text:span text:style-name="T43">•</text:span></text:p>
          </draw:text-box>
        </draw:frame>
        <draw:frame draw:style-name="gr569" draw:text-style-name="P217" draw:layer="layout" svg:width="1.557cm" svg:height="0.361cm" svg:x="22.056cm" svg:y="12.036cm">
          <draw:text-box>
            <text:p text:style-name="P3"><text:span text:style-name="T41">User story </text:span></text:p>
          </draw:text-box>
        </draw:frame>
        <draw:frame draw:style-name="gr570" draw:text-style-name="P217" draw:layer="layout" svg:width="2.166cm" svg:height="0.361cm" svg:x="22.056cm" svg:y="12.476cm">
          <draw:text-box>
            <text:p text:style-name="P3"><text:span text:style-name="T41">communication</text:span></text:p>
          </draw:text-box>
        </draw:frame>
        <draw:frame draw:style-name="gr547" draw:text-style-name="P217" draw:layer="layout" svg:width="0.321cm" svg:height="0.361cm" svg:x="21.582cm" svg:y="12.908cm">
          <draw:text-box>
            <text:p text:style-name="P3"><text:span text:style-name="T43">•</text:span></text:p>
          </draw:text-box>
        </draw:frame>
        <draw:frame draw:style-name="gr571" draw:text-style-name="P217" draw:layer="layout" svg:width="2.864cm" svg:height="0.361cm" svg:x="22.056cm" svg:y="12.908cm">
          <draw:text-box>
            <text:p text:style-name="P3"><text:span text:style-name="T41">Sprint planning and </text:span></text:p>
          </draw:text-box>
        </draw:frame>
        <draw:frame draw:style-name="gr567" draw:text-style-name="P216" draw:layer="layout" svg:width="3.48cm" svg:height="0.365cm" svg:x="22.056cm" svg:y="13.339cm">
          <draw:text-box>
            <text:p text:style-name="P3"><text:span text:style-name="T40">review, task assignment</text:span></text:p>
          </draw:text-box>
        </draw:frame>
        <draw:frame draw:style-name="gr547" draw:text-style-name="P217" draw:layer="layout" svg:width="0.321cm" svg:height="0.361cm" svg:x="21.582cm" svg:y="13.78cm">
          <draw:text-box>
            <text:p text:style-name="P3"><text:span text:style-name="T43">•</text:span></text:p>
          </draw:text-box>
        </draw:frame>
        <draw:frame draw:style-name="gr572" draw:text-style-name="P217" draw:layer="layout" svg:width="2.845cm" svg:height="0.361cm" svg:x="22.056cm" svg:y="13.78cm">
          <draw:text-box>
            <text:p text:style-name="P3"><text:span text:style-name="T41">Sprint output review</text:span></text:p>
          </draw:text-box>
        </draw:frame>
        <draw:frame draw:style-name="gr547" draw:text-style-name="P217" draw:layer="layout" svg:width="0.321cm" svg:height="0.361cm" svg:x="21.582cm" svg:y="14.212cm">
          <draw:text-box>
            <text:p text:style-name="P3"><text:span text:style-name="T43">•</text:span></text:p>
          </draw:text-box>
        </draw:frame>
        <draw:frame draw:style-name="gr562" draw:text-style-name="P217" draw:layer="layout" svg:width="3.453cm" svg:height="0.361cm" svg:x="22.056cm" svg:y="14.212cm">
          <draw:text-box>
            <text:p text:style-name="P3"><text:span text:style-name="T41">Sprint burn down review</text:span></text:p>
          </draw:text-box>
        </draw:frame>
        <draw:frame draw:style-name="gr547" draw:text-style-name="P217" draw:layer="layout" svg:width="0.321cm" svg:height="0.361cm" svg:x="21.582cm" svg:y="14.644cm">
          <draw:text-box>
            <text:p text:style-name="P3"><text:span text:style-name="T43">•</text:span></text:p>
          </draw:text-box>
        </draw:frame>
        <draw:frame draw:style-name="gr573" draw:text-style-name="P217" draw:layer="layout" svg:width="1.808cm" svg:height="0.361cm" svg:x="22.056cm" svg:y="14.644cm">
          <draw:text-box>
            <text:p text:style-name="P3"><text:span text:style-name="T41">Issues/Risks</text:span></text:p>
          </draw:text-box>
        </draw:frame>
        <draw:frame draw:style-name="gr557" draw:text-style-name="P217" draw:layer="layout" svg:width="1.253cm" svg:height="0.361cm" svg:x="25.984cm" svg:y="12.036cm">
          <draw:text-box>
            <text:p text:style-name="P3"><text:span text:style-name="T41">HK &amp; SZ</text:span></text:p>
          </draw:text-box>
        </draw:frame>
        <draw:frame draw:style-name="gr558" draw:text-style-name="P217" draw:layer="layout" svg:width="2.004cm" svg:height="0.361cm" svg:x="25.984cm" svg:y="12.476cm">
          <draw:text-box>
            <text:p text:style-name="P3"><text:span text:style-name="T41">Scrum Master</text:span></text:p>
          </draw:text-box>
        </draw:frame>
        <draw:frame draw:style-name="gr574" draw:text-style-name="P217" draw:layer="layout" svg:width="1.969cm" svg:height="0.361cm" svg:x="28.631cm" svg:y="12.036cm">
          <draw:text-box>
            <text:p text:style-name="P3"><text:span text:style-name="T41">HK core team</text:span></text:p>
          </draw:text-box>
        </draw:frame>
        <draw:frame draw:style-name="gr566" draw:text-style-name="P217" draw:layer="layout" svg:width="1.665cm" svg:height="0.361cm" svg:x="28.631cm" svg:y="12.476cm">
          <draw:text-box>
            <text:p text:style-name="P3"><text:span text:style-name="T41">SZ Leaders</text:span></text:p>
          </draw:text-box>
        </draw:frame>
        <draw:frame draw:style-name="gr575" draw:text-style-name="P217" draw:layer="layout" svg:width="2.559cm" svg:height="0.361cm" svg:x="28.631cm" svg:y="12.908cm">
          <draw:text-box>
            <text:p text:style-name="P3"><text:span text:style-name="T41">SZ core members</text:span></text:p>
          </draw:text-box>
        </draw:frame>
        <draw:frame draw:style-name="gr576" draw:text-style-name="P217" draw:layer="layout" svg:width="2.862cm" svg:height="0.361cm" svg:x="17.302cm" svg:y="15.331cm">
          <draw:text-box>
            <text:p text:style-name="P3"><text:span text:style-name="T41">HK/SZ Daily Scrum </text:span></text:p>
          </draw:text-box>
        </draw:frame>
        <draw:frame draw:style-name="gr544" draw:text-style-name="P217" draw:layer="layout" svg:width="1.147cm" svg:height="0.361cm" svg:x="17.302cm" svg:y="15.771cm">
          <draw:text-box>
            <text:p text:style-name="P3"><text:span text:style-name="T41">meeting</text:span></text:p>
          </draw:text-box>
        </draw:frame>
        <draw:frame draw:style-name="gr547" draw:text-style-name="P217" draw:layer="layout" svg:width="0.321cm" svg:height="0.361cm" svg:x="21.582cm" svg:y="15.331cm">
          <draw:text-box>
            <text:p text:style-name="P3"><text:span text:style-name="T43">•</text:span></text:p>
          </draw:text-box>
        </draw:frame>
        <draw:frame draw:style-name="gr577" draw:text-style-name="P217" draw:layer="layout" svg:width="2.434cm" svg:height="0.361cm" svg:x="22.056cm" svg:y="15.331cm">
          <draw:text-box>
            <text:p text:style-name="P3"><text:span text:style-name="T41">Task assignment</text:span></text:p>
          </draw:text-box>
        </draw:frame>
        <draw:frame draw:style-name="gr547" draw:text-style-name="P217" draw:layer="layout" svg:width="0.321cm" svg:height="0.361cm" svg:x="21.582cm" svg:y="15.771cm">
          <draw:text-box>
            <text:p text:style-name="P3"><text:span text:style-name="T43">•</text:span></text:p>
          </draw:text-box>
        </draw:frame>
        <draw:frame draw:style-name="gr578" draw:text-style-name="P217" draw:layer="layout" svg:width="1.718cm" svg:height="0.361cm" svg:x="22.056cm" svg:y="15.771cm">
          <draw:text-box>
            <text:p text:style-name="P3"><text:span text:style-name="T41">Task review</text:span></text:p>
          </draw:text-box>
        </draw:frame>
        <draw:frame draw:style-name="gr547" draw:text-style-name="P217" draw:layer="layout" svg:width="0.321cm" svg:height="0.361cm" svg:x="21.582cm" svg:y="16.203cm">
          <draw:text-box>
            <text:p text:style-name="P3"><text:span text:style-name="T43">•</text:span></text:p>
          </draw:text-box>
        </draw:frame>
        <draw:frame draw:style-name="gr579" draw:text-style-name="P217" draw:layer="layout" svg:width="1.736cm" svg:height="0.361cm" svg:x="22.056cm" svg:y="16.203cm">
          <draw:text-box>
            <text:p text:style-name="P3"><text:span text:style-name="T41">Tech review</text:span></text:p>
          </draw:text-box>
        </draw:frame>
        <draw:frame draw:style-name="gr565" draw:text-style-name="P217" draw:layer="layout" svg:width="2.147cm" svg:height="0.361cm" svg:x="25.984cm" svg:y="15.331cm">
          <draw:text-box>
            <text:p text:style-name="P3"><text:span text:style-name="T41">HK/ODC team </text:span></text:p>
          </draw:text-box>
        </draw:frame>
        <draw:frame draw:style-name="gr580" draw:text-style-name="P217" draw:layer="layout" svg:width="1.057cm" svg:height="0.361cm" svg:x="25.984cm" svg:y="15.771cm">
          <draw:text-box>
            <text:p text:style-name="P3"><text:span text:style-name="T41">leaders</text:span></text:p>
          </draw:text-box>
        </draw:frame>
        <draw:frame draw:style-name="gr581" draw:text-style-name="P217" draw:layer="layout" svg:width="2.29cm" svg:height="0.361cm" svg:x="28.631cm" svg:y="15.331cm">
          <draw:text-box>
            <text:p text:style-name="P3"><text:span text:style-name="T41">All HK/SZ team </text:span></text:p>
          </draw:text-box>
        </draw:frame>
        <draw:frame draw:style-name="gr582" draw:text-style-name="P217" draw:layer="layout" svg:width="1.343cm" svg:height="0.361cm" svg:x="28.631cm" svg:y="15.771cm">
          <draw:text-box>
            <text:p text:style-name="P3"><text:span text:style-name="T41">members</text:span></text:p>
          </draw:text-box>
        </draw:frame>
        <draw:polygon draw:style-name="gr583" draw:text-style-name="P2" draw:layer="layout" svg:width="2.76cm" svg:height="10.973cm" svg:x="1.494cm" svg:y="4.652cm" svg:viewBox="0 0 2761 10974" draw:points="0,0 2761,0 2761,10974 0,10974">
          <text:p/>
        </draw:polygon>
        <draw:frame draw:style-name="gr584" draw:text-style-name="P99" draw:layer="layout" svg:width="1.214cm" svg:height="0.314cm" svg:x="6.176cm" svg:y="12.81cm">
          <draw:text-box>
            <text:p text:style-name="P3"><text:span text:style-name="T34">ETL Lead</text:span></text:p>
          </draw:text-box>
        </draw:frame>
        <draw:path draw:style-name="gr150" draw:text-style-name="P101" draw:layer="layout" svg:width="2.903cm" svg:height="0.262cm" svg:x="7.285cm" svg:y="6.993cm" svg:viewBox="0 0 2904 263" svg:d="M271 89l133 1h129l126 2h60l59 1 58 1 56 1h54l52 1 50 1 48 1 45 1 43 1 40 1 38 1 34 1 32 1 28 1 24 2 22 1 18 1 15 1 10 1 8 2c2 0 3 1 4 1l3 1v1h3l9 1 14 1 17 2 21 1 25 1 28 1 31 1 35 1 37 1 40 1 43 1 45 1 48 1 49 1 53 1h53l56 1 58 1 59 1h61l125 1 130 1 132 1h59v-88l213 106-213 107v-89h-59l-133-2h-129l-125-2h-61l-59-1-58-1h-56l-54-1-52-1-50-1-48-1-45-1-43-1-40-1-37-1-35-1-32-1-28-1-25-1-21-2-19-1-14-1-12-1-6-1c-1-1-3-1-4-2l-2-1h-1l-2-1-10-1-13-1-18-1-21-1-25-1-27-1-32-1-34-2-37-1-41-1-42-1-46-1-48-1-49-1-52-1h-54l-56-1-58-1-59-1h-61l-125-1-130-1-132-1h-59l-1 89-211-107 212-106v89z">
          <text:p/>
        </draw:path>
        <draw:path draw:style-name="gr585" draw:text-style-name="P218" draw:layer="layout" svg:width="3.137cm" svg:height="0.468cm" svg:x="7.141cm" svg:y="8.586cm" svg:viewBox="0 0 3138 469" svg:d="M293 379l144-3 140-5 136-6 66-3 64-4 63-4 60-4 59-4 56-4 54-5 52-5 49-5 46-5 44-5 40-5 38-6 34-6 31-6 27-6 24-6 20-6 16-6 13-7c2-1 3-2 4-3l6-6c2-2 4-4 5-6l2-6 1-3 2-1 10-5 12-5 19-6 22-6 26-5 30-6 33-6 37-5 40-6 43-5 47-5 48-5 52-5 53-4 56-5 59-4 60-4 62-4 64-3 66-4 135-6 140-4 143-4 81-1v88l211-107-212-106v90l-81 1-143 3-140 5-136 6-65 3-65 4-62 4-60 4-59 4-57 4-53 5-52 5-49 5-47 5-44 6-40 5-38 5-34 6-31 6-27 6-24 6-20 7-17 6-12 6c-1 1-2 2-3 3l-7 6c-2 2-3 4-4 7l-3 6-1 2-2 2-7 4-14 5-18 6-23 6-26 6-30 5-33 6-37 5-40 6-43 5-47 5-48 5-52 5-54 5-56 4-58 4-61 4-62 4-64 4-65 3-136 6-140 4-143 4-81 1-1-88-211 107 213 105-1-89z">
          <text:p/>
        </draw:path>
        <draw:path draw:style-name="gr585" draw:text-style-name="P218" draw:layer="layout" svg:width="3.163cm" svg:height="1.446cm" svg:x="7.141cm" svg:y="8.846cm" svg:viewBox="0 0 3164 1447" svg:d="M222 89l74 6 74 8 72 9 142 23 137 28 68 17 65 17 63 19 61 19 60 21 56 21 55 23 53 24 50 24 47 25 44 26 42 26 38 27 34 28 32 28 28 29 24 31 20 30 17 31 12 31 7 31c0 1 1 2 1 3l2 29 2 28 7 28 10 27 14 27 19 27 22 27 26 27 30 27 34 26 36 26 40 26 43 25 46 25 49 23 52 23 54 23 56 21 58 20 61 20 62 18 64 17 66 16 136 28 140 23 71 9 73 8 72 6h10l3-88 208 113-215 98 3-88h-12l-73-6-73-8-73-9-141-23-138-29-66-16-65-17-63-19-62-19-59-21-57-22-55-22-52-24-50-24-47-25-45-26-41-27-38-27-35-28-32-29-28-29-24-29-21-31-16-31-12-31-6-29c-1-1-1-2-1-3l-2-29-2-28-6-26-10-27-14-27-19-28-22-27-26-28-30-27-34-27-36-26-41-26-43-25-45-25-49-23-52-24-54-22-56-21-59-20-60-20-62-18-65-17-66-16-136-28-140-23-72-9-72-8-73-6h-10l-3 88-208-113 215-99-3 89z">
          <text:p/>
        </draw:path>
        <draw:path draw:style-name="gr322" draw:text-style-name="P104" draw:layer="layout" svg:width="3.237cm" svg:height="1.271cm" svg:x="7.158cm" svg:y="10.459cm" svg:viewBox="0 0 3238 1272" svg:d="M410 97l201 15 99 9 97 11 96 11 95 13 92 14 90 15 87 16 85 17 82 17 79 19 76 19 72 21 69 20 65 22 61 23 57 23 53 23 48 24 43 24 39 25 33 25 28 26 23 27c1 1 1 1 2 2l15 25c0 1 1 2 1 3l10 25c0 1 0 2 1 3l2 12 1 16 2 25 4 23 7 23 10 24 11 23 15 23 17 23 20 23 21 23 25 22 26 22 28 22 30 20 32 21 33 20 36 19 76 35 80 33 85 28 89 24 92 20 77 9 6-86 204 120-219 91 6-90-81-10-94-20-91-24-87-30-83-33-77-36-36-20-35-21-33-21-32-21-29-23-27-23-26-24-23-24-21-25-19-25-16-26-13-26-11-27-8-27-5-27-1-25-1-11-2-12 1 3-9-23-15-24-18-22-25-23-32-24-36-24-42-23-46-24-52-23-56-22-60-22-64-21-68-21-72-20-75-20-78-18-82-18-84-17-87-16-89-14-92-14-94-13-95-11-97-11-99-9-199-15-198-7-1 87-210-109 213-103-1 89z">
          <text:p/>
        </draw:path>
        <draw:polygon draw:style-name="gr322" draw:text-style-name="P104" draw:layer="layout" svg:width="3.118cm" svg:height="2.058cm" svg:x="7.158cm" svg:y="8.593cm" svg:viewBox="0 0 3119 2059" draw:points="244,1966 305,1955 364,1941 423,1925 481,1906 538,1886 594,1863 650,1839 703,1813 756,1785 806,1756 855,1725 902,1692 947,1658 990,1623 1031,1586 1070,1549 1106,1510 1140,1470 1171,1429 1200,1388 1226,1346 1248,1303 1268,1259 1284,1215 1297,1171 1307,1125 1312,1081 1314,1035 1317,991 1325,950 1337,908 1354,867 1375,825 1402,784 1432,743 1467,702 1505,661 1548,622 1594,583 1644,546 1697,509 1753,473 1813,439 1875,406 1940,374 2007,343 2077,314 2148,287 2222,261 2298,237 2376,215 2454,195 2535,177 2616,161 2698,148 2782,136 2866,127 2909,124 2912,212 3119,98 2904,0 2907,89 2862,92 2777,101 2693,113 2610,126 2527,142 2446,161 2366,181 2287,203 2211,228 2136,254 2063,282 1992,311 1924,342 1858,374 1795,408 1734,444 1677,480 1622,518 1571,556 1524,596 1480,637 1440,679 1404,722 1372,765 1344,809 1322,853 1303,898 1290,944 1282,989 1279,1034 1277,1076 1272,1118 1263,1161 1251,1203 1236,1245 1217,1286 1196,1327 1171,1368 1143,1408 1113,1447 1080,1486 1045,1523 1008,1560 968,1595 926,1630 882,1663 836,1695 788,1725 739,1754 688,1781 635,1807 581,1831 526,1853 470,1873 414,1891 356,1907 298,1920 240,1932 210,1935 203,1848 0,1970 219,2059 212,1970">
          <text:p/>
        </draw:polygon>
        <draw:frame draw:style-name="gr586" draw:text-style-name="P105" draw:layer="layout" svg:width="1.296cm" svg:height="0.475cm" svg:x="2.272cm" svg:y="3.974cm">
          <draw:text-box>
            <text:p text:style-name="P3"><text:span text:style-name="T44">Client </text:span></text:p>
          </draw:text-box>
        </draw:frame>
        <draw:path draw:style-name="gr150" draw:text-style-name="P101" draw:layer="layout" svg:width="3.239cm" svg:height="0.246cm" svg:x="7.353cm" svg:y="13.902cm" svg:viewBox="0 0 3240 247" svg:d="M302 88l148 1h145l139 1 69 1h66 65l62 2h60l58 1h56l53 1 51 1h48l44 1 42 1 38 1h35l32 1 28 1 24 1h19l17 1 11 1 8 1c1 0 3 0 4 1l2 1h1 5l10 1 16 1 19 1 24 1h27l32 1 35 1 38 1h42l45 1 47 1 51 1h53l56 1h58l60 1h62l65 1h66l68 1 140 1h144l148 1h90v-88l212 106-212 106v-89h-90l-148-1h-145l-140-1h-68l-66-1h-64l-62-1h-61l-58-1-55-1h-54l-50-1-48-1h-45l-42-1-38-1-35-1h-31l-28-1-24-1-20-1-16-1-13-1h-6c-2 0-3-1-4-1l-2-1h-1l-4-1-11-1h-16l-20-1-23-1-28-1h-31l-35-1-38-1-42-1-45-1h-48l-50-1h-53l-56-1-58-1h-60l-63-1-64-1h-66-69l-139-1-145-1h-148l-91-1v89l-211-106 211-106v88z">
          <text:p/>
        </draw:path>
        <draw:polygon draw:style-name="gr587" draw:text-style-name="P219" draw:layer="layout" svg:width="3.118cm" svg:height="3.524cm" svg:x="7.158cm" svg:y="8.605cm" svg:viewBox="0 0 3119 3525" draw:points="221,3436 295,3420 367,3399 439,3374 510,3344 580,3312 650,3275 717,3235 783,3192 847,3144 910,3095 971,3042 1029,2986 1086,2928 1140,2867 1192,2804 1241,2739 1287,2672 1330,2603 1371,2532 1408,2460 1443,2386 1473,2311 1500,2235 1523,2158 1542,2080 1558,2001 1569,1922 1576,1843 1578,1764 1580,1685 1587,1608 1598,1531 1613,1454 1632,1378 1654,1302 1681,1228 1711,1154 1744,1082 1780,1011 1820,941 1863,874 1909,808 1957,744 2008,682 2061,622 2116,565 2173,511 2233,459 2294,410 2358,364 2422,321 2488,282 2555,246 2624,214 2693,185 2763,160 2833,140 2904,124 2911,124 2919,212 3119,86 2899,0 2907,89 2897,90 2824,106 2751,127 2679,152 2608,181 2539,215 2470,252 2402,292 2337,336 2272,382 2210,432 2149,485 2091,541 2034,599 1980,659 1929,723 1879,788 1833,855 1790,924 1749,995 1712,1067 1678,1141 1647,1216 1620,1292 1597,1369 1578,1447 1562,1526 1552,1605 1545,1684 1543,1763 1540,1840 1534,1918 1523,1995 1508,2072 1489,2148 1467,2223 1440,2298 1410,2371 1377,2444 1341,2515 1301,2584 1258,2652 1213,2718 1164,2782 1113,2844 1060,2904 1005,2961 948,3015 888,3067 827,3116 764,3162 699,3205 632,3244 565,3280 497,3312 428,3341 358,3365 287,3385 217,3401 209,3402 201,3314 0,3440 221,3525 212,3437">
          <text:p/>
        </draw:polygon>
        <draw:path draw:style-name="gr587" draw:text-style-name="P219" draw:layer="layout" svg:width="3.428cm" svg:height="0.247cm" svg:x="7.158cm" svg:y="11.904cm" svg:viewBox="0 0 3429 248" svg:d="M320 160h157l153-1 148-1h71l70-1h68l66-1h64l62-1 59-1 56-1h53l51-1 48-1h44l41-1 37-1 33-1 30-1h25l21-1 17-1 13-1 8-1c1 0 2 0 3-1l3-1h6l11-1 16-1 21-1 25-1 30-1h33l37-1 40-1 44-1h48l50-1 54-1 56-1h59l61-1h64l66-1h68l70-1h72l148-1 153-1h156l108-1v88l212-106-212-106v89l-108 1h-157l-153 1h-148l-71 1h-70l-68 1h-66l-64 1-62 1h-59l-56 1-54 1h-50l-47 1-44 1-41 1h-37l-34 1-29 1-25 1-21 1h-18l-12 2h-7c-2 0-3 1-4 1l-2 1h-1l-5 1-12 1-16 1h-21l-25 1-29 1-34 1-37 1h-40l-44 1-49 1h-50l-54 1-56 1-59 1h-61l-64 1h-66l-68 1h-70l-72 1h-148l-152 1h-157l-108 1v-89l-212 107 212 105v-88z">
          <text:p/>
        </draw:path>
        <draw:polygon draw:style-name="gr587" draw:text-style-name="P219" draw:layer="layout" svg:width="3.144cm" svg:height="2.034cm" svg:x="7.158cm" svg:y="10.103cm" svg:viewBox="0 0 3145 2035" draw:points="222,1946 295,1937 368,1926 440,1912 511,1897 582,1878 651,1858 719,1837 786,1813 850,1787 913,1759 974,1730 1033,1700 1090,1668 1145,1634 1197,1599 1247,1564 1294,1526 1338,1488 1379,1449 1417,1409 1451,1368 1483,1326 1510,1284 1534,1241 1554,1197 1570,1154 1581,1109 1588,1063 1591,1018 1593,975 1600,934 1610,892 1625,851 1644,810 1666,769 1692,729 1722,689 1755,650 1792,611 1832,573 1875,536 1921,500 1969,465 2020,431 2074,398 2129,367 2187,337 2247,308 2309,281 2373,256 2438,233 2505,211 2573,191 2642,173 2712,157 2783,144 2854,133 2927,124 2934,123 2939,211 3145,95 2928,0 2933,88 2922,89 2849,98 2776,109 2704,123 2633,139 2563,157 2494,177 2426,199 2360,223 2295,249 2232,276 2171,305 2112,336 2055,368 2000,402 1948,436 1899,472 1852,509 1807,548 1766,587 1729,627 1694,668 1663,710 1635,752 1611,796 1591,839 1576,883 1565,928 1558,973 1555,1016 1553,1058 1547,1100 1536,1142 1522,1183 1503,1224 1480,1265 1454,1305 1424,1345 1391,1385 1354,1424 1315,1462 1272,1499 1226,1535 1178,1570 1127,1604 1073,1637 1017,1669 959,1698 899,1727 837,1754 774,1779 708,1803 641,1824 573,1844 503,1862 434,1878 363,1891 291,1903 219,1911 210,1912 206,1824 0,1941 217,2035 212,1947">
          <text:p/>
        </draw:polygon>
        <draw:path draw:style-name="gr150" draw:text-style-name="P101" draw:layer="layout" svg:width="2.826cm" svg:height="0.246cm" svg:x="3.382cm" svg:y="5.207cm" svg:viewBox="0 0 2827 247" svg:d="M263 89h130l126 1 122 1 117 1 56 1h55l53 1h51l49 1 46 1h44l41 1 40 1 36 1h33l31 1 28 1 24 1h21l17 1 14 1 10 1 7 1c2 0 3 0 4 1h2l1 1h3l10 1 13 1 17 1h21l24 1 27 1 31 1h33l36 1 39 1 42 1h44l46 1 49 1h50l53 1h55l56 1 116 1 122 1h126l130 1h51v-90l212 108-212 105v-88h-51l-130-1h-126l-122-1-117-1-56-1h-55l-52-1h-51l-48-1h-47l-44-1-41-1-40-1h-36l-33-1-31-1-28-1h-24l-21-2h-17l-14-1-11-1-6-1c-2 0-3 0-4-1h-2l-4-1-9-1-14-1h-17l-20-1-24-1-28-1h-30l-34-1-36-1-39-1h-42l-44-1-46-1h-49l-50-1h-53l-55-2h-56l-117-1-122-1h-126l-130-1h-51v89l-212-107 212-106v89z">
          <text:p/>
        </draw:path>
        <draw:frame draw:style-name="gr2" draw:text-style-name="P2" draw:layer="layout" svg:width="1.142cm" svg:height="1.083cm" svg:x="6.206cm" svg:y="8.289cm">
          <draw:image xlink:href="Pictures/10000001000000630000005E025859FE.png" xlink:type="simple" xlink:show="embed" xlink:actuate="onLoad" draw:mime-type="image/png">
            <text:p/>
          </draw:image>
        </draw:frame>
        <draw:frame draw:style-name="gr2" draw:text-style-name="P2" draw:layer="layout" svg:width="1.142cm" svg:height="0.905cm" svg:x="10.583cm" svg:y="9.813cm">
          <draw:image xlink:href="Pictures/10000001000000630000004EF963BFDE.png" xlink:type="simple" xlink:show="embed" xlink:actuate="onLoad" draw:mime-type="image/png">
            <text:p/>
          </draw:image>
        </draw:frame>
        <draw:frame draw:style-name="gr2" draw:text-style-name="P2" draw:layer="layout" svg:width="1.142cm" svg:height="1.074cm" svg:x="6.206cm" svg:y="11.464cm">
          <draw:image xlink:href="Pictures/10000001000000630000005D80A917C9.png" xlink:type="simple" xlink:show="embed" xlink:actuate="onLoad" draw:mime-type="image/png">
            <text:p/>
          </draw:image>
        </draw:frame>
        <draw:frame draw:style-name="gr2" draw:text-style-name="P2" draw:layer="layout" svg:width="1.142cm" svg:height="1.201cm" svg:x="6.206cm" svg:y="13.403cm">
          <draw:image xlink:href="Pictures/100000010000006300000068E733001D.png" xlink:type="simple" xlink:show="embed" xlink:actuate="onLoad" draw:mime-type="image/png">
            <text:p/>
          </draw:image>
        </draw:frame>
        <draw:frame draw:style-name="gr2" draw:text-style-name="P2" draw:layer="layout" svg:width="1.015cm" svg:height="1.015cm" svg:x="6.265cm" svg:y="6.587cm">
          <draw:image xlink:href="Pictures/10000000000000580000005890F3241F.png" xlink:type="simple" xlink:show="embed" xlink:actuate="onLoad" draw:mime-type="image/png">
            <text:p/>
          </draw:image>
        </draw:frame>
        <draw:frame draw:style-name="gr2" draw:text-style-name="P2" draw:layer="layout" svg:width="1.015cm" svg:height="1.074cm" svg:x="6.265cm" svg:y="10.033cm">
          <draw:image xlink:href="Pictures/10000001000000580000005DAFEBAFA7.png" xlink:type="simple" xlink:show="embed" xlink:actuate="onLoad" draw:mime-type="image/png">
            <text:p/>
          </draw:image>
        </draw:frame>
        <draw:frame draw:style-name="gr2" draw:text-style-name="P2" draw:layer="layout" svg:width="1.015cm" svg:height="0.973cm" svg:x="2.362cm" svg:y="6.917cm">
          <draw:image xlink:href="Pictures/1000000000000058000000543A51F688.png" xlink:type="simple" xlink:show="embed" xlink:actuate="onLoad" draw:mime-type="image/png">
            <text:p/>
          </draw:image>
        </draw:frame>
        <draw:frame draw:style-name="gr2" draw:text-style-name="P2" draw:layer="layout" svg:width="1.015cm" svg:height="0.964cm" svg:x="2.362cm" svg:y="4.826cm">
          <draw:image xlink:href="Pictures/100000010000005800000054404C21DA.png" xlink:type="simple" xlink:show="embed" xlink:actuate="onLoad" draw:mime-type="image/png">
            <text:p/>
          </draw:image>
        </draw:frame>
        <draw:frame draw:style-name="gr2" draw:text-style-name="P2" draw:layer="layout" svg:width="1.142cm" svg:height="1.083cm" svg:x="10.583cm" svg:y="8.069cm">
          <draw:image xlink:href="Pictures/10000001000000630000005E025859FE.png" xlink:type="simple" xlink:show="embed" xlink:actuate="onLoad" draw:mime-type="image/png">
            <text:p/>
          </draw:image>
        </draw:frame>
        <draw:frame draw:style-name="gr2" draw:text-style-name="P2" draw:layer="layout" svg:width="1.142cm" svg:height="1.074cm" svg:x="10.583cm" svg:y="11.464cm">
          <draw:image xlink:href="Pictures/10000001000000630000005D80A917C9.png" xlink:type="simple" xlink:show="embed" xlink:actuate="onLoad" draw:mime-type="image/png">
            <text:p/>
          </draw:image>
        </draw:frame>
        <draw:frame draw:style-name="gr2" draw:text-style-name="P2" draw:layer="layout" svg:width="1.269cm" svg:height="1.269cm" svg:x="6.206cm" svg:y="4.674cm">
          <draw:image xlink:href="Pictures/100000010000006E0000006E5A050D2A.png" xlink:type="simple" xlink:show="embed" xlink:actuate="onLoad" draw:mime-type="image/png">
            <text:p/>
          </draw:image>
        </draw:frame>
        <draw:frame draw:style-name="gr2" draw:text-style-name="P2" draw:layer="layout" svg:width="1.142cm" svg:height="1.201cm" svg:x="10.583cm" svg:y="13.403cm">
          <draw:image xlink:href="Pictures/100000010000006300000068E733001D.png" xlink:type="simple" xlink:show="embed" xlink:actuate="onLoad" draw:mime-type="image/png">
            <text:p/>
          </draw:image>
        </draw:frame>
        <draw:frame draw:style-name="gr2" draw:text-style-name="P2" draw:layer="layout" svg:width="1.269cm" svg:height="1.108cm" svg:x="13.978cm" svg:y="6.562cm">
          <draw:image xlink:href="Pictures/100000000000006E0000005FC01015FA.jpg" xlink:type="simple" xlink:show="embed" xlink:actuate="onLoad" draw:mime-type="image/jpeg">
            <text:p/>
          </draw:image>
        </draw:frame>
        <draw:frame draw:style-name="gr2" draw:text-style-name="P2" draw:layer="layout" svg:width="1.269cm" svg:height="1.108cm" svg:x="13.978cm" svg:y="8.797cm">
          <draw:image xlink:href="Pictures/100000000000006E0000005FC01015FA.jpg" xlink:type="simple" xlink:show="embed" xlink:actuate="onLoad" draw:mime-type="image/jpeg">
            <text:p/>
          </draw:image>
        </draw:frame>
        <draw:frame draw:style-name="gr2" draw:text-style-name="P2" draw:layer="layout" svg:width="1.269cm" svg:height="1.108cm" svg:x="13.978cm" svg:y="11.091cm">
          <draw:image xlink:href="Pictures/100000000000006E0000005FC01015FA.jpg" xlink:type="simple" xlink:show="embed" xlink:actuate="onLoad" draw:mime-type="image/jpeg">
            <text:p/>
          </draw:image>
        </draw:frame>
        <draw:frame draw:style-name="gr2" draw:text-style-name="P2" draw:layer="layout" svg:width="1.523cm" svg:height="1.523cm" svg:x="13.851cm" svg:y="13.089cm">
          <draw:image xlink:href="Pictures/100000010000008400000084E24670FD.png" xlink:type="simple" xlink:show="embed" xlink:actuate="onLoad" draw:mime-type="image/png">
            <text:p/>
          </draw:image>
        </draw:frame>
        <draw:frame draw:style-name="gr536" draw:text-style-name="P99" draw:layer="layout" svg:width="3.046cm" svg:height="0.314cm" svg:x="5.613cm" svg:y="14.859cm">
          <draw:text-box>
            <text:p text:style-name="P3"><text:span text:style-name="T34">Quality <text:s/>Assurance Lead</text:span></text:p>
          </draw:text-box>
        </draw:frame>
        <draw:frame draw:style-name="gr2" draw:text-style-name="P2" draw:layer="layout" svg:width="1.015cm" svg:height="0.964cm" svg:x="2.286cm" svg:y="10.82cm">
          <draw:image xlink:href="Pictures/1000000000000058000000543A51F688.png" xlink:type="simple" xlink:show="embed" xlink:actuate="onLoad" draw:mime-type="image/png">
            <text:p/>
          </draw:image>
        </draw:frame>
        <draw:frame draw:style-name="gr2" draw:text-style-name="P2" draw:layer="layout" svg:width="1.142cm" svg:height="1.083cm" svg:x="10.583cm" svg:y="6.308cm">
          <draw:image xlink:href="Pictures/10000001000000630000005E025859FE.png" xlink:type="simple" xlink:show="embed" xlink:actuate="onLoad" draw:mime-type="image/png">
            <text:p/>
          </draw:image>
        </draw:frame>
        <draw:frame draw:style-name="gr588" draw:text-style-name="P99" draw:layer="layout" svg:width="1.803cm" svg:height="0.314cm" svg:x="1.871cm" svg:y="12.062cm">
          <draw:text-box>
            <text:p text:style-name="P3"><text:span text:style-name="T33">Business User</text:span></text:p>
          </draw:text-box>
        </draw:frame>
        <draw:frame draw:style-name="gr589" draw:text-style-name="P99" draw:layer="layout" svg:width="2.487cm" svg:height="0.314cm" svg:x="9.825cm" svg:y="7.666cm">
          <draw:text-box>
            <text:p text:style-name="P3"><text:span text:style-name="T35">Business Unit <text:s/>Lead</text:span></text:p>
          </draw:text-box>
        </draw:frame>
        <draw:frame draw:style-name="gr2" draw:text-style-name="P2" draw:layer="layout" svg:width="1.015cm" svg:height="0.973cm" svg:x="2.337cm" svg:y="8.915cm">
          <draw:image xlink:href="Pictures/1000000000000058000000543A51F688.png" xlink:type="simple" xlink:show="embed" xlink:actuate="onLoad" draw:mime-type="image/png">
            <text:p/>
          </draw:image>
        </draw:frame>
        <draw:polygon draw:style-name="gr200" draw:text-style-name="P108" draw:layer="layout" svg:width="0.015cm" svg:height="0.033cm" svg:x="4.047cm" svg:y="10.253cm" svg:viewBox="0 0 16 34" draw:points="0,34 0,0 16,34">
          <text:p/>
        </draw:polygon>
        <draw:polygon draw:style-name="gr201" draw:text-style-name="P109" draw:layer="layout" svg:width="0.031cm" svg:height="0.066cm" svg:x="4.047cm" svg:y="10.22cm" svg:viewBox="0 0 32 67" draw:points="15,67 0,33 0,0 32,67">
          <text:p/>
        </draw:polygon>
        <draw:polygon draw:style-name="gr56" draw:text-style-name="P17" draw:layer="layout" svg:width="0.046cm" svg:height="0.099cm" svg:x="4.047cm" svg:y="10.187cm" svg:viewBox="0 0 47 100" draw:points="32,100 0,33 0,0 47,100">
          <text:p/>
        </draw:polygon>
        <draw:polygon draw:style-name="gr202" draw:text-style-name="P110" draw:layer="layout" svg:width="0.062cm" svg:height="0.133cm" svg:x="4.047cm" svg:y="10.153cm" svg:viewBox="0 0 63 134" draw:points="47,134 0,35 0,0 63,134">
          <text:p/>
        </draw:polygon>
        <draw:polygon draw:style-name="gr59" draw:text-style-name="P20" draw:layer="layout" svg:width="0.078cm" svg:height="0.166cm" svg:x="4.047cm" svg:y="10.12cm" svg:viewBox="0 0 79 167" draw:points="63,167 0,33 0,0 79,167">
          <text:p/>
        </draw:polygon>
        <draw:polygon draw:style-name="gr60" draw:text-style-name="P21" draw:layer="layout" svg:width="0.093cm" svg:height="0.199cm" svg:x="4.047cm" svg:y="10.087cm" svg:viewBox="0 0 94 200" draw:points="78,200 0,33 0,0 94,200">
          <text:p/>
        </draw:polygon>
        <draw:polygon draw:style-name="gr61" draw:text-style-name="P22" draw:layer="layout" svg:width="0.109cm" svg:height="0.233cm" svg:x="4.047cm" svg:y="10.053cm" svg:viewBox="0 0 110 234" draw:points="94,234 0,34 0,0 110,234">
          <text:p/>
        </draw:polygon>
        <draw:polygon draw:style-name="gr63" draw:text-style-name="P24" draw:layer="layout" svg:width="0.124cm" svg:height="0.266cm" svg:x="4.047cm" svg:y="10.02cm" svg:viewBox="0 0 125 267" draw:points="110,267 0,33 0,0 125,267">
          <text:p/>
        </draw:polygon>
        <draw:polygon draw:style-name="gr203" draw:text-style-name="P111" draw:layer="layout" svg:width="0.14cm" svg:height="0.3cm" svg:x="4.047cm" svg:y="9.986cm" svg:viewBox="0 0 141 301" draw:points="125,301 0,34 0,0 141,301">
          <text:p/>
        </draw:polygon>
        <draw:polygon draw:style-name="gr64" draw:text-style-name="P25" draw:layer="layout" svg:width="0.156cm" svg:height="0.333cm" svg:x="4.047cm" svg:y="9.953cm" svg:viewBox="0 0 157 334" draw:points="141,334 0,33 0,0 157,334">
          <text:p/>
        </draw:polygon>
        <draw:polygon draw:style-name="gr65" draw:text-style-name="P26" draw:layer="layout" svg:width="0.171cm" svg:height="0.366cm" svg:x="4.047cm" svg:y="9.92cm" svg:viewBox="0 0 172 367" draw:points="157,367 0,33 0,0 172,367">
          <text:p/>
        </draw:polygon>
        <draw:polygon draw:style-name="gr66" draw:text-style-name="P27" draw:layer="layout" svg:width="0.187cm" svg:height="0.4cm" svg:x="4.047cm" svg:y="9.886cm" svg:viewBox="0 0 188 401" draw:points="172,401 0,34 0,0 188,401">
          <text:p/>
        </draw:polygon>
        <draw:polygon draw:style-name="gr68" draw:text-style-name="P29" draw:layer="layout" svg:width="0.203cm" svg:height="0.433cm" svg:x="4.047cm" svg:y="9.853cm" svg:viewBox="0 0 204 434" draw:points="188,434 0,33 0,0 204,434">
          <text:p/>
        </draw:polygon>
        <draw:polygon draw:style-name="gr70" draw:text-style-name="P31" draw:layer="layout" svg:width="0.218cm" svg:height="0.466cm" svg:x="4.047cm" svg:y="9.82cm" svg:viewBox="0 0 219 467" draw:points="203,467 0,33 0,0 219,467">
          <text:p/>
        </draw:polygon>
        <draw:polygon draw:style-name="gr71" draw:text-style-name="P32" draw:layer="layout" svg:width="0.234cm" svg:height="0.5cm" svg:x="4.047cm" svg:y="9.786cm" svg:viewBox="0 0 235 501" draw:points="219,501 0,34 0,0 235,501">
          <text:p/>
        </draw:polygon>
        <draw:path draw:style-name="gr73" draw:text-style-name="P34" draw:layer="layout" svg:width="0.499cm" svg:height="1.067cm" svg:x="4.047cm" svg:y="9.753cm" svg:viewBox="0 0 500 1068" svg:d="M500 1068zM235 534l-235-501v-33l250 534z">
          <text:p/>
        </draw:path>
        <draw:path draw:style-name="gr74" draw:text-style-name="P35" draw:layer="layout" svg:width="0.507cm" svg:height="1.1cm" svg:x="4.047cm" svg:y="9.72cm" svg:viewBox="0 0 508 1101" svg:d="M500 1068l8 16-8 17zM249 566l-249-533v-33l266 566z">
          <text:p/>
        </draw:path>
        <draw:path draw:style-name="gr75" draw:text-style-name="P36" draw:layer="layout" svg:width="0.515cm" svg:height="1.117cm" svg:x="4.047cm" svg:y="9.686cm" svg:viewBox="0 0 516 1118" svg:d="M500 1068l16 34-8 16-8-16zM265 600l-265-566v-34l281 600z">
          <text:p/>
        </draw:path>
        <draw:path draw:style-name="gr76" draw:text-style-name="P37" draw:layer="layout" svg:width="0.523cm" svg:height="1.134cm" svg:x="4.047cm" svg:y="9.653cm" svg:viewBox="0 0 524 1135" svg:d="M500 1067l24 51-8 17-16-35zM281 633l-281-600v-33l296 633z">
          <text:p/>
        </draw:path>
        <draw:path draw:style-name="gr77" draw:text-style-name="P38" draw:layer="layout" svg:width="0.53cm" svg:height="1.15cm" svg:x="4.047cm" svg:y="9.62cm" svg:viewBox="0 0 531 1151" svg:d="M500 1068l31 66-7 17-24-50zM296 667l-296-634v-33l312 667z">
          <text:p/>
        </draw:path>
        <draw:path draw:style-name="gr78" draw:text-style-name="P39" draw:layer="layout" svg:width="0.538cm" svg:height="1.167cm" svg:x="4.047cm" svg:y="9.586cm" svg:viewBox="0 0 539 1168" svg:d="M499 1068l40 84-8 16-32-66zM312 701l-312-667v-34l327 701z">
          <text:p/>
        </draw:path>
        <draw:path draw:style-name="gr205" draw:text-style-name="P113" draw:layer="layout" svg:width="0.546cm" svg:height="1.184cm" svg:x="4.047cm" svg:y="9.553cm" svg:viewBox="0 0 547 1185" svg:d="M500 1068l47 100-8 17-39-84zM328 734l-328-701v-33l344 734z">
          <text:p/>
        </draw:path>
        <draw:path draw:style-name="gr79" draw:text-style-name="P40" draw:layer="layout" svg:width="0.554cm" svg:height="1.2cm" svg:x="4.047cm" svg:y="9.52cm" svg:viewBox="0 0 555 1201" svg:d="M500 1068l55 116-8 17-47-100zM344 767l-344-734v-33l360 767z">
          <text:p/>
        </draw:path>
        <draw:path draw:style-name="gr206" draw:text-style-name="P114" draw:layer="layout" svg:width="0.562cm" svg:height="1.217cm" svg:x="4.047cm" svg:y="9.486cm" svg:viewBox="0 0 563 1218" svg:d="M500 1068l63 134-8 16-55-116zM360 800l-360-766v-34l375 800z">
          <text:p/>
        </draw:path>
        <draw:path draw:style-name="gr80" draw:text-style-name="P41" draw:layer="layout" svg:width="0.569cm" svg:height="1.234cm" svg:x="4.047cm" svg:y="9.453cm" svg:viewBox="0 0 570 1235" svg:d="M500 1068l70 150-7 17-63-134zM375 833l-375-800v-33l391 833z">
          <text:p/>
        </draw:path>
        <draw:path draw:style-name="gr82" draw:text-style-name="P43" draw:layer="layout" svg:width="0.577cm" svg:height="1.25cm" svg:x="4.047cm" svg:y="9.42cm" svg:viewBox="0 0 578 1251" svg:d="M500 1066l78 168-8 17-70-151zM391 866l-391-833v-33l406 866z">
          <text:p/>
        </draw:path>
        <draw:path draw:style-name="gr207" draw:text-style-name="P115" draw:layer="layout" svg:width="0.585cm" svg:height="1.267cm" svg:x="4.047cm" svg:y="9.386cm" svg:viewBox="0 0 586 1268" svg:d="M500 1068l86 184-8 16-78-167zM406 901l-406-867v-34l422 901z">
          <text:p/>
        </draw:path>
        <draw:path draw:style-name="gr83" draw:text-style-name="P44" draw:layer="layout" svg:width="0.593cm" svg:height="1.284cm" svg:x="4.047cm" svg:y="9.353cm" svg:viewBox="0 0 594 1285" svg:d="M500 1068l94 200-8 17-86-184zM422 934l-422-901v-33l438 934z">
          <text:p/>
        </draw:path>
        <draw:path draw:style-name="gr208" draw:text-style-name="P116" draw:layer="layout" svg:width="0.601cm" svg:height="1.3cm" svg:x="4.047cm" svg:y="9.32cm" svg:viewBox="0 0 602 1301" svg:d="M500 1067l102 217-8 17-94-200zM437 967l-437-934v-33l452 967z">
          <text:p/>
        </draw:path>
        <draw:path draw:style-name="gr86" draw:text-style-name="P47" draw:layer="layout" svg:width="0.608cm" svg:height="1.317cm" svg:x="4.047cm" svg:y="9.286cm" svg:viewBox="0 0 609 1318" svg:d="M499 1068l110 234-7 16-103-217zM452 1001l-452-967v-34l468 1001z">
          <text:p/>
        </draw:path>
        <draw:path draw:style-name="gr209" draw:text-style-name="P117" draw:layer="layout" svg:width="0.616cm" svg:height="1.334cm" svg:x="4.047cm" svg:y="9.253cm" svg:viewBox="0 0 617 1335" svg:d="M499 1068l118 250-8 17-110-234zM468 1034l-468-1001v-33l483 1034z">
          <text:p/>
        </draw:path>
        <draw:polygon draw:style-name="gr87" draw:text-style-name="P48" draw:layer="layout" svg:width="0.624cm" svg:height="1.35cm" svg:x="4.047cm" svg:y="9.22cm" svg:viewBox="0 0 625 1351" draw:points="500,1067 484,1067 0,33 0,0 625,1334 617,1351 500,1101">
          <text:p/>
        </draw:polygon>
        <draw:polygon draw:style-name="gr88" draw:text-style-name="P49" draw:layer="layout" svg:width="0.632cm" svg:height="1.333cm" svg:x="4.047cm" svg:y="9.22cm" svg:viewBox="0 0 633 1334" draw:points="0,0 15,0 633,1318 625,1334">
          <text:p/>
        </draw:polygon>
        <draw:polygon draw:style-name="gr88" draw:text-style-name="P49" draw:layer="layout" svg:width="0.625cm" svg:height="1.317cm" svg:x="4.062cm" svg:y="9.22cm" svg:viewBox="0 0 626 1318" draw:points="16,0 626,1301 617,1318 0,0">
          <text:p/>
        </draw:polygon>
        <draw:polygon draw:style-name="gr89" draw:text-style-name="P50" draw:layer="layout" svg:width="0.616cm" svg:height="1.3cm" svg:x="4.078cm" svg:y="9.22cm" svg:viewBox="0 0 617 1301" draw:points="15,0 617,1284 610,1301 0,0">
          <text:p/>
        </draw:polygon>
        <draw:polygon draw:style-name="gr210" draw:text-style-name="P118" draw:layer="layout" svg:width="0.609cm" svg:height="1.283cm" svg:x="4.093cm" svg:y="9.22cm" svg:viewBox="0 0 610 1284" draw:points="16,0 610,1268 602,1284 0,0">
          <text:p/>
        </draw:polygon>
        <draw:polygon draw:style-name="gr90" draw:text-style-name="P51" draw:layer="layout" svg:width="0.601cm" svg:height="1.267cm" svg:x="4.109cm" svg:y="9.22cm" svg:viewBox="0 0 602 1268" draw:points="16,0 602,1251 594,1268 0,0">
          <text:p/>
        </draw:polygon>
        <draw:polygon draw:style-name="gr92" draw:text-style-name="P53" draw:layer="layout" svg:width="0.593cm" svg:height="1.25cm" svg:x="4.125cm" svg:y="9.22cm" svg:viewBox="0 0 594 1251" draw:points="15,0 594,1234 586,1251 0,0">
          <text:p/>
        </draw:polygon>
        <draw:polygon draw:style-name="gr211" draw:text-style-name="P119" draw:layer="layout" svg:width="0.586cm" svg:height="1.233cm" svg:x="4.14cm" svg:y="9.22cm" svg:viewBox="0 0 587 1234" draw:points="16,0 587,1217 579,1234 0,0">
          <text:p/>
        </draw:polygon>
        <draw:polygon draw:style-name="gr212" draw:text-style-name="P120" draw:layer="layout" svg:width="0.577cm" svg:height="1.216cm" svg:x="4.156cm" svg:y="9.22cm" svg:viewBox="0 0 578 1217" draw:points="15,0 578,1201 571,1217 0,0">
          <text:p/>
        </draw:polygon>
        <draw:polygon draw:style-name="gr95" draw:text-style-name="P56" draw:layer="layout" svg:width="0.57cm" svg:height="1.2cm" svg:x="4.171cm" svg:y="9.22cm" svg:viewBox="0 0 571 1201" draw:points="16,0 571,1184 563,1201 0,0">
          <text:p/>
        </draw:polygon>
        <draw:polygon draw:style-name="gr96" draw:text-style-name="P57" draw:layer="layout" svg:width="0.562cm" svg:height="1.183cm" svg:x="4.187cm" svg:y="9.22cm" svg:viewBox="0 0 563 1184" draw:points="16,0 563,1167 555,1184 0,0">
          <text:p/>
        </draw:polygon>
        <draw:polygon draw:style-name="gr213" draw:text-style-name="P121" draw:layer="layout" svg:width="0.554cm" svg:height="1.166cm" svg:x="4.203cm" svg:y="9.22cm" svg:viewBox="0 0 555 1167" draw:points="15,0 555,1151 547,1167 0,0">
          <text:p/>
        </draw:polygon>
        <draw:polygon draw:style-name="gr97" draw:text-style-name="P58" draw:layer="layout" svg:width="0.547cm" svg:height="1.15cm" svg:x="4.218cm" svg:y="9.22cm" svg:viewBox="0 0 548 1151" draw:points="16,0 548,1134 540,1151 0,0">
          <text:p/>
        </draw:polygon>
        <draw:polygon draw:style-name="gr99" draw:text-style-name="P60" draw:layer="layout" svg:width="0.538cm" svg:height="1.133cm" svg:x="4.234cm" svg:y="9.22cm" svg:viewBox="0 0 539 1134" draw:points="15,0 539,1117 532,1134 0,0">
          <text:p/>
        </draw:polygon>
        <draw:polygon draw:style-name="gr214" draw:text-style-name="P122" draw:layer="layout" svg:width="0.531cm" svg:height="1.116cm" svg:x="4.249cm" svg:y="9.22cm" svg:viewBox="0 0 532 1117" draw:points="16,0 532,1101 524,1117 0,0">
          <text:p/>
        </draw:polygon>
        <draw:polygon draw:style-name="gr101" draw:text-style-name="P62" draw:layer="layout" svg:width="0.523cm" svg:height="1.1cm" svg:x="4.265cm" svg:y="9.22cm" svg:viewBox="0 0 524 1101" draw:points="16,0 524,1084 516,1101 0,0">
          <text:p/>
        </draw:polygon>
        <draw:polygon draw:style-name="gr102" draw:text-style-name="P63" draw:layer="layout" svg:width="0.515cm" svg:height="1.083cm" svg:x="4.281cm" svg:y="9.22cm" svg:viewBox="0 0 516 1084" draw:points="15,0 516,1067 508,1084 0,0">
          <text:p/>
        </draw:polygon>
        <draw:polygon draw:style-name="gr102" draw:text-style-name="P63" draw:layer="layout" svg:width="0.5cm" svg:height="1.067cm" svg:x="4.296cm" svg:y="9.22cm" svg:viewBox="0 0 501 1068" draw:points="0,0 501,1067 501,1068">
          <text:p/>
        </draw:polygon>
        <draw:polygon draw:style-name="gr102" draw:text-style-name="P63" draw:layer="layout" svg:width="0.5cm" svg:height="1.066cm" svg:x="4.296cm" svg:y="9.22cm" svg:viewBox="0 0 501 1067" draw:points="0,0 501,1067">
          <text:p/>
        </draw:polygon>
        <draw:polygon draw:style-name="gr102" draw:text-style-name="P63" draw:layer="layout" svg:width="0.508cm" svg:height="1.066cm" svg:x="4.296cm" svg:y="9.22cm" svg:viewBox="0 0 509 1067" draw:points="17,0 509,1051 501,1067 0,0">
          <text:p/>
        </draw:polygon>
        <draw:polygon draw:style-name="gr103" draw:text-style-name="P64" draw:layer="layout" svg:width="0.499cm" svg:height="1.05cm" svg:x="4.312cm" svg:y="9.22cm" svg:viewBox="0 0 500 1051" draw:points="16,0 500,1034 493,1051 0,0">
          <text:p/>
        </draw:polygon>
        <draw:polygon draw:style-name="gr104" draw:text-style-name="P65" draw:layer="layout" svg:width="0.491cm" svg:height="1.033cm" svg:x="4.328cm" svg:y="9.22cm" svg:viewBox="0 0 492 1034" draw:points="15,0 492,1017 484,1034 0,0">
          <text:p/>
        </draw:polygon>
        <draw:polygon draw:style-name="gr105" draw:text-style-name="P66" draw:layer="layout" svg:width="0.484cm" svg:height="1.016cm" svg:x="4.343cm" svg:y="9.22cm" svg:viewBox="0 0 485 1017" draw:points="16,0 485,1001 477,1017 0,0">
          <text:p/>
        </draw:polygon>
        <draw:polygon draw:style-name="gr105" draw:text-style-name="P66" draw:layer="layout" svg:width="0.476cm" svg:height="1cm" svg:x="4.359cm" svg:y="9.22cm" svg:viewBox="0 0 477 1001" draw:points="15,0 477,984 469,1001 0,0">
          <text:p/>
        </draw:polygon>
        <draw:polygon draw:style-name="gr216" draw:text-style-name="P124" draw:layer="layout" svg:width="0.469cm" svg:height="0.983cm" svg:x="4.374cm" svg:y="9.22cm" svg:viewBox="0 0 470 984" draw:points="16,0 470,967 462,984 0,0">
          <text:p/>
        </draw:polygon>
        <draw:polygon draw:style-name="gr106" draw:text-style-name="P67" draw:layer="layout" svg:width="0.461cm" svg:height="0.966cm" svg:x="4.39cm" svg:y="9.22cm" svg:viewBox="0 0 462 967" draw:points="16,0 462,951 454,967 0,0">
          <text:p/>
        </draw:polygon>
        <draw:polygon draw:style-name="gr108" draw:text-style-name="P69" draw:layer="layout" svg:width="0.452cm" svg:height="0.95cm" svg:x="4.406cm" svg:y="9.22cm" svg:viewBox="0 0 453 951" draw:points="15,0 453,934 446,951 0,0">
          <text:p/>
        </draw:polygon>
        <draw:polygon draw:style-name="gr108" draw:text-style-name="P69" draw:layer="layout" svg:width="0.445cm" svg:height="0.933cm" svg:x="4.421cm" svg:y="9.22cm" svg:viewBox="0 0 446 934" draw:points="16,0 446,917 438,934 0,0">
          <text:p/>
        </draw:polygon>
        <draw:polygon draw:style-name="gr217" draw:text-style-name="P125" draw:layer="layout" svg:width="0.437cm" svg:height="0.916cm" svg:x="4.437cm" svg:y="9.22cm" svg:viewBox="0 0 438 917" draw:points="15,0 438,901 430,917 0,0">
          <text:p/>
        </draw:polygon>
        <draw:polygon draw:style-name="gr109" draw:text-style-name="P70" draw:layer="layout" svg:width="0.43cm" svg:height="0.9cm" svg:x="4.452cm" svg:y="9.22cm" svg:viewBox="0 0 431 901" draw:points="16,0 431,884 423,901 0,0">
          <text:p/>
        </draw:polygon>
        <draw:polygon draw:style-name="gr218" draw:text-style-name="P126" draw:layer="layout" svg:width="0.422cm" svg:height="0.883cm" svg:x="4.468cm" svg:y="9.22cm" svg:viewBox="0 0 423 884" draw:points="16,0 423,867 415,884 0,0">
          <text:p/>
        </draw:polygon>
        <draw:polygon draw:style-name="gr110" draw:text-style-name="P71" draw:layer="layout" svg:width="0.413cm" svg:height="0.866cm" svg:x="4.484cm" svg:y="9.22cm" svg:viewBox="0 0 414 867" draw:points="15,0 414,851 407,867 0,0">
          <text:p/>
        </draw:polygon>
        <draw:polygon draw:style-name="gr111" draw:text-style-name="P72" draw:layer="layout" svg:width="0.406cm" svg:height="0.85cm" svg:x="4.499cm" svg:y="9.22cm" svg:viewBox="0 0 407 851" draw:points="16,0 407,834 399,851 0,0">
          <text:p/>
        </draw:polygon>
        <draw:polygon draw:style-name="gr112" draw:text-style-name="P73" draw:layer="layout" svg:width="0.398cm" svg:height="0.833cm" svg:x="4.515cm" svg:y="9.22cm" svg:viewBox="0 0 399 834" draw:points="15,0 399,817 391,834 0,0">
          <text:p/>
        </draw:polygon>
        <draw:polygon draw:style-name="gr219" draw:text-style-name="P127" draw:layer="layout" svg:width="0.391cm" svg:height="0.816cm" svg:x="4.53cm" svg:y="9.22cm" svg:viewBox="0 0 392 817" draw:points="16,0 392,801 384,817 0,0">
          <text:p/>
        </draw:polygon>
        <draw:polygon draw:style-name="gr113" draw:text-style-name="P74" draw:layer="layout" svg:width="0.383cm" svg:height="0.834cm" svg:x="4.546cm" svg:y="9.186cm" svg:viewBox="0 0 384 835" draw:points="0,34 0,0 384,818 376,835">
          <text:p/>
        </draw:polygon>
        <draw:polygon draw:style-name="gr114" draw:text-style-name="P75" draw:layer="layout" svg:width="0.39cm" svg:height="0.85cm" svg:x="4.546cm" svg:y="9.153cm" svg:viewBox="0 0 391 851" draw:points="0,0 391,834 384,851 0,33">
          <text:p/>
        </draw:polygon>
        <draw:polygon draw:style-name="gr115" draw:text-style-name="P76" draw:layer="layout" svg:width="0.398cm" svg:height="0.866cm" svg:x="4.546cm" svg:y="9.12cm" svg:viewBox="0 0 399 867" draw:points="0,0 399,851 391,867 0,33">
          <text:p/>
        </draw:polygon>
        <draw:polygon draw:style-name="gr116" draw:text-style-name="P77" draw:layer="layout" svg:width="0.406cm" svg:height="0.884cm" svg:x="4.546cm" svg:y="9.086cm" svg:viewBox="0 0 407 885" draw:points="0,0 407,868 399,885 0,34">
          <text:p/>
        </draw:polygon>
        <draw:polygon draw:style-name="gr117" draw:text-style-name="P78" draw:layer="layout" svg:width="0.414cm" svg:height="0.9cm" svg:x="4.546cm" svg:y="9.053cm" svg:viewBox="0 0 415 901" draw:points="0,0 415,884 407,901 0,33">
          <text:p/>
        </draw:polygon>
        <draw:polygon draw:style-name="gr118" draw:text-style-name="P79" draw:layer="layout" svg:width="0.422cm" svg:height="0.916cm" svg:x="4.546cm" svg:y="9.02cm" svg:viewBox="0 0 423 917" draw:points="0,0 423,901 415,917 0,33">
          <text:p/>
        </draw:polygon>
        <draw:polygon draw:style-name="gr119" draw:text-style-name="P80" draw:layer="layout" svg:width="0.429cm" svg:height="0.934cm" svg:x="4.546cm" svg:y="8.986cm" svg:viewBox="0 0 430 935" draw:points="0,0 430,918 423,935 0,34">
          <text:p/>
        </draw:polygon>
        <draw:polygon draw:style-name="gr120" draw:text-style-name="P81" draw:layer="layout" svg:width="0.437cm" svg:height="0.95cm" svg:x="4.546cm" svg:y="8.953cm" svg:viewBox="0 0 438 951" draw:points="0,0 438,934 430,951 0,33">
          <text:p/>
        </draw:polygon>
        <draw:polygon draw:style-name="gr121" draw:text-style-name="P82" draw:layer="layout" svg:width="0.445cm" svg:height="0.966cm" svg:x="4.546cm" svg:y="8.92cm" svg:viewBox="0 0 446 967" draw:points="0,0 446,951 438,967 0,33">
          <text:p/>
        </draw:polygon>
        <draw:polygon draw:style-name="gr122" draw:text-style-name="P83" draw:layer="layout" svg:width="0.453cm" svg:height="0.984cm" svg:x="4.546cm" svg:y="8.886cm" svg:viewBox="0 0 454 985" draw:points="0,0 454,968 446,985 0,34">
          <text:p/>
        </draw:polygon>
        <draw:polygon draw:style-name="gr122" draw:text-style-name="P83" draw:layer="layout" svg:width="0.461cm" svg:height="1cm" svg:x="4.546cm" svg:y="8.853cm" svg:viewBox="0 0 462 1001" draw:points="0,0 462,984 454,1001 0,33">
          <text:p/>
        </draw:polygon>
        <draw:polygon draw:style-name="gr123" draw:text-style-name="P84" draw:layer="layout" svg:width="0.468cm" svg:height="1.016cm" svg:x="4.546cm" svg:y="8.82cm" svg:viewBox="0 0 469 1017" draw:points="0,0 469,1001 462,1017 0,33">
          <text:p/>
        </draw:polygon>
        <draw:polygon draw:style-name="gr124" draw:text-style-name="P85" draw:layer="layout" svg:width="0.476cm" svg:height="1.034cm" svg:x="4.546cm" svg:y="8.786cm" svg:viewBox="0 0 477 1035" draw:points="0,0 477,1017 469,1035 0,34">
          <text:p/>
        </draw:polygon>
        <draw:polygon draw:style-name="gr125" draw:text-style-name="P86" draw:layer="layout" svg:width="0.484cm" svg:height="1.05cm" svg:x="4.546cm" svg:y="8.753cm" svg:viewBox="0 0 485 1051" draw:points="0,0 485,1034 477,1051 0,33">
          <text:p/>
        </draw:polygon>
        <draw:polygon draw:style-name="gr125" draw:text-style-name="P86" draw:layer="layout" svg:width="0.492cm" svg:height="1.066cm" svg:x="4.546cm" svg:y="8.72cm" svg:viewBox="0 0 493 1067" draw:points="0,0 493,1051 485,1067 0,33">
          <text:p/>
        </draw:polygon>
        <draw:polygon draw:style-name="gr126" draw:text-style-name="P87" draw:layer="layout" svg:width="0.5cm" svg:height="1.084cm" svg:x="4.546cm" svg:y="8.686cm" svg:viewBox="0 0 501 1085" draw:points="0,0 251,535 501,1068 493,1085 0,34">
          <text:p/>
        </draw:polygon>
        <draw:polygon draw:style-name="gr127" draw:text-style-name="P88" draw:layer="layout" svg:width="0.25cm" svg:height="0.534cm" svg:x="4.546cm" svg:y="8.686cm" svg:viewBox="0 0 251 535" draw:points="0,0 251,535">
          <text:p/>
        </draw:polygon>
        <draw:polygon draw:style-name="gr220" draw:text-style-name="P2" draw:layer="layout" svg:width="0.999cm" svg:height="2.134cm" svg:x="4.047cm" svg:y="8.686cm" svg:viewBox="0 0 1000 2135" draw:points="500,2135 500,1601 0,1601 0,534 500,534 500,0 1000,1068">
          <text:p/>
        </draw:polygon>
        <draw:frame draw:style-name="gr590" draw:text-style-name="P99" draw:layer="layout" svg:width="1.773cm" svg:height="0.314cm" svg:x="2.016cm" svg:y="10.165cm">
          <draw:text-box>
            <text:p text:style-name="P3"><text:span text:style-name="T33">Data manager</text:span></text:p>
          </draw:text-box>
        </draw:frame>
      </draw:page>
      <draw:page draw:name="page18" draw:style-name="dp1" draw:master-page-name="master-page3">
        <draw:polygon draw:style-name="gr1" draw:text-style-name="P1" draw:layer="layout" svg:width="33.866cm" svg:height="19.049cm" svg:x="0cm" svg:y="0cm" svg:viewBox="0 0 33867 19050" draw:points="0,0 33867,0 33867,19050 0,19050">
          <text:p/>
        </draw:polygon>
        <draw:frame draw:style-name="gr2" draw:text-style-name="P2" draw:layer="layout" svg:width="33.866cm" svg:height="19.049cm" svg:x="0cm" svg:y="0cm">
          <draw:image xlink:href="Pictures/10000001000007D10000046675075CCA.png" xlink:type="simple" xlink:show="embed" xlink:actuate="onLoad" draw:mime-type="image/png">
            <text:p/>
          </draw:image>
        </draw:frame>
        <draw:polygon draw:style-name="gr8" draw:text-style-name="P6" draw:layer="layout" svg:width="2.175cm" svg:height="0.128cm" svg:x="0cm" svg:y="3.056cm" svg:viewBox="0 0 2176 129" draw:points="0,0 2176,0 2176,129 0,129">
          <text:p/>
        </draw:polygon>
        <draw:frame draw:style-name="gr2" draw:text-style-name="P2" draw:layer="layout" svg:width="1.015cm" svg:height="0.998cm" svg:x="12.598cm" svg:y="9.229cm">
          <draw:image xlink:href="Pictures/1000000100000058000000576C3B6CC0.png" xlink:type="simple" xlink:show="embed" xlink:actuate="onLoad" draw:mime-type="image/png">
            <text:p/>
          </draw:image>
        </draw:frame>
        <draw:frame draw:style-name="gr591" draw:text-style-name="P8" draw:layer="layout" svg:width="16.61cm" svg:height="0.945cm" svg:x="0.899cm" svg:y="1.462cm">
          <draw:text-box>
            <text:p text:style-name="P3"><text:span text:style-name="T45">Proposal: How to Organize Scrum Teams</text:span></text:p>
          </draw:text-box>
        </draw:frame>
        <draw:frame draw:style-name="gr2" draw:text-style-name="P2" draw:layer="layout" svg:width="1.015cm" svg:height="0.99cm" svg:x="17.805cm" svg:y="9.279cm">
          <draw:image xlink:href="Pictures/1000000100000058000000566AEFA739.png" xlink:type="simple" xlink:show="embed" xlink:actuate="onLoad" draw:mime-type="image/png">
            <text:p/>
          </draw:image>
        </draw:frame>
        <draw:frame draw:style-name="gr592" draw:text-style-name="P99" draw:layer="layout" svg:width="1.461cm" svg:height="0.314cm" svg:x="12.548cm" svg:y="10.335cm">
          <draw:text-box>
            <text:p text:style-name="P3"><text:span text:style-name="T46">ETL &amp; SQL</text:span></text:p>
          </draw:text-box>
        </draw:frame>
        <draw:frame draw:style-name="gr592" draw:text-style-name="P99" draw:layer="layout" svg:width="1.461cm" svg:height="0.314cm" svg:x="17.689cm" svg:y="10.409cm">
          <draw:text-box>
            <text:p text:style-name="P3"><text:span text:style-name="T46">ETL &amp; SQL</text:span></text:p>
          </draw:text-box>
        </draw:frame>
        <draw:frame draw:style-name="gr2" draw:text-style-name="P2" draw:layer="layout" svg:width="0.758cm" svg:height="0.864cm" svg:x="6.926cm" svg:y="9.466cm">
          <draw:image xlink:href="Pictures/10000001000000420000004ADBBB7DE6.png" xlink:type="simple" xlink:show="embed" xlink:actuate="onLoad" draw:mime-type="image/png">
            <text:p/>
          </draw:image>
        </draw:frame>
        <draw:frame draw:style-name="gr593" draw:text-style-name="P99" draw:layer="layout" svg:width="2.952cm" svg:height="0.314cm" svg:x="5.86cm" svg:y="10.464cm">
          <draw:text-box>
            <text:p text:style-name="P3"><text:span text:style-name="T46">Business <text:s/>coordinator</text:span></text:p>
          </draw:text-box>
        </draw:frame>
        <draw:frame draw:style-name="gr2" draw:text-style-name="P2" draw:layer="layout" svg:width="1.015cm" svg:height="1.015cm" svg:x="22.572cm" svg:y="9.39cm">
          <draw:image xlink:href="Pictures/100000010000005800000058C9347651.png" xlink:type="simple" xlink:show="embed" xlink:actuate="onLoad" draw:mime-type="image/png">
            <text:p/>
          </draw:image>
        </draw:frame>
        <draw:frame draw:style-name="gr594" draw:text-style-name="P99" draw:layer="layout" svg:width="2.455cm" svg:height="0.314cm" svg:x="21.824cm" svg:y="10.506cm">
          <draw:text-box>
            <text:p text:style-name="P3"><text:span text:style-name="T46">Quality Assurance</text:span></text:p>
          </draw:text-box>
        </draw:frame>
        <draw:frame draw:style-name="gr528" draw:text-style-name="P99" draw:layer="layout" svg:width="1.741cm" svg:height="0.314cm" svg:x="2.25cm" svg:y="5.525cm">
          <draw:text-box>
            <text:p text:style-name="P3"><text:span text:style-name="T34">Scrum Master</text:span></text:p>
          </draw:text-box>
        </draw:frame>
        <draw:frame draw:style-name="gr529" draw:text-style-name="P99" draw:layer="layout" svg:width="0.375cm" svg:height="0.314cm" svg:x="9.824cm" svg:y="5.525cm">
          <draw:text-box>
            <text:p text:style-name="P3"><text:span text:style-name="T34">BA</text:span></text:p>
          </draw:text-box>
        </draw:frame>
        <draw:frame draw:style-name="gr531" draw:text-style-name="P99" draw:layer="layout" svg:width="1.058cm" svg:height="0.314cm" svg:x="6.047cm" svg:y="5.525cm">
          <draw:text-box>
            <text:p text:style-name="P3"><text:span text:style-name="T34">Sol Arch</text:span></text:p>
          </draw:text-box>
        </draw:frame>
        <draw:frame draw:style-name="gr595" draw:text-style-name="P99" draw:layer="layout" svg:width="1.245cm" svg:height="0.314cm" svg:x="13.325cm" svg:y="5.525cm">
          <draw:text-box>
            <text:p text:style-name="P3"><text:span text:style-name="T34">Data Eng.</text:span></text:p>
          </draw:text-box>
        </draw:frame>
        <draw:frame draw:style-name="gr2" draw:text-style-name="P2" draw:layer="layout" svg:width="1.142cm" svg:height="1.074cm" svg:x="6.02cm" svg:y="4.225cm">
          <draw:image xlink:href="Pictures/10000001000000630000005E025859FE.png" xlink:type="simple" xlink:show="embed" xlink:actuate="onLoad" draw:mime-type="image/png">
            <text:p/>
          </draw:image>
        </draw:frame>
        <draw:frame draw:style-name="gr2" draw:text-style-name="P2" draw:layer="layout" svg:width="1.142cm" svg:height="1.066cm" svg:x="13.352cm" svg:y="4.233cm">
          <draw:image xlink:href="Pictures/10000001000000630000005D80A917C9.png" xlink:type="simple" xlink:show="embed" xlink:actuate="onLoad" draw:mime-type="image/png">
            <text:p/>
          </draw:image>
        </draw:frame>
        <draw:frame draw:style-name="gr2" draw:text-style-name="P2" draw:layer="layout" svg:width="1.142cm" svg:height="1.201cm" svg:x="17.983cm" svg:y="4.098cm">
          <draw:image xlink:href="Pictures/100000010000006300000068E733001D.png" xlink:type="simple" xlink:show="embed" xlink:actuate="onLoad" draw:mime-type="image/png">
            <text:p/>
          </draw:image>
        </draw:frame>
        <draw:frame draw:style-name="gr2" draw:text-style-name="P2" draw:layer="layout" svg:width="1.015cm" svg:height="1.015cm" svg:x="2.633cm" svg:y="4.284cm">
          <draw:image xlink:href="Pictures/10000000000000580000005890F3241F.png" xlink:type="simple" xlink:show="embed" xlink:actuate="onLoad" draw:mime-type="image/png">
            <text:p/>
          </draw:image>
        </draw:frame>
        <draw:frame draw:style-name="gr2" draw:text-style-name="P2" draw:layer="layout" svg:width="1.015cm" svg:height="1.066cm" svg:x="9.576cm" svg:y="4.233cm">
          <draw:image xlink:href="Pictures/10000001000000580000005DAFEBAFA7.png" xlink:type="simple" xlink:show="embed" xlink:actuate="onLoad" draw:mime-type="image/png">
            <text:p/>
          </draw:image>
        </draw:frame>
        <draw:frame draw:style-name="gr596" draw:text-style-name="P99" draw:layer="layout" svg:width="2.347cm" svg:height="0.314cm" svg:x="17.393cm" svg:y="5.525cm">
          <draw:text-box>
            <text:p text:style-name="P3"><text:span text:style-name="T34">Quality <text:s/>Assurance</text:span></text:p>
          </draw:text-box>
        </draw:frame>
        <draw:frame draw:style-name="gr589" draw:text-style-name="P99" draw:layer="layout" svg:width="2.487cm" svg:height="0.314cm" svg:x="6.066cm" svg:y="8.745cm">
          <draw:text-box>
            <text:p text:style-name="P3"><text:span text:style-name="T35">Business Unit <text:s/>Lead</text:span></text:p>
          </draw:text-box>
        </draw:frame>
        <draw:frame draw:style-name="gr535" draw:text-style-name="P99" draw:layer="layout" svg:width="2.114cm" svg:height="0.314cm" svg:x="12.137cm" svg:y="8.745cm">
          <draw:text-box>
            <text:p text:style-name="P3"><text:span text:style-name="T35">ETL &amp; SQL Lead</text:span></text:p>
          </draw:text-box>
        </draw:frame>
        <draw:frame draw:style-name="gr536" draw:text-style-name="P99" draw:layer="layout" svg:width="3.046cm" svg:height="0.314cm" svg:x="21.56cm" svg:y="8.745cm">
          <draw:text-box>
            <text:p text:style-name="P3"><text:span text:style-name="T35">Quality <text:s/>Assurance Lead</text:span></text:p>
          </draw:text-box>
        </draw:frame>
        <draw:frame draw:style-name="gr535" draw:text-style-name="P99" draw:layer="layout" svg:width="2.114cm" svg:height="0.314cm" svg:x="17.227cm" svg:y="8.745cm">
          <draw:text-box>
            <text:p text:style-name="P3"><text:span text:style-name="T35">ETL &amp; SQL Lead</text:span></text:p>
          </draw:text-box>
        </draw:frame>
        <draw:frame draw:style-name="gr2" draw:text-style-name="P2" draw:layer="layout" svg:width="1.142cm" svg:height="0.905cm" svg:x="12.632cm" svg:y="7.493cm">
          <draw:image xlink:href="Pictures/10000001000000630000004EF963BFDE.png" xlink:type="simple" xlink:show="embed" xlink:actuate="onLoad" draw:mime-type="image/png">
            <text:p/>
          </draw:image>
        </draw:frame>
        <draw:frame draw:style-name="gr2" draw:text-style-name="P2" draw:layer="layout" svg:width="1.015cm" svg:height="1.023cm" svg:x="3.056cm" svg:y="7.493cm">
          <draw:image xlink:href="Pictures/10000000000000580000005890F3241F.png" xlink:type="simple" xlink:show="embed" xlink:actuate="onLoad" draw:mime-type="image/png">
            <text:p/>
          </draw:image>
        </draw:frame>
        <draw:frame draw:style-name="gr2" draw:text-style-name="P2" draw:layer="layout" svg:width="1.142cm" svg:height="1.083cm" svg:x="6.824cm" svg:y="7.493cm">
          <draw:image xlink:href="Pictures/10000001000000630000005E025859FE.png" xlink:type="simple" xlink:show="embed" xlink:actuate="onLoad" draw:mime-type="image/png">
            <text:p/>
          </draw:image>
        </draw:frame>
        <draw:frame draw:style-name="gr2" draw:text-style-name="P2" draw:layer="layout" svg:width="1.142cm" svg:height="1.074cm" svg:x="17.678cm" svg:y="7.493cm">
          <draw:image xlink:href="Pictures/10000001000000630000005D80A917C9.png" xlink:type="simple" xlink:show="embed" xlink:actuate="onLoad" draw:mime-type="image/png">
            <text:p/>
          </draw:image>
        </draw:frame>
        <draw:frame draw:style-name="gr2" draw:text-style-name="P2" draw:layer="layout" svg:width="1.142cm" svg:height="1.21cm" svg:x="22.504cm" svg:y="7.493cm">
          <draw:image xlink:href="Pictures/100000010000006300000068E733001D.png" xlink:type="simple" xlink:show="embed" xlink:actuate="onLoad" draw:mime-type="image/png">
            <text:p/>
          </draw:image>
        </draw:frame>
        <draw:frame draw:style-name="gr2" draw:text-style-name="P2" draw:layer="layout" svg:width="1.269cm" svg:height="1.108cm" svg:x="6.697cm" svg:y="11.227cm">
          <draw:image xlink:href="Pictures/100000000000006E0000005FC01015FA.jpg" xlink:type="simple" xlink:show="embed" xlink:actuate="onLoad" draw:mime-type="image/jpeg">
            <text:p/>
          </draw:image>
        </draw:frame>
        <draw:frame draw:style-name="gr2" draw:text-style-name="P2" draw:layer="layout" svg:width="1.269cm" svg:height="1.108cm" svg:x="12.624cm" svg:y="11.218cm">
          <draw:image xlink:href="Pictures/100000000000006E0000005FC01015FA.jpg" xlink:type="simple" xlink:show="embed" xlink:actuate="onLoad" draw:mime-type="image/jpeg">
            <text:p/>
          </draw:image>
        </draw:frame>
        <draw:frame draw:style-name="gr2" draw:text-style-name="P2" draw:layer="layout" svg:width="1.269cm" svg:height="1.108cm" svg:x="6.756cm" svg:y="13.36cm">
          <draw:image xlink:href="Pictures/100000000000006E0000005FC01015FA.jpg" xlink:type="simple" xlink:show="embed" xlink:actuate="onLoad" draw:mime-type="image/jpeg">
            <text:p/>
          </draw:image>
        </draw:frame>
        <draw:frame draw:style-name="gr2" draw:text-style-name="P2" draw:layer="layout" svg:width="1.269cm" svg:height="1.108cm" svg:x="12.624cm" svg:y="13.411cm">
          <draw:image xlink:href="Pictures/100000000000006E0000005FC01015FA.jpg" xlink:type="simple" xlink:show="embed" xlink:actuate="onLoad" draw:mime-type="image/jpeg">
            <text:p/>
          </draw:image>
        </draw:frame>
        <draw:frame draw:style-name="gr2" draw:text-style-name="P2" draw:layer="layout" svg:width="1.269cm" svg:height="1.108cm" svg:x="12.556cm" svg:y="15.553cm">
          <draw:image xlink:href="Pictures/100000000000006E0000005FC01015FA.jpg" xlink:type="simple" xlink:show="embed" xlink:actuate="onLoad" draw:mime-type="image/jpeg">
            <text:p/>
          </draw:image>
        </draw:frame>
        <draw:frame draw:style-name="gr2" draw:text-style-name="P2" draw:layer="layout" svg:width="1.269cm" svg:height="1.108cm" svg:x="17.678cm" svg:y="11.337cm">
          <draw:image xlink:href="Pictures/100000000000006E0000005FC01015FA.jpg" xlink:type="simple" xlink:show="embed" xlink:actuate="onLoad" draw:mime-type="image/jpeg">
            <text:p/>
          </draw:image>
        </draw:frame>
        <draw:frame draw:style-name="gr2" draw:text-style-name="P2" draw:layer="layout" svg:width="1.269cm" svg:height="1.108cm" svg:x="22.572cm" svg:y="11.328cm">
          <draw:image xlink:href="Pictures/100000000000006E0000005FC01015FA.jpg" xlink:type="simple" xlink:show="embed" xlink:actuate="onLoad" draw:mime-type="image/jpeg">
            <text:p/>
          </draw:image>
        </draw:frame>
        <draw:frame draw:style-name="gr2" draw:text-style-name="P2" draw:layer="layout" svg:width="1.269cm" svg:height="1.108cm" svg:x="22.572cm" svg:y="13.504cm">
          <draw:image xlink:href="Pictures/100000000000006E0000005FC01015FA.jpg" xlink:type="simple" xlink:show="embed" xlink:actuate="onLoad" draw:mime-type="image/jpeg">
            <text:p/>
          </draw:image>
        </draw:frame>
        <draw:frame draw:style-name="gr597" draw:text-style-name="P99" draw:layer="layout" svg:width="2.439cm" svg:height="0.314cm" svg:x="2.317cm" svg:y="8.745cm">
          <draw:text-box>
            <text:p text:style-name="P3"><text:span text:style-name="T35">ODC Scrum Master</text:span></text:p>
          </draw:text-box>
        </draw:frame>
        <draw:frame draw:style-name="gr598" draw:text-style-name="P105" draw:layer="layout" svg:width="2.19cm" svg:height="0.475cm" svg:x="1.72cm" svg:y="3.277cm">
          <draw:text-box>
            <text:p text:style-name="P3"><text:span text:style-name="T32">Core Team</text:span></text:p>
          </draw:text-box>
        </draw:frame>
        <draw:polygon draw:style-name="gr39" draw:text-style-name="P2" draw:layer="layout" svg:width="24.231cm" svg:height="10.651cm" svg:x="1.422cm" svg:y="7.12cm" svg:viewBox="0 0 24232 10652" draw:points="0,0 24232,0 24232,10652 0,10652">
          <text:p/>
        </draw:polygon>
        <draw:polygon draw:style-name="gr39" draw:text-style-name="P2" draw:layer="layout" svg:width="24.231cm" svg:height="2.082cm" svg:x="1.422cm" svg:y="3.886cm" svg:viewBox="0 0 24232 2083" draw:points="0,0 24232,0 24232,2083 0,2083">
          <text:p/>
        </draw:polygon>
        <draw:path draw:style-name="gr599" draw:text-style-name="P2" draw:layer="layout" svg:width="25.705cm" svg:height="5.452cm" svg:x="0.635cm" svg:y="3.742cm" svg:viewBox="0 0 25706 5453" svg:d="M0 909c0-502 407-909 909-909h23889c502 0 908 407 908 909v3636c0 502-406 908-908 908h-23889c-502 0-909-406-909-908z">
          <text:p/>
        </draw:path>
        <draw:frame draw:style-name="gr600" draw:text-style-name="P105" draw:layer="layout" svg:width="2.166cm" svg:height="0.475cm" svg:x="1.68cm" svg:y="6.485cm">
          <draw:text-box>
            <text:p text:style-name="P3"><text:span text:style-name="T32">ODC Team</text:span></text:p>
          </draw:text-box>
        </draw:frame>
        <draw:path draw:style-name="gr599" draw:text-style-name="P2" draw:layer="layout" svg:width="22.131cm" svg:height="1.701cm" svg:x="1.998cm" svg:y="11.032cm" svg:viewBox="0 0 22132 1702" svg:d="M0 284c0-156 127-284 283-284h21566c156 0 283 128 283 284v1135c0 156-127 283-283 283h-21566c-156 0-283-127-283-283z">
          <text:p/>
        </draw:path>
        <draw:frame draw:style-name="gr601" draw:text-style-name="P99" draw:layer="layout" svg:width="2.393cm" svg:height="0.314cm" svg:x="12.886cm" svg:y="3.311cm">
          <draw:text-box>
            <text:p text:style-name="P3"><text:span text:style-name="T47">Core Scrum Team</text:span></text:p>
          </draw:text-box>
        </draw:frame>
        <draw:path draw:style-name="gr599" draw:text-style-name="P2" draw:layer="layout" svg:width="22.123cm" svg:height="1.702cm" svg:x="2.006cm" svg:y="13.199cm" svg:viewBox="0 0 22124 1703" svg:d="M0 284c0-157 127-284 284-284h21557c156 0 283 127 283 284v1135c0 157-127 284-283 284h-21557c-157 0-284-127-284-284z">
          <text:p/>
        </draw:path>
        <draw:frame draw:style-name="gr602" draw:text-style-name="P99" draw:layer="layout" svg:width="2.657cm" svg:height="0.314cm" svg:x="2.251cm" svg:y="10.585cm">
          <draw:text-box>
            <text:p text:style-name="P3"><text:span text:style-name="T47">ODC Scrum Team A</text:span></text:p>
          </draw:text-box>
        </draw:frame>
        <draw:frame draw:style-name="gr2" draw:text-style-name="P2" draw:layer="layout" svg:width="1.269cm" svg:height="1.108cm" svg:x="22.572cm" svg:y="15.553cm">
          <draw:image xlink:href="Pictures/100000000000006E0000005FC01015FA.jpg" xlink:type="simple" xlink:show="embed" xlink:actuate="onLoad" draw:mime-type="image/jpeg">
            <text:p/>
          </draw:image>
        </draw:frame>
        <draw:path draw:style-name="gr599" draw:text-style-name="P2" draw:layer="layout" svg:width="22.123cm" svg:height="1.694cm" svg:x="1.998cm" svg:y="15.417cm" svg:viewBox="0 0 22124 1695" svg:d="M0 283c0-156 126-283 282-283h21560c156 0 282 127 282 283v1129c0 156-126 283-282 283h-21560c-156 0-282-127-282-283z">
          <text:p/>
        </draw:path>
        <draw:frame draw:style-name="gr602" draw:text-style-name="P99" draw:layer="layout" svg:width="2.657cm" svg:height="0.314cm" svg:x="2.258cm" svg:y="12.843cm">
          <draw:text-box>
            <text:p text:style-name="P3"><text:span text:style-name="T47">ODC Scrum Team B</text:span></text:p>
          </draw:text-box>
        </draw:frame>
        <draw:path draw:style-name="gr603" draw:text-style-name="P220" draw:layer="layout" svg:width="0.678cm" svg:height="0.703cm" svg:x="12.081cm" svg:y="3.056cm" svg:viewBox="0 0 679 704" svg:d="M0 352c0-194 152-352 339-352 188 0 340 158 340 352s-152 352-340 352c-187 0-339-158-339-352z">
          <text:p/>
        </draw:path>
        <draw:frame draw:style-name="gr602" draw:text-style-name="P99" draw:layer="layout" svg:width="2.657cm" svg:height="0.314cm" svg:x="2.245cm" svg:y="15.053cm">
          <draw:text-box>
            <text:p text:style-name="P3"><text:span text:style-name="T47">ODC Scrum Team C</text:span></text:p>
          </draw:text-box>
        </draw:frame>
        <draw:path draw:style-name="gr603" draw:text-style-name="P220" draw:layer="layout" svg:width="0.677cm" svg:height="0.703cm" svg:x="2.125cm" svg:y="7.755cm" svg:viewBox="0 0 678 704" svg:d="M0 352c0-195 151-352 339-352 187 0 339 157 339 352 0 194-152 352-339 352-188 0-339-158-339-352z">
          <text:p/>
        </draw:path>
        <draw:frame draw:style-name="gr186" draw:text-style-name="P4" draw:layer="layout" svg:width="0.49cm" svg:height="0.552cm" svg:x="12.285cm" svg:y="3.154cm">
          <draw:text-box>
            <text:p text:style-name="P3"><text:span text:style-name="T3">1</text:span></text:p>
          </draw:text-box>
        </draw:frame>
        <draw:path draw:style-name="gr603" draw:text-style-name="P220" draw:layer="layout" svg:width="0.677cm" svg:height="0.703cm" svg:x="3.056cm" svg:y="15.917cm" svg:viewBox="0 0 678 704" svg:d="M0 351c0-194 152-351 339-351s339 157 339 351-152 353-339 353-339-159-339-353z">
          <text:p/>
        </draw:path>
        <draw:frame draw:style-name="gr186" draw:text-style-name="P4" draw:layer="layout" svg:width="0.49cm" svg:height="0.552cm" svg:x="2.327cm" svg:y="7.851cm">
          <draw:text-box>
            <text:p text:style-name="P3"><text:span text:style-name="T3">2</text:span></text:p>
          </draw:text-box>
        </draw:frame>
        <draw:path draw:style-name="gr603" draw:text-style-name="P220" draw:layer="layout" svg:width="0.678cm" svg:height="0.703cm" svg:x="26.991cm" svg:y="4.064cm" svg:viewBox="0 0 679 704" svg:d="M0 352c0-194 152-352 339-352 188 0 340 158 340 352 0 195-152 352-340 352-187 0-339-157-339-352z">
          <text:p/>
        </draw:path>
        <draw:frame draw:style-name="gr186" draw:text-style-name="P4" draw:layer="layout" svg:width="0.49cm" svg:height="0.552cm" svg:x="3.257cm" svg:y="16.015cm">
          <draw:text-box>
            <text:p text:style-name="P3"><text:span text:style-name="T3">4</text:span></text:p>
          </draw:text-box>
        </draw:frame>
        <draw:path draw:style-name="gr603" draw:text-style-name="P220" draw:layer="layout" svg:width="0.678cm" svg:height="0.703cm" svg:x="26.991cm" svg:y="7.306cm" svg:viewBox="0 0 679 704" svg:d="M0 353c0-194 152-353 339-353 188 0 340 159 340 353s-152 351-340 351c-187 0-339-157-339-351z">
          <text:p/>
        </draw:path>
        <draw:frame draw:style-name="gr186" draw:text-style-name="P4" draw:layer="layout" svg:width="0.49cm" svg:height="0.552cm" svg:x="27.197cm" svg:y="4.158cm">
          <draw:text-box>
            <text:p text:style-name="P3"><text:span text:style-name="T3">1</text:span></text:p>
          </draw:text-box>
        </draw:frame>
        <draw:path draw:style-name="gr603" draw:text-style-name="P220" draw:layer="layout" svg:width="0.678cm" svg:height="0.703cm" svg:x="26.991cm" svg:y="11.116cm" svg:viewBox="0 0 679 704" svg:d="M0 352c0-194 152-352 339-352 188 0 340 158 340 352 0 195-152 352-340 352-187 0-339-157-339-352z">
          <text:p/>
        </draw:path>
        <draw:frame draw:style-name="gr186" draw:text-style-name="P4" draw:layer="layout" svg:width="0.49cm" svg:height="0.552cm" svg:x="27.197cm" svg:y="7.402cm">
          <draw:text-box>
            <text:p text:style-name="P3"><text:span text:style-name="T3">2</text:span></text:p>
          </draw:text-box>
        </draw:frame>
        <draw:frame draw:style-name="gr186" draw:text-style-name="P4" draw:layer="layout" svg:width="0.49cm" svg:height="0.552cm" svg:x="27.197cm" svg:y="11.217cm">
          <draw:text-box>
            <text:p text:style-name="P3"><text:span text:style-name="T3">3</text:span></text:p>
          </draw:text-box>
        </draw:frame>
        <draw:frame draw:style-name="gr604" draw:text-style-name="P14" draw:layer="layout" svg:width="4.33cm" svg:height="0.399cm" svg:x="27.927cm" svg:y="4.077cm">
          <draw:text-box>
            <text:p text:style-name="P3"><text:span text:style-name="T48">Core Team and ODC Core </text:span></text:p>
          </draw:text-box>
        </draw:frame>
        <draw:frame draw:style-name="gr605" draw:text-style-name="P14" draw:layer="layout" svg:width="4.568cm" svg:height="0.399cm" svg:x="27.927cm" svg:y="4.501cm">
          <draw:text-box>
            <text:p text:style-name="P3"><text:span text:style-name="T48">leaders will establish a </text:span><text:span text:style-name="T49">Core </text:span></text:p>
          </draw:text-box>
        </draw:frame>
        <draw:frame draw:style-name="gr606" draw:text-style-name="P14" draw:layer="layout" svg:width="4.746cm" svg:height="0.399cm" svg:x="27.927cm" svg:y="4.924cm">
          <draw:text-box>
            <text:p text:style-name="P3"><text:span text:style-name="T49">Scrum Team</text:span><text:span text:style-name="T48"> focusing on the </text:span></text:p>
          </draw:text-box>
        </draw:frame>
        <draw:frame draw:style-name="gr607" draw:text-style-name="P14" draw:layer="layout" svg:width="5.437cm" svg:height="0.399cm" svg:x="27.927cm" svg:y="5.347cm">
          <draw:text-box>
            <text:p text:style-name="P3"><text:span text:style-name="T48">requirement analysis, architecture </text:span></text:p>
          </draw:text-box>
        </draw:frame>
        <draw:frame draw:style-name="gr608" draw:text-style-name="P14" draw:layer="layout" svg:width="4.608cm" svg:height="0.399cm" svg:x="27.927cm" svg:y="5.77cm">
          <draw:text-box>
            <text:p text:style-name="P3"><text:span text:style-name="T48">design, project planning, key </text:span></text:p>
          </draw:text-box>
        </draw:frame>
        <draw:frame draw:style-name="gr609" draw:text-style-name="P14" draw:layer="layout" svg:width="3.797cm" svg:height="0.399cm" svg:x="27.927cm" svg:y="6.195cm">
          <draw:text-box>
            <text:p text:style-name="P3"><text:span text:style-name="T48">milestones definition etc</text:span></text:p>
          </draw:text-box>
        </draw:frame>
        <draw:frame draw:style-name="gr610" draw:text-style-name="P14" draw:layer="layout" svg:width="5.198cm" svg:height="0.399cm" svg:x="28.042cm" svg:y="7.294cm">
          <draw:text-box>
            <text:p text:style-name="P3"><text:span text:style-name="T48">ODC Scrum Master will form the </text:span></text:p>
          </draw:text-box>
        </draw:frame>
        <draw:frame draw:style-name="gr611" draw:text-style-name="P14" draw:layer="layout" svg:width="3.283cm" svg:height="0.399cm" svg:x="28.042cm" svg:y="7.717cm">
          <draw:text-box>
            <text:p text:style-name="P3"><text:span text:style-name="T49">ODC scrum teams</text:span><text:span text:style-name="T48">, </text:span></text:p>
          </draw:text-box>
        </draw:frame>
        <draw:frame draw:style-name="gr612" draw:text-style-name="P14" draw:layer="layout" svg:width="5.517cm" svg:height="0.399cm" svg:x="28.042cm" svg:y="8.141cm">
          <draw:text-box>
            <text:p text:style-name="P3"><text:span text:style-name="T48">execute/distribute according to the </text:span></text:p>
          </draw:text-box>
        </draw:frame>
        <draw:frame draw:style-name="gr613" draw:text-style-name="P14" draw:layer="layout" svg:width="4.885cm" svg:height="0.399cm" svg:x="28.042cm" svg:y="8.565cm">
          <draw:text-box>
            <text:p text:style-name="P3"><text:span text:style-name="T48">project high level plan and key </text:span></text:p>
          </draw:text-box>
        </draw:frame>
        <draw:frame draw:style-name="gr614" draw:text-style-name="P14" draw:layer="layout" svg:width="4.606cm" svg:height="0.399cm" svg:x="28.042cm" svg:y="8.988cm">
          <draw:text-box>
            <text:p text:style-name="P3"><text:span text:style-name="T48">milestones to all ODC scrum </text:span></text:p>
          </draw:text-box>
        </draw:frame>
        <draw:frame draw:style-name="gr615" draw:text-style-name="P14" draw:layer="layout" svg:width="2.828cm" svg:height="0.399cm" svg:x="28.042cm" svg:y="9.411cm">
          <draw:text-box>
            <text:p text:style-name="P3"><text:span text:style-name="T48">teams, as well as </text:span></text:p>
          </draw:text-box>
        </draw:frame>
        <draw:frame draw:style-name="gr616" draw:text-style-name="P14" draw:layer="layout" svg:width="5.478cm" svg:height="0.399cm" svg:x="28.042cm" svg:y="9.834cm">
          <draw:text-box>
            <text:p text:style-name="P3"><text:span text:style-name="T48">monitoring/reporting the execution </text:span></text:p>
          </draw:text-box>
        </draw:frame>
        <draw:path draw:style-name="gr603" draw:text-style-name="P220" draw:layer="layout" svg:width="0.677cm" svg:height="0.703cm" svg:x="3.056cm" svg:y="9.736cm" svg:viewBox="0 0 678 704" svg:d="M0 352c0-194 152-352 339-352s339 158 339 352c0 195-152 352-339 352s-339-157-339-352z">
          <text:p/>
        </draw:path>
        <draw:frame draw:style-name="gr617" draw:text-style-name="P14" draw:layer="layout" svg:width="4.488cm" svg:height="0.399cm" svg:x="28.042cm" svg:y="10.259cm">
          <draw:text-box>
            <text:p text:style-name="P3"><text:span text:style-name="T48">status to </text:span><text:span text:style-name="T49">Core Scrum Team</text:span></text:p>
          </draw:text-box>
        </draw:frame>
        <draw:path draw:style-name="gr603" draw:text-style-name="P220" draw:layer="layout" svg:width="0.677cm" svg:height="0.703cm" svg:x="26.983cm" svg:y="14.901cm" svg:viewBox="0 0 678 704" svg:d="M0 352c0-195 151-352 338-352 188 0 340 157 340 352 0 194-152 352-340 352-187 0-338-158-338-352z">
          <text:p/>
        </draw:path>
        <draw:frame draw:style-name="gr186" draw:text-style-name="P4" draw:layer="layout" svg:width="0.49cm" svg:height="0.552cm" svg:x="3.257cm" svg:y="9.832cm">
          <draw:text-box>
            <text:p text:style-name="P3"><text:span text:style-name="T3">3</text:span></text:p>
          </draw:text-box>
        </draw:frame>
        <draw:frame draw:style-name="gr187" draw:text-style-name="P4" draw:layer="layout" svg:width="0.491cm" svg:height="0.552cm" svg:x="27.191cm" svg:y="14.999cm">
          <draw:text-box>
            <text:p text:style-name="P3"><text:span text:style-name="T3">4</text:span></text:p>
          </draw:text-box>
        </draw:frame>
        <draw:frame draw:style-name="gr618" draw:text-style-name="P14" draw:layer="layout" svg:width="4.903cm" svg:height="0.399cm" svg:x="28.042cm" svg:y="11.136cm">
          <draw:text-box>
            <text:p text:style-name="P3"><text:span text:style-name="T48">Each ODC Scrum team will be </text:span></text:p>
          </draw:text-box>
        </draw:frame>
        <draw:frame draw:style-name="gr619" draw:text-style-name="P14" draw:layer="layout" svg:width="3.856cm" svg:height="0.399cm" svg:x="28.042cm" svg:y="11.559cm">
          <draw:text-box>
            <text:p text:style-name="P3"><text:span text:style-name="T48">dynamically formed and </text:span></text:p>
          </draw:text-box>
        </draw:frame>
        <draw:frame draw:style-name="gr620" draw:text-style-name="P14" draw:layer="layout" svg:width="4.984cm" svg:height="0.399cm" svg:x="28.042cm" svg:y="11.983cm">
          <draw:text-box>
            <text:p text:style-name="P3"><text:span text:style-name="T48">established based on the tasks </text:span></text:p>
          </draw:text-box>
        </draw:frame>
        <draw:frame draw:style-name="gr621" draw:text-style-name="P14" draw:layer="layout" svg:width="4.687cm" svg:height="0.399cm" svg:x="28.042cm" svg:y="12.406cm">
          <draw:text-box>
            <text:p text:style-name="P3"><text:span text:style-name="T48">planned according to specific </text:span></text:p>
          </draw:text-box>
        </draw:frame>
        <draw:frame draw:style-name="gr622" draw:text-style-name="P14" draw:layer="layout" svg:width="5.378cm" svg:height="0.399cm" svg:x="28.042cm" svg:y="12.829cm">
          <draw:text-box>
            <text:p text:style-name="P3"><text:span text:style-name="T48">project phases and skills required </text:span></text:p>
          </draw:text-box>
        </draw:frame>
        <draw:frame draw:style-name="gr623" draw:text-style-name="P14" draw:layer="layout" svg:width="3.698cm" svg:height="0.399cm" svg:x="28.042cm" svg:y="13.254cm">
          <draw:text-box>
            <text:p text:style-name="P3"><text:span text:style-name="T48">for each phase or tasks</text:span></text:p>
          </draw:text-box>
        </draw:frame>
        <draw:frame draw:style-name="gr624" draw:text-style-name="P14" draw:layer="layout" svg:width="4.331cm" svg:height="0.399cm" svg:x="28.042cm" svg:y="14.955cm">
          <draw:text-box>
            <text:p text:style-name="P3"><text:span text:style-name="T48">Senior Dev/Leaders will be </text:span></text:p>
          </draw:text-box>
        </draw:frame>
        <draw:frame draw:style-name="gr625" draw:text-style-name="P14" draw:layer="layout" svg:width="5.279cm" svg:height="0.399cm" svg:x="28.042cm" svg:y="15.378cm">
          <draw:text-box>
            <text:p text:style-name="P3"><text:span text:style-name="T48">assigned to play the ODC Scrum </text:span></text:p>
          </draw:text-box>
        </draw:frame>
        <draw:frame draw:style-name="gr626" draw:text-style-name="P14" draw:layer="layout" svg:width="2.809cm" svg:height="0.399cm" svg:x="28.042cm" svg:y="15.801cm">
          <draw:text-box>
            <text:p text:style-name="P3"><text:span text:style-name="T48">Team Leader role</text:span></text:p>
          </draw:text-box>
        </draw:frame>
        <draw:frame draw:style-name="gr2" draw:text-style-name="P2" draw:layer="layout" svg:width="1.142cm" svg:height="1.074cm" svg:x="22.2cm" svg:y="4.225cm">
          <draw:image xlink:href="Pictures/10000001000000630000005E025859FE.png" xlink:type="simple" xlink:show="embed" xlink:actuate="onLoad" draw:mime-type="image/png">
            <text:p/>
          </draw:image>
        </draw:frame>
        <draw:frame draw:style-name="gr2" draw:text-style-name="P2" draw:layer="layout" svg:width="1.269cm" svg:height="1.108cm" svg:x="17.678cm" svg:y="13.428cm">
          <draw:image xlink:href="Pictures/100000000000006E0000005FC01015FA.jpg" xlink:type="simple" xlink:show="embed" xlink:actuate="onLoad" draw:mime-type="image/jpeg">
            <text:p/>
          </draw:image>
        </draw:frame>
        <draw:frame draw:style-name="gr2" draw:text-style-name="P2" draw:layer="layout" svg:width="1.269cm" svg:height="1.108cm" svg:x="17.661cm" svg:y="15.621cm">
          <draw:image xlink:href="Pictures/100000000000006E0000005FC01015FA.jpg" xlink:type="simple" xlink:show="embed" xlink:actuate="onLoad" draw:mime-type="image/jpeg">
            <text:p/>
          </draw:image>
        </draw:frame>
        <draw:frame draw:style-name="gr2" draw:text-style-name="P2" draw:layer="layout" svg:width="1.269cm" svg:height="1.108cm" svg:x="6.782cm" svg:y="15.621cm">
          <draw:image xlink:href="Pictures/100000000000006E0000005FC01015FA.jpg" xlink:type="simple" xlink:show="embed" xlink:actuate="onLoad" draw:mime-type="image/jpeg">
            <text:p/>
          </draw:image>
        </draw:frame>
        <draw:frame draw:style-name="gr627" draw:text-style-name="P99" draw:layer="layout" svg:width="0.576cm" svg:height="0.314cm" svg:x="22.522cm" svg:y="5.525cm">
          <draw:text-box>
            <text:p text:style-name="P3"><text:span text:style-name="T34">DBA</text:span></text:p>
          </draw:text-box>
        </draw:frame>
      </draw:page>
      <draw:page draw:name="page19" draw:style-name="dp1" draw:master-page-name="master-page3">
        <draw:polygon draw:style-name="gr1" draw:text-style-name="P1" draw:layer="layout" svg:width="33.866cm" svg:height="19.049cm" svg:x="0cm" svg:y="0cm" svg:viewBox="0 0 33867 19050" draw:points="0,0 33867,0 33867,19050 0,19050">
          <text:p/>
        </draw:polygon>
        <draw:frame draw:style-name="gr2" draw:text-style-name="P2" draw:layer="layout" svg:width="33.866cm" svg:height="19.049cm" svg:x="0cm" svg:y="0cm">
          <draw:image xlink:href="Pictures/10000001000007D10000046675075CCA.png" xlink:type="simple" xlink:show="embed" xlink:actuate="onLoad" draw:mime-type="image/png">
            <text:p/>
          </draw:image>
        </draw:frame>
        <draw:polygon draw:style-name="gr8" draw:text-style-name="P6" draw:layer="layout" svg:width="2.175cm" svg:height="0.128cm" svg:x="0cm" svg:y="3.056cm" svg:viewBox="0 0 2176 129" draw:points="0,0 2176,0 2176,129 0,129">
          <text:p/>
        </draw:polygon>
        <draw:frame draw:style-name="gr628" draw:text-style-name="P9" draw:layer="layout" svg:width="6.403cm" svg:height="1.309cm" svg:x="0.899cm" svg:y="1.426cm">
          <draw:text-box>
            <text:p text:style-name="P3"><text:span text:style-name="T7">Deliverables </text:span></text:p>
          </draw:text-box>
        </draw:frame>
        <draw:frame draw:style-name="gr27" draw:text-style-name="P9" draw:layer="layout" svg:width="0.99cm" svg:height="1.309cm" svg:x="1.607cm" svg:y="3.711cm">
          <draw:text-box>
            <text:p text:style-name="P3"><text:span text:style-name="T8">1.</text:span></text:p>
          </draw:text-box>
        </draw:frame>
        <draw:frame draw:style-name="gr629" draw:text-style-name="P11" draw:layer="layout" svg:width="6.18cm" svg:height="0.928cm" svg:x="2.878cm" svg:y="4.015cm">
          <draw:text-box>
            <text:p text:style-name="P3"><text:span text:style-name="T10">Design document </text:span></text:p>
          </draw:text-box>
        </draw:frame>
        <draw:frame draw:style-name="gr27" draw:text-style-name="P9" draw:layer="layout" svg:width="0.99cm" svg:height="1.309cm" svg:x="1.607cm" svg:y="5.166cm">
          <draw:text-box>
            <text:p text:style-name="P3"><text:span text:style-name="T8">2.</text:span></text:p>
          </draw:text-box>
        </draw:frame>
        <draw:frame draw:style-name="gr630" draw:text-style-name="P10" draw:layer="layout" svg:width="2.79cm" svg:height="0.937cm" svg:x="2.878cm" svg:y="5.471cm">
          <draw:text-box>
            <text:p text:style-name="P3"><text:span text:style-name="T9">SQL file </text:span></text:p>
          </draw:text-box>
        </draw:frame>
        <draw:frame draw:style-name="gr27" draw:text-style-name="P9" draw:layer="layout" svg:width="0.99cm" svg:height="1.309cm" svg:x="1.607cm" svg:y="6.624cm">
          <draw:text-box>
            <text:p text:style-name="P3"><text:span text:style-name="T8">3.</text:span></text:p>
          </draw:text-box>
        </draw:frame>
        <draw:frame draw:style-name="gr631" draw:text-style-name="P11" draw:layer="layout" svg:width="6.234cm" svg:height="0.928cm" svg:x="2.878cm" svg:y="6.929cm">
          <draw:text-box>
            <text:p text:style-name="P3"><text:span text:style-name="T10">PL/SQL shell code </text:span></text:p>
          </draw:text-box>
        </draw:frame>
        <draw:frame draw:style-name="gr27" draw:text-style-name="P9" draw:layer="layout" svg:width="0.99cm" svg:height="1.309cm" svg:x="1.607cm" svg:y="8.073cm">
          <draw:text-box>
            <text:p text:style-name="P3"><text:span text:style-name="T8">4.</text:span></text:p>
          </draw:text-box>
        </draw:frame>
        <draw:frame draw:style-name="gr632" draw:text-style-name="P11" draw:layer="layout" svg:width="2.584cm" svg:height="0.928cm" svg:x="2.878cm" svg:y="8.378cm">
          <draw:text-box>
            <text:p text:style-name="P3"><text:span text:style-name="T10">NIFI file</text:span></text:p>
          </draw:text-box>
        </draw:frame>
        <draw:frame draw:style-name="gr27" draw:text-style-name="P9" draw:layer="layout" svg:width="0.99cm" svg:height="1.309cm" svg:x="1.607cm" svg:y="9.53cm">
          <draw:text-box>
            <text:p text:style-name="P3"><text:span text:style-name="T8">5.</text:span></text:p>
          </draw:text-box>
        </draw:frame>
        <draw:frame draw:style-name="gr633" draw:text-style-name="P11" draw:layer="layout" svg:width="4.333cm" svg:height="0.928cm" svg:x="2.878cm" svg:y="9.835cm">
          <draw:text-box>
            <text:p text:style-name="P3"><text:span text:style-name="T10">Testing plan </text:span></text:p>
          </draw:text-box>
        </draw:frame>
        <draw:frame draw:style-name="gr27" draw:text-style-name="P9" draw:layer="layout" svg:width="0.99cm" svg:height="1.309cm" svg:x="1.607cm" svg:y="10.986cm">
          <draw:text-box>
            <text:p text:style-name="P3"><text:span text:style-name="T8">6.</text:span></text:p>
          </draw:text-box>
        </draw:frame>
        <draw:frame draw:style-name="gr634" draw:text-style-name="P10" draw:layer="layout" svg:width="3.291cm" svg:height="0.937cm" svg:x="2.878cm" svg:y="11.29cm">
          <draw:text-box>
            <text:p text:style-name="P3"><text:span text:style-name="T9">Test case </text:span></text:p>
          </draw:text-box>
        </draw:frame>
        <draw:frame draw:style-name="gr27" draw:text-style-name="P9" draw:layer="layout" svg:width="0.99cm" svg:height="1.309cm" svg:x="1.607cm" svg:y="12.435cm">
          <draw:text-box>
            <text:p text:style-name="P3"><text:span text:style-name="T8">7.</text:span></text:p>
          </draw:text-box>
        </draw:frame>
        <draw:frame draw:style-name="gr635" draw:text-style-name="P11" draw:layer="layout" svg:width="7.737cm" svg:height="0.928cm" svg:x="2.878cm" svg:y="12.74cm">
          <draw:text-box>
            <text:p text:style-name="P3"><text:span text:style-name="T10">Test result /test report </text:span></text:p>
          </draw:text-box>
        </draw:frame>
        <draw:frame draw:style-name="gr636" draw:text-style-name="P10" draw:layer="layout" svg:width="23.474cm" svg:height="0.937cm" svg:x="1.607cm" svg:y="15.652cm">
          <draw:text-box>
            <text:p text:style-name="P3"><text:span text:style-name="T9">*the software parsing XML &amp; generating SQL is not in deliverable list </text:span></text:p>
          </draw:text-box>
        </draw:frame>
      </draw:page>
      <draw:page draw:name="page20" draw:style-name="dp1" draw:master-page-name="master-page3">
        <draw:polygon draw:style-name="gr1" draw:text-style-name="P1" draw:layer="layout" svg:width="33.866cm" svg:height="19.049cm" svg:x="0cm" svg:y="0cm" svg:viewBox="0 0 33867 19050" draw:points="0,0 33867,0 33867,19050 0,19050">
          <text:p/>
        </draw:polygon>
        <draw:polygon draw:style-name="gr8" draw:text-style-name="P6" draw:layer="layout" svg:width="2.175cm" svg:height="0.128cm" svg:x="0cm" svg:y="3.056cm" svg:viewBox="0 0 2176 129" draw:points="0,0 2176,0 2176,129 0,129">
          <text:p/>
        </draw:polygon>
        <draw:polygon draw:style-name="gr8" draw:text-style-name="P6" draw:layer="layout" svg:width="1.995cm" svg:height="1.099cm" svg:x="0.645cm" svg:y="3.612cm" svg:viewBox="0 0 1996 1100" draw:points="0,0 1996,0 1996,1100 0,1100">
          <text:p/>
        </draw:polygon>
        <draw:polygon draw:style-name="gr8" draw:text-style-name="P6" draw:layer="layout" svg:width="2.649cm" svg:height="1.099cm" svg:x="2.64cm" svg:y="3.612cm" svg:viewBox="0 0 2650 1100" draw:points="0,0 2650,0 2650,1100 0,1100">
          <text:p/>
        </draw:polygon>
        <draw:polygon draw:style-name="gr8" draw:text-style-name="P6" draw:layer="layout" svg:width="2.783cm" svg:height="1.099cm" svg:x="5.289cm" svg:y="3.612cm" svg:viewBox="0 0 2784 1100" draw:points="0,0 2784,0 2784,1100 0,1100">
          <text:p/>
        </draw:polygon>
        <draw:polygon draw:style-name="gr8" draw:text-style-name="P6" draw:layer="layout" svg:width="2.547cm" svg:height="1.099cm" svg:x="8.072cm" svg:y="3.612cm" svg:viewBox="0 0 2548 1100" draw:points="0,0 2548,0 2548,1100 0,1100">
          <text:p/>
        </draw:polygon>
        <draw:polygon draw:style-name="gr8" draw:text-style-name="P6" draw:layer="layout" svg:width="2.882cm" svg:height="1.099cm" svg:x="10.619cm" svg:y="3.612cm" svg:viewBox="0 0 2883 1100" draw:points="0,0 2883,0 2883,1100 0,1100">
          <text:p/>
        </draw:polygon>
        <draw:polygon draw:style-name="gr8" draw:text-style-name="P6" draw:layer="layout" svg:width="1.995cm" svg:height="1.222cm" svg:x="0.645cm" svg:y="4.711cm" svg:viewBox="0 0 1996 1223" draw:points="0,0 1996,0 1996,1223 0,1223">
          <text:p/>
        </draw:polygon>
        <draw:polygon draw:style-name="gr637" draw:text-style-name="P221" draw:layer="layout" svg:width="2.649cm" svg:height="1.222cm" svg:x="2.64cm" svg:y="4.711cm" svg:viewBox="0 0 2650 1223" draw:points="0,0 2650,0 2650,1223 0,1223">
          <text:p/>
        </draw:polygon>
        <draw:polygon draw:style-name="gr637" draw:text-style-name="P221" draw:layer="layout" svg:width="2.783cm" svg:height="1.222cm" svg:x="5.289cm" svg:y="4.711cm" svg:viewBox="0 0 2784 1223" draw:points="0,0 2784,0 2784,1223 0,1223">
          <text:p/>
        </draw:polygon>
        <draw:polygon draw:style-name="gr637" draw:text-style-name="P221" draw:layer="layout" svg:width="2.547cm" svg:height="1.222cm" svg:x="8.072cm" svg:y="4.711cm" svg:viewBox="0 0 2548 1223" draw:points="0,0 2548,0 2548,1223 0,1223">
          <text:p/>
        </draw:polygon>
        <draw:polygon draw:style-name="gr637" draw:text-style-name="P221" draw:layer="layout" svg:width="2.882cm" svg:height="1.222cm" svg:x="10.619cm" svg:y="4.711cm" svg:viewBox="0 0 2883 1223" draw:points="0,0 2883,0 2883,1223 0,1223">
          <text:p/>
        </draw:polygon>
        <draw:polygon draw:style-name="gr8" draw:text-style-name="P6" draw:layer="layout" svg:width="1.995cm" svg:height="1.784cm" svg:x="0.645cm" svg:y="5.933cm" svg:viewBox="0 0 1996 1785" draw:points="0,0 1996,0 1996,1785 0,1785">
          <text:p/>
        </draw:polygon>
        <draw:polygon draw:style-name="gr638" draw:text-style-name="P222" draw:layer="layout" svg:width="2.649cm" svg:height="1.784cm" svg:x="2.64cm" svg:y="5.933cm" svg:viewBox="0 0 2650 1785" draw:points="0,0 2650,0 2650,1785 0,1785">
          <text:p/>
        </draw:polygon>
        <draw:polygon draw:style-name="gr638" draw:text-style-name="P222" draw:layer="layout" svg:width="2.783cm" svg:height="1.784cm" svg:x="5.289cm" svg:y="5.933cm" svg:viewBox="0 0 2784 1785" draw:points="0,0 2784,0 2784,1785 0,1785">
          <text:p/>
        </draw:polygon>
        <draw:polygon draw:style-name="gr638" draw:text-style-name="P222" draw:layer="layout" svg:width="2.547cm" svg:height="1.784cm" svg:x="8.072cm" svg:y="5.933cm" svg:viewBox="0 0 2548 1785" draw:points="0,0 2548,0 2548,1785 0,1785">
          <text:p/>
        </draw:polygon>
        <draw:polygon draw:style-name="gr638" draw:text-style-name="P222" draw:layer="layout" svg:width="2.882cm" svg:height="1.784cm" svg:x="10.619cm" svg:y="5.933cm" svg:viewBox="0 0 2883 1785" draw:points="0,0 2883,0 2883,1785 0,1785">
          <text:p/>
        </draw:polygon>
        <draw:polygon draw:style-name="gr8" draw:text-style-name="P6" draw:layer="layout" svg:width="1.995cm" svg:height="1.616cm" svg:x="0.645cm" svg:y="7.717cm" svg:viewBox="0 0 1996 1617" draw:points="0,0 1996,0 1996,1617 0,1617">
          <text:p/>
        </draw:polygon>
        <draw:polygon draw:style-name="gr637" draw:text-style-name="P221" draw:layer="layout" svg:width="2.649cm" svg:height="1.616cm" svg:x="2.64cm" svg:y="7.717cm" svg:viewBox="0 0 2650 1617" draw:points="0,0 2650,0 2650,1617 0,1617">
          <text:p/>
        </draw:polygon>
        <draw:polygon draw:style-name="gr637" draw:text-style-name="P221" draw:layer="layout" svg:width="2.783cm" svg:height="1.616cm" svg:x="5.289cm" svg:y="7.717cm" svg:viewBox="0 0 2784 1617" draw:points="0,0 2784,0 2784,1617 0,1617">
          <text:p/>
        </draw:polygon>
        <draw:polygon draw:style-name="gr637" draw:text-style-name="P221" draw:layer="layout" svg:width="2.547cm" svg:height="1.616cm" svg:x="8.072cm" svg:y="7.717cm" svg:viewBox="0 0 2548 1617" draw:points="0,0 2548,0 2548,1617 0,1617">
          <text:p/>
        </draw:polygon>
        <draw:polygon draw:style-name="gr637" draw:text-style-name="P221" draw:layer="layout" svg:width="2.882cm" svg:height="1.616cm" svg:x="10.619cm" svg:y="7.717cm" svg:viewBox="0 0 2883 1617" draw:points="0,0 2883,0 2883,1617 0,1617">
          <text:p/>
        </draw:polygon>
        <draw:polygon draw:style-name="gr8" draw:text-style-name="P6" draw:layer="layout" svg:width="1.995cm" svg:height="2.039cm" svg:x="0.645cm" svg:y="9.333cm" svg:viewBox="0 0 1996 2040" draw:points="0,0 1996,0 1996,2040 0,2040">
          <text:p/>
        </draw:polygon>
        <draw:polygon draw:style-name="gr638" draw:text-style-name="P222" draw:layer="layout" svg:width="2.649cm" svg:height="2.039cm" svg:x="2.64cm" svg:y="9.333cm" svg:viewBox="0 0 2650 2040" draw:points="0,0 2650,0 2650,2040 0,2040">
          <text:p/>
        </draw:polygon>
        <draw:polygon draw:style-name="gr638" draw:text-style-name="P222" draw:layer="layout" svg:width="2.783cm" svg:height="2.039cm" svg:x="5.289cm" svg:y="9.333cm" svg:viewBox="0 0 2784 2040" draw:points="0,0 2784,0 2784,2040 0,2040">
          <text:p/>
        </draw:polygon>
        <draw:polygon draw:style-name="gr638" draw:text-style-name="P222" draw:layer="layout" svg:width="2.547cm" svg:height="2.039cm" svg:x="8.072cm" svg:y="9.333cm" svg:viewBox="0 0 2548 2040" draw:points="0,0 2548,0 2548,2040 0,2040">
          <text:p/>
        </draw:polygon>
        <draw:polygon draw:style-name="gr638" draw:text-style-name="P222" draw:layer="layout" svg:width="2.882cm" svg:height="2.039cm" svg:x="10.619cm" svg:y="9.333cm" svg:viewBox="0 0 2883 2040" draw:points="0,0 2883,0 2883,2040 0,2040">
          <text:p/>
        </draw:polygon>
        <draw:line draw:style-name="gr639" draw:text-style-name="P2" draw:layer="layout" svg:x1="2.64cm" svg:y1="3.595cm" svg:x2="2.64cm" svg:y2="11.39cm">
          <text:p/>
        </draw:line>
        <draw:line draw:style-name="gr639" draw:text-style-name="P2" draw:layer="layout" svg:x1="5.289cm" svg:y1="3.595cm" svg:x2="5.289cm" svg:y2="11.39cm">
          <text:p/>
        </draw:line>
        <draw:line draw:style-name="gr639" draw:text-style-name="P2" draw:layer="layout" svg:x1="8.072cm" svg:y1="3.595cm" svg:x2="8.072cm" svg:y2="11.39cm">
          <text:p/>
        </draw:line>
        <draw:line draw:style-name="gr639" draw:text-style-name="P2" draw:layer="layout" svg:x1="10.619cm" svg:y1="3.595cm" svg:x2="10.619cm" svg:y2="11.39cm">
          <text:p/>
        </draw:line>
        <draw:line draw:style-name="gr640" draw:text-style-name="P2" draw:layer="layout" svg:x1="0.627cm" svg:y1="4.711cm" svg:x2="13.519cm" svg:y2="4.711cm">
          <text:p/>
        </draw:line>
        <draw:line draw:style-name="gr639" draw:text-style-name="P2" draw:layer="layout" svg:x1="0.627cm" svg:y1="5.933cm" svg:x2="13.519cm" svg:y2="5.933cm">
          <text:p/>
        </draw:line>
        <draw:line draw:style-name="gr639" draw:text-style-name="P2" draw:layer="layout" svg:x1="0.627cm" svg:y1="7.717cm" svg:x2="13.519cm" svg:y2="7.717cm">
          <text:p/>
        </draw:line>
        <draw:line draw:style-name="gr639" draw:text-style-name="P2" draw:layer="layout" svg:x1="0.627cm" svg:y1="9.333cm" svg:x2="13.519cm" svg:y2="9.333cm">
          <text:p/>
        </draw:line>
        <draw:line draw:style-name="gr639" draw:text-style-name="P2" draw:layer="layout" svg:x1="0.645cm" svg:y1="3.595cm" svg:x2="0.645cm" svg:y2="11.39cm">
          <text:p/>
        </draw:line>
        <draw:line draw:style-name="gr639" draw:text-style-name="P2" draw:layer="layout" svg:x1="13.501cm" svg:y1="3.595cm" svg:x2="13.501cm" svg:y2="11.39cm">
          <text:p/>
        </draw:line>
        <draw:line draw:style-name="gr639" draw:text-style-name="P2" draw:layer="layout" svg:x1="0.627cm" svg:y1="3.612cm" svg:x2="13.519cm" svg:y2="3.612cm">
          <text:p/>
        </draw:line>
        <draw:line draw:style-name="gr639" draw:text-style-name="P2" draw:layer="layout" svg:x1="0.627cm" svg:y1="11.372cm" svg:x2="13.519cm" svg:y2="11.372cm">
          <text:p/>
        </draw:line>
        <draw:frame draw:style-name="gr641" draw:text-style-name="P9" draw:layer="layout" svg:width="17.403cm" svg:height="1.309cm" svg:x="0.899cm" svg:y="1.518cm">
          <draw:text-box>
            <text:p text:style-name="P3"><text:span text:style-name="T7">Escalation Time &amp; Escalation Level </text:span></text:p>
          </draw:text-box>
        </draw:frame>
        <draw:frame draw:style-name="gr642" draw:text-style-name="P100" draw:layer="layout" svg:width="1.644cm" svg:height="0.442cm" svg:x="0.897cm" svg:y="3.97cm">
          <draw:text-box>
            <text:p text:style-name="P3"><text:span text:style-name="T50">Severity </text:span></text:p>
          </draw:text-box>
        </draw:frame>
        <draw:frame draw:style-name="gr643" draw:text-style-name="P100" draw:layer="layout" svg:width="2.256cm" svg:height="0.442cm" svg:x="2.9cm" svg:y="3.97cm">
          <draw:text-box>
            <text:p text:style-name="P3"><text:span text:style-name="T50">Initial Level </text:span></text:p>
          </draw:text-box>
        </draw:frame>
        <draw:frame draw:style-name="gr644" draw:text-style-name="P100" draw:layer="layout" svg:width="1.533cm" svg:height="0.442cm" svg:x="5.965cm" svg:y="3.721cm">
          <draw:text-box>
            <text:p text:style-name="P3"><text:span text:style-name="T50">Second </text:span></text:p>
          </draw:text-box>
        </draw:frame>
        <draw:frame draw:style-name="gr645" draw:text-style-name="P100" draw:layer="layout" svg:width="1.118cm" svg:height="0.442cm" svg:x="6.186cm" svg:y="4.219cm">
          <draw:text-box>
            <text:p text:style-name="P3"><text:span text:style-name="T50">Level </text:span></text:p>
          </draw:text-box>
        </draw:frame>
        <draw:frame draw:style-name="gr646" draw:text-style-name="P100" draw:layer="layout" svg:width="2.212cm" svg:height="0.442cm" svg:x="8.293cm" svg:y="3.97cm">
          <draw:text-box>
            <text:p text:style-name="P3"><text:span text:style-name="T50">Third Level </text:span></text:p>
          </draw:text-box>
        </draw:frame>
        <draw:frame draw:style-name="gr647" draw:text-style-name="P100" draw:layer="layout" svg:width="2.474cm" svg:height="0.442cm" svg:x="10.891cm" svg:y="3.97cm">
          <draw:text-box>
            <text:p text:style-name="P3"><text:span text:style-name="T50">Fourth Level </text:span></text:p>
          </draw:text-box>
        </draw:frame>
        <draw:frame draw:style-name="gr648" draw:text-style-name="P100" draw:layer="layout" svg:width="0.388cm" svg:height="0.442cm" svg:x="1.524cm" svg:y="5.131cm">
          <draw:text-box>
            <text:p text:style-name="P3"><text:span text:style-name="T50">1 </text:span></text:p>
          </draw:text-box>
        </draw:frame>
        <draw:frame draw:style-name="gr649" draw:text-style-name="P105" draw:layer="layout" svg:width="2.072cm" svg:height="0.475cm" svg:x="2.959cm" svg:y="4.84cm">
          <draw:text-box>
            <text:p text:style-name="P3"><text:span text:style-name="T21">Immediatel</text:span></text:p>
          </draw:text-box>
        </draw:frame>
        <draw:frame draw:style-name="gr175" draw:text-style-name="P105" draw:layer="layout" svg:width="0.422cm" svg:height="0.475cm" svg:x="3.899cm" svg:y="5.382cm">
          <draw:text-box>
            <text:p text:style-name="P3"><text:span text:style-name="T21">y </text:span></text:p>
          </draw:text-box>
        </draw:frame>
        <draw:frame draw:style-name="gr650" draw:text-style-name="P105" draw:layer="layout" svg:width="2.402cm" svg:height="0.475cm" svg:x="5.534cm" svg:y="5.112cm">
          <draw:text-box>
            <text:p text:style-name="P3"><text:span text:style-name="T21">Immediately </text:span></text:p>
          </draw:text-box>
        </draw:frame>
        <draw:frame draw:style-name="gr651" draw:text-style-name="P105" draw:layer="layout" svg:width="1.332cm" svg:height="0.475cm" svg:x="8.725cm" svg:y="4.84cm">
          <draw:text-box>
            <text:p text:style-name="P3"><text:span text:style-name="T21">T + 30 </text:span></text:p>
          </draw:text-box>
        </draw:frame>
        <draw:frame draw:style-name="gr652" draw:text-style-name="P105" draw:layer="layout" svg:width="0.896cm" svg:height="0.475cm" svg:x="8.894cm" svg:y="5.382cm">
          <draw:text-box>
            <text:p text:style-name="P3"><text:span text:style-name="T21">mins</text:span></text:p>
          </draw:text-box>
        </draw:frame>
        <draw:frame draw:style-name="gr653" draw:text-style-name="P105" draw:layer="layout" svg:width="2.061cm" svg:height="0.475cm" svg:x="11.077cm" svg:y="5.112cm">
          <draw:text-box>
            <text:p text:style-name="P3"><text:span text:style-name="T21">T + 1 hour </text:span></text:p>
          </draw:text-box>
        </draw:frame>
        <draw:frame draw:style-name="gr648" draw:text-style-name="P100" draw:layer="layout" svg:width="0.388cm" svg:height="0.442cm" svg:x="1.482cm" svg:y="6.635cm">
          <draw:text-box>
            <text:p text:style-name="P3"><text:span text:style-name="T50">2 </text:span></text:p>
          </draw:text-box>
        </draw:frame>
        <draw:frame draw:style-name="gr650" draw:text-style-name="P105" draw:layer="layout" svg:width="2.402cm" svg:height="0.475cm" svg:x="2.781cm" svg:y="6.615cm">
          <draw:text-box>
            <text:p text:style-name="P3"><text:span text:style-name="T21">Immediately </text:span></text:p>
          </draw:text-box>
        </draw:frame>
        <draw:frame draw:style-name="gr654" draw:text-style-name="P105" draw:layer="layout" svg:width="2.225cm" svg:height="0.475cm" svg:x="5.534cm" svg:y="6.615cm">
          <draw:text-box>
            <text:p text:style-name="P3"><text:span text:style-name="T21">T + 30 mins</text:span></text:p>
          </draw:text-box>
        </draw:frame>
        <draw:frame draw:style-name="gr653" draw:text-style-name="P105" draw:layer="layout" svg:width="2.061cm" svg:height="0.475cm" svg:x="8.327cm" svg:y="6.615cm">
          <draw:text-box>
            <text:p text:style-name="P3"><text:span text:style-name="T21">T + 1 hour </text:span></text:p>
          </draw:text-box>
        </draw:frame>
        <draw:frame draw:style-name="gr655" draw:text-style-name="P105" draw:layer="layout" svg:width="2.155cm" svg:height="0.475cm" svg:x="10.992cm" svg:y="6.615cm">
          <draw:text-box>
            <text:p text:style-name="P3"><text:span text:style-name="T21">T + 2hours </text:span></text:p>
          </draw:text-box>
        </draw:frame>
        <draw:frame draw:style-name="gr656" draw:text-style-name="P100" draw:layer="layout" svg:width="0.389cm" svg:height="0.442cm" svg:x="1.482cm" svg:y="8.334cm">
          <draw:text-box>
            <text:p text:style-name="P3"><text:span text:style-name="T50">3 </text:span></text:p>
          </draw:text-box>
        </draw:frame>
        <draw:frame draw:style-name="gr657" draw:text-style-name="P105" draw:layer="layout" svg:width="2.273cm" svg:height="0.475cm" svg:x="2.841cm" svg:y="8.316cm">
          <draw:text-box>
            <text:p text:style-name="P3"><text:span text:style-name="T21">T + 2 hours </text:span></text:p>
          </draw:text-box>
        </draw:frame>
        <draw:frame draw:style-name="gr657" draw:text-style-name="P105" draw:layer="layout" svg:width="2.273cm" svg:height="0.475cm" svg:x="5.559cm" svg:y="8.316cm">
          <draw:text-box>
            <text:p text:style-name="P3"><text:span text:style-name="T21">T + 4 hours </text:span></text:p>
          </draw:text-box>
        </draw:frame>
        <draw:frame draw:style-name="gr658" draw:text-style-name="P105" draw:layer="layout" svg:width="1.896cm" svg:height="0.475cm" svg:x="8.412cm" svg:y="8.316cm">
          <draw:text-box>
            <text:p text:style-name="P3"><text:span text:style-name="T21">T + 1 day </text:span></text:p>
          </draw:text-box>
        </draw:frame>
        <draw:frame draw:style-name="gr659" draw:text-style-name="P105" draw:layer="layout" svg:width="2.108cm" svg:height="0.475cm" svg:x="11.018cm" svg:y="8.316cm">
          <draw:text-box>
            <text:p text:style-name="P3"><text:span text:style-name="T21">T + 2 days </text:span></text:p>
          </draw:text-box>
        </draw:frame>
        <draw:frame draw:style-name="gr648" draw:text-style-name="P100" draw:layer="layout" svg:width="0.388cm" svg:height="0.442cm" svg:x="1.482cm" svg:y="10.164cm">
          <draw:text-box>
            <text:p text:style-name="P3"><text:span text:style-name="T50">4 </text:span></text:p>
          </draw:text-box>
        </draw:frame>
        <draw:frame draw:style-name="gr658" draw:text-style-name="P105" draw:layer="layout" svg:width="1.896cm" svg:height="0.475cm" svg:x="3.027cm" svg:y="10.144cm">
          <draw:text-box>
            <text:p text:style-name="P3"><text:span text:style-name="T21">T + 1 day </text:span></text:p>
          </draw:text-box>
        </draw:frame>
        <draw:frame draw:style-name="gr659" draw:text-style-name="P105" draw:layer="layout" svg:width="2.108cm" svg:height="0.475cm" svg:x="5.644cm" svg:y="10.144cm">
          <draw:text-box>
            <text:p text:style-name="P3"><text:span text:style-name="T21">T + 2 days </text:span></text:p>
          </draw:text-box>
        </draw:frame>
        <draw:frame draw:style-name="gr660" draw:text-style-name="P105" draw:layer="layout" svg:width="2.202cm" svg:height="0.475cm" svg:x="8.259cm" svg:y="10.144cm">
          <draw:text-box>
            <text:p text:style-name="P3"><text:span text:style-name="T21">T + 1 week </text:span></text:p>
          </draw:text-box>
        </draw:frame>
        <draw:polygon draw:style-name="gr45" draw:text-style-name="P6" draw:layer="layout" svg:width="6.063cm" svg:height="1.566cm" svg:x="16.399cm" svg:y="5.85cm" svg:viewBox="0 0 6064 1567" draw:points="0,0 6064,0 6064,1567 0,1567">
          <text:p/>
        </draw:polygon>
        <draw:frame draw:style-name="gr660" draw:text-style-name="P105" draw:layer="layout" svg:width="2.202cm" svg:height="0.475cm" svg:x="10.975cm" svg:y="10.144cm">
          <draw:text-box>
            <text:p text:style-name="P3"><text:span text:style-name="T21">T + 2 week </text:span></text:p>
          </draw:text-box>
        </draw:frame>
        <draw:polygon draw:style-name="gr45" draw:text-style-name="P6" draw:layer="layout" svg:width="6.063cm" svg:height="1.558cm" svg:x="16.399cm" svg:y="8.094cm" svg:viewBox="0 0 6064 1559" draw:points="0,0 6064,0 6064,1559 0,1559">
          <text:p/>
        </draw:polygon>
        <draw:frame draw:style-name="gr277" draw:text-style-name="P105" draw:layer="layout" svg:width="3.414cm" svg:height="0.475cm" svg:x="17.727cm" svg:y="6.415cm">
          <draw:text-box>
            <text:p text:style-name="P3"><text:span text:style-name="T19">Business Sponsor</text:span></text:p>
          </draw:text-box>
        </draw:frame>
        <draw:polygon draw:style-name="gr661" draw:text-style-name="P223" draw:layer="layout" svg:width="6.909cm" svg:height="1.567cm" svg:x="23.397cm" svg:y="5.854cm" svg:viewBox="0 0 6910 1568" draw:points="0,0 6910,0 6910,1568 0,1568">
          <text:p/>
        </draw:polygon>
        <draw:frame draw:style-name="gr277" draw:text-style-name="P105" draw:layer="layout" svg:width="3.414cm" svg:height="0.475cm" svg:x="17.727cm" svg:y="8.658cm">
          <draw:text-box>
            <text:p text:style-name="P3"><text:span text:style-name="T19">Program Manager</text:span></text:p>
          </draw:text-box>
        </draw:frame>
        <draw:polygon draw:style-name="gr661" draw:text-style-name="P223" draw:layer="layout" svg:width="3.412cm" svg:height="1.558cm" svg:x="23.363cm" svg:y="8.098cm" svg:viewBox="0 0 3413 1559" draw:points="0,0 3413,0 3413,1559 0,1559">
          <text:p/>
        </draw:polygon>
        <draw:frame draw:style-name="gr662" draw:text-style-name="P105" draw:layer="layout" svg:width="0.684cm" svg:height="0.475cm" svg:x="26.518cm" svg:y="6.415cm">
          <draw:text-box>
            <text:p text:style-name="P3"><text:span text:style-name="T21">GM</text:span></text:p>
          </draw:text-box>
        </draw:frame>
        <draw:polygon draw:style-name="gr661" draw:text-style-name="P223" draw:layer="layout" svg:width="3.387cm" svg:height="1.558cm" svg:x="26.919cm" svg:y="8.098cm" svg:viewBox="0 0 3388 1559" draw:points="0,0 3388,0 3388,1559 0,1559">
          <text:p/>
        </draw:polygon>
        <draw:frame draw:style-name="gr663" draw:text-style-name="P100" draw:layer="layout" svg:width="2.912cm" svg:height="0.442cm" svg:x="23.635cm" svg:y="8.675cm">
          <draw:text-box>
            <text:p text:style-name="P3"><text:span text:style-name="T17">Account Director</text:span></text:p>
          </draw:text-box>
        </draw:frame>
        <draw:polygon draw:style-name="gr45" draw:text-style-name="P6" draw:layer="layout" svg:width="6.063cm" svg:height="1.558cm" svg:x="16.399cm" svg:y="10.337cm" svg:viewBox="0 0 6064 1559" draw:points="0,0 6064,0 6064,1559 0,1559">
          <text:p/>
        </draw:polygon>
        <draw:frame draw:style-name="gr164" draw:text-style-name="P100" draw:layer="layout" svg:width="2.475cm" svg:height="0.442cm" svg:x="27.385cm" svg:y="8.675cm">
          <draw:text-box>
            <text:p text:style-name="P3"><text:span text:style-name="T17">Delivery Head</text:span></text:p>
          </draw:text-box>
        </draw:frame>
        <draw:polygon draw:style-name="gr661" draw:text-style-name="P223" draw:layer="layout" svg:width="6.943cm" svg:height="1.557cm" svg:x="23.363cm" svg:y="10.342cm" svg:viewBox="0 0 6944 1558" draw:points="0,0 6944,0 6944,1558 0,1558">
          <text:p/>
        </draw:polygon>
        <draw:frame draw:style-name="gr664" draw:text-style-name="P105" draw:layer="layout" svg:width="3.108cm" svg:height="0.475cm" svg:x="17.88cm" svg:y="10.9cm">
          <draw:text-box>
            <text:p text:style-name="P3"><text:span text:style-name="T19">Project Manager</text:span></text:p>
          </draw:text-box>
        </draw:frame>
        <draw:polygon draw:style-name="gr661" draw:text-style-name="P223" draw:layer="layout" svg:width="6.909cm" svg:height="1.558cm" svg:x="23.397cm" svg:y="3.619cm" svg:viewBox="0 0 6910 1559" draw:points="0,0 6910,0 6910,1559 0,1559">
          <text:p/>
        </draw:polygon>
        <draw:frame draw:style-name="gr665" draw:text-style-name="P105" draw:layer="layout" svg:width="5.767cm" svg:height="0.475cm" svg:x="23.95cm" svg:y="10.9cm">
          <draw:text-box>
            <text:p text:style-name="P3"><text:span text:style-name="T21">Contact Point/Project Manager</text:span></text:p>
          </draw:text-box>
        </draw:frame>
        <draw:polygon draw:style-name="gr45" draw:text-style-name="P6" draw:layer="layout" svg:width="6.063cm" svg:height="1.558cm" svg:x="16.399cm" svg:y="3.615cm" svg:viewBox="0 0 6064 1559" draw:points="0,0 6064,0 6064,1559 0,1559">
          <text:p/>
        </draw:polygon>
        <draw:frame draw:style-name="gr666" draw:text-style-name="P105" draw:layer="layout" svg:width="2.896cm" svg:height="0.475cm" svg:x="25.408cm" svg:y="4.172cm">
          <draw:text-box>
            <text:p text:style-name="P3"><text:span text:style-name="T21">Executive Mngt</text:span></text:p>
          </draw:text-box>
        </draw:frame>
        <draw:polygon draw:style-name="gr236" draw:text-style-name="P6" draw:layer="layout" svg:width="0.753cm" svg:height="0.685cm" svg:x="19.143cm" svg:y="9.618cm" svg:viewBox="0 0 754 686" draw:points="0,344 377,0 754,344 566,344 566,686 189,686 189,344">
          <text:p/>
        </draw:polygon>
        <draw:polygon draw:style-name="gr236" draw:text-style-name="P6" draw:layer="layout" svg:width="0.753cm" svg:height="0.678cm" svg:x="19.143cm" svg:y="7.416cm" svg:viewBox="0 0 754 679" draw:points="0,339 377,0 754,339 566,339 566,679 189,679 189,339">
          <text:p/>
        </draw:polygon>
        <draw:polygon draw:style-name="gr236" draw:text-style-name="P6" draw:layer="layout" svg:width="0.753cm" svg:height="0.677cm" svg:x="19.143cm" svg:y="5.173cm" svg:viewBox="0 0 754 678" draw:points="0,338 377,0 754,338 566,338 566,678 189,678 189,338">
          <text:p/>
        </draw:polygon>
        <draw:polygon draw:style-name="gr661" draw:text-style-name="P223" draw:layer="layout" svg:width="0.753cm" svg:height="0.686cm" svg:x="26.454cm" svg:y="9.656cm" svg:viewBox="0 0 754 687" draw:points="0,344 377,0 754,344 566,344 566,687 188,687 188,344">
          <text:p/>
        </draw:polygon>
        <draw:polygon draw:style-name="gr661" draw:text-style-name="P223" draw:layer="layout" svg:width="2.252cm" svg:height="1.557cm" svg:x="30.755cm" svg:y="10.342cm" svg:viewBox="0 0 2253 1558" draw:points="0,0 2253,0 2253,1558 0,1558">
          <text:p/>
        </draw:polygon>
        <draw:frame draw:style-name="gr666" draw:text-style-name="P105" draw:layer="layout" svg:width="2.896cm" svg:height="0.475cm" svg:x="17.99cm" svg:y="4.172cm">
          <draw:text-box>
            <text:p text:style-name="P3"><text:span text:style-name="T19">Executive Mngt</text:span></text:p>
          </draw:text-box>
        </draw:frame>
        <draw:polygon draw:style-name="gr661" draw:text-style-name="P223" draw:layer="layout" svg:width="0.753cm" svg:height="0.677cm" svg:x="26.454cm" svg:y="7.412cm" svg:viewBox="0 0 754 678" draw:points="0,339 377,0 754,339 566,339 566,678 188,678 188,339">
          <text:p/>
        </draw:polygon>
        <draw:polygon draw:style-name="gr661" draw:text-style-name="P223" draw:layer="layout" svg:width="0.753cm" svg:height="0.686cm" svg:x="26.454cm" svg:y="5.177cm" svg:viewBox="0 0 754 687" draw:points="0,343 377,0 754,343 566,343 566,687 188,687 188,343">
          <text:p/>
        </draw:polygon>
        <draw:frame draw:style-name="gr667" draw:text-style-name="P105" draw:layer="layout" svg:width="0.966cm" svg:height="0.475cm" svg:x="31.399cm" svg:y="10.894cm">
          <draw:text-box>
            <text:p text:style-name="P3"><text:span text:style-name="T21">PMO</text:span></text:p>
          </draw:text-box>
        </draw:frame>
        <draw:frame draw:style-name="gr668" draw:text-style-name="P100" draw:layer="layout" svg:width="1.272cm" svg:height="0.442cm" svg:x="14.629cm" svg:y="4.005cm">
          <draw:text-box>
            <text:p text:style-name="P3"><text:span text:style-name="T17">Level 1</text:span></text:p>
          </draw:text-box>
        </draw:frame>
        <draw:frame draw:style-name="gr668" draw:text-style-name="P100" draw:layer="layout" svg:width="1.272cm" svg:height="0.442cm" svg:x="14.629cm" svg:y="6.278cm">
          <draw:text-box>
            <text:p text:style-name="P3"><text:span text:style-name="T17">Level 2</text:span></text:p>
          </draw:text-box>
        </draw:frame>
        <draw:frame draw:style-name="gr668" draw:text-style-name="P100" draw:layer="layout" svg:width="1.272cm" svg:height="0.442cm" svg:x="14.629cm" svg:y="8.548cm">
          <draw:text-box>
            <text:p text:style-name="P3"><text:span text:style-name="T17">Level 3</text:span></text:p>
          </draw:text-box>
        </draw:frame>
        <draw:frame draw:style-name="gr668" draw:text-style-name="P100" draw:layer="layout" svg:width="1.272cm" svg:height="0.442cm" svg:x="14.629cm" svg:y="10.82cm">
          <draw:text-box>
            <text:p text:style-name="P3"><text:span text:style-name="T17">Level 4</text:span></text:p>
          </draw:text-box>
        </draw:frame>
        <draw:frame draw:style-name="gr669" draw:text-style-name="P217" draw:layer="layout" svg:width="2.773cm" svg:height="0.361cm" svg:x="14.879cm" svg:y="12.553cm">
          <draw:text-box>
            <text:p text:style-name="P3"><text:span text:style-name="T51">Escalation Scope:</text:span></text:p>
          </draw:text-box>
        </draw:frame>
        <draw:frame draw:style-name="gr670" draw:text-style-name="P217" draw:layer="layout" svg:width="9.516cm" svg:height="0.361cm" svg:x="14.879cm" svg:y="12.934cm">
          <draw:text-box>
            <text:p text:style-name="P3"><text:span text:style-name="T52">1. Project KPI releated issues/risks (schedule, quality, budget/cost)</text:span></text:p>
          </draw:text-box>
        </draw:frame>
        <draw:frame draw:style-name="gr671" draw:text-style-name="P217" draw:layer="layout" svg:width="5.259cm" svg:height="0.361cm" svg:x="14.879cm" svg:y="13.315cm">
          <draw:text-box>
            <text:p text:style-name="P3"><text:span text:style-name="T52">2. Resource related SLA issues/risks</text:span></text:p>
          </draw:text-box>
        </draw:frame>
        <draw:frame draw:style-name="gr672" draw:text-style-name="P216" draw:layer="layout" svg:width="5.818cm" svg:height="0.365cm" svg:x="14.879cm" svg:y="13.695cm">
          <draw:text-box>
            <text:p text:style-name="P3"><text:span text:style-name="T53">3. Other project/tech related issues/risks</text:span></text:p>
          </draw:text-box>
        </draw:frame>
        <draw:frame draw:style-name="gr673" draw:text-style-name="P217" draw:layer="layout" svg:width="2.97cm" svg:height="0.361cm" svg:x="14.879cm" svg:y="14.458cm">
          <draw:text-box>
            <text:p text:style-name="P3"><text:span text:style-name="T51">Escalation criteria: </text:span></text:p>
          </draw:text-box>
        </draw:frame>
        <draw:frame draw:style-name="gr674" draw:text-style-name="P217" draw:layer="layout" svg:width="14.647cm" svg:height="0.361cm" svg:x="14.879cm" svg:y="14.839cm">
          <draw:text-box>
            <text:p text:style-name="P3"><text:span text:style-name="T52">1. if the </text:span><text:span text:style-name="T51">high </text:span><text:span text:style-name="T52">issue/risk is identified and not resolved within </text:span><text:span text:style-name="T51">3 working days</text:span><text:span text:style-name="T52">, then escalate to next level</text:span></text:p>
          </draw:text-box>
        </draw:frame>
        <draw:frame draw:style-name="gr675" draw:text-style-name="P217" draw:layer="layout" svg:width="15.202cm" svg:height="0.361cm" svg:x="14.879cm" svg:y="15.22cm">
          <draw:text-box>
            <text:p text:style-name="P3"><text:span text:style-name="T52">2. if the </text:span><text:span text:style-name="T51">medium </text:span><text:span text:style-name="T52">issue/risk is identified and not revolved within </text:span><text:span text:style-name="T51">5 working days</text:span><text:span text:style-name="T52">, then escalate to next level</text:span></text:p>
          </draw:text-box>
        </draw:frame>
        <draw:frame draw:style-name="gr676" draw:text-style-name="P216" draw:layer="layout" svg:width="14.877cm" svg:height="0.365cm" svg:x="14.879cm" svg:y="15.601cm">
          <draw:text-box>
            <text:p text:style-name="P3"><text:span text:style-name="T53">3. if the </text:span><text:span text:style-name="T54">low</text:span><text:span text:style-name="T53"> issue/risk is identified and not revolved within </text:span><text:span text:style-name="T54">10 working days</text:span><text:span text:style-name="T53">, then escalate to next level</text:span></text:p>
          </draw:text-box>
        </draw:frame>
        <draw:frame draw:style-name="gr677" draw:text-style-name="P217" draw:layer="layout" svg:width="4.579cm" svg:height="0.361cm" svg:x="14.879cm" svg:y="16.364cm">
          <draw:text-box>
            <text:p text:style-name="P3"><text:span text:style-name="T51">Definition of Issue/Risk Level:</text:span></text:p>
          </draw:text-box>
        </draw:frame>
        <draw:frame draw:style-name="gr678" draw:text-style-name="P217" draw:layer="layout" svg:width="9.623cm" svg:height="0.361cm" svg:x="14.879cm" svg:y="16.745cm">
          <draw:text-box>
            <text:p text:style-name="P3"><text:span text:style-name="T52">1. High Issue/Risk: have big impact on project KPI, recruitment SLA</text:span></text:p>
          </draw:text-box>
        </draw:frame>
        <draw:frame draw:style-name="gr679" draw:text-style-name="P217" draw:layer="layout" svg:width="18.653cm" svg:height="0.361cm" svg:x="14.879cm" svg:y="17.126cm">
          <draw:text-box>
            <text:p text:style-name="P3"><text:span text:style-name="T52">2. Medium Issue/Risk: project internal technical, mngt related issue but with no or limited impact on project overall delivery KPI/SLA</text:span></text:p>
          </draw:text-box>
        </draw:frame>
        <draw:frame draw:style-name="gr680" draw:text-style-name="P216" draw:layer="layout" svg:width="7.63cm" svg:height="0.365cm" svg:x="14.879cm" svg:y="17.507cm">
          <draw:text-box>
            <text:p text:style-name="P3"><text:span text:style-name="T53">3. Low Issue/Risk: no impact on the project KPI, SLA</text:span></text:p>
          </draw:text-box>
        </draw:frame>
        <draw:polygon draw:style-name="gr681" draw:text-style-name="P211" draw:layer="layout" svg:width="0.965cm" svg:height="0.483cm" svg:x="22.462cm" svg:y="4.258cm" svg:viewBox="0 0 966 484" draw:points="0,242 242,0 242,121 724,121 724,0 966,242 724,484 724,363 242,363 242,484">
          <text:p/>
        </draw:polygon>
        <draw:polygon draw:style-name="gr681" draw:text-style-name="P211" draw:layer="layout" svg:width="0.965cm" svg:height="0.482cm" svg:x="22.428cm" svg:y="6.392cm" svg:viewBox="0 0 966 483" draw:points="0,242 241,0 241,121 725,121 725,0 966,242 725,483 725,363 241,363 241,483">
          <text:p/>
        </draw:polygon>
        <draw:polygon draw:style-name="gr681" draw:text-style-name="P211" draw:layer="layout" svg:width="0.965cm" svg:height="0.482cm" svg:x="22.428cm" svg:y="8.636cm" svg:viewBox="0 0 966 483" draw:points="0,241 241,0 241,120 725,120 725,0 966,241 725,483 725,362 241,362 241,483">
          <text:p/>
        </draw:polygon>
        <draw:polygon draw:style-name="gr681" draw:text-style-name="P211" draw:layer="layout" svg:width="0.965cm" svg:height="0.474cm" svg:x="22.428cm" svg:y="10.871cm" svg:viewBox="0 0 966 475" draw:points="0,237 237,0 237,118 729,118 729,0 966,237 729,475 729,356 237,356 237,475">
          <text:p/>
        </draw:polygon>
        <draw:polygon draw:style-name="gr682" draw:text-style-name="P223" draw:layer="layout" svg:width="1.846cm" svg:height="1.787cm" svg:x="30.289cm" svg:y="8.555cm" svg:viewBox="0 0 1847 1788" draw:points="1400,1788 1400,670 448,670 448,893 0,447 448,0 448,223 1847,223 1847,1788">
          <text:p/>
        </draw:polygon>
        <draw:polygon draw:style-name="gr683" draw:text-style-name="P2" draw:layer="layout" svg:width="1.846cm" svg:height="1.787cm" svg:x="30.289cm" svg:y="8.555cm" svg:viewBox="0 0 1847 1788" draw:points="1400,1788 1400,670 448,670 448,893 0,447 448,0 448,223 1847,223 1847,1788">
          <text:p/>
        </draw:polygon>
        <draw:frame draw:style-name="gr684" draw:text-style-name="P217" draw:layer="layout" svg:width="18.619cm" svg:height="0.361cm" svg:x="14.879cm" svg:y="18.27cm">
          <draw:text-box>
            <text:p text:style-name="P3"><text:span text:style-name="T52">the assessment and definition on the severity of each specific issue or risk should be matually agreed at same level from both side.</text:span></text:p>
          </draw:text-box>
        </draw:frame>
      </draw:page>
      <draw:page draw:name="page21" draw:style-name="dp1" draw:master-page-name="master-page3">
        <draw:polygon draw:style-name="gr1" draw:text-style-name="P1" draw:layer="layout" svg:width="33.866cm" svg:height="19.049cm" svg:x="0cm" svg:y="0cm" svg:viewBox="0 0 33867 19050" draw:points="0,0 33867,0 33867,19050 0,19050">
          <text:p/>
        </draw:polygon>
        <draw:polygon draw:style-name="gr8" draw:text-style-name="P6" draw:layer="layout" svg:width="2.175cm" svg:height="0.128cm" svg:x="0cm" svg:y="3.056cm" svg:viewBox="0 0 2176 129" draw:points="0,0 2176,0 2176,129 0,129">
          <text:p/>
        </draw:polygon>
        <draw:polygon draw:style-name="gr8" draw:text-style-name="P6" draw:layer="layout" svg:width="2.418cm" svg:height="1.775cm" svg:x="3.497cm" svg:y="4.202cm" svg:viewBox="0 0 2419 1776" draw:points="0,0 2419,0 2419,1776 0,1776">
          <text:p/>
        </draw:polygon>
        <draw:polygon draw:style-name="gr8" draw:text-style-name="P6" draw:layer="layout" svg:width="4.448cm" svg:height="1.775cm" svg:x="5.915cm" svg:y="4.202cm" svg:viewBox="0 0 4449 1776" draw:points="0,0 4449,0 4449,1776 0,1776">
          <text:p/>
        </draw:polygon>
        <draw:polygon draw:style-name="gr8" draw:text-style-name="P6" draw:layer="layout" svg:width="9.154cm" svg:height="1.775cm" svg:x="10.363cm" svg:y="4.202cm" svg:viewBox="0 0 9155 1776" draw:points="0,0 9155,0 9155,1776 0,1776">
          <text:p/>
        </draw:polygon>
        <draw:polygon draw:style-name="gr8" draw:text-style-name="P6" draw:layer="layout" svg:width="5.147cm" svg:height="1.775cm" svg:x="19.517cm" svg:y="4.202cm" svg:viewBox="0 0 5148 1776" draw:points="0,0 5148,0 5148,1776 0,1776">
          <text:p/>
        </draw:polygon>
        <draw:polygon draw:style-name="gr8" draw:text-style-name="P6" draw:layer="layout" svg:width="3.025cm" svg:height="1.775cm" svg:x="24.664cm" svg:y="4.202cm" svg:viewBox="0 0 3026 1776" draw:points="0,0 3026,0 3026,1776 0,1776">
          <text:p/>
        </draw:polygon>
        <draw:polygon draw:style-name="gr8" draw:text-style-name="P6" draw:layer="layout" svg:width="2.857cm" svg:height="1.775cm" svg:x="27.689cm" svg:y="4.202cm" svg:viewBox="0 0 2858 1776" draw:points="0,0 2858,0 2858,1776 0,1776">
          <text:p/>
        </draw:polygon>
        <draw:polygon draw:style-name="gr8" draw:text-style-name="P6" draw:layer="layout" svg:width="2.418cm" svg:height="2.319cm" svg:x="3.497cm" svg:y="5.977cm" svg:viewBox="0 0 2419 2320" draw:points="0,0 2419,0 2419,2320 0,2320">
          <text:p/>
        </draw:polygon>
        <draw:polygon draw:style-name="gr637" draw:text-style-name="P221" draw:layer="layout" svg:width="4.448cm" svg:height="2.319cm" svg:x="5.915cm" svg:y="5.977cm" svg:viewBox="0 0 4449 2320" draw:points="0,0 4449,0 4449,2320 0,2320">
          <text:p/>
        </draw:polygon>
        <draw:polygon draw:style-name="gr637" draw:text-style-name="P221" draw:layer="layout" svg:width="9.154cm" svg:height="2.319cm" svg:x="10.363cm" svg:y="5.977cm" svg:viewBox="0 0 9155 2320" draw:points="0,0 9155,0 9155,2320 0,2320">
          <text:p/>
        </draw:polygon>
        <draw:polygon draw:style-name="gr637" draw:text-style-name="P221" draw:layer="layout" svg:width="5.147cm" svg:height="2.319cm" svg:x="19.517cm" svg:y="5.977cm" svg:viewBox="0 0 5148 2320" draw:points="0,0 5148,0 5148,2320 0,2320">
          <text:p/>
        </draw:polygon>
        <draw:polygon draw:style-name="gr637" draw:text-style-name="P221" draw:layer="layout" svg:width="3.025cm" svg:height="2.319cm" svg:x="24.664cm" svg:y="5.977cm" svg:viewBox="0 0 3026 2320" draw:points="0,0 3026,0 3026,2320 0,2320">
          <text:p/>
        </draw:polygon>
        <draw:polygon draw:style-name="gr637" draw:text-style-name="P221" draw:layer="layout" svg:width="2.857cm" svg:height="2.319cm" svg:x="27.689cm" svg:y="5.977cm" svg:viewBox="0 0 2858 2320" draw:points="0,0 2858,0 2858,2320 0,2320">
          <text:p/>
        </draw:polygon>
        <draw:polygon draw:style-name="gr8" draw:text-style-name="P6" draw:layer="layout" svg:width="2.418cm" svg:height="2.392cm" svg:x="3.497cm" svg:y="8.296cm" svg:viewBox="0 0 2419 2393" draw:points="0,0 2419,0 2419,2393 0,2393">
          <text:p/>
        </draw:polygon>
        <draw:polygon draw:style-name="gr638" draw:text-style-name="P222" draw:layer="layout" svg:width="4.448cm" svg:height="2.392cm" svg:x="5.915cm" svg:y="8.296cm" svg:viewBox="0 0 4449 2393" draw:points="0,0 4449,0 4449,2393 0,2393">
          <text:p/>
        </draw:polygon>
        <draw:polygon draw:style-name="gr638" draw:text-style-name="P222" draw:layer="layout" svg:width="9.154cm" svg:height="2.392cm" svg:x="10.363cm" svg:y="8.296cm" svg:viewBox="0 0 9155 2393" draw:points="0,0 9155,0 9155,2393 0,2393">
          <text:p/>
        </draw:polygon>
        <draw:polygon draw:style-name="gr638" draw:text-style-name="P222" draw:layer="layout" svg:width="5.147cm" svg:height="2.392cm" svg:x="19.517cm" svg:y="8.296cm" svg:viewBox="0 0 5148 2393" draw:points="0,0 5148,0 5148,2393 0,2393">
          <text:p/>
        </draw:polygon>
        <draw:polygon draw:style-name="gr638" draw:text-style-name="P222" draw:layer="layout" svg:width="3.025cm" svg:height="2.392cm" svg:x="24.664cm" svg:y="8.296cm" svg:viewBox="0 0 3026 2393" draw:points="0,0 3026,0 3026,2393 0,2393">
          <text:p/>
        </draw:polygon>
        <draw:polygon draw:style-name="gr638" draw:text-style-name="P222" draw:layer="layout" svg:width="2.857cm" svg:height="2.392cm" svg:x="27.689cm" svg:y="8.296cm" svg:viewBox="0 0 2858 2393" draw:points="0,0 2858,0 2858,2393 0,2393">
          <text:p/>
        </draw:polygon>
        <draw:polygon draw:style-name="gr8" draw:text-style-name="P6" draw:layer="layout" svg:width="2.418cm" svg:height="3.405cm" svg:x="3.497cm" svg:y="10.688cm" svg:viewBox="0 0 2419 3406" draw:points="0,0 2419,0 2419,3406 0,3406">
          <text:p/>
        </draw:polygon>
        <draw:polygon draw:style-name="gr637" draw:text-style-name="P221" draw:layer="layout" svg:width="4.448cm" svg:height="3.405cm" svg:x="5.915cm" svg:y="10.688cm" svg:viewBox="0 0 4449 3406" draw:points="0,0 4449,0 4449,3406 0,3406">
          <text:p/>
        </draw:polygon>
        <draw:polygon draw:style-name="gr637" draw:text-style-name="P221" draw:layer="layout" svg:width="9.154cm" svg:height="3.405cm" svg:x="10.363cm" svg:y="10.688cm" svg:viewBox="0 0 9155 3406" draw:points="0,0 9155,0 9155,3406 0,3406">
          <text:p/>
        </draw:polygon>
        <draw:polygon draw:style-name="gr637" draw:text-style-name="P221" draw:layer="layout" svg:width="5.147cm" svg:height="3.405cm" svg:x="19.517cm" svg:y="10.688cm" svg:viewBox="0 0 5148 3406" draw:points="0,0 5148,0 5148,3406 0,3406">
          <text:p/>
        </draw:polygon>
        <draw:polygon draw:style-name="gr637" draw:text-style-name="P221" draw:layer="layout" svg:width="3.025cm" svg:height="3.405cm" svg:x="24.664cm" svg:y="10.688cm" svg:viewBox="0 0 3026 3406" draw:points="0,0 3026,0 3026,3406 0,3406">
          <text:p/>
        </draw:polygon>
        <draw:polygon draw:style-name="gr637" draw:text-style-name="P221" draw:layer="layout" svg:width="2.857cm" svg:height="3.405cm" svg:x="27.689cm" svg:y="10.688cm" svg:viewBox="0 0 2858 3406" draw:points="0,0 2858,0 2858,3406 0,3406">
          <text:p/>
        </draw:polygon>
        <draw:polygon draw:style-name="gr8" draw:text-style-name="P6" draw:layer="layout" svg:width="2.418cm" svg:height="3.94cm" svg:x="3.497cm" svg:y="14.093cm" svg:viewBox="0 0 2419 3941" draw:points="0,0 2419,0 2419,3941 0,3941">
          <text:p/>
        </draw:polygon>
        <draw:polygon draw:style-name="gr638" draw:text-style-name="P222" draw:layer="layout" svg:width="4.448cm" svg:height="3.94cm" svg:x="5.915cm" svg:y="14.093cm" svg:viewBox="0 0 4449 3941" draw:points="0,0 4449,0 4449,3941 0,3941">
          <text:p/>
        </draw:polygon>
        <draw:polygon draw:style-name="gr638" draw:text-style-name="P222" draw:layer="layout" svg:width="9.154cm" svg:height="3.94cm" svg:x="10.363cm" svg:y="14.093cm" svg:viewBox="0 0 9155 3941" draw:points="0,0 9155,0 9155,3941 0,3941">
          <text:p/>
        </draw:polygon>
        <draw:polygon draw:style-name="gr638" draw:text-style-name="P222" draw:layer="layout" svg:width="5.147cm" svg:height="3.94cm" svg:x="19.517cm" svg:y="14.093cm" svg:viewBox="0 0 5148 3941" draw:points="0,0 5148,0 5148,3941 0,3941">
          <text:p/>
        </draw:polygon>
        <draw:polygon draw:style-name="gr638" draw:text-style-name="P222" draw:layer="layout" svg:width="3.025cm" svg:height="3.94cm" svg:x="24.664cm" svg:y="14.093cm" svg:viewBox="0 0 3026 3941" draw:points="0,0 3026,0 3026,3941 0,3941">
          <text:p/>
        </draw:polygon>
        <draw:polygon draw:style-name="gr638" draw:text-style-name="P222" draw:layer="layout" svg:width="2.857cm" svg:height="3.94cm" svg:x="27.689cm" svg:y="14.093cm" svg:viewBox="0 0 2858 3941" draw:points="0,0 2858,0 2858,3941 0,3941">
          <text:p/>
        </draw:polygon>
        <draw:line draw:style-name="gr639" draw:text-style-name="P2" draw:layer="layout" svg:x1="5.915cm" svg:y1="4.184cm" svg:x2="5.915cm" svg:y2="18.05cm">
          <text:p/>
        </draw:line>
        <draw:line draw:style-name="gr639" draw:text-style-name="P2" draw:layer="layout" svg:x1="10.363cm" svg:y1="4.184cm" svg:x2="10.363cm" svg:y2="18.05cm">
          <text:p/>
        </draw:line>
        <draw:line draw:style-name="gr639" draw:text-style-name="P2" draw:layer="layout" svg:x1="19.517cm" svg:y1="4.184cm" svg:x2="19.517cm" svg:y2="18.05cm">
          <text:p/>
        </draw:line>
        <draw:line draw:style-name="gr639" draw:text-style-name="P2" draw:layer="layout" svg:x1="24.664cm" svg:y1="4.184cm" svg:x2="24.664cm" svg:y2="18.05cm">
          <text:p/>
        </draw:line>
        <draw:line draw:style-name="gr639" draw:text-style-name="P2" draw:layer="layout" svg:x1="27.689cm" svg:y1="4.184cm" svg:x2="27.689cm" svg:y2="18.05cm">
          <text:p/>
        </draw:line>
        <draw:line draw:style-name="gr640" draw:text-style-name="P2" draw:layer="layout" svg:x1="3.48cm" svg:y1="5.977cm" svg:x2="30.564cm" svg:y2="5.977cm">
          <text:p/>
        </draw:line>
        <draw:line draw:style-name="gr639" draw:text-style-name="P2" draw:layer="layout" svg:x1="3.48cm" svg:y1="8.296cm" svg:x2="30.564cm" svg:y2="8.296cm">
          <text:p/>
        </draw:line>
        <draw:line draw:style-name="gr639" draw:text-style-name="P2" draw:layer="layout" svg:x1="3.48cm" svg:y1="10.688cm" svg:x2="30.564cm" svg:y2="10.688cm">
          <text:p/>
        </draw:line>
        <draw:line draw:style-name="gr639" draw:text-style-name="P2" draw:layer="layout" svg:x1="3.48cm" svg:y1="14.093cm" svg:x2="30.564cm" svg:y2="14.093cm">
          <text:p/>
        </draw:line>
        <draw:line draw:style-name="gr639" draw:text-style-name="P2" draw:layer="layout" svg:x1="3.497cm" svg:y1="4.184cm" svg:x2="3.497cm" svg:y2="18.05cm">
          <text:p/>
        </draw:line>
        <draw:line draw:style-name="gr639" draw:text-style-name="P2" draw:layer="layout" svg:x1="30.546cm" svg:y1="4.184cm" svg:x2="30.546cm" svg:y2="18.05cm">
          <text:p/>
        </draw:line>
        <draw:line draw:style-name="gr639" draw:text-style-name="P2" draw:layer="layout" svg:x1="3.48cm" svg:y1="4.202cm" svg:x2="30.564cm" svg:y2="4.202cm">
          <text:p/>
        </draw:line>
        <draw:line draw:style-name="gr639" draw:text-style-name="P2" draw:layer="layout" svg:x1="3.48cm" svg:y1="18.033cm" svg:x2="30.564cm" svg:y2="18.033cm">
          <text:p/>
        </draw:line>
        <draw:frame draw:style-name="gr685" draw:text-style-name="P9" draw:layer="layout" svg:width="1.885cm" svg:height="1.309cm" svg:x="0.899cm" svg:y="1.518cm">
          <draw:text-box>
            <text:p text:style-name="P3"><text:span text:style-name="T7">SLA</text:span></text:p>
          </draw:text-box>
        </draw:frame>
        <draw:frame draw:style-name="gr686" draw:text-style-name="P14" draw:layer="layout" svg:width="1.485cm" svg:height="0.399cm" svg:x="4.141cm" svg:y="4.892cm">
          <draw:text-box>
            <text:p text:style-name="P3"><text:span text:style-name="T55">Severity </text:span></text:p>
          </draw:text-box>
        </draw:frame>
        <draw:frame draw:style-name="gr687" draw:text-style-name="P14" draw:layer="layout" svg:width="3.124cm" svg:height="0.399cm" svg:x="6.671cm" svg:y="4.892cm">
          <draw:text-box>
            <text:p text:style-name="P3"><text:span text:style-name="T55">Incident Involving </text:span></text:p>
          </draw:text-box>
        </draw:frame>
        <draw:frame draw:style-name="gr688" draw:text-style-name="P14" draw:layer="layout" svg:width="2.413cm" svg:height="0.399cm" svg:x="13.786cm" svg:y="4.892cm">
          <draw:text-box>
            <text:p text:style-name="P3"><text:span text:style-name="T55">Impact Scope </text:span></text:p>
          </draw:text-box>
        </draw:frame>
        <draw:frame draw:style-name="gr689" draw:text-style-name="P14" draw:layer="layout" svg:width="4.369cm" svg:height="0.399cm" svg:x="19.97cm" svg:y="4.896cm">
          <draw:text-box>
            <text:p text:style-name="P3"><text:span text:style-name="T55">Target first response time</text:span></text:p>
          </draw:text-box>
        </draw:frame>
        <draw:frame draw:style-name="gr690" draw:text-style-name="P14" draw:layer="layout" svg:width="1.938cm" svg:height="0.399cm" svg:x="25.33cm" svg:y="4.471cm">
          <draw:text-box>
            <text:p text:style-name="P3"><text:span text:style-name="T55">Resolution </text:span></text:p>
          </draw:text-box>
        </draw:frame>
        <draw:frame draw:style-name="gr691" draw:text-style-name="P14" draw:layer="layout" svg:width="0.832cm" svg:height="0.399cm" svg:x="25.745cm" svg:y="5.31cm">
          <draw:text-box>
            <text:p text:style-name="P3"><text:span text:style-name="T55">Time</text:span></text:p>
          </draw:text-box>
        </draw:frame>
        <draw:frame draw:style-name="gr692" draw:text-style-name="P14" draw:layer="layout" svg:width="1.504cm" svg:height="0.399cm" svg:x="28.364cm" svg:y="4.892cm">
          <draw:text-box>
            <text:p text:style-name="P3"><text:span text:style-name="T55">% Target</text:span></text:p>
          </draw:text-box>
        </draw:frame>
        <draw:frame draw:style-name="gr648" draw:text-style-name="P100" draw:layer="layout" svg:width="0.388cm" svg:height="0.442cm" svg:x="4.607cm" svg:y="6.92cm">
          <draw:text-box>
            <text:p text:style-name="P3"><text:span text:style-name="T50">1 </text:span></text:p>
          </draw:text-box>
        </draw:frame>
        <draw:frame draw:style-name="gr181" draw:text-style-name="P105" draw:layer="layout" svg:width="1.461cm" svg:height="0.475cm" svg:x="7.501cm" svg:y="6.07cm">
          <draw:text-box>
            <text:p text:style-name="P3"><text:span text:style-name="T21">Severe </text:span></text:p>
          </draw:text-box>
        </draw:frame>
        <draw:frame draw:style-name="gr506" draw:text-style-name="P105" draw:layer="layout" svg:width="1.837cm" svg:height="0.475cm" svg:x="7.314cm" svg:y="6.611cm">
          <draw:text-box>
            <text:p text:style-name="P3"><text:span text:style-name="T21">Business </text:span></text:p>
          </draw:text-box>
        </draw:frame>
        <draw:frame draw:style-name="gr693" draw:text-style-name="P105" draw:layer="layout" svg:width="1.39cm" svg:height="0.475cm" svg:x="7.552cm" svg:y="7.163cm">
          <draw:text-box>
            <text:p text:style-name="P3"><text:span text:style-name="T21">Impact </text:span></text:p>
          </draw:text-box>
        </draw:frame>
        <draw:frame draw:style-name="gr694" draw:text-style-name="P105" draw:layer="layout" svg:width="7.672cm" svg:height="0.475cm" svg:x="10.797cm" svg:y="6.087cm">
          <draw:text-box>
            <text:p text:style-name="P3"><text:span text:style-name="T21">There is a critical system outage caused </text:span></text:p>
          </draw:text-box>
        </draw:frame>
        <draw:frame draw:style-name="gr693" draw:text-style-name="P105" draw:layer="layout" svg:width="1.39cm" svg:height="0.475cm" svg:x="11.008cm" svg:y="6.645cm">
          <draw:text-box>
            <text:p text:style-name="P3"><text:span text:style-name="T21">severe </text:span></text:p>
          </draw:text-box>
        </draw:frame>
        <draw:frame draw:style-name="gr695" draw:text-style-name="P105" draw:layer="layout" svg:width="8.685cm" svg:height="0.475cm" svg:x="10.594cm" svg:y="7.189cm">
          <draw:text-box>
            <text:p text:style-name="P3"><text:span text:style-name="T21">impact on services delivery and no alternative </text:span></text:p>
          </draw:text-box>
        </draw:frame>
        <draw:frame draw:style-name="gr314" draw:text-style-name="P105" draw:layer="layout" svg:width="4.167cm" svg:height="0.475cm" svg:x="11.068cm" svg:y="7.73cm">
          <draw:text-box>
            <text:p text:style-name="P3"><text:span text:style-name="T21">or bypass is available </text:span></text:p>
          </draw:text-box>
        </draw:frame>
        <draw:frame draw:style-name="gr696" draw:text-style-name="P105" draw:layer="layout" svg:width="2.778cm" svg:height="0.475cm" svg:x="20.733cm" svg:y="6.07cm">
          <draw:text-box>
            <text:p text:style-name="P3"><text:span text:style-name="T21">Within 30 mins</text:span></text:p>
          </draw:text-box>
        </draw:frame>
        <draw:frame draw:style-name="gr697" draw:text-style-name="P105" draw:layer="layout" svg:width="1.532cm" svg:height="0.475cm" svg:x="25.457cm" svg:y="6.07cm">
          <draw:text-box>
            <text:p text:style-name="P3"><text:span text:style-name="T21">2 hours </text:span></text:p>
          </draw:text-box>
        </draw:frame>
        <draw:frame draw:style-name="gr698" draw:text-style-name="P105" draw:layer="layout" svg:width="0.967cm" svg:height="0.475cm" svg:x="28.694cm" svg:y="6.07cm">
          <draw:text-box>
            <text:p text:style-name="P3"><text:span text:style-name="T21">95% </text:span></text:p>
          </draw:text-box>
        </draw:frame>
        <draw:frame draw:style-name="gr656" draw:text-style-name="P100" draw:layer="layout" svg:width="0.389cm" svg:height="0.442cm" svg:x="4.607cm" svg:y="10.166cm">
          <draw:text-box>
            <text:p text:style-name="P3"><text:span text:style-name="T50">2 </text:span></text:p>
          </draw:text-box>
        </draw:frame>
        <draw:frame draw:style-name="gr699" draw:text-style-name="P105" draw:layer="layout" svg:width="1.178cm" svg:height="0.475cm" svg:x="7.653cm" svg:y="8.39cm">
          <draw:text-box>
            <text:p text:style-name="P3"><text:span text:style-name="T21">Major </text:span></text:p>
          </draw:text-box>
        </draw:frame>
        <draw:frame draw:style-name="gr506" draw:text-style-name="P105" draw:layer="layout" svg:width="1.837cm" svg:height="0.475cm" svg:x="7.314cm" svg:y="8.932cm">
          <draw:text-box>
            <text:p text:style-name="P3"><text:span text:style-name="T21">Business </text:span></text:p>
          </draw:text-box>
        </draw:frame>
        <draw:frame draw:style-name="gr693" draw:text-style-name="P105" draw:layer="layout" svg:width="1.39cm" svg:height="0.475cm" svg:x="7.552cm" svg:y="9.482cm">
          <draw:text-box>
            <text:p text:style-name="P3"><text:span text:style-name="T21">Impact </text:span></text:p>
          </draw:text-box>
        </draw:frame>
        <draw:frame draw:style-name="gr700" draw:text-style-name="P105" draw:layer="layout" svg:width="8.401cm" svg:height="0.475cm" svg:x="10.797cm" svg:y="8.399cm">
          <draw:text-box>
            <text:p text:style-name="P3"><text:span text:style-name="T21">There is a critical system degraded or with a </text:span></text:p>
          </draw:text-box>
        </draw:frame>
        <draw:frame draw:style-name="gr701" draw:text-style-name="P105" draw:layer="layout" svg:width="8.308cm" svg:height="0.475cm" svg:x="10.61cm" svg:y="8.957cm">
          <draw:text-box>
            <text:p text:style-name="P3"><text:span text:style-name="T21">potential severe impact on services delivery </text:span></text:p>
          </draw:text-box>
        </draw:frame>
        <draw:frame draw:style-name="gr507" draw:text-style-name="P105" draw:layer="layout" svg:width="1.414cm" svg:height="0.475cm" svg:x="10.839cm" svg:y="9.515cm">
          <draw:text-box>
            <text:p text:style-name="P3"><text:span text:style-name="T21">and no </text:span></text:p>
          </draw:text-box>
        </draw:frame>
        <draw:frame draw:style-name="gr702" draw:text-style-name="P105" draw:layer="layout" svg:width="8.403cm" svg:height="0.475cm" svg:x="10.441cm" svg:y="10.067cm">
          <draw:text-box>
            <text:p text:style-name="P3"><text:span text:style-name="T21">acceptable alternative or bypass is available </text:span></text:p>
          </draw:text-box>
        </draw:frame>
        <draw:frame draw:style-name="gr696" draw:text-style-name="P105" draw:layer="layout" svg:width="2.778cm" svg:height="0.475cm" svg:x="20.733cm" svg:y="8.39cm">
          <draw:text-box>
            <text:p text:style-name="P3"><text:span text:style-name="T21">Within 60 mins</text:span></text:p>
          </draw:text-box>
        </draw:frame>
        <draw:frame draw:style-name="gr697" draw:text-style-name="P105" draw:layer="layout" svg:width="1.532cm" svg:height="0.475cm" svg:x="25.457cm" svg:y="8.39cm">
          <draw:text-box>
            <text:p text:style-name="P3"><text:span text:style-name="T21">4 hours </text:span></text:p>
          </draw:text-box>
        </draw:frame>
        <draw:frame draw:style-name="gr698" draw:text-style-name="P105" draw:layer="layout" svg:width="0.967cm" svg:height="0.475cm" svg:x="28.694cm" svg:y="8.39cm">
          <draw:text-box>
            <text:p text:style-name="P3"><text:span text:style-name="T21">95% </text:span></text:p>
          </draw:text-box>
        </draw:frame>
        <draw:frame draw:style-name="gr648" draw:text-style-name="P100" draw:layer="layout" svg:width="0.388cm" svg:height="0.442cm" svg:x="4.607cm" svg:y="12.176cm">
          <draw:text-box>
            <text:p text:style-name="P3"><text:span text:style-name="T50">3 </text:span></text:p>
          </draw:text-box>
        </draw:frame>
        <draw:frame draw:style-name="gr699" draw:text-style-name="P105" draw:layer="layout" svg:width="1.178cm" svg:height="0.475cm" svg:x="7.636cm" svg:y="10.783cm">
          <draw:text-box>
            <text:p text:style-name="P3"><text:span text:style-name="T21">Minor </text:span></text:p>
          </draw:text-box>
        </draw:frame>
        <draw:frame draw:style-name="gr506" draw:text-style-name="P105" draw:layer="layout" svg:width="1.837cm" svg:height="0.475cm" svg:x="7.314cm" svg:y="11.325cm">
          <draw:text-box>
            <text:p text:style-name="P3"><text:span text:style-name="T21">Business </text:span></text:p>
          </draw:text-box>
        </draw:frame>
        <draw:frame draw:style-name="gr693" draw:text-style-name="P105" draw:layer="layout" svg:width="1.39cm" svg:height="0.475cm" svg:x="7.552cm" svg:y="11.875cm">
          <draw:text-box>
            <text:p text:style-name="P3"><text:span text:style-name="T21">Impact </text:span></text:p>
          </draw:text-box>
        </draw:frame>
        <draw:frame draw:style-name="gr703" draw:text-style-name="P105" draw:layer="layout" svg:width="8.331cm" svg:height="0.475cm" svg:x="10.814cm" svg:y="10.791cm">
          <draw:text-box>
            <text:p text:style-name="P3"><text:span text:style-name="T21">A non-critical system, or procedure is down, </text:span></text:p>
          </draw:text-box>
        </draw:frame>
        <draw:frame draw:style-name="gr704" draw:text-style-name="P105" draw:layer="layout" svg:width="7.061cm" svg:height="0.475cm" svg:x="10.61cm" svg:y="11.341cm">
          <draw:text-box>
            <text:p text:style-name="P3"><text:span text:style-name="T21">unusable or difficult to use with some </text:span></text:p>
          </draw:text-box>
        </draw:frame>
        <draw:frame draw:style-name="gr287" draw:text-style-name="P105" draw:layer="layout" svg:width="2.214cm" svg:height="0.475cm" svg:x="10.941cm" svg:y="11.9cm">
          <draw:text-box>
            <text:p text:style-name="P3"><text:span text:style-name="T21">operational </text:span></text:p>
          </draw:text-box>
        </draw:frame>
        <draw:frame draw:style-name="gr705" draw:text-style-name="P105" draw:layer="layout" svg:width="4.849cm" svg:height="0.475cm" svg:x="10.661cm" svg:y="12.443cm">
          <draw:text-box>
            <text:p text:style-name="P3"><text:span text:style-name="T21">impact, but no immediate </text:span></text:p>
          </draw:text-box>
        </draw:frame>
        <draw:frame draw:style-name="gr695" draw:text-style-name="P105" draw:layer="layout" svg:width="8.685cm" svg:height="0.475cm" svg:x="10.594cm" svg:y="12.994cm">
          <draw:text-box>
            <text:p text:style-name="P3"><text:span text:style-name="T21">impact on services delivery and an alternative </text:span></text:p>
          </draw:text-box>
        </draw:frame>
        <draw:frame draw:style-name="gr706" draw:text-style-name="P105" draw:layer="layout" svg:width="4.285cm" svg:height="0.475cm" svg:x="11.051cm" svg:y="13.535cm">
          <draw:text-box>
            <text:p text:style-name="P3"><text:span text:style-name="T21">or bypass is available. </text:span></text:p>
          </draw:text-box>
        </draw:frame>
        <draw:frame draw:style-name="gr707" draw:text-style-name="P105" draw:layer="layout" svg:width="2.449cm" svg:height="0.475cm" svg:x="20.919cm" svg:y="10.783cm">
          <draw:text-box>
            <text:p text:style-name="P3"><text:span text:style-name="T21">Within 1 day </text:span></text:p>
          </draw:text-box>
        </draw:frame>
        <draw:frame draw:style-name="gr697" draw:text-style-name="P105" draw:layer="layout" svg:width="1.532cm" svg:height="0.475cm" svg:x="25.44cm" svg:y="10.783cm">
          <draw:text-box>
            <text:p text:style-name="P3"><text:span text:style-name="T21">8 hours </text:span></text:p>
          </draw:text-box>
        </draw:frame>
        <draw:frame draw:style-name="gr698" draw:text-style-name="P105" draw:layer="layout" svg:width="0.967cm" svg:height="0.475cm" svg:x="28.694cm" svg:y="10.783cm">
          <draw:text-box>
            <text:p text:style-name="P3"><text:span text:style-name="T21">95% </text:span></text:p>
          </draw:text-box>
        </draw:frame>
        <draw:frame draw:style-name="gr656" draw:text-style-name="P100" draw:layer="layout" svg:width="0.389cm" svg:height="0.442cm" svg:x="4.607cm" svg:y="17.514cm">
          <draw:text-box>
            <text:p text:style-name="P3"><text:span text:style-name="T50">4 </text:span></text:p>
          </draw:text-box>
        </draw:frame>
        <draw:frame draw:style-name="gr708" draw:text-style-name="P105" draw:layer="layout" svg:width="2.731cm" svg:height="0.475cm" svg:x="6.076cm" svg:y="14.198cm">
          <draw:text-box>
            <text:p text:style-name="P3"><text:span text:style-name="T21">Minimal or No </text:span></text:p>
          </draw:text-box>
        </draw:frame>
        <draw:frame draw:style-name="gr709" draw:text-style-name="P105" draw:layer="layout" svg:width="1.79cm" svg:height="0.475cm" svg:x="6.55cm" svg:y="14.749cm">
          <draw:text-box>
            <text:p text:style-name="P3"><text:span text:style-name="T21">business </text:span></text:p>
          </draw:text-box>
        </draw:frame>
        <draw:frame draw:style-name="gr710" draw:text-style-name="P105" draw:layer="layout" svg:width="1.484cm" svg:height="0.475cm" svg:x="7.499cm" svg:y="15.3cm">
          <draw:text-box>
            <text:p text:style-name="P3"><text:span text:style-name="T21">impact, </text:span></text:p>
          </draw:text-box>
        </draw:frame>
        <draw:frame draw:style-name="gr708" draw:text-style-name="P105" draw:layer="layout" svg:width="2.731cm" svg:height="0.475cm" svg:x="6.152cm" svg:y="15.842cm">
          <draw:text-box>
            <text:p text:style-name="P3"><text:span text:style-name="T21">General EDW </text:span></text:p>
          </draw:text-box>
        </draw:frame>
        <draw:frame draw:style-name="gr711" draw:text-style-name="P105" draw:layer="layout" svg:width="1.531cm" svg:height="0.475cm" svg:x="7.465cm" svg:y="16.383cm">
          <draw:text-box>
            <text:p text:style-name="P3"><text:span text:style-name="T21">Service </text:span></text:p>
          </draw:text-box>
        </draw:frame>
        <draw:frame draw:style-name="gr598" draw:text-style-name="P105" draw:layer="layout" svg:width="2.19cm" svg:height="0.475cm" svg:x="7.152cm" svg:y="16.933cm">
          <draw:text-box>
            <text:p text:style-name="P3"><text:span text:style-name="T21">Request or </text:span></text:p>
          </draw:text-box>
        </draw:frame>
        <draw:frame draw:style-name="gr712" draw:text-style-name="P105" draw:layer="layout" svg:width="1.555cm" svg:height="0.475cm" svg:x="7.457cm" svg:y="17.476cm">
          <draw:text-box>
            <text:p text:style-name="P3"><text:span text:style-name="T21">Enquiry </text:span></text:p>
          </draw:text-box>
        </draw:frame>
        <draw:frame draw:style-name="gr713" draw:text-style-name="P105" draw:layer="layout" svg:width="7.626cm" svg:height="0.475cm" svg:x="10.585cm" svg:y="14.198cm">
          <draw:text-box>
            <text:p text:style-name="P3"><text:span text:style-name="T21">A procedure or component not critical to </text:span></text:p>
          </draw:text-box>
        </draw:frame>
        <draw:frame draw:style-name="gr481" draw:text-style-name="P105" draw:layer="layout" svg:width="2.495cm" svg:height="0.475cm" svg:x="10.653cm" svg:y="14.749cm">
          <draw:text-box>
            <text:p text:style-name="P3"><text:span text:style-name="T21">Customer <text:s/>is </text:span></text:p>
          </draw:text-box>
        </draw:frame>
        <draw:frame draw:style-name="gr714" draw:text-style-name="P105" draw:layer="layout" svg:width="7.979cm" svg:height="0.475cm" svg:x="10.907cm" svg:y="15.308cm">
          <draw:text-box>
            <text:p text:style-name="P3"><text:span text:style-name="T21">unstable. Alternative is available; deferred </text:span></text:p>
          </draw:text-box>
        </draw:frame>
        <draw:frame draw:style-name="gr715" draw:text-style-name="P105" draw:layer="layout" svg:width="8.732cm" svg:height="0.475cm" svg:x="10.534cm" svg:y="15.85cm">
          <draw:text-box>
            <text:p text:style-name="P3"><text:span text:style-name="T21">maintenance is acceptable. No service impact </text:span></text:p>
          </draw:text-box>
        </draw:frame>
        <draw:frame draw:style-name="gr716" draw:text-style-name="P105" draw:layer="layout" svg:width="2.331cm" svg:height="0.475cm" svg:x="19.597cm" svg:y="14.19cm">
          <draw:text-box>
            <text:p text:style-name="P3"><text:span text:style-name="T21">Within 1 day</text:span></text:p>
          </draw:text-box>
        </draw:frame>
        <draw:frame draw:style-name="gr717" draw:text-style-name="P99" draw:layer="layout" svg:width="0.278cm" svg:height="0.314cm" svg:x="22.138cm" svg:y="14.193cm">
          <draw:text-box>
            <text:p text:style-name="P3"><text:span text:style-name="T56">4 </text:span></text:p>
          </draw:text-box>
        </draw:frame>
        <draw:frame draw:style-name="gr696" draw:text-style-name="P105" draw:layer="layout" svg:width="2.778cm" svg:height="0.475cm" svg:x="24.881cm" svg:y="14.19cm">
          <draw:text-box>
            <text:p text:style-name="P3"><text:span text:style-name="T21">Next business </text:span></text:p>
          </draw:text-box>
        </draw:frame>
        <draw:frame draw:style-name="gr718" draw:text-style-name="P105" draw:layer="layout" svg:width="0.802cm" svg:height="0.475cm" svg:x="25.88cm" svg:y="14.732cm">
          <draw:text-box>
            <text:p text:style-name="P3"><text:span text:style-name="T21">day </text:span></text:p>
          </draw:text-box>
        </draw:frame>
        <draw:frame draw:style-name="gr698" draw:text-style-name="P105" draw:layer="layout" svg:width="0.967cm" svg:height="0.475cm" svg:x="28.694cm" svg:y="14.19cm">
          <draw:text-box>
            <text:p text:style-name="P3"><text:span text:style-name="T21">95% </text:span></text:p>
          </draw:text-box>
        </draw:frame>
      </draw:page>
      <draw:page draw:name="page22" draw:style-name="dp1" draw:master-page-name="master-page3">
        <draw:polygon draw:style-name="gr1" draw:text-style-name="P1" draw:layer="layout" svg:width="33.866cm" svg:height="19.049cm" svg:x="0cm" svg:y="0cm" svg:viewBox="0 0 33867 19050" draw:points="0,0 33867,0 33867,19050 0,19050">
          <text:p/>
        </draw:polygon>
        <draw:polygon draw:style-name="gr8" draw:text-style-name="P6" draw:layer="layout" svg:width="2.175cm" svg:height="0.128cm" svg:x="0cm" svg:y="3.056cm" svg:viewBox="0 0 2176 129" draw:points="0,0 2176,0 2176,129 0,129">
          <text:p/>
        </draw:polygon>
        <draw:polygon draw:style-name="gr8" draw:text-style-name="P6" draw:layer="layout" svg:width="2.011cm" svg:height="1.775cm" svg:x="1.91cm" svg:y="4.202cm" svg:viewBox="0 0 2012 1776" draw:points="0,0 2012,0 2012,1776 0,1776">
          <text:p/>
        </draw:polygon>
        <draw:polygon draw:style-name="gr8" draw:text-style-name="P6" draw:layer="layout" svg:width="11.21cm" svg:height="1.775cm" svg:x="3.921cm" svg:y="4.202cm" svg:viewBox="0 0 11211 1776" draw:points="0,0 11211,0 11211,1776 0,1776">
          <text:p/>
        </draw:polygon>
        <draw:polygon draw:style-name="gr8" draw:text-style-name="P6" draw:layer="layout" svg:width="12.157cm" svg:height="1.775cm" svg:x="15.131cm" svg:y="4.202cm" svg:viewBox="0 0 12158 1776" draw:points="0,0 12158,0 12158,1776 0,1776">
          <text:p/>
        </draw:polygon>
        <draw:polygon draw:style-name="gr8" draw:text-style-name="P6" draw:layer="layout" svg:width="3.691cm" svg:height="1.775cm" svg:x="27.288cm" svg:y="4.202cm" svg:viewBox="0 0 3692 1776" draw:points="0,0 3692,0 3692,1776 0,1776">
          <text:p/>
        </draw:polygon>
        <draw:polygon draw:style-name="gr8" draw:text-style-name="P6" draw:layer="layout" svg:width="2.011cm" svg:height="2.016cm" svg:x="1.91cm" svg:y="5.978cm" svg:viewBox="0 0 2012 2017" draw:points="0,0 2012,0 2012,2017 0,2017">
          <text:p/>
        </draw:polygon>
        <draw:polygon draw:style-name="gr637" draw:text-style-name="P221" draw:layer="layout" svg:width="11.21cm" svg:height="2.016cm" svg:x="3.921cm" svg:y="5.978cm" svg:viewBox="0 0 11211 2017" draw:points="0,0 11211,0 11211,2017 0,2017">
          <text:p/>
        </draw:polygon>
        <draw:polygon draw:style-name="gr637" draw:text-style-name="P221" draw:layer="layout" svg:width="12.157cm" svg:height="2.016cm" svg:x="15.131cm" svg:y="5.978cm" svg:viewBox="0 0 12158 2017" draw:points="0,0 12158,0 12158,2017 0,2017">
          <text:p/>
        </draw:polygon>
        <draw:polygon draw:style-name="gr637" draw:text-style-name="P221" draw:layer="layout" svg:width="3.691cm" svg:height="2.016cm" svg:x="27.288cm" svg:y="5.978cm" svg:viewBox="0 0 3692 2017" draw:points="0,0 3692,0 3692,2017 0,2017">
          <text:p/>
        </draw:polygon>
        <draw:polygon draw:style-name="gr8" draw:text-style-name="P6" draw:layer="layout" svg:width="2.011cm" svg:height="2.391cm" svg:x="1.91cm" svg:y="7.994cm" svg:viewBox="0 0 2012 2392" draw:points="0,0 2012,0 2012,2392 0,2392">
          <text:p/>
        </draw:polygon>
        <draw:polygon draw:style-name="gr638" draw:text-style-name="P222" draw:layer="layout" svg:width="11.21cm" svg:height="2.391cm" svg:x="3.921cm" svg:y="7.994cm" svg:viewBox="0 0 11211 2392" draw:points="0,0 11211,0 11211,2392 0,2392">
          <text:p/>
        </draw:polygon>
        <draw:polygon draw:style-name="gr638" draw:text-style-name="P222" draw:layer="layout" svg:width="12.157cm" svg:height="2.391cm" svg:x="15.131cm" svg:y="7.994cm" svg:viewBox="0 0 12158 2392" draw:points="0,0 12158,0 12158,2392 0,2392">
          <text:p/>
        </draw:polygon>
        <draw:polygon draw:style-name="gr638" draw:text-style-name="P222" draw:layer="layout" svg:width="3.691cm" svg:height="2.391cm" svg:x="27.288cm" svg:y="7.994cm" svg:viewBox="0 0 3692 2392" draw:points="0,0 3692,0 3692,2392 0,2392">
          <text:p/>
        </draw:polygon>
        <draw:polygon draw:style-name="gr8" draw:text-style-name="P6" draw:layer="layout" svg:width="2.011cm" svg:height="3.205cm" svg:x="1.91cm" svg:y="10.385cm" svg:viewBox="0 0 2012 3206" draw:points="0,0 2012,0 2012,3206 0,3206">
          <text:p/>
        </draw:polygon>
        <draw:polygon draw:style-name="gr637" draw:text-style-name="P221" draw:layer="layout" svg:width="11.21cm" svg:height="3.205cm" svg:x="3.921cm" svg:y="10.385cm" svg:viewBox="0 0 11211 3206" draw:points="0,0 11211,0 11211,3206 0,3206">
          <text:p/>
        </draw:polygon>
        <draw:polygon draw:style-name="gr637" draw:text-style-name="P221" draw:layer="layout" svg:width="12.157cm" svg:height="3.205cm" svg:x="15.131cm" svg:y="10.385cm" svg:viewBox="0 0 12158 3206" draw:points="0,0 12158,0 12158,3206 0,3206">
          <text:p/>
        </draw:polygon>
        <draw:polygon draw:style-name="gr637" draw:text-style-name="P221" draw:layer="layout" svg:width="3.691cm" svg:height="3.205cm" svg:x="27.288cm" svg:y="10.385cm" svg:viewBox="0 0 3692 3206" draw:points="0,0 3692,0 3692,3206 0,3206">
          <text:p/>
        </draw:polygon>
        <draw:polygon draw:style-name="gr8" draw:text-style-name="P6" draw:layer="layout" svg:width="2.011cm" svg:height="2.765cm" svg:x="1.91cm" svg:y="13.59cm" svg:viewBox="0 0 2012 2766" draw:points="0,0 2012,0 2012,2766 0,2766">
          <text:p/>
        </draw:polygon>
        <draw:polygon draw:style-name="gr638" draw:text-style-name="P222" draw:layer="layout" svg:width="11.21cm" svg:height="2.765cm" svg:x="3.921cm" svg:y="13.59cm" svg:viewBox="0 0 11211 2766" draw:points="0,0 11211,0 11211,2766 0,2766">
          <text:p/>
        </draw:polygon>
        <draw:polygon draw:style-name="gr638" draw:text-style-name="P222" draw:layer="layout" svg:width="12.157cm" svg:height="2.765cm" svg:x="15.131cm" svg:y="13.59cm" svg:viewBox="0 0 12158 2766" draw:points="0,0 12158,0 12158,2766 0,2766">
          <text:p/>
        </draw:polygon>
        <draw:polygon draw:style-name="gr638" draw:text-style-name="P222" draw:layer="layout" svg:width="3.691cm" svg:height="2.765cm" svg:x="27.288cm" svg:y="13.59cm" svg:viewBox="0 0 3692 2766" draw:points="0,0 3692,0 3692,2766 0,2766">
          <text:p/>
        </draw:polygon>
        <draw:line draw:style-name="gr639" draw:text-style-name="P2" draw:layer="layout" svg:x1="3.921cm" svg:y1="4.184cm" svg:x2="3.921cm" svg:y2="16.372cm">
          <text:p/>
        </draw:line>
        <draw:line draw:style-name="gr639" draw:text-style-name="P2" draw:layer="layout" svg:x1="15.131cm" svg:y1="4.184cm" svg:x2="15.131cm" svg:y2="16.372cm">
          <text:p/>
        </draw:line>
        <draw:line draw:style-name="gr639" draw:text-style-name="P2" draw:layer="layout" svg:x1="27.288cm" svg:y1="4.184cm" svg:x2="27.288cm" svg:y2="16.372cm">
          <text:p/>
        </draw:line>
        <draw:line draw:style-name="gr640" draw:text-style-name="P2" draw:layer="layout" svg:x1="1.892cm" svg:y1="5.977cm" svg:x2="30.996cm" svg:y2="5.977cm">
          <text:p/>
        </draw:line>
        <draw:line draw:style-name="gr639" draw:text-style-name="P2" draw:layer="layout" svg:x1="1.892cm" svg:y1="7.994cm" svg:x2="30.996cm" svg:y2="7.994cm">
          <text:p/>
        </draw:line>
        <draw:line draw:style-name="gr639" draw:text-style-name="P2" draw:layer="layout" svg:x1="1.892cm" svg:y1="10.385cm" svg:x2="30.996cm" svg:y2="10.385cm">
          <text:p/>
        </draw:line>
        <draw:line draw:style-name="gr639" draw:text-style-name="P2" draw:layer="layout" svg:x1="1.892cm" svg:y1="13.59cm" svg:x2="30.996cm" svg:y2="13.59cm">
          <text:p/>
        </draw:line>
        <draw:line draw:style-name="gr639" draw:text-style-name="P2" draw:layer="layout" svg:x1="1.91cm" svg:y1="4.184cm" svg:x2="1.91cm" svg:y2="16.372cm">
          <text:p/>
        </draw:line>
        <draw:line draw:style-name="gr639" draw:text-style-name="P2" draw:layer="layout" svg:x1="30.979cm" svg:y1="4.184cm" svg:x2="30.979cm" svg:y2="16.372cm">
          <text:p/>
        </draw:line>
        <draw:line draw:style-name="gr639" draw:text-style-name="P2" draw:layer="layout" svg:x1="1.892cm" svg:y1="4.202cm" svg:x2="30.996cm" svg:y2="4.202cm">
          <text:p/>
        </draw:line>
        <draw:line draw:style-name="gr639" draw:text-style-name="P2" draw:layer="layout" svg:x1="1.892cm" svg:y1="16.355cm" svg:x2="30.996cm" svg:y2="16.355cm">
          <text:p/>
        </draw:line>
        <draw:frame draw:style-name="gr719" draw:text-style-name="P9" draw:layer="layout" svg:width="11.572cm" svg:height="1.309cm" svg:x="0.899cm" svg:y="1.518cm">
          <draw:text-box>
            <text:p text:style-name="P3"><text:span text:style-name="T7">Risk </text:span><text:span text:style-name="T57">– </text:span><text:span text:style-name="T57">（</text:span><text:span text:style-name="T7">for internal</text:span><text:span text:style-name="T57">）</text:span></text:p>
          </draw:text-box>
        </draw:frame>
        <draw:frame draw:style-name="gr720" draw:text-style-name="P14" draw:layer="layout" svg:width="0.674cm" svg:height="0.399cm" svg:x="2.748cm" svg:y="4.892cm">
          <draw:text-box>
            <text:p text:style-name="P3"><text:span text:style-name="T55">No. </text:span></text:p>
          </draw:text-box>
        </draw:frame>
        <draw:frame draw:style-name="gr721" draw:text-style-name="P14" draw:layer="layout" svg:width="2.768cm" svg:height="0.399cm" svg:x="8.181cm" svg:y="4.892cm">
          <draw:text-box>
            <text:p text:style-name="P3"><text:span text:style-name="T55">Risk description</text:span></text:p>
          </draw:text-box>
        </draw:frame>
        <draw:frame draw:style-name="gr722" draw:text-style-name="P14" draw:layer="layout" svg:width="1.681cm" svg:height="0.399cm" svg:x="20.35cm" svg:y="4.892cm">
          <draw:text-box>
            <text:p text:style-name="P3"><text:span text:style-name="T55">Mitigation</text:span></text:p>
          </draw:text-box>
        </draw:frame>
        <draw:frame draw:style-name="gr723" draw:text-style-name="P14" draw:layer="layout" svg:width="1.089cm" svg:height="0.399cm" svg:x="28.633cm" svg:y="4.896cm">
          <draw:text-box>
            <text:p text:style-name="P3"><text:span text:style-name="T55">Status</text:span></text:p>
          </draw:text-box>
        </draw:frame>
        <draw:frame draw:style-name="gr648" draw:text-style-name="P100" draw:layer="layout" svg:width="0.388cm" svg:height="0.442cm" svg:x="2.816cm" svg:y="6.77cm">
          <draw:text-box>
            <text:p text:style-name="P3"><text:span text:style-name="T50">1 </text:span></text:p>
          </draw:text-box>
        </draw:frame>
        <draw:frame draw:style-name="gr724" draw:text-style-name="P4" draw:layer="layout" svg:width="10.213cm" svg:height="0.552cm" svg:x="3.997cm" svg:y="6.077cm">
          <draw:text-box>
            <text:p text:style-name="P3"><text:span text:style-name="T13">Lack of understanding of the detailed usage of </text:span></text:p>
          </draw:text-box>
        </draw:frame>
        <draw:frame draw:style-name="gr725" draw:text-style-name="P4" draw:layer="layout" svg:width="10.864cm" svg:height="0.552cm" svg:x="4.014cm" svg:y="6.711cm">
          <draw:text-box>
            <text:p text:style-name="P3"><text:span text:style-name="T13">Informatica in Client, and system information, this </text:span></text:p>
          </draw:text-box>
        </draw:frame>
        <draw:frame draw:style-name="gr726" draw:text-style-name="P4" draw:layer="layout" svg:width="8.271cm" svg:height="0.552cm" svg:x="4.014cm" svg:y="7.347cm">
          <draw:text-box>
            <text:p text:style-name="P3"><text:span text:style-name="T13">will impact our accuracy of estimation </text:span></text:p>
          </draw:text-box>
        </draw:frame>
        <draw:frame draw:style-name="gr727" draw:text-style-name="P4" draw:layer="layout" svg:width="6.826cm" svg:height="0.552cm" svg:x="15.565cm" svg:y="6.719cm">
          <draw:text-box>
            <text:p text:style-name="P3"><text:span text:style-name="T13">Put more buffer into estimation </text:span></text:p>
          </draw:text-box>
        </draw:frame>
        <draw:frame draw:style-name="gr648" draw:text-style-name="P100" draw:layer="layout" svg:width="0.388cm" svg:height="0.442cm" svg:x="2.816cm" svg:y="8.974cm">
          <draw:text-box>
            <text:p text:style-name="P3"><text:span text:style-name="T50">2 </text:span></text:p>
          </draw:text-box>
        </draw:frame>
        <draw:frame draw:style-name="gr728" draw:text-style-name="P4" draw:layer="layout" svg:width="10.838cm" svg:height="0.552cm" svg:x="3.997cm" svg:y="8.281cm">
          <draw:text-box>
            <text:p text:style-name="P3"><text:span text:style-name="T13">Can’t find Control M software, led few experience </text:span></text:p>
          </draw:text-box>
        </draw:frame>
        <draw:frame draw:style-name="gr729" draw:text-style-name="P4" draw:layer="layout" svg:width="10.455cm" svg:height="0.552cm" svg:x="4.014cm" svg:y="8.917cm">
          <draw:text-box>
            <text:p text:style-name="P3"><text:span text:style-name="T13">on Control M usage, so assume this software is </text:span></text:p>
          </draw:text-box>
        </draw:frame>
        <draw:frame draw:style-name="gr730" draw:text-style-name="P4" draw:layer="layout" svg:width="5.488cm" svg:height="0.552cm" svg:x="4.014cm" svg:y="9.552cm">
          <draw:text-box>
            <text:p text:style-name="P3"><text:span text:style-name="T13">compatible with airflow <text:s text:c="3"/></text:span></text:p>
          </draw:text-box>
        </draw:frame>
        <draw:frame draw:style-name="gr731" draw:text-style-name="P4" draw:layer="layout" svg:width="11.521cm" svg:height="0.552cm" svg:x="15.565cm" svg:y="8.596cm">
          <draw:text-box>
            <text:p text:style-name="P3"><text:span text:style-name="T13">Checked with some person who have experience on </text:span></text:p>
          </draw:text-box>
        </draw:frame>
        <draw:frame draw:style-name="gr732" draw:text-style-name="P4" draw:layer="layout" svg:width="9.392cm" svg:height="0.552cm" svg:x="15.997cm" svg:y="9.247cm">
          <draw:text-box>
            <text:p text:style-name="P3"><text:span text:style-name="T13">Control M, no comment on its tough usage </text:span></text:p>
          </draw:text-box>
        </draw:frame>
        <draw:frame draw:style-name="gr648" draw:text-style-name="P100" draw:layer="layout" svg:width="0.388cm" svg:height="0.442cm" svg:x="2.816cm" svg:y="11.774cm">
          <draw:text-box>
            <text:p text:style-name="P3"><text:span text:style-name="T50">3 </text:span></text:p>
          </draw:text-box>
        </draw:frame>
        <draw:frame draw:style-name="gr733" draw:text-style-name="P4" draw:layer="layout" svg:width="9.91cm" svg:height="0.552cm" svg:x="3.997cm" svg:y="11.081cm">
          <draw:text-box>
            <text:p text:style-name="P3"><text:span text:style-name="T13">Data testing in this project, few experience of </text:span></text:p>
          </draw:text-box>
        </draw:frame>
        <draw:frame draw:style-name="gr734" draw:text-style-name="P4" draw:layer="layout" svg:width="11.029cm" svg:height="0.552cm" svg:x="4.014cm" svg:y="11.716cm">
          <draw:text-box>
            <text:p text:style-name="P3"><text:span text:style-name="T13">Client’s <text:s/>business knowledge, this would consume </text:span></text:p>
          </draw:text-box>
        </draw:frame>
        <draw:frame draw:style-name="gr323" draw:text-style-name="P4" draw:layer="layout" svg:width="2.595cm" svg:height="0.552cm" svg:x="4.014cm" svg:y="12.35cm">
          <draw:text-box>
            <text:p text:style-name="P3"><text:span text:style-name="T13">much effort </text:span></text:p>
          </draw:text-box>
        </draw:frame>
        <draw:frame draw:style-name="gr187" draw:text-style-name="P4" draw:layer="layout" svg:width="0.491cm" svg:height="0.552cm" svg:x="15.582cm" svg:y="10.494cm">
          <draw:text-box>
            <text:p text:style-name="P3"><text:span text:style-name="T13">•</text:span></text:p>
          </draw:text-box>
        </draw:frame>
        <draw:frame draw:style-name="gr735" draw:text-style-name="P4" draw:layer="layout" svg:width="10.592cm" svg:height="0.552cm" svg:x="16.378cm" svg:y="10.494cm">
          <draw:text-box>
            <text:p text:style-name="P3"><text:span text:style-name="T13">Run informatica workflow &amp; new development in </text:span></text:p>
          </draw:text-box>
        </draw:frame>
        <draw:frame draw:style-name="gr736" draw:text-style-name="P4" draw:layer="layout" svg:width="9.447cm" svg:height="0.552cm" svg:x="16.378cm" svg:y="11.147cm">
          <draw:text-box>
            <text:p text:style-name="P3"><text:span text:style-name="T13">parallel, and check the result, <text:s/>not to check </text:span></text:p>
          </draw:text-box>
        </draw:frame>
        <draw:frame draw:style-name="gr737" draw:text-style-name="P4" draw:layer="layout" svg:width="3.087cm" svg:height="0.552cm" svg:x="16.378cm" svg:y="11.791cm">
          <draw:text-box>
            <text:p text:style-name="P3"><text:span text:style-name="T13">business logic</text:span></text:p>
          </draw:text-box>
        </draw:frame>
        <draw:frame draw:style-name="gr187" draw:text-style-name="P4" draw:layer="layout" svg:width="0.491cm" svg:height="0.552cm" svg:x="15.582cm" svg:y="12.433cm">
          <draw:text-box>
            <text:p text:style-name="P3"><text:span text:style-name="T13">•</text:span></text:p>
          </draw:text-box>
        </draw:frame>
        <draw:frame draw:style-name="gr738" draw:text-style-name="P4" draw:layer="layout" svg:width="10.184cm" svg:height="0.552cm" svg:x="16.378cm" svg:y="12.433cm">
          <draw:text-box>
            <text:p text:style-name="P3"><text:span text:style-name="T13">Persuade Client accepting the SQL conversion</text:span></text:p>
          </draw:text-box>
        </draw:frame>
        <draw:frame draw:style-name="gr648" draw:text-style-name="P100" draw:layer="layout" svg:width="0.388cm" svg:height="0.442cm" svg:x="2.816cm" svg:y="14.76cm">
          <draw:text-box>
            <text:p text:style-name="P3"><text:span text:style-name="T50">4 </text:span></text:p>
          </draw:text-box>
        </draw:frame>
        <draw:frame draw:style-name="gr739" draw:text-style-name="P4" draw:layer="layout" svg:width="9.938cm" svg:height="0.552cm" svg:x="4.082cm" svg:y="14.381cm">
          <draw:text-box>
            <text:p text:style-name="P3"><text:span text:style-name="T13">No knowledge of the complexity of their 1000 </text:span></text:p>
          </draw:text-box>
        </draw:frame>
        <draw:frame draw:style-name="gr740" draw:text-style-name="P4" draw:layer="layout" svg:width="9.966cm" svg:height="0.552cm" svg:x="4.556cm" svg:y="15.033cm">
          <draw:text-box>
            <text:p text:style-name="P3"><text:span text:style-name="T13">reports, would lead a big <text:s/>estimation deviation</text:span></text:p>
          </draw:text-box>
        </draw:frame>
        <draw:frame draw:style-name="gr186" draw:text-style-name="P4" draw:layer="layout" svg:width="0.49cm" svg:height="0.552cm" svg:x="15.354cm" svg:y="14.704cm">
          <draw:text-box>
            <text:p text:style-name="P3"><text:span text:style-name="T13">•</text:span></text:p>
          </draw:text-box>
        </draw:frame>
        <draw:frame draw:style-name="gr518" draw:text-style-name="P4" draw:layer="layout" svg:width="8.245cm" svg:height="0.552cm" svg:x="16.141cm" svg:y="14.704cm">
          <draw:text-box>
            <text:p text:style-name="P3"><text:span text:style-name="T13">a conservative estimate of work hours</text:span></text:p>
          </draw:text-box>
        </draw:frame>
      </draw:page>
      <draw:page draw:name="page23" draw:style-name="dp1" draw:master-page-name="master-page3">
        <draw:polygon draw:style-name="gr1" draw:text-style-name="P1" draw:layer="layout" svg:width="33.866cm" svg:height="19.049cm" svg:x="0cm" svg:y="0cm" svg:viewBox="0 0 33867 19050" draw:points="0,0 33867,0 33867,19050 0,19050">
          <text:p/>
        </draw:polygon>
        <draw:frame draw:style-name="gr2" draw:text-style-name="P2" draw:layer="layout" svg:width="33.866cm" svg:height="19.049cm" svg:x="0cm" svg:y="0cm">
          <draw:image xlink:href="Pictures/10000001000007D10000046675075CCA.png" xlink:type="simple" xlink:show="embed" xlink:actuate="onLoad" draw:mime-type="image/png">
            <text:p/>
          </draw:image>
        </draw:frame>
        <draw:polygon draw:style-name="gr8" draw:text-style-name="P6" draw:layer="layout" svg:width="2.175cm" svg:height="0.128cm" svg:x="0cm" svg:y="3.056cm" svg:viewBox="0 0 2176 129" draw:points="0,0 2176,0 2176,129 0,129">
          <text:p/>
        </draw:polygon>
        <draw:frame draw:style-name="gr741" draw:text-style-name="P9" draw:layer="layout" svg:width="5.995cm" svg:height="1.309cm" svg:x="0.899cm" svg:y="1.426cm">
          <draw:text-box>
            <text:p text:style-name="P3"><text:span text:style-name="T7">Assumption</text:span></text:p>
          </draw:text-box>
        </draw:frame>
        <draw:frame draw:style-name="gr742" draw:text-style-name="P224" draw:layer="layout" svg:width="2.908cm" svg:height="0.598cm" svg:x="1.607cm" svg:y="3.978cm">
          <draw:text-box>
            <text:p text:style-name="P3"><text:span text:style-name="T58">Technology </text:span></text:p>
          </draw:text-box>
        </draw:frame>
        <draw:frame draw:style-name="gr743" draw:text-style-name="P9" draw:layer="layout" svg:width="0.99cm" svg:height="1.11cm" svg:x="1.607cm" svg:y="4.26cm">
          <draw:text-box>
            <text:p text:style-name="P3"><text:span text:style-name="T59">•</text:span></text:p>
          </draw:text-box>
        </draw:frame>
        <draw:frame draw:style-name="gr744" draw:text-style-name="P105" draw:layer="layout" svg:width="8.049cm" svg:height="0.475cm" svg:x="2.311cm" svg:y="4.774cm">
          <draw:text-box>
            <text:p text:style-name="P3"><text:span text:style-name="T21">Client assign one contact point from Client </text:span></text:p>
          </draw:text-box>
        </draw:frame>
        <draw:frame draw:style-name="gr743" draw:text-style-name="P9" draw:layer="layout" svg:width="0.99cm" svg:height="1.11cm" svg:x="1.607cm" svg:y="4.869cm">
          <draw:text-box>
            <text:p text:style-name="P3"><text:span text:style-name="T59">•</text:span></text:p>
          </draw:text-box>
        </draw:frame>
        <draw:frame draw:style-name="gr745" draw:text-style-name="P105" draw:layer="layout" svg:width="14.968cm" svg:height="0.475cm" svg:x="2.311cm" svg:y="5.383cm">
          <draw:text-box>
            <text:p text:style-name="P3"><text:span text:style-name="T21">Client provide necessary technology/business training for project per application</text:span></text:p>
          </draw:text-box>
        </draw:frame>
        <draw:frame draw:style-name="gr746" draw:text-style-name="P105" draw:layer="layout" svg:width="0.425cm" svg:height="0.56cm" svg:x="17.207cm" svg:y="5.319cm">
          <draw:text-box>
            <text:p text:style-name="P3"><text:span text:style-name="T60">、</text:span></text:p>
          </draw:text-box>
        </draw:frame>
        <draw:frame draw:style-name="gr747" draw:text-style-name="P105" draw:layer="layout" svg:width="13.838cm" svg:height="0.475cm" svg:x="17.63cm" svg:y="5.383cm">
          <draw:text-box>
            <text:p text:style-name="P3"><text:span text:style-name="T21">business and workflow, help project team understand existing system well</text:span></text:p>
          </draw:text-box>
        </draw:frame>
        <draw:frame draw:style-name="gr743" draw:text-style-name="P9" draw:layer="layout" svg:width="0.99cm" svg:height="1.11cm" svg:x="1.607cm" svg:y="5.496cm">
          <draw:text-box>
            <text:p text:style-name="P3"><text:span text:style-name="T59">•</text:span></text:p>
          </draw:text-box>
        </draw:frame>
        <draw:frame draw:style-name="gr748" draw:text-style-name="P105" draw:layer="layout" svg:width="9.508cm" svg:height="0.475cm" svg:x="2.311cm" svg:y="6.009cm">
          <draw:text-box>
            <text:p text:style-name="P3"><text:span text:style-name="T21">Client provide workable testing data(have masked)</text:span></text:p>
          </draw:text-box>
        </draw:frame>
        <draw:frame draw:style-name="gr743" draw:text-style-name="P9" draw:layer="layout" svg:width="0.99cm" svg:height="1.11cm" svg:x="1.607cm" svg:y="6.116cm">
          <draw:text-box>
            <text:p text:style-name="P3"><text:span text:style-name="T59">•</text:span></text:p>
          </draw:text-box>
        </draw:frame>
        <draw:frame draw:style-name="gr749" draw:text-style-name="P105" draw:layer="layout" svg:width="16.638cm" svg:height="0.475cm" svg:x="2.311cm" svg:y="6.629cm">
          <draw:text-box>
            <text:p text:style-name="P3"><text:span text:style-name="T21">Client provide enough hardware/ software for project, include DEV/SIT/PRD environment</text:span></text:p>
          </draw:text-box>
        </draw:frame>
        <draw:frame draw:style-name="gr743" draw:text-style-name="P9" draw:layer="layout" svg:width="0.99cm" svg:height="1.11cm" svg:x="1.607cm" svg:y="6.733cm">
          <draw:text-box>
            <text:p text:style-name="P3"><text:span text:style-name="T59">•</text:span></text:p>
          </draw:text-box>
        </draw:frame>
        <draw:frame draw:style-name="gr750" draw:text-style-name="P105" draw:layer="layout" svg:width="15.32cm" svg:height="0.475cm" svg:x="2.311cm" svg:y="7.247cm">
          <draw:text-box>
            <text:p text:style-name="P3"><text:span text:style-name="T21">Client provide code standard for project team, or project team will use its standard</text:span></text:p>
          </draw:text-box>
        </draw:frame>
        <draw:frame draw:style-name="gr743" draw:text-style-name="P9" draw:layer="layout" svg:width="0.99cm" svg:height="1.11cm" svg:x="1.607cm" svg:y="7.351cm">
          <draw:text-box>
            <text:p text:style-name="P3"><text:span text:style-name="T59">•</text:span></text:p>
          </draw:text-box>
        </draw:frame>
        <draw:frame draw:style-name="gr751" draw:text-style-name="P105" draw:layer="layout" svg:width="8.662cm" svg:height="0.475cm" svg:x="2.311cm" svg:y="7.864cm">
          <draw:text-box>
            <text:p text:style-name="P3"><text:span text:style-name="T21">DbLink/gateway is not allowed in this proposal</text:span></text:p>
          </draw:text-box>
        </draw:frame>
        <draw:frame draw:style-name="gr743" draw:text-style-name="P9" draw:layer="layout" svg:width="0.99cm" svg:height="1.11cm" svg:x="1.607cm" svg:y="7.971cm">
          <draw:text-box>
            <text:p text:style-name="P3"><text:span text:style-name="T59">•</text:span></text:p>
          </draw:text-box>
        </draw:frame>
        <draw:frame draw:style-name="gr752" draw:text-style-name="P105" draw:layer="layout" svg:width="11.366cm" svg:height="0.475cm" svg:x="2.311cm" svg:y="8.484cm">
          <draw:text-box>
            <text:p text:style-name="P3"><text:span text:style-name="T21">Client provide the performance benchmark of current system</text:span></text:p>
          </draw:text-box>
        </draw:frame>
        <draw:frame draw:style-name="gr743" draw:text-style-name="P9" draw:layer="layout" svg:width="0.99cm" svg:height="1.11cm" svg:x="1.607cm" svg:y="8.589cm">
          <draw:text-box>
            <text:p text:style-name="P3"><text:span text:style-name="T59">•</text:span></text:p>
          </draw:text-box>
        </draw:frame>
        <draw:frame draw:style-name="gr753" draw:text-style-name="P105" draw:layer="layout" svg:width="17.813cm" svg:height="0.475cm" svg:x="2.311cm" svg:y="9.102cm">
          <draw:text-box>
            <text:p text:style-name="P3"><text:span text:style-name="T21">Client must tell project team before project start, If Client won’t accept what solution or software</text:span></text:p>
          </draw:text-box>
        </draw:frame>
        <draw:frame draw:style-name="gr743" draw:text-style-name="P9" draw:layer="layout" svg:width="0.99cm" svg:height="1.11cm" svg:x="1.607cm" svg:y="9.206cm">
          <draw:text-box>
            <text:p text:style-name="P3"><text:span text:style-name="T59">•</text:span></text:p>
          </draw:text-box>
        </draw:frame>
        <draw:frame draw:style-name="gr754" draw:text-style-name="P105" draw:layer="layout" svg:width="16.591cm" svg:height="0.475cm" svg:x="2.311cm" svg:y="9.72cm">
          <draw:text-box>
            <text:p text:style-name="P3"><text:span text:style-name="T21">Gientech ensure all the SQLs extract from XML, not necessary grasp all business details</text:span></text:p>
          </draw:text-box>
        </draw:frame>
        <draw:frame draw:style-name="gr743" draw:text-style-name="P9" draw:layer="layout" svg:width="0.99cm" svg:height="1.11cm" svg:x="1.607cm" svg:y="9.826cm">
          <draw:text-box>
            <text:p text:style-name="P3"><text:span text:style-name="T59">•</text:span></text:p>
          </draw:text-box>
        </draw:frame>
        <draw:frame draw:style-name="gr755" draw:text-style-name="P105" draw:layer="layout" svg:width="8.943cm" svg:height="0.475cm" svg:x="2.311cm" svg:y="10.339cm">
          <draw:text-box>
            <text:p text:style-name="P3"><text:span text:style-name="T21">Control M is the default schedule for this project</text:span></text:p>
          </draw:text-box>
        </draw:frame>
        <draw:frame draw:style-name="gr743" draw:text-style-name="P9" draw:layer="layout" svg:width="0.99cm" svg:height="1.11cm" svg:x="1.607cm" svg:y="10.444cm">
          <draw:text-box>
            <text:p text:style-name="P3"><text:span text:style-name="T59">•</text:span></text:p>
          </draw:text-box>
        </draw:frame>
        <draw:frame draw:style-name="gr756" draw:text-style-name="P105" draw:layer="layout" svg:width="20.403cm" svg:height="0.475cm" svg:x="2.311cm" svg:y="10.957cm">
          <draw:text-box>
            <text:p text:style-name="P3"><text:span text:style-name="T21">Oracle / Control M are the existing software in Client, no need to set up, or Client will handle the existing infra</text:span></text:p>
          </draw:text-box>
        </draw:frame>
        <draw:frame draw:style-name="gr743" draw:text-style-name="P9" draw:layer="layout" svg:width="0.99cm" svg:height="1.11cm" svg:x="1.607cm" svg:y="11.061cm">
          <draw:text-box>
            <text:p text:style-name="P3"><text:span text:style-name="T59">•</text:span></text:p>
          </draw:text-box>
        </draw:frame>
        <draw:frame draw:style-name="gr757" draw:text-style-name="P105" draw:layer="layout" svg:width="10.896cm" svg:height="0.475cm" svg:x="2.311cm" svg:y="11.575cm">
          <draw:text-box>
            <text:p text:style-name="P3"><text:span text:style-name="T21">Any network /firewall / infra changes will be done by Client</text:span></text:p>
          </draw:text-box>
        </draw:frame>
        <draw:frame draw:style-name="gr743" draw:text-style-name="P9" draw:layer="layout" svg:width="0.99cm" svg:height="1.11cm" svg:x="1.607cm" svg:y="11.681cm">
          <draw:text-box>
            <text:p text:style-name="P3"><text:span text:style-name="T59">•</text:span></text:p>
          </draw:text-box>
        </draw:frame>
        <draw:frame draw:style-name="gr758" draw:text-style-name="P105" draw:layer="layout" svg:width="25.274cm" svg:height="0.475cm" svg:x="2.311cm" svg:y="12.194cm">
          <draw:text-box>
            <text:p text:style-name="P3"><text:span text:style-name="T21">Any delay caused by Client(infra, process, software, hardware, business, data issue), the project schedule will be postpone accordingly</text:span></text:p>
          </draw:text-box>
        </draw:frame>
        <draw:frame draw:style-name="gr759" draw:text-style-name="P224" draw:layer="layout" svg:width="2.315cm" svg:height="0.598cm" svg:x="1.607cm" svg:y="13.685cm">
          <draw:text-box>
            <text:p text:style-name="P3"><text:span text:style-name="T58">Business </text:span></text:p>
          </draw:text-box>
        </draw:frame>
        <draw:frame draw:style-name="gr743" draw:text-style-name="P9" draw:layer="layout" svg:width="0.99cm" svg:height="1.11cm" svg:x="1.607cm" svg:y="14.255cm">
          <draw:text-box>
            <text:p text:style-name="P3"><text:span text:style-name="T59">•</text:span></text:p>
          </draw:text-box>
        </draw:frame>
        <draw:frame draw:style-name="gr760" draw:text-style-name="P225" draw:layer="layout" svg:width="18.91cm" svg:height="0.513cm" svg:x="2.404cm" svg:y="14.738cm">
          <draw:text-box>
            <text:p text:style-name="P3"><text:span text:style-name="T61">Client should have business owner participate the project, to provide support for project team </text:span></text:p>
          </draw:text-box>
        </draw:frame>
        <draw:frame draw:style-name="gr743" draw:text-style-name="P9" draw:layer="layout" svg:width="0.99cm" svg:height="1.11cm" svg:x="1.607cm" svg:y="15.245cm">
          <draw:text-box>
            <text:p text:style-name="P3"><text:span text:style-name="T59">•</text:span></text:p>
          </draw:text-box>
        </draw:frame>
        <draw:frame draw:style-name="gr761" draw:text-style-name="P4" draw:layer="layout" svg:width="14.716cm" svg:height="0.552cm" svg:x="2.404cm" svg:y="15.697cm">
          <draw:text-box>
            <text:p text:style-name="P3"><text:span text:style-name="T13">Not include any requirement or changes out of defined 1000 reports</text:span></text:p>
          </draw:text-box>
        </draw:frame>
        <draw:frame draw:style-name="gr743" draw:text-style-name="P9" draw:layer="layout" svg:width="0.99cm" svg:height="1.11cm" svg:x="1.607cm" svg:y="16.254cm">
          <draw:text-box>
            <text:p text:style-name="P3"><text:span text:style-name="T59">•</text:span></text:p>
          </draw:text-box>
        </draw:frame>
        <draw:frame draw:style-name="gr762" draw:text-style-name="P4" draw:layer="layout" svg:width="20.419cm" svg:height="0.552cm" svg:x="2.404cm" svg:y="16.707cm">
          <draw:text-box>
            <text:p text:style-name="P3"><text:span text:style-name="T13">Client confirm query/question/request within 3 days, for efficient communication and execution</text:span></text:p>
          </draw:text-box>
        </draw:frame>
      </draw:page>
      <draw:page draw:name="page24" draw:style-name="dp1" draw:master-page-name="master-page3">
        <draw:polygon draw:style-name="gr1" draw:text-style-name="P1" draw:layer="layout" svg:width="33.866cm" svg:height="19.049cm" svg:x="0cm" svg:y="0cm" svg:viewBox="0 0 33867 19050" draw:points="0,0 33867,0 33867,19050 0,19050">
          <text:p/>
        </draw:polygon>
        <draw:frame draw:style-name="gr2" draw:text-style-name="P2" draw:layer="layout" svg:width="33.866cm" svg:height="19.049cm" svg:x="0cm" svg:y="0cm">
          <draw:image xlink:href="Pictures/10000000000007D10000046614069405.jpg" xlink:type="simple" xlink:show="embed" xlink:actuate="onLoad" draw:mime-type="image/jpeg">
            <text:p/>
          </draw:image>
        </draw:frame>
        <draw:frame draw:style-name="gr763" draw:text-style-name="P12" draw:layer="layout" svg:width="8.231cm" svg:height="2.237cm" svg:x="2.384cm" svg:y="7.643cm">
          <draw:text-box>
            <text:p text:style-name="P3"><text:span text:style-name="T11">Appendix</text:span></text:p>
          </draw:text-box>
        </draw:frame>
      </draw:page>
      <draw:page draw:name="page25" draw:style-name="dp1" draw:master-page-name="master-page3">
        <draw:polygon draw:style-name="gr1" draw:text-style-name="P1" draw:layer="layout" svg:width="33.866cm" svg:height="19.049cm" svg:x="0cm" svg:y="0cm" svg:viewBox="0 0 33867 19050" draw:points="0,0 33867,0 33867,19050 0,19050">
          <text:p/>
        </draw:polygon>
        <draw:frame draw:style-name="gr2" draw:text-style-name="P2" draw:layer="layout" svg:width="33.866cm" svg:height="19.049cm" svg:x="0cm" svg:y="0cm">
          <draw:image xlink:href="Pictures/10000001000007D100000466F7E8660E.png" xlink:type="simple" xlink:show="embed" xlink:actuate="onLoad" draw:mime-type="image/png">
            <text:p/>
          </draw:image>
        </draw:frame>
        <draw:frame draw:style-name="gr764" draw:text-style-name="P4" draw:layer="layout" svg:width="2.457cm" svg:height="0.649cm" svg:x="2.384cm" svg:y="17.027cm">
          <draw:text-box>
            <text:p text:style-name="P3"><text:span text:style-name="T1">销售热线：</text:span></text:p>
          </draw:text-box>
        </draw:frame>
        <draw:path draw:style-name="gr1" draw:text-style-name="P1" draw:layer="layout" svg:width="11.235cm" svg:height="5.757cm" svg:x="0cm" svg:y="0cm" svg:viewBox="0 0 11236 5758" svg:d="M0 0h11236l-5320 5320c-584 584-1529 584-2112 0l-3804-3805z">
          <text:p/>
        </draw:path>
        <draw:frame draw:style-name="gr765" draw:text-style-name="P4" draw:layer="layout" svg:width="3.06cm" svg:height="0.552cm" svg:x="4.84cm" svg:y="17.102cm">
          <draw:text-box>
            <text:p text:style-name="P3"><text:span text:style-name="T62">400-020-9900</text:span></text:p>
          </draw:text-box>
        </draw:frame>
        <draw:frame draw:style-name="gr766" draw:text-style-name="P226" draw:layer="layout" svg:width="10.183cm" svg:height="2.516cm" svg:x="12.04cm" svg:y="7.838cm">
          <draw:text-box>
            <text:p text:style-name="P3"><text:span text:style-name="T63">Thank You</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ce style:name="Noto Sans" svg:font-family="'Noto Sans'" style:font-family-generic="roman" style:font-pitch="variable"/>
    <style:font-face style:name="Noto Sans SC" svg:font-family="'Noto Sans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ingdings" svg:font-family="Wingdings"/>
    <style:font-face style:name="微软雅黑" svg:font-family="微软雅黑"/>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stroke-dash644" draw:style="rect" draw:dots1="1" draw:dots1-length="0.101cm" draw:distance="0.076cm"/>
    <draw:stroke-dash draw:name="stroke-dash723" draw:style="rect" draw:dots1="1" draw:dots1-length="0.27cm" draw:distance="0.203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HK"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33.866cm" fo:page-height="19.0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date>2026-06-11T11:54:30.300888500</dc:date>
    <meta:editing-duration>PT5M39S</meta:editing-duration>
    <meta:editing-cycles>2</meta:editing-cycles>
    <meta:generator>LibreOffice/26.2.4.2$Windows_X86_64 LibreOffice_project/0229ac93fcf0d7cbc6376066c6f35021cef002dc</meta:generator>
    <meta:document-statistic meta:object-count="2494"/>
  </office:meta>
</office:document-meta>
</file>